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gprog_t_1" table:style-name="ta1">
        <table:shapes>
          <draw:frame draw:z-index="0" draw:style-name="gr1" draw:text-style-name="P1" svg:width="15.999cm" svg:height="8.999cm" svg:x="20.527cm" svg:y="0.1cm">
            <draw:object draw:notify-on-update-of-ranges="out_gprog_t_1.A1:out_gprog_t_1.A1 out_gprog_t_1.A2:out_gprog_t_1.A401 out_gprog_t_1.B1:out_gprog_t_1.B1 out_gprog_t_1.B2:out_gprog_t_1.B401 out_gprog_t_1.A1:out_gprog_t_1.A1 out_gprog_t_1.A2:out_gprog_t_1.A401 out_gprog_t_1.C1:out_gprog_t_1.C1 out_gprog_t_1.C2:out_gprog_t_1.C401 out_gprog_t_1.A1:out_gprog_t_1.A1 out_gprog_t_1.A2:out_gprog_t_1.A401 out_gprog_t_1.E1:out_gprog_t_1.E1 out_gprog_t_1.E2:out_gprog_t_1.E401 out_gprog_t_1.A1:out_gprog_t_1.A1 out_gprog_t_1.A2:out_gprog_t_1.A401 out_gprog_t_1.F1:out_gprog_t_1.F1 out_gprog_t_1.F2:out_gprog_t_1.F401 out_gprog_t_1.A1:out_gprog_t_1.A1 out_gprog_t_1.A2:out_gprog_t_1.A401 out_gprog_t_1.H1:out_gprog_t_1.H1 out_gprog_t_1.H2:out_gprog_t_1.H401 out_gprog_t_1.A1:out_gprog_t_1.A1 out_gprog_t_1.A2:out_gprog_t_1.A401 out_gprog_t_1.I1:out_gprog_t_1.I1 out_gprog_t_1.I2:out_gprog_t_1.I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et1</text:p>
          </table:table-cell>
          <table:table-cell table:style-name="Default" office:value-type="string" calcext:value-type="string">
            <text:p>Numerical (set 1)</text:p>
          </table:table-cell>
          <table:table-cell office:value-type="string" calcext:value-type="string">
            <text:p>Surrogate (set 1)</text:p>
          </table:table-cell>
          <table:table-cell office:value-type="string" calcext:value-type="string">
            <text:p>set2</text:p>
          </table:table-cell>
          <table:table-cell table:style-name="Default" office:value-type="string" calcext:value-type="string">
            <text:p>Numerical (set 2)</text:p>
          </table:table-cell>
          <table:table-cell office:value-type="string" calcext:value-type="string">
            <text:p>Surrogate (set 2)</text:p>
          </table:table-cell>
          <table:table-cell office:value-type="string" calcext:value-type="string">
            <text:p>set4</text:p>
          </table:table-cell>
          <table:table-cell table:style-name="Default" office:value-type="string" calcext:value-type="string">
            <text:p>Numerical (set 4)</text:p>
          </table:table-cell>
          <table:table-cell office:value-type="string" calcext:value-type="string">
            <text:p>Surrogate (set 4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410377" calcext:value-type="float">
            <text:p>4,10E-06</text:p>
          </table:table-cell>
          <table:table-cell office:value-type="float" office:value="0.0001702" calcext:value-type="float">
            <text:p>0,0001702</text:p>
          </table:table-cell>
          <table:table-cell/>
          <table:table-cell office:value-type="float" office:value="0.0000069587" calcext:value-type="float">
            <text:p>6,96E-06</text:p>
          </table:table-cell>
          <table:table-cell office:value-type="float" office:value="0.000731008" calcext:value-type="float">
            <text:p>0,000731008</text:p>
          </table:table-cell>
          <table:table-cell/>
          <table:table-cell office:value-type="float" office:value="0.0000455219" calcext:value-type="float">
            <text:p>4,55E-05</text:p>
          </table:table-cell>
          <table:table-cell office:value-type="float" office:value="0.000533081" calcext:value-type="float">
            <text:p>0,000533081</text:p>
          </table:table-cell>
        </table:table-row>
        <table:table-row table:style-name="ro1">
          <table:table-cell table:formula="of:=[.A2]+0.025" office:value-type="float" office:value="0.025" calcext:value-type="float">
            <text:p>0,025</text:p>
          </table:table-cell>
          <table:table-cell table:style-name="Default" office:value-type="float" office:value="0.000204642" calcext:value-type="float">
            <text:p>0,000204642</text:p>
          </table:table-cell>
          <table:table-cell office:value-type="float" office:value="0.000353696" calcext:value-type="float">
            <text:p>0,000353696</text:p>
          </table:table-cell>
          <table:table-cell/>
          <table:table-cell table:style-name="Default" office:value-type="float" office:value="0.000320364" calcext:value-type="float">
            <text:p>0,000320364</text:p>
          </table:table-cell>
          <table:table-cell office:value-type="float" office:value="0.0020268" calcext:value-type="float">
            <text:p>0,0020268</text:p>
          </table:table-cell>
          <table:table-cell/>
          <table:table-cell table:style-name="Default" office:value-type="float" office:value="0.000699046" calcext:value-type="float">
            <text:p>0,000699046</text:p>
          </table:table-cell>
          <table:table-cell office:value-type="float" office:value="0.000405963" calcext:value-type="float">
            <text:p>0,000405963</text:p>
          </table:table-cell>
        </table:table-row>
        <table:table-row table:style-name="ro1">
          <table:table-cell table:formula="of:=[.A3]+0.025" office:value-type="float" office:value="0.05" calcext:value-type="float">
            <text:p>0,05</text:p>
          </table:table-cell>
          <table:table-cell table:style-name="Default" office:value-type="float" office:value="0.000553405" calcext:value-type="float">
            <text:p>0,000553405</text:p>
          </table:table-cell>
          <table:table-cell office:value-type="float" office:value="0.000678039" calcext:value-type="float">
            <text:p>0,000678039</text:p>
          </table:table-cell>
          <table:table-cell/>
          <table:table-cell table:style-name="Default" office:value-type="float" office:value="0.00106181" calcext:value-type="float">
            <text:p>0,00106181</text:p>
          </table:table-cell>
          <table:table-cell office:value-type="float" office:value="0.00413081" calcext:value-type="float">
            <text:p>0,00413081</text:p>
          </table:table-cell>
          <table:table-cell/>
          <table:table-cell table:style-name="Default" office:value-type="float" office:value="0.00122404" calcext:value-type="float">
            <text:p>0,00122404</text:p>
          </table:table-cell>
          <table:table-cell office:value-type="float" office:value="0.000479465" calcext:value-type="float">
            <text:p>0,000479465</text:p>
          </table:table-cell>
        </table:table-row>
        <table:table-row table:style-name="ro1">
          <table:table-cell table:formula="of:=[.A4]+0.025" office:value-type="float" office:value="0.075" calcext:value-type="float">
            <text:p>0,075</text:p>
          </table:table-cell>
          <table:table-cell table:style-name="Default" office:value-type="float" office:value="0.00105267" calcext:value-type="float">
            <text:p>0,00105267</text:p>
          </table:table-cell>
          <table:table-cell office:value-type="float" office:value="0.00112993" calcext:value-type="float">
            <text:p>0,00112993</text:p>
          </table:table-cell>
          <table:table-cell/>
          <table:table-cell table:style-name="Default" office:value-type="float" office:value="0.00243339" calcext:value-type="float">
            <text:p>0,00243339</text:p>
          </table:table-cell>
          <table:table-cell office:value-type="float" office:value="0.00677914" calcext:value-type="float">
            <text:p>0,00677914</text:p>
          </table:table-cell>
          <table:table-cell/>
          <table:table-cell table:style-name="Default" office:value-type="float" office:value="0.00170005" calcext:value-type="float">
            <text:p>0,00170005</text:p>
          </table:table-cell>
          <table:table-cell office:value-type="float" office:value="0.000577454" calcext:value-type="float">
            <text:p>0,000577454</text:p>
          </table:table-cell>
        </table:table-row>
        <table:table-row table:style-name="ro1">
          <table:table-cell table:formula="of:=[.A5]+0.025" office:value-type="float" office:value="0.1" calcext:value-type="float">
            <text:p>0,1</text:p>
          </table:table-cell>
          <table:table-cell table:style-name="Default" office:value-type="float" office:value="0.00171204" calcext:value-type="float">
            <text:p>0,00171204</text:p>
          </table:table-cell>
          <table:table-cell office:value-type="float" office:value="0.00169743" calcext:value-type="float">
            <text:p>0,00169743</text:p>
          </table:table-cell>
          <table:table-cell/>
          <table:table-cell table:style-name="Default" office:value-type="float" office:value="0.00442374" calcext:value-type="float">
            <text:p>0,00442374</text:p>
          </table:table-cell>
          <table:table-cell office:value-type="float" office:value="0.00977446" calcext:value-type="float">
            <text:p>0,00977446</text:p>
          </table:table-cell>
          <table:table-cell/>
          <table:table-cell table:style-name="Default" office:value-type="float" office:value="0.00214144" calcext:value-type="float">
            <text:p>0,00214144</text:p>
          </table:table-cell>
          <table:table-cell office:value-type="float" office:value="0.000682859" calcext:value-type="float">
            <text:p>0,000682859</text:p>
          </table:table-cell>
        </table:table-row>
        <table:table-row table:style-name="ro1">
          <table:table-cell table:formula="of:=[.A6]+0.025" office:value-type="float" office:value="0.125" calcext:value-type="float">
            <text:p>0,125</text:p>
          </table:table-cell>
          <table:table-cell table:style-name="Default" office:value-type="float" office:value="0.00253172" calcext:value-type="float">
            <text:p>0,00253172</text:p>
          </table:table-cell>
          <table:table-cell office:value-type="float" office:value="0.00236667" calcext:value-type="float">
            <text:p>0,00236667</text:p>
          </table:table-cell>
          <table:table-cell/>
          <table:table-cell table:style-name="Default" office:value-type="float" office:value="0.00692442" calcext:value-type="float">
            <text:p>0,00692442</text:p>
          </table:table-cell>
          <table:table-cell office:value-type="float" office:value="0.0130005" calcext:value-type="float">
            <text:p>0,0130005</text:p>
          </table:table-cell>
          <table:table-cell/>
          <table:table-cell table:style-name="Default" office:value-type="float" office:value="0.0025552" calcext:value-type="float">
            <text:p>0,0025552</text:p>
          </table:table-cell>
          <table:table-cell office:value-type="float" office:value="0.000791967" calcext:value-type="float">
            <text:p>0,000791967</text:p>
          </table:table-cell>
        </table:table-row>
        <table:table-row table:style-name="ro1">
          <table:table-cell table:formula="of:=[.A7]+0.025" office:value-type="float" office:value="0.15" calcext:value-type="float">
            <text:p>0,15</text:p>
          </table:table-cell>
          <table:table-cell table:style-name="Default" office:value-type="float" office:value="0.00350109" calcext:value-type="float">
            <text:p>0,00350109</text:p>
          </table:table-cell>
          <table:table-cell office:value-type="float" office:value="0.00312405" calcext:value-type="float">
            <text:p>0,00312405</text:p>
          </table:table-cell>
          <table:table-cell/>
          <table:table-cell table:style-name="Default" office:value-type="float" office:value="0.00981515" calcext:value-type="float">
            <text:p>0,00981515</text:p>
          </table:table-cell>
          <table:table-cell office:value-type="float" office:value="0.0163927" calcext:value-type="float">
            <text:p>0,0163927</text:p>
          </table:table-cell>
          <table:table-cell/>
          <table:table-cell table:style-name="Default" office:value-type="float" office:value="0.00294569" calcext:value-type="float">
            <text:p>0,00294569</text:p>
          </table:table-cell>
          <table:table-cell office:value-type="float" office:value="0.000903207" calcext:value-type="float">
            <text:p>0,000903207</text:p>
          </table:table-cell>
        </table:table-row>
        <table:table-row table:style-name="ro1">
          <table:table-cell table:formula="of:=[.A8]+0.025" office:value-type="float" office:value="0.175" calcext:value-type="float">
            <text:p>0,175</text:p>
          </table:table-cell>
          <table:table-cell table:style-name="Default" office:value-type="float" office:value="0.00460214" calcext:value-type="float">
            <text:p>0,00460214</text:p>
          </table:table-cell>
          <table:table-cell office:value-type="float" office:value="0.00395719" calcext:value-type="float">
            <text:p>0,00395719</text:p>
          </table:table-cell>
          <table:table-cell/>
          <table:table-cell table:style-name="Default" office:value-type="float" office:value="0.0129913" calcext:value-type="float">
            <text:p>0,0129913</text:p>
          </table:table-cell>
          <table:table-cell office:value-type="float" office:value="0.0199132" calcext:value-type="float">
            <text:p>0,0199132</text:p>
          </table:table-cell>
          <table:table-cell/>
          <table:table-cell table:style-name="Default" office:value-type="float" office:value="0.00331595" calcext:value-type="float">
            <text:p>0,00331595</text:p>
          </table:table-cell>
          <table:table-cell office:value-type="float" office:value="0.00101558" calcext:value-type="float">
            <text:p>0,00101558</text:p>
          </table:table-cell>
        </table:table-row>
        <table:table-row table:style-name="ro1">
          <table:table-cell table:formula="of:=[.A9]+0.025" office:value-type="float" office:value="0.2" calcext:value-type="float">
            <text:p>0,2</text:p>
          </table:table-cell>
          <table:table-cell table:style-name="Default" office:value-type="float" office:value="0.00581343" calcext:value-type="float">
            <text:p>0,00581343</text:p>
          </table:table-cell>
          <table:table-cell office:value-type="float" office:value="0.00485499" calcext:value-type="float">
            <text:p>0,00485499</text:p>
          </table:table-cell>
          <table:table-cell/>
          <table:table-cell table:style-name="Default" office:value-type="float" office:value="0.016369" calcext:value-type="float">
            <text:p>0,016369</text:p>
          </table:table-cell>
          <table:table-cell office:value-type="float" office:value="0.023538" calcext:value-type="float">
            <text:p>0,023538</text:p>
          </table:table-cell>
          <table:table-cell/>
          <table:table-cell table:style-name="Default" office:value-type="float" office:value="0.00366846" calcext:value-type="float">
            <text:p>0,00366846</text:p>
          </table:table-cell>
          <table:table-cell office:value-type="float" office:value="0.00112832" calcext:value-type="float">
            <text:p>0,00112832</text:p>
          </table:table-cell>
        </table:table-row>
        <table:table-row table:style-name="ro1">
          <table:table-cell table:formula="of:=[.A10]+0.025" office:value-type="float" office:value="0.225" calcext:value-type="float">
            <text:p>0,225</text:p>
          </table:table-cell>
          <table:table-cell table:style-name="Default" office:value-type="float" office:value="0.00711305" calcext:value-type="float">
            <text:p>0,00711305</text:p>
          </table:table-cell>
          <table:table-cell office:value-type="float" office:value="0.00580736" calcext:value-type="float">
            <text:p>0,00580736</text:p>
          </table:table-cell>
          <table:table-cell/>
          <table:table-cell table:style-name="Default" office:value-type="float" office:value="0.0198836" calcext:value-type="float">
            <text:p>0,0198836</text:p>
          </table:table-cell>
          <table:table-cell office:value-type="float" office:value="0.0272489" calcext:value-type="float">
            <text:p>0,0272489</text:p>
          </table:table-cell>
          <table:table-cell/>
          <table:table-cell table:style-name="Default" office:value-type="float" office:value="0.00400512" calcext:value-type="float">
            <text:p>0,00400512</text:p>
          </table:table-cell>
          <table:table-cell office:value-type="float" office:value="0.00124076" calcext:value-type="float">
            <text:p>0,00124076</text:p>
          </table:table-cell>
        </table:table-row>
        <table:table-row table:style-name="ro1">
          <table:table-cell table:formula="of:=[.A11]+0.025" office:value-type="float" office:value="0.25" calcext:value-type="float">
            <text:p>0,25</text:p>
          </table:table-cell>
          <table:table-cell table:style-name="Default" office:value-type="float" office:value="0.00848046" calcext:value-type="float">
            <text:p>0,00848046</text:p>
          </table:table-cell>
          <table:table-cell office:value-type="float" office:value="0.00680494" calcext:value-type="float">
            <text:p>0,00680494</text:p>
          </table:table-cell>
          <table:table-cell/>
          <table:table-cell table:style-name="Default" office:value-type="float" office:value="0.0234848" calcext:value-type="float">
            <text:p>0,0234848</text:p>
          </table:table-cell>
          <table:table-cell office:value-type="float" office:value="0.0310318" calcext:value-type="float">
            <text:p>0,0310318</text:p>
          </table:table-cell>
          <table:table-cell/>
          <table:table-cell table:style-name="Default" office:value-type="float" office:value="0.00432746" calcext:value-type="float">
            <text:p>0,00432746</text:p>
          </table:table-cell>
          <table:table-cell office:value-type="float" office:value="0.0013523" calcext:value-type="float">
            <text:p>0,0013523</text:p>
          </table:table-cell>
        </table:table-row>
        <table:table-row table:style-name="ro1">
          <table:table-cell table:formula="of:=[.A12]+0.025" office:value-type="float" office:value="0.275" calcext:value-type="float">
            <text:p>0,275</text:p>
          </table:table-cell>
          <table:table-cell table:style-name="Default" office:value-type="float" office:value="0.00989734" calcext:value-type="float">
            <text:p>0,00989734</text:p>
          </table:table-cell>
          <table:table-cell office:value-type="float" office:value="0.00783885" calcext:value-type="float">
            <text:p>0,00783885</text:p>
          </table:table-cell>
          <table:table-cell/>
          <table:table-cell table:style-name="Default" office:value-type="float" office:value="0.0271342" calcext:value-type="float">
            <text:p>0,0271342</text:p>
          </table:table-cell>
          <table:table-cell office:value-type="float" office:value="0.0348742" calcext:value-type="float">
            <text:p>0,0348742</text:p>
          </table:table-cell>
          <table:table-cell/>
          <table:table-cell table:style-name="Default" office:value-type="float" office:value="0.00463678" calcext:value-type="float">
            <text:p>0,00463678</text:p>
          </table:table-cell>
          <table:table-cell office:value-type="float" office:value="0.00146239" calcext:value-type="float">
            <text:p>0,00146239</text:p>
          </table:table-cell>
        </table:table-row>
        <table:table-row table:style-name="ro1">
          <table:table-cell table:formula="of:=[.A13]+0.025" office:value-type="float" office:value="0.3" calcext:value-type="float">
            <text:p>0,3</text:p>
          </table:table-cell>
          <table:table-cell table:style-name="Default" office:value-type="float" office:value="0.0113478" calcext:value-type="float">
            <text:p>0,0113478</text:p>
          </table:table-cell>
          <table:table-cell office:value-type="float" office:value="0.00890048" calcext:value-type="float">
            <text:p>0,00890048</text:p>
          </table:table-cell>
          <table:table-cell/>
          <table:table-cell table:style-name="Default" office:value-type="float" office:value="0.0308028" calcext:value-type="float">
            <text:p>0,0308028</text:p>
          </table:table-cell>
          <table:table-cell office:value-type="float" office:value="0.0387647" calcext:value-type="float">
            <text:p>0,0387647</text:p>
          </table:table-cell>
          <table:table-cell/>
          <table:table-cell table:style-name="Default" office:value-type="float" office:value="0.00493417" calcext:value-type="float">
            <text:p>0,00493417</text:p>
          </table:table-cell>
          <table:table-cell office:value-type="float" office:value="0.00157053" calcext:value-type="float">
            <text:p>0,00157053</text:p>
          </table:table-cell>
        </table:table-row>
        <table:table-row table:style-name="ro1">
          <table:table-cell table:formula="of:=[.A14]+0.025" office:value-type="float" office:value="0.325" calcext:value-type="float">
            <text:p>0,325</text:p>
          </table:table-cell>
          <table:table-cell table:style-name="Default" office:value-type="float" office:value="0.0128186" calcext:value-type="float">
            <text:p>0,0128186</text:p>
          </table:table-cell>
          <table:table-cell office:value-type="float" office:value="0.00998118" calcext:value-type="float">
            <text:p>0,00998118</text:p>
          </table:table-cell>
          <table:table-cell/>
          <table:table-cell table:style-name="Default" office:value-type="float" office:value="0.0344685" calcext:value-type="float">
            <text:p>0,0344685</text:p>
          </table:table-cell>
          <table:table-cell office:value-type="float" office:value="0.042693" calcext:value-type="float">
            <text:p>0,042693</text:p>
          </table:table-cell>
          <table:table-cell/>
          <table:table-cell table:style-name="Default" office:value-type="float" office:value="0.0052206" calcext:value-type="float">
            <text:p>0,0052206</text:p>
          </table:table-cell>
          <table:table-cell office:value-type="float" office:value="0.00167621" calcext:value-type="float">
            <text:p>0,00167621</text:p>
          </table:table-cell>
        </table:table-row>
        <table:table-row table:style-name="ro1">
          <table:table-cell table:formula="of:=[.A15]+0.025" office:value-type="float" office:value="0.35" calcext:value-type="float">
            <text:p>0,35</text:p>
          </table:table-cell>
          <table:table-cell table:style-name="Default" office:value-type="float" office:value="0.0142988" calcext:value-type="float">
            <text:p>0,0142988</text:p>
          </table:table-cell>
          <table:table-cell office:value-type="float" office:value="0.0110726" calcext:value-type="float">
            <text:p>0,0110726</text:p>
          </table:table-cell>
          <table:table-cell/>
          <table:table-cell table:style-name="Default" office:value-type="float" office:value="0.0381144" calcext:value-type="float">
            <text:p>0,0381144</text:p>
          </table:table-cell>
          <table:table-cell office:value-type="float" office:value="0.04665" calcext:value-type="float">
            <text:p>0,04665</text:p>
          </table:table-cell>
          <table:table-cell/>
          <table:table-cell table:style-name="Default" office:value-type="float" office:value="0.0054969" calcext:value-type="float">
            <text:p>0,0054969</text:p>
          </table:table-cell>
          <table:table-cell office:value-type="float" office:value="0.00177903" calcext:value-type="float">
            <text:p>0,00177903</text:p>
          </table:table-cell>
        </table:table-row>
        <table:table-row table:style-name="ro1">
          <table:table-cell table:formula="of:=[.A16]+0.025" office:value-type="float" office:value="0.375" calcext:value-type="float">
            <text:p>0,375</text:p>
          </table:table-cell>
          <table:table-cell table:style-name="Default" office:value-type="float" office:value="0.0157791" calcext:value-type="float">
            <text:p>0,0157791</text:p>
          </table:table-cell>
          <table:table-cell office:value-type="float" office:value="0.012166" calcext:value-type="float">
            <text:p>0,012166</text:p>
          </table:table-cell>
          <table:table-cell/>
          <table:table-cell table:style-name="Default" office:value-type="float" office:value="0.0417279" calcext:value-type="float">
            <text:p>0,0417279</text:p>
          </table:table-cell>
          <table:table-cell office:value-type="float" office:value="0.0506258" calcext:value-type="float">
            <text:p>0,0506258</text:p>
          </table:table-cell>
          <table:table-cell/>
          <table:table-cell table:style-name="Default" office:value-type="float" office:value="0.00576379" calcext:value-type="float">
            <text:p>0,00576379</text:p>
          </table:table-cell>
          <table:table-cell office:value-type="float" office:value="0.00187855" calcext:value-type="float">
            <text:p>0,00187855</text:p>
          </table:table-cell>
        </table:table-row>
        <table:table-row table:style-name="ro1">
          <table:table-cell table:formula="of:=[.A17]+0.025" office:value-type="float" office:value="0.4" calcext:value-type="float">
            <text:p>0,4</text:p>
          </table:table-cell>
          <table:table-cell table:style-name="Default" office:value-type="float" office:value="0.0172525" calcext:value-type="float">
            <text:p>0,0172525</text:p>
          </table:table-cell>
          <table:table-cell office:value-type="float" office:value="0.0132528" calcext:value-type="float">
            <text:p>0,0132528</text:p>
          </table:table-cell>
          <table:table-cell/>
          <table:table-cell table:style-name="Default" office:value-type="float" office:value="0.0452996" calcext:value-type="float">
            <text:p>0,0452996</text:p>
          </table:table-cell>
          <table:table-cell office:value-type="float" office:value="0.0546123" calcext:value-type="float">
            <text:p>0,0546123</text:p>
          </table:table-cell>
          <table:table-cell/>
          <table:table-cell table:style-name="Default" office:value-type="float" office:value="0.00602193" calcext:value-type="float">
            <text:p>0,00602193</text:p>
          </table:table-cell>
          <table:table-cell office:value-type="float" office:value="0.0019744" calcext:value-type="float">
            <text:p>0,0019744</text:p>
          </table:table-cell>
        </table:table-row>
        <table:table-row table:style-name="ro1">
          <table:table-cell table:formula="of:=[.A18]+0.025" office:value-type="float" office:value="0.425" calcext:value-type="float">
            <text:p>0,425</text:p>
          </table:table-cell>
          <table:table-cell table:style-name="Default" office:value-type="float" office:value="0.0187132" calcext:value-type="float">
            <text:p>0,0187132</text:p>
          </table:table-cell>
          <table:table-cell office:value-type="float" office:value="0.0143243" calcext:value-type="float">
            <text:p>0,0143243</text:p>
          </table:table-cell>
          <table:table-cell/>
          <table:table-cell table:style-name="Default" office:value-type="float" office:value="0.0488225" calcext:value-type="float">
            <text:p>0,0488225</text:p>
          </table:table-cell>
          <table:table-cell office:value-type="float" office:value="0.0586019" calcext:value-type="float">
            <text:p>0,0586019</text:p>
          </table:table-cell>
          <table:table-cell/>
          <table:table-cell table:style-name="Default" office:value-type="float" office:value="0.0062719" calcext:value-type="float">
            <text:p>0,0062719</text:p>
          </table:table-cell>
          <table:table-cell office:value-type="float" office:value="0.00206626" calcext:value-type="float">
            <text:p>0,00206626</text:p>
          </table:table-cell>
        </table:table-row>
        <table:table-row table:style-name="ro1">
          <table:table-cell table:formula="of:=[.A19]+0.025" office:value-type="float" office:value="0.45" calcext:value-type="float">
            <text:p>0,45</text:p>
          </table:table-cell>
          <table:table-cell table:style-name="Default" office:value-type="float" office:value="0.0201564" calcext:value-type="float">
            <text:p>0,0201564</text:p>
          </table:table-cell>
          <table:table-cell office:value-type="float" office:value="0.0153715" calcext:value-type="float">
            <text:p>0,0153715</text:p>
          </table:table-cell>
          <table:table-cell/>
          <table:table-cell table:style-name="Default" office:value-type="float" office:value="0.0522915" calcext:value-type="float">
            <text:p>0,0522915</text:p>
          </table:table-cell>
          <table:table-cell office:value-type="float" office:value="0.0625862" calcext:value-type="float">
            <text:p>0,0625862</text:p>
          </table:table-cell>
          <table:table-cell/>
          <table:table-cell table:style-name="Default" office:value-type="float" office:value="0.00651421" calcext:value-type="float">
            <text:p>0,00651421</text:p>
          </table:table-cell>
          <table:table-cell office:value-type="float" office:value="0.00215382" calcext:value-type="float">
            <text:p>0,00215382</text:p>
          </table:table-cell>
        </table:table-row>
        <table:table-row table:style-name="ro1">
          <table:table-cell table:formula="of:=[.A20]+0.025" office:value-type="float" office:value="0.475" calcext:value-type="float">
            <text:p>0,475</text:p>
          </table:table-cell>
          <table:table-cell table:style-name="Default" office:value-type="float" office:value="0.0215787" calcext:value-type="float">
            <text:p>0,0215787</text:p>
          </table:table-cell>
          <table:table-cell office:value-type="float" office:value="0.0163858" calcext:value-type="float">
            <text:p>0,0163858</text:p>
          </table:table-cell>
          <table:table-cell/>
          <table:table-cell table:style-name="Default" office:value-type="float" office:value="0.0557029" calcext:value-type="float">
            <text:p>0,0557029</text:p>
          </table:table-cell>
          <table:table-cell office:value-type="float" office:value="0.0665582" calcext:value-type="float">
            <text:p>0,0665582</text:p>
          </table:table-cell>
          <table:table-cell/>
          <table:table-cell table:style-name="Default" office:value-type="float" office:value="0.00674934" calcext:value-type="float">
            <text:p>0,00674934</text:p>
          </table:table-cell>
          <table:table-cell office:value-type="float" office:value="0.00223682" calcext:value-type="float">
            <text:p>0,00223682</text:p>
          </table:table-cell>
        </table:table-row>
        <table:table-row table:style-name="ro1">
          <table:table-cell table:formula="of:=[.A21]+0.025" office:value-type="float" office:value="0.5" calcext:value-type="float">
            <text:p>0,5</text:p>
          </table:table-cell>
          <table:table-cell table:style-name="Default" office:value-type="float" office:value="0.0228199" calcext:value-type="float">
            <text:p>0,0228199</text:p>
          </table:table-cell>
          <table:table-cell office:value-type="float" office:value="0.0173589" calcext:value-type="float">
            <text:p>0,0173589</text:p>
          </table:table-cell>
          <table:table-cell/>
          <table:table-cell table:style-name="Default" office:value-type="float" office:value="0.0590544" calcext:value-type="float">
            <text:p>0,0590544</text:p>
          </table:table-cell>
          <table:table-cell office:value-type="float" office:value="0.0705113" calcext:value-type="float">
            <text:p>0,0705113</text:p>
          </table:table-cell>
          <table:table-cell/>
          <table:table-cell table:style-name="Default" office:value-type="float" office:value="0.00697769" calcext:value-type="float">
            <text:p>0,00697769</text:p>
          </table:table-cell>
          <table:table-cell office:value-type="float" office:value="0.00231507" calcext:value-type="float">
            <text:p>0,00231507</text:p>
          </table:table-cell>
        </table:table-row>
        <table:table-row table:style-name="ro1">
          <table:table-cell table:formula="of:=[.A22]+0.025" office:value-type="float" office:value="0.525" calcext:value-type="float">
            <text:p>0,525</text:p>
          </table:table-cell>
          <table:table-cell table:style-name="Default" office:value-type="float" office:value="0.0238985" calcext:value-type="float">
            <text:p>0,0238985</text:p>
          </table:table-cell>
          <table:table-cell office:value-type="float" office:value="0.0182826" calcext:value-type="float">
            <text:p>0,0182826</text:p>
          </table:table-cell>
          <table:table-cell/>
          <table:table-cell table:style-name="Default" office:value-type="float" office:value="0.0623451" calcext:value-type="float">
            <text:p>0,0623451</text:p>
          </table:table-cell>
          <table:table-cell office:value-type="float" office:value="0.0744377" calcext:value-type="float">
            <text:p>0,0744377</text:p>
          </table:table-cell>
          <table:table-cell/>
          <table:table-cell table:style-name="Default" office:value-type="float" office:value="0.00719967" calcext:value-type="float">
            <text:p>0,00719967</text:p>
          </table:table-cell>
          <table:table-cell office:value-type="float" office:value="0.00238837" calcext:value-type="float">
            <text:p>0,00238837</text:p>
          </table:table-cell>
        </table:table-row>
        <table:table-row table:style-name="ro1">
          <table:table-cell table:formula="of:=[.A23]+0.025" office:value-type="float" office:value="0.55" calcext:value-type="float">
            <text:p>0,55</text:p>
          </table:table-cell>
          <table:table-cell table:style-name="Default" office:value-type="float" office:value="0.0248231" calcext:value-type="float">
            <text:p>0,0248231</text:p>
          </table:table-cell>
          <table:table-cell office:value-type="float" office:value="0.0191491" calcext:value-type="float">
            <text:p>0,0191491</text:p>
          </table:table-cell>
          <table:table-cell/>
          <table:table-cell table:style-name="Default" office:value-type="float" office:value="0.0655739" calcext:value-type="float">
            <text:p>0,0655739</text:p>
          </table:table-cell>
          <table:table-cell office:value-type="float" office:value="0.0783307" calcext:value-type="float">
            <text:p>0,0783307</text:p>
          </table:table-cell>
          <table:table-cell/>
          <table:table-cell table:style-name="Default" office:value-type="float" office:value="0.00741562" calcext:value-type="float">
            <text:p>0,00741562</text:p>
          </table:table-cell>
          <table:table-cell office:value-type="float" office:value="0.00245659" calcext:value-type="float">
            <text:p>0,00245659</text:p>
          </table:table-cell>
        </table:table-row>
        <table:table-row table:style-name="ro1">
          <table:table-cell table:formula="of:=[.A24]+0.025" office:value-type="float" office:value="0.575" calcext:value-type="float">
            <text:p>0,575</text:p>
          </table:table-cell>
          <table:table-cell table:style-name="Default" office:value-type="float" office:value="0.0255853" calcext:value-type="float">
            <text:p>0,0255853</text:p>
          </table:table-cell>
          <table:table-cell office:value-type="float" office:value="0.0199518" calcext:value-type="float">
            <text:p>0,0199518</text:p>
          </table:table-cell>
          <table:table-cell/>
          <table:table-cell table:style-name="Default" office:value-type="float" office:value="0.0687401" calcext:value-type="float">
            <text:p>0,0687401</text:p>
          </table:table-cell>
          <table:table-cell office:value-type="float" office:value="0.0821836" calcext:value-type="float">
            <text:p>0,0821836</text:p>
          </table:table-cell>
          <table:table-cell/>
          <table:table-cell table:style-name="Default" office:value-type="float" office:value="0.00762586" calcext:value-type="float">
            <text:p>0,00762586</text:p>
          </table:table-cell>
          <table:table-cell office:value-type="float" office:value="0.00251965" calcext:value-type="float">
            <text:p>0,00251965</text:p>
          </table:table-cell>
        </table:table-row>
        <table:table-row table:style-name="ro1">
          <table:table-cell table:formula="of:=[.A25]+0.025" office:value-type="float" office:value="0.6" calcext:value-type="float">
            <text:p>0,6</text:p>
          </table:table-cell>
          <table:table-cell table:style-name="Default" office:value-type="float" office:value="0.026184" calcext:value-type="float">
            <text:p>0,026184</text:p>
          </table:table-cell>
          <table:table-cell office:value-type="float" office:value="0.0206846" calcext:value-type="float">
            <text:p>0,0206846</text:p>
          </table:table-cell>
          <table:table-cell/>
          <table:table-cell table:style-name="Default" office:value-type="float" office:value="0.0718437" calcext:value-type="float">
            <text:p>0,0718437</text:p>
          </table:table-cell>
          <table:table-cell office:value-type="float" office:value="0.0859887" calcext:value-type="float">
            <text:p>0,0859887</text:p>
          </table:table-cell>
          <table:table-cell/>
          <table:table-cell table:style-name="Default" office:value-type="float" office:value="0.00771737" calcext:value-type="float">
            <text:p>0,00771737</text:p>
          </table:table-cell>
          <table:table-cell office:value-type="float" office:value="0.00257748" calcext:value-type="float">
            <text:p>0,00257748</text:p>
          </table:table-cell>
        </table:table-row>
        <table:table-row table:style-name="ro1">
          <table:table-cell table:formula="of:=[.A26]+0.025" office:value-type="float" office:value="0.625" calcext:value-type="float">
            <text:p>0,625</text:p>
          </table:table-cell>
          <table:table-cell table:style-name="Default" office:value-type="float" office:value="0.0266264" calcext:value-type="float">
            <text:p>0,0266264</text:p>
          </table:table-cell>
          <table:table-cell office:value-type="float" office:value="0.0213428" calcext:value-type="float">
            <text:p>0,0213428</text:p>
          </table:table-cell>
          <table:table-cell/>
          <table:table-cell table:style-name="Default" office:value-type="float" office:value="0.0748852" calcext:value-type="float">
            <text:p>0,0748852</text:p>
          </table:table-cell>
          <table:table-cell office:value-type="float" office:value="0.0897376" calcext:value-type="float">
            <text:p>0,0897376</text:p>
          </table:table-cell>
          <table:table-cell/>
          <table:table-cell table:style-name="Default" office:value-type="float" office:value="0.00731553" calcext:value-type="float">
            <text:p>0,00731553</text:p>
          </table:table-cell>
          <table:table-cell office:value-type="float" office:value="0.00263007" calcext:value-type="float">
            <text:p>0,00263007</text:p>
          </table:table-cell>
        </table:table-row>
        <table:table-row table:style-name="ro1">
          <table:table-cell table:formula="of:=[.A27]+0.025" office:value-type="float" office:value="0.65" calcext:value-type="float">
            <text:p>0,65</text:p>
          </table:table-cell>
          <table:table-cell table:style-name="Default" office:value-type="float" office:value="0.0269259" calcext:value-type="float">
            <text:p>0,0269259</text:p>
          </table:table-cell>
          <table:table-cell office:value-type="float" office:value="0.0219227" calcext:value-type="float">
            <text:p>0,0219227</text:p>
          </table:table-cell>
          <table:table-cell/>
          <table:table-cell table:style-name="Default" office:value-type="float" office:value="0.0778651" calcext:value-type="float">
            <text:p>0,0778651</text:p>
          </table:table-cell>
          <table:table-cell office:value-type="float" office:value="0.0934224" calcext:value-type="float">
            <text:p>0,0934224</text:p>
          </table:table-cell>
          <table:table-cell/>
          <table:table-cell table:style-name="Default" office:value-type="float" office:value="0.00701184" calcext:value-type="float">
            <text:p>0,00701184</text:p>
          </table:table-cell>
          <table:table-cell office:value-type="float" office:value="0.00267745" calcext:value-type="float">
            <text:p>0,00267745</text:p>
          </table:table-cell>
        </table:table-row>
        <table:table-row table:style-name="ro1">
          <table:table-cell table:formula="of:=[.A28]+0.025" office:value-type="float" office:value="0.675" calcext:value-type="float">
            <text:p>0,675</text:p>
          </table:table-cell>
          <table:table-cell table:style-name="Default" office:value-type="float" office:value="0.027099" calcext:value-type="float">
            <text:p>0,027099</text:p>
          </table:table-cell>
          <table:table-cell office:value-type="float" office:value="0.0224217" calcext:value-type="float">
            <text:p>0,0224217</text:p>
          </table:table-cell>
          <table:table-cell/>
          <table:table-cell table:style-name="Default" office:value-type="float" office:value="0.0807843" calcext:value-type="float">
            <text:p>0,0807843</text:p>
          </table:table-cell>
          <table:table-cell office:value-type="float" office:value="0.0970341" calcext:value-type="float">
            <text:p>0,0970341</text:p>
          </table:table-cell>
          <table:table-cell/>
          <table:table-cell table:style-name="Default" office:value-type="float" office:value="0.00674766" calcext:value-type="float">
            <text:p>0,00674766</text:p>
          </table:table-cell>
          <table:table-cell office:value-type="float" office:value="0.00271964" calcext:value-type="float">
            <text:p>0,00271964</text:p>
          </table:table-cell>
        </table:table-row>
        <table:table-row table:style-name="ro1">
          <table:table-cell table:formula="of:=[.A29]+0.025" office:value-type="float" office:value="0.7" calcext:value-type="float">
            <text:p>0,7</text:p>
          </table:table-cell>
          <table:table-cell table:style-name="Default" office:value-type="float" office:value="0.027163" calcext:value-type="float">
            <text:p>0,027163</text:p>
          </table:table-cell>
          <table:table-cell office:value-type="float" office:value="0.0228392" calcext:value-type="float">
            <text:p>0,0228392</text:p>
          </table:table-cell>
          <table:table-cell/>
          <table:table-cell table:style-name="Default" office:value-type="float" office:value="0.0836437" calcext:value-type="float">
            <text:p>0,0836437</text:p>
          </table:table-cell>
          <table:table-cell office:value-type="float" office:value="0.100564" calcext:value-type="float">
            <text:p>0,100564</text:p>
          </table:table-cell>
          <table:table-cell/>
          <table:table-cell table:style-name="Default" office:value-type="float" office:value="0.00651056" calcext:value-type="float">
            <text:p>0,00651056</text:p>
          </table:table-cell>
          <table:table-cell office:value-type="float" office:value="0.00275675" calcext:value-type="float">
            <text:p>0,00275675</text:p>
          </table:table-cell>
        </table:table-row>
        <table:table-row table:style-name="ro1">
          <table:table-cell table:formula="of:=[.A30]+0.025" office:value-type="float" office:value="0.725" calcext:value-type="float">
            <text:p>0,725</text:p>
          </table:table-cell>
          <table:table-cell table:style-name="Default" office:value-type="float" office:value="0.0271343" calcext:value-type="float">
            <text:p>0,0271343</text:p>
          </table:table-cell>
          <table:table-cell office:value-type="float" office:value="0.0231754" calcext:value-type="float">
            <text:p>0,0231754</text:p>
          </table:table-cell>
          <table:table-cell/>
          <table:table-cell table:style-name="Default" office:value-type="float" office:value="0.0864449" calcext:value-type="float">
            <text:p>0,0864449</text:p>
          </table:table-cell>
          <table:table-cell office:value-type="float" office:value="0.104001" calcext:value-type="float">
            <text:p>0,104001</text:p>
          </table:table-cell>
          <table:table-cell/>
          <table:table-cell table:style-name="Default" office:value-type="float" office:value="0.0062945" calcext:value-type="float">
            <text:p>0,0062945</text:p>
          </table:table-cell>
          <table:table-cell office:value-type="float" office:value="0.00278887" calcext:value-type="float">
            <text:p>0,00278887</text:p>
          </table:table-cell>
        </table:table-row>
        <table:table-row table:style-name="ro1">
          <table:table-cell table:formula="of:=[.A31]+0.025" office:value-type="float" office:value="0.75" calcext:value-type="float">
            <text:p>0,75</text:p>
          </table:table-cell>
          <table:table-cell table:style-name="Default" office:value-type="float" office:value="0.027028" calcext:value-type="float">
            <text:p>0,027028</text:p>
          </table:table-cell>
          <table:table-cell office:value-type="float" office:value="0.023432" calcext:value-type="float">
            <text:p>0,023432</text:p>
          </table:table-cell>
          <table:table-cell/>
          <table:table-cell table:style-name="Default" office:value-type="float" office:value="0.0891886" calcext:value-type="float">
            <text:p>0,0891886</text:p>
          </table:table-cell>
          <table:table-cell office:value-type="float" office:value="0.107334" calcext:value-type="float">
            <text:p>0,107334</text:p>
          </table:table-cell>
          <table:table-cell/>
          <table:table-cell table:style-name="Default" office:value-type="float" office:value="0.00609576" calcext:value-type="float">
            <text:p>0,00609576</text:p>
          </table:table-cell>
          <table:table-cell office:value-type="float" office:value="0.00281614" calcext:value-type="float">
            <text:p>0,00281614</text:p>
          </table:table-cell>
        </table:table-row>
        <table:table-row table:style-name="ro1">
          <table:table-cell table:formula="of:=[.A32]+0.025" office:value-type="float" office:value="0.775" calcext:value-type="float">
            <text:p>0,775</text:p>
          </table:table-cell>
          <table:table-cell table:style-name="Default" office:value-type="float" office:value="0.0268577" calcext:value-type="float">
            <text:p>0,0268577</text:p>
          </table:table-cell>
          <table:table-cell office:value-type="float" office:value="0.0236119" calcext:value-type="float">
            <text:p>0,0236119</text:p>
          </table:table-cell>
          <table:table-cell/>
          <table:table-cell table:style-name="Default" office:value-type="float" office:value="0.0918763" calcext:value-type="float">
            <text:p>0,0918763</text:p>
          </table:table-cell>
          <table:table-cell office:value-type="float" office:value="0.110552" calcext:value-type="float">
            <text:p>0,110552</text:p>
          </table:table-cell>
          <table:table-cell/>
          <table:table-cell table:style-name="Default" office:value-type="float" office:value="0.0059117" calcext:value-type="float">
            <text:p>0,0059117</text:p>
          </table:table-cell>
          <table:table-cell office:value-type="float" office:value="0.00283873" calcext:value-type="float">
            <text:p>0,00283873</text:p>
          </table:table-cell>
        </table:table-row>
        <table:table-row table:style-name="ro1">
          <table:table-cell table:formula="of:=[.A33]+0.025" office:value-type="float" office:value="0.8" calcext:value-type="float">
            <text:p>0,8</text:p>
          </table:table-cell>
          <table:table-cell table:style-name="Default" office:value-type="float" office:value="0.0266348" calcext:value-type="float">
            <text:p>0,0266348</text:p>
          </table:table-cell>
          <table:table-cell office:value-type="float" office:value="0.0237189" calcext:value-type="float">
            <text:p>0,0237189</text:p>
          </table:table-cell>
          <table:table-cell/>
          <table:table-cell table:style-name="Default" office:value-type="float" office:value="0.0945091" calcext:value-type="float">
            <text:p>0,0945091</text:p>
          </table:table-cell>
          <table:table-cell office:value-type="float" office:value="0.113642" calcext:value-type="float">
            <text:p>0,113642</text:p>
          </table:table-cell>
          <table:table-cell/>
          <table:table-cell table:style-name="Default" office:value-type="float" office:value="0.00574035" calcext:value-type="float">
            <text:p>0,00574035</text:p>
          </table:table-cell>
          <table:table-cell office:value-type="float" office:value="0.00285679" calcext:value-type="float">
            <text:p>0,00285679</text:p>
          </table:table-cell>
        </table:table-row>
        <table:table-row table:style-name="ro1">
          <table:table-cell table:formula="of:=[.A34]+0.025" office:value-type="float" office:value="0.825" calcext:value-type="float">
            <text:p>0,825</text:p>
          </table:table-cell>
          <table:table-cell table:style-name="Default" office:value-type="float" office:value="0.0263695" calcext:value-type="float">
            <text:p>0,0263695</text:p>
          </table:table-cell>
          <table:table-cell office:value-type="float" office:value="0.0237577" calcext:value-type="float">
            <text:p>0,0237577</text:p>
          </table:table-cell>
          <table:table-cell/>
          <table:table-cell table:style-name="Default" office:value-type="float" office:value="0.0970883" calcext:value-type="float">
            <text:p>0,0970883</text:p>
          </table:table-cell>
          <table:table-cell office:value-type="float" office:value="0.116593" calcext:value-type="float">
            <text:p>0,116593</text:p>
          </table:table-cell>
          <table:table-cell/>
          <table:table-cell table:style-name="Default" office:value-type="float" office:value="0.00558016" calcext:value-type="float">
            <text:p>0,00558016</text:p>
          </table:table-cell>
          <table:table-cell office:value-type="float" office:value="0.00287052" calcext:value-type="float">
            <text:p>0,00287052</text:p>
          </table:table-cell>
        </table:table-row>
        <table:table-row table:style-name="ro1">
          <table:table-cell table:formula="of:=[.A35]+0.025" office:value-type="float" office:value="0.85" calcext:value-type="float">
            <text:p>0,85</text:p>
          </table:table-cell>
          <table:table-cell table:style-name="Default" office:value-type="float" office:value="0.0260702" calcext:value-type="float">
            <text:p>0,0260702</text:p>
          </table:table-cell>
          <table:table-cell office:value-type="float" office:value="0.0237335" calcext:value-type="float">
            <text:p>0,0237335</text:p>
          </table:table-cell>
          <table:table-cell/>
          <table:table-cell table:style-name="Default" office:value-type="float" office:value="0.099615" calcext:value-type="float">
            <text:p>0,099615</text:p>
          </table:table-cell>
          <table:table-cell office:value-type="float" office:value="0.119392" calcext:value-type="float">
            <text:p>0,119392</text:p>
          </table:table-cell>
          <table:table-cell/>
          <table:table-cell table:style-name="Default" office:value-type="float" office:value="0.00542987" calcext:value-type="float">
            <text:p>0,00542987</text:p>
          </table:table-cell>
          <table:table-cell office:value-type="float" office:value="0.00288012" calcext:value-type="float">
            <text:p>0,00288012</text:p>
          </table:table-cell>
        </table:table-row>
        <table:table-row table:style-name="ro1">
          <table:table-cell table:formula="of:=[.A36]+0.025" office:value-type="float" office:value="0.875" calcext:value-type="float">
            <text:p>0,875</text:p>
          </table:table-cell>
          <table:table-cell table:style-name="Default" office:value-type="float" office:value="0.025744" calcext:value-type="float">
            <text:p>0,025744</text:p>
          </table:table-cell>
          <table:table-cell office:value-type="float" office:value="0.0236523" calcext:value-type="float">
            <text:p>0,0236523</text:p>
          </table:table-cell>
          <table:table-cell/>
          <table:table-cell table:style-name="Default" office:value-type="float" office:value="0.102092" calcext:value-type="float">
            <text:p>0,102092</text:p>
          </table:table-cell>
          <table:table-cell office:value-type="float" office:value="0.122025" calcext:value-type="float">
            <text:p>0,122025</text:p>
          </table:table-cell>
          <table:table-cell/>
          <table:table-cell table:style-name="Default" office:value-type="float" office:value="0.00528844" calcext:value-type="float">
            <text:p>0,00528844</text:p>
          </table:table-cell>
          <table:table-cell office:value-type="float" office:value="0.00288579" calcext:value-type="float">
            <text:p>0,00288579</text:p>
          </table:table-cell>
        </table:table-row>
        <table:table-row table:style-name="ro1">
          <table:table-cell table:formula="of:=[.A37]+0.025" office:value-type="float" office:value="0.900000000000001" calcext:value-type="float">
            <text:p>0,900000000000001</text:p>
          </table:table-cell>
          <table:table-cell table:style-name="Default" office:value-type="float" office:value="0.025397" calcext:value-type="float">
            <text:p>0,025397</text:p>
          </table:table-cell>
          <table:table-cell office:value-type="float" office:value="0.0235199" calcext:value-type="float">
            <text:p>0,0235199</text:p>
          </table:table-cell>
          <table:table-cell/>
          <table:table-cell table:style-name="Default" office:value-type="float" office:value="0.104519" calcext:value-type="float">
            <text:p>0,104519</text:p>
          </table:table-cell>
          <table:table-cell office:value-type="float" office:value="0.12448" calcext:value-type="float">
            <text:p>0,12448</text:p>
          </table:table-cell>
          <table:table-cell/>
          <table:table-cell table:style-name="Default" office:value-type="float" office:value="0.00515547" calcext:value-type="float">
            <text:p>0,00515547</text:p>
          </table:table-cell>
          <table:table-cell office:value-type="float" office:value="0.00288776" calcext:value-type="float">
            <text:p>0,00288776</text:p>
          </table:table-cell>
        </table:table-row>
        <table:table-row table:style-name="ro1">
          <table:table-cell table:formula="of:=[.A38]+0.025" office:value-type="float" office:value="0.925000000000001" calcext:value-type="float">
            <text:p>0,925000000000001</text:p>
          </table:table-cell>
          <table:table-cell table:style-name="Default" office:value-type="float" office:value="0.0250343" calcext:value-type="float">
            <text:p>0,0250343</text:p>
          </table:table-cell>
          <table:table-cell office:value-type="float" office:value="0.0233423" calcext:value-type="float">
            <text:p>0,0233423</text:p>
          </table:table-cell>
          <table:table-cell/>
          <table:table-cell table:style-name="Default" office:value-type="float" office:value="0.106897" calcext:value-type="float">
            <text:p>0,106897</text:p>
          </table:table-cell>
          <table:table-cell office:value-type="float" office:value="0.126746" calcext:value-type="float">
            <text:p>0,126746</text:p>
          </table:table-cell>
          <table:table-cell/>
          <table:table-cell table:style-name="Default" office:value-type="float" office:value="0.00502953" calcext:value-type="float">
            <text:p>0,00502953</text:p>
          </table:table-cell>
          <table:table-cell office:value-type="float" office:value="0.00288625" calcext:value-type="float">
            <text:p>0,00288625</text:p>
          </table:table-cell>
        </table:table-row>
        <table:table-row table:style-name="ro1">
          <table:table-cell table:formula="of:=[.A39]+0.025" office:value-type="float" office:value="0.950000000000001" calcext:value-type="float">
            <text:p>0,950000000000001</text:p>
          </table:table-cell>
          <table:table-cell table:style-name="Default" office:value-type="float" office:value="0.02466" calcext:value-type="float">
            <text:p>0,02466</text:p>
          </table:table-cell>
          <table:table-cell office:value-type="float" office:value="0.0231254" calcext:value-type="float">
            <text:p>0,0231254</text:p>
          </table:table-cell>
          <table:table-cell/>
          <table:table-cell table:style-name="Default" office:value-type="float" office:value="0.109229" calcext:value-type="float">
            <text:p>0,109229</text:p>
          </table:table-cell>
          <table:table-cell office:value-type="float" office:value="0.128811" calcext:value-type="float">
            <text:p>0,128811</text:p>
          </table:table-cell>
          <table:table-cell/>
          <table:table-cell table:style-name="Default" office:value-type="float" office:value="0.00491008" calcext:value-type="float">
            <text:p>0,00491008</text:p>
          </table:table-cell>
          <table:table-cell office:value-type="float" office:value="0.00288148" calcext:value-type="float">
            <text:p>0,00288148</text:p>
          </table:table-cell>
        </table:table-row>
        <table:table-row table:style-name="ro1">
          <table:table-cell table:formula="of:=[.A40]+0.025" office:value-type="float" office:value="0.975000000000001" calcext:value-type="float">
            <text:p>0,975000000000001</text:p>
          </table:table-cell>
          <table:table-cell table:style-name="Default" office:value-type="float" office:value="0.0242777" calcext:value-type="float">
            <text:p>0,0242777</text:p>
          </table:table-cell>
          <table:table-cell office:value-type="float" office:value="0.0228751" calcext:value-type="float">
            <text:p>0,0228751</text:p>
          </table:table-cell>
          <table:table-cell/>
          <table:table-cell table:style-name="Default" office:value-type="float" office:value="0.111515" calcext:value-type="float">
            <text:p>0,111515</text:p>
          </table:table-cell>
          <table:table-cell office:value-type="float" office:value="0.130665" calcext:value-type="float">
            <text:p>0,130665</text:p>
          </table:table-cell>
          <table:table-cell/>
          <table:table-cell table:style-name="Default" office:value-type="float" office:value="0.00479659" calcext:value-type="float">
            <text:p>0,00479659</text:p>
          </table:table-cell>
          <table:table-cell office:value-type="float" office:value="0.00287368" calcext:value-type="float">
            <text:p>0,00287368</text:p>
          </table:table-cell>
        </table:table-row>
        <table:table-row table:style-name="ro1">
          <table:table-cell table:formula="of:=[.A41]+0.025" office:value-type="float" office:value="1" calcext:value-type="float">
            <text:p>1</text:p>
          </table:table-cell>
          <table:table-cell table:style-name="Default" office:value-type="float" office:value="0.0238902" calcext:value-type="float">
            <text:p>0,0238902</text:p>
          </table:table-cell>
          <table:table-cell office:value-type="float" office:value="0.0225965" calcext:value-type="float">
            <text:p>0,0225965</text:p>
          </table:table-cell>
          <table:table-cell/>
          <table:table-cell table:style-name="Default" office:value-type="float" office:value="0.113735" calcext:value-type="float">
            <text:p>0,113735</text:p>
          </table:table-cell>
          <table:table-cell office:value-type="float" office:value="0.132301" calcext:value-type="float">
            <text:p>0,132301</text:p>
          </table:table-cell>
          <table:table-cell/>
          <table:table-cell table:style-name="Default" office:value-type="float" office:value="0.00468861" calcext:value-type="float">
            <text:p>0,00468861</text:p>
          </table:table-cell>
          <table:table-cell office:value-type="float" office:value="0.00286307" calcext:value-type="float">
            <text:p>0,00286307</text:p>
          </table:table-cell>
        </table:table-row>
        <table:table-row table:style-name="ro1">
          <table:table-cell table:formula="of:=[.A42]+0.025" office:value-type="float" office:value="1.025" calcext:value-type="float">
            <text:p>1,025</text:p>
          </table:table-cell>
          <table:table-cell table:style-name="Default" office:value-type="float" office:value="0.0234999" calcext:value-type="float">
            <text:p>0,0234999</text:p>
          </table:table-cell>
          <table:table-cell office:value-type="float" office:value="0.0222947" calcext:value-type="float">
            <text:p>0,0222947</text:p>
          </table:table-cell>
          <table:table-cell/>
          <table:table-cell table:style-name="Default" office:value-type="float" office:value="0.115615" calcext:value-type="float">
            <text:p>0,115615</text:p>
          </table:table-cell>
          <table:table-cell office:value-type="float" office:value="0.133712" calcext:value-type="float">
            <text:p>0,133712</text:p>
          </table:table-cell>
          <table:table-cell/>
          <table:table-cell table:style-name="Default" office:value-type="float" office:value="0.00458569" calcext:value-type="float">
            <text:p>0,00458569</text:p>
          </table:table-cell>
          <table:table-cell office:value-type="float" office:value="0.00284986" calcext:value-type="float">
            <text:p>0,00284986</text:p>
          </table:table-cell>
        </table:table-row>
        <table:table-row table:style-name="ro1">
          <table:table-cell table:formula="of:=[.A43]+0.025" office:value-type="float" office:value="1.05" calcext:value-type="float">
            <text:p>1,05</text:p>
          </table:table-cell>
          <table:table-cell table:style-name="Default" office:value-type="float" office:value="0.0231089" calcext:value-type="float">
            <text:p>0,0231089</text:p>
          </table:table-cell>
          <table:table-cell office:value-type="float" office:value="0.0219743" calcext:value-type="float">
            <text:p>0,0219743</text:p>
          </table:table-cell>
          <table:table-cell/>
          <table:table-cell table:style-name="Default" office:value-type="float" office:value="0.117047" calcext:value-type="float">
            <text:p>0,117047</text:p>
          </table:table-cell>
          <table:table-cell office:value-type="float" office:value="0.134893" calcext:value-type="float">
            <text:p>0,134893</text:p>
          </table:table-cell>
          <table:table-cell/>
          <table:table-cell table:style-name="Default" office:value-type="float" office:value="0.00448746" calcext:value-type="float">
            <text:p>0,00448746</text:p>
          </table:table-cell>
          <table:table-cell office:value-type="float" office:value="0.00283428" calcext:value-type="float">
            <text:p>0,00283428</text:p>
          </table:table-cell>
        </table:table-row>
        <table:table-row table:style-name="ro1">
          <table:table-cell table:formula="of:=[.A44]+0.025" office:value-type="float" office:value="1.075" calcext:value-type="float">
            <text:p>1,075</text:p>
          </table:table-cell>
          <table:table-cell table:style-name="Default" office:value-type="float" office:value="0.0227188" calcext:value-type="float">
            <text:p>0,0227188</text:p>
          </table:table-cell>
          <table:table-cell office:value-type="float" office:value="0.0216395" calcext:value-type="float">
            <text:p>0,0216395</text:p>
          </table:table-cell>
          <table:table-cell/>
          <table:table-cell table:style-name="Default" office:value-type="float" office:value="0.117867" calcext:value-type="float">
            <text:p>0,117867</text:p>
          </table:table-cell>
          <table:table-cell office:value-type="float" office:value="0.135843" calcext:value-type="float">
            <text:p>0,135843</text:p>
          </table:table-cell>
          <table:table-cell/>
          <table:table-cell table:style-name="Default" office:value-type="float" office:value="0.00439359" calcext:value-type="float">
            <text:p>0,00439359</text:p>
          </table:table-cell>
          <table:table-cell office:value-type="float" office:value="0.00281651" calcext:value-type="float">
            <text:p>0,00281651</text:p>
          </table:table-cell>
        </table:table-row>
        <table:table-row table:style-name="ro1">
          <table:table-cell table:formula="of:=[.A45]+0.025" office:value-type="float" office:value="1.1" calcext:value-type="float">
            <text:p>1,1</text:p>
          </table:table-cell>
          <table:table-cell table:style-name="Default" office:value-type="float" office:value="0.0223309" calcext:value-type="float">
            <text:p>0,0223309</text:p>
          </table:table-cell>
          <table:table-cell office:value-type="float" office:value="0.0212938" calcext:value-type="float">
            <text:p>0,0212938</text:p>
          </table:table-cell>
          <table:table-cell/>
          <table:table-cell table:style-name="Default" office:value-type="float" office:value="0.118096" calcext:value-type="float">
            <text:p>0,118096</text:p>
          </table:table-cell>
          <table:table-cell office:value-type="float" office:value="0.136563" calcext:value-type="float">
            <text:p>0,136563</text:p>
          </table:table-cell>
          <table:table-cell/>
          <table:table-cell table:style-name="Default" office:value-type="float" office:value="0.00430376" calcext:value-type="float">
            <text:p>0,00430376</text:p>
          </table:table-cell>
          <table:table-cell office:value-type="float" office:value="0.00279678" calcext:value-type="float">
            <text:p>0,00279678</text:p>
          </table:table-cell>
        </table:table-row>
        <table:table-row table:style-name="ro1">
          <table:table-cell table:formula="of:=[.A46]+0.025" office:value-type="float" office:value="1.125" calcext:value-type="float">
            <text:p>1,125</text:p>
          </table:table-cell>
          <table:table-cell table:style-name="Default" office:value-type="float" office:value="0.0219463" calcext:value-type="float">
            <text:p>0,0219463</text:p>
          </table:table-cell>
          <table:table-cell office:value-type="float" office:value="0.0209405" calcext:value-type="float">
            <text:p>0,0209405</text:p>
          </table:table-cell>
          <table:table-cell/>
          <table:table-cell table:style-name="Default" office:value-type="float" office:value="0.117836" calcext:value-type="float">
            <text:p>0,117836</text:p>
          </table:table-cell>
          <table:table-cell office:value-type="float" office:value="0.137053" calcext:value-type="float">
            <text:p>0,137053</text:p>
          </table:table-cell>
          <table:table-cell/>
          <table:table-cell table:style-name="Default" office:value-type="float" office:value="0.0042177" calcext:value-type="float">
            <text:p>0,0042177</text:p>
          </table:table-cell>
          <table:table-cell office:value-type="float" office:value="0.00277527" calcext:value-type="float">
            <text:p>0,00277527</text:p>
          </table:table-cell>
        </table:table-row>
        <table:table-row table:style-name="ro1">
          <table:table-cell table:formula="of:=[.A47]+0.025" office:value-type="float" office:value="1.15" calcext:value-type="float">
            <text:p>1,15</text:p>
          </table:table-cell>
          <table:table-cell table:style-name="Default" office:value-type="float" office:value="0.021566" calcext:value-type="float">
            <text:p>0,021566</text:p>
          </table:table-cell>
          <table:table-cell office:value-type="float" office:value="0.0205825" calcext:value-type="float">
            <text:p>0,0205825</text:p>
          </table:table-cell>
          <table:table-cell/>
          <table:table-cell table:style-name="Default" office:value-type="float" office:value="0.117194" calcext:value-type="float">
            <text:p>0,117194</text:p>
          </table:table-cell>
          <table:table-cell office:value-type="float" office:value="0.137321" calcext:value-type="float">
            <text:p>0,137321</text:p>
          </table:table-cell>
          <table:table-cell/>
          <table:table-cell table:style-name="Default" office:value-type="float" office:value="0.00413515" calcext:value-type="float">
            <text:p>0,00413515</text:p>
          </table:table-cell>
          <table:table-cell office:value-type="float" office:value="0.00275215" calcext:value-type="float">
            <text:p>0,00275215</text:p>
          </table:table-cell>
        </table:table-row>
        <table:table-row table:style-name="ro1">
          <table:table-cell table:formula="of:=[.A48]+0.025" office:value-type="float" office:value="1.175" calcext:value-type="float">
            <text:p>1,175</text:p>
          </table:table-cell>
          <table:table-cell table:style-name="Default" office:value-type="float" office:value="0.0211905" calcext:value-type="float">
            <text:p>0,0211905</text:p>
          </table:table-cell>
          <table:table-cell office:value-type="float" office:value="0.0202222" calcext:value-type="float">
            <text:p>0,0202222</text:p>
          </table:table-cell>
          <table:table-cell/>
          <table:table-cell table:style-name="Default" office:value-type="float" office:value="0.116262" calcext:value-type="float">
            <text:p>0,116262</text:p>
          </table:table-cell>
          <table:table-cell office:value-type="float" office:value="0.137374" calcext:value-type="float">
            <text:p>0,137374</text:p>
          </table:table-cell>
          <table:table-cell/>
          <table:table-cell table:style-name="Default" office:value-type="float" office:value="0.0040559" calcext:value-type="float">
            <text:p>0,0040559</text:p>
          </table:table-cell>
          <table:table-cell office:value-type="float" office:value="0.00272763" calcext:value-type="float">
            <text:p>0,00272763</text:p>
          </table:table-cell>
        </table:table-row>
        <table:table-row table:style-name="ro1">
          <table:table-cell table:formula="of:=[.A49]+0.025" office:value-type="float" office:value="1.2" calcext:value-type="float">
            <text:p>1,2</text:p>
          </table:table-cell>
          <table:table-cell table:style-name="Default" office:value-type="float" office:value="0.0208206" calcext:value-type="float">
            <text:p>0,0208206</text:p>
          </table:table-cell>
          <table:table-cell office:value-type="float" office:value="0.0198616" calcext:value-type="float">
            <text:p>0,0198616</text:p>
          </table:table-cell>
          <table:table-cell/>
          <table:table-cell table:style-name="Default" office:value-type="float" office:value="0.115113" calcext:value-type="float">
            <text:p>0,115113</text:p>
          </table:table-cell>
          <table:table-cell office:value-type="float" office:value="0.13722" calcext:value-type="float">
            <text:p>0,13722</text:p>
          </table:table-cell>
          <table:table-cell/>
          <table:table-cell table:style-name="Default" office:value-type="float" office:value="0.00397974" calcext:value-type="float">
            <text:p>0,00397974</text:p>
          </table:table-cell>
          <table:table-cell office:value-type="float" office:value="0.00270184" calcext:value-type="float">
            <text:p>0,00270184</text:p>
          </table:table-cell>
        </table:table-row>
        <table:table-row table:style-name="ro1">
          <table:table-cell table:formula="of:=[.A50]+0.025" office:value-type="float" office:value="1.225" calcext:value-type="float">
            <text:p>1,225</text:p>
          </table:table-cell>
          <table:table-cell table:style-name="Default" office:value-type="float" office:value="0.0204566" calcext:value-type="float">
            <text:p>0,0204566</text:p>
          </table:table-cell>
          <table:table-cell office:value-type="float" office:value="0.0195026" calcext:value-type="float">
            <text:p>0,0195026</text:p>
          </table:table-cell>
          <table:table-cell/>
          <table:table-cell table:style-name="Default" office:value-type="float" office:value="0.113805" calcext:value-type="float">
            <text:p>0,113805</text:p>
          </table:table-cell>
          <table:table-cell office:value-type="float" office:value="0.136872" calcext:value-type="float">
            <text:p>0,136872</text:p>
          </table:table-cell>
          <table:table-cell/>
          <table:table-cell table:style-name="Default" office:value-type="float" office:value="0.00390647" calcext:value-type="float">
            <text:p>0,00390647</text:p>
          </table:table-cell>
          <table:table-cell office:value-type="float" office:value="0.00267496" calcext:value-type="float">
            <text:p>0,00267496</text:p>
          </table:table-cell>
        </table:table-row>
        <table:table-row table:style-name="ro1">
          <table:table-cell table:formula="of:=[.A51]+0.025" office:value-type="float" office:value="1.25" calcext:value-type="float">
            <text:p>1,25</text:p>
          </table:table-cell>
          <table:table-cell table:style-name="Default" office:value-type="float" office:value="0.020099" calcext:value-type="float">
            <text:p>0,020099</text:p>
          </table:table-cell>
          <table:table-cell office:value-type="float" office:value="0.0191465" calcext:value-type="float">
            <text:p>0,0191465</text:p>
          </table:table-cell>
          <table:table-cell/>
          <table:table-cell table:style-name="Default" office:value-type="float" office:value="0.112382" calcext:value-type="float">
            <text:p>0,112382</text:p>
          </table:table-cell>
          <table:table-cell office:value-type="float" office:value="0.136342" calcext:value-type="float">
            <text:p>0,136342</text:p>
          </table:table-cell>
          <table:table-cell/>
          <table:table-cell table:style-name="Default" office:value-type="float" office:value="0.00383593" calcext:value-type="float">
            <text:p>0,00383593</text:p>
          </table:table-cell>
          <table:table-cell office:value-type="float" office:value="0.00264712" calcext:value-type="float">
            <text:p>0,00264712</text:p>
          </table:table-cell>
        </table:table-row>
        <table:table-row table:style-name="ro1">
          <table:table-cell table:formula="of:=[.A52]+0.025" office:value-type="float" office:value="1.275" calcext:value-type="float">
            <text:p>1,275</text:p>
          </table:table-cell>
          <table:table-cell table:style-name="Default" office:value-type="float" office:value="0.0197478" calcext:value-type="float">
            <text:p>0,0197478</text:p>
          </table:table-cell>
          <table:table-cell office:value-type="float" office:value="0.0187947" calcext:value-type="float">
            <text:p>0,0187947</text:p>
          </table:table-cell>
          <table:table-cell/>
          <table:table-cell table:style-name="Default" office:value-type="float" office:value="0.110879" calcext:value-type="float">
            <text:p>0,110879</text:p>
          </table:table-cell>
          <table:table-cell office:value-type="float" office:value="0.135644" calcext:value-type="float">
            <text:p>0,135644</text:p>
          </table:table-cell>
          <table:table-cell/>
          <table:table-cell table:style-name="Default" office:value-type="float" office:value="0.00376796" calcext:value-type="float">
            <text:p>0,00376796</text:p>
          </table:table-cell>
          <table:table-cell office:value-type="float" office:value="0.00261846" calcext:value-type="float">
            <text:p>0,00261846</text:p>
          </table:table-cell>
        </table:table-row>
        <table:table-row table:style-name="ro1">
          <table:table-cell table:formula="of:=[.A53]+0.025" office:value-type="float" office:value="1.3" calcext:value-type="float">
            <text:p>1,3</text:p>
          </table:table-cell>
          <table:table-cell table:style-name="Default" office:value-type="float" office:value="0.0194034" calcext:value-type="float">
            <text:p>0,0194034</text:p>
          </table:table-cell>
          <table:table-cell office:value-type="float" office:value="0.0184481" calcext:value-type="float">
            <text:p>0,0184481</text:p>
          </table:table-cell>
          <table:table-cell/>
          <table:table-cell table:style-name="Default" office:value-type="float" office:value="0.10932" calcext:value-type="float">
            <text:p>0,10932</text:p>
          </table:table-cell>
          <table:table-cell office:value-type="float" office:value="0.134792" calcext:value-type="float">
            <text:p>0,134792</text:p>
          </table:table-cell>
          <table:table-cell/>
          <table:table-cell table:style-name="Default" office:value-type="float" office:value="0.00370241" calcext:value-type="float">
            <text:p>0,00370241</text:p>
          </table:table-cell>
          <table:table-cell office:value-type="float" office:value="0.00258913" calcext:value-type="float">
            <text:p>0,00258913</text:p>
          </table:table-cell>
        </table:table-row>
        <table:table-row table:style-name="ro1">
          <table:table-cell table:formula="of:=[.A54]+0.025" office:value-type="float" office:value="1.325" calcext:value-type="float">
            <text:p>1,325</text:p>
          </table:table-cell>
          <table:table-cell table:style-name="Default" office:value-type="float" office:value="0.0190659" calcext:value-type="float">
            <text:p>0,0190659</text:p>
          </table:table-cell>
          <table:table-cell office:value-type="float" office:value="0.0181074" calcext:value-type="float">
            <text:p>0,0181074</text:p>
          </table:table-cell>
          <table:table-cell/>
          <table:table-cell table:style-name="Default" office:value-type="float" office:value="0.107728" calcext:value-type="float">
            <text:p>0,107728</text:p>
          </table:table-cell>
          <table:table-cell office:value-type="float" office:value="0.133802" calcext:value-type="float">
            <text:p>0,133802</text:p>
          </table:table-cell>
          <table:table-cell/>
          <table:table-cell table:style-name="Default" office:value-type="float" office:value="0.00363914" calcext:value-type="float">
            <text:p>0,00363914</text:p>
          </table:table-cell>
          <table:table-cell office:value-type="float" office:value="0.00255922" calcext:value-type="float">
            <text:p>0,00255922</text:p>
          </table:table-cell>
        </table:table-row>
        <table:table-row table:style-name="ro1">
          <table:table-cell table:formula="of:=[.A55]+0.025" office:value-type="float" office:value="1.35" calcext:value-type="float">
            <text:p>1,35</text:p>
          </table:table-cell>
          <table:table-cell table:style-name="Default" office:value-type="float" office:value="0.0187353" calcext:value-type="float">
            <text:p>0,0187353</text:p>
          </table:table-cell>
          <table:table-cell office:value-type="float" office:value="0.0177734" calcext:value-type="float">
            <text:p>0,0177734</text:p>
          </table:table-cell>
          <table:table-cell/>
          <table:table-cell table:style-name="Default" office:value-type="float" office:value="0.106118" calcext:value-type="float">
            <text:p>0,106118</text:p>
          </table:table-cell>
          <table:table-cell office:value-type="float" office:value="0.132687" calcext:value-type="float">
            <text:p>0,132687</text:p>
          </table:table-cell>
          <table:table-cell/>
          <table:table-cell table:style-name="Default" office:value-type="float" office:value="0.00357804" calcext:value-type="float">
            <text:p>0,00357804</text:p>
          </table:table-cell>
          <table:table-cell office:value-type="float" office:value="0.00252886" calcext:value-type="float">
            <text:p>0,00252886</text:p>
          </table:table-cell>
        </table:table-row>
        <table:table-row table:style-name="ro1">
          <table:table-cell table:formula="of:=[.A56]+0.025" office:value-type="float" office:value="1.375" calcext:value-type="float">
            <text:p>1,375</text:p>
          </table:table-cell>
          <table:table-cell table:style-name="Default" office:value-type="float" office:value="0.0184116" calcext:value-type="float">
            <text:p>0,0184116</text:p>
          </table:table-cell>
          <table:table-cell office:value-type="float" office:value="0.0174463" calcext:value-type="float">
            <text:p>0,0174463</text:p>
          </table:table-cell>
          <table:table-cell/>
          <table:table-cell table:style-name="Default" office:value-type="float" office:value="0.104501" calcext:value-type="float">
            <text:p>0,104501</text:p>
          </table:table-cell>
          <table:table-cell office:value-type="float" office:value="0.131464" calcext:value-type="float">
            <text:p>0,131464</text:p>
          </table:table-cell>
          <table:table-cell/>
          <table:table-cell table:style-name="Default" office:value-type="float" office:value="0.00351899" calcext:value-type="float">
            <text:p>0,00351899</text:p>
          </table:table-cell>
          <table:table-cell office:value-type="float" office:value="0.00249813" calcext:value-type="float">
            <text:p>0,00249813</text:p>
          </table:table-cell>
        </table:table-row>
        <table:table-row table:style-name="ro1">
          <table:table-cell table:formula="of:=[.A57]+0.025" office:value-type="float" office:value="1.4" calcext:value-type="float">
            <text:p>1,4</text:p>
          </table:table-cell>
          <table:table-cell table:style-name="Default" office:value-type="float" office:value="0.0180949" calcext:value-type="float">
            <text:p>0,0180949</text:p>
          </table:table-cell>
          <table:table-cell office:value-type="float" office:value="0.0171267" calcext:value-type="float">
            <text:p>0,0171267</text:p>
          </table:table-cell>
          <table:table-cell/>
          <table:table-cell table:style-name="Default" office:value-type="float" office:value="0.102887" calcext:value-type="float">
            <text:p>0,102887</text:p>
          </table:table-cell>
          <table:table-cell office:value-type="float" office:value="0.130146" calcext:value-type="float">
            <text:p>0,130146</text:p>
          </table:table-cell>
          <table:table-cell/>
          <table:table-cell table:style-name="Default" office:value-type="float" office:value="0.00346189" calcext:value-type="float">
            <text:p>0,00346189</text:p>
          </table:table-cell>
          <table:table-cell office:value-type="float" office:value="0.00246714" calcext:value-type="float">
            <text:p>0,00246714</text:p>
          </table:table-cell>
        </table:table-row>
        <table:table-row table:style-name="ro1">
          <table:table-cell table:formula="of:=[.A58]+0.025" office:value-type="float" office:value="1.425" calcext:value-type="float">
            <text:p>1,425</text:p>
          </table:table-cell>
          <table:table-cell table:style-name="Default" office:value-type="float" office:value="0.0177852" calcext:value-type="float">
            <text:p>0,0177852</text:p>
          </table:table-cell>
          <table:table-cell office:value-type="float" office:value="0.0168147" calcext:value-type="float">
            <text:p>0,0168147</text:p>
          </table:table-cell>
          <table:table-cell/>
          <table:table-cell table:style-name="Default" office:value-type="float" office:value="0.101283" calcext:value-type="float">
            <text:p>0,101283</text:p>
          </table:table-cell>
          <table:table-cell office:value-type="float" office:value="0.128749" calcext:value-type="float">
            <text:p>0,128749</text:p>
          </table:table-cell>
          <table:table-cell/>
          <table:table-cell table:style-name="Default" office:value-type="float" office:value="0.00340663" calcext:value-type="float">
            <text:p>0,00340663</text:p>
          </table:table-cell>
          <table:table-cell office:value-type="float" office:value="0.00243598" calcext:value-type="float">
            <text:p>0,00243598</text:p>
          </table:table-cell>
        </table:table-row>
        <table:table-row table:style-name="ro1">
          <table:table-cell table:formula="of:=[.A59]+0.025" office:value-type="float" office:value="1.45" calcext:value-type="float">
            <text:p>1,45</text:p>
          </table:table-cell>
          <table:table-cell table:style-name="Default" office:value-type="float" office:value="0.0174823" calcext:value-type="float">
            <text:p>0,0174823</text:p>
          </table:table-cell>
          <table:table-cell office:value-type="float" office:value="0.0165106" calcext:value-type="float">
            <text:p>0,0165106</text:p>
          </table:table-cell>
          <table:table-cell/>
          <table:table-cell table:style-name="Default" office:value-type="float" office:value="0.0996948" calcext:value-type="float">
            <text:p>0,0996948</text:p>
          </table:table-cell>
          <table:table-cell office:value-type="float" office:value="0.127284" calcext:value-type="float">
            <text:p>0,127284</text:p>
          </table:table-cell>
          <table:table-cell/>
          <table:table-cell table:style-name="Default" office:value-type="float" office:value="0.00335312" calcext:value-type="float">
            <text:p>0,00335312</text:p>
          </table:table-cell>
          <table:table-cell office:value-type="float" office:value="0.00240472" calcext:value-type="float">
            <text:p>0,00240472</text:p>
          </table:table-cell>
        </table:table-row>
        <table:table-row table:style-name="ro1">
          <table:table-cell table:formula="of:=[.A60]+0.025" office:value-type="float" office:value="1.475" calcext:value-type="float">
            <text:p>1,475</text:p>
          </table:table-cell>
          <table:table-cell table:style-name="Default" office:value-type="float" office:value="0.0171862" calcext:value-type="float">
            <text:p>0,0171862</text:p>
          </table:table-cell>
          <table:table-cell office:value-type="float" office:value="0.0162144" calcext:value-type="float">
            <text:p>0,0162144</text:p>
          </table:table-cell>
          <table:table-cell/>
          <table:table-cell table:style-name="Default" office:value-type="float" office:value="0.0981265" calcext:value-type="float">
            <text:p>0,0981265</text:p>
          </table:table-cell>
          <table:table-cell office:value-type="float" office:value="0.125765" calcext:value-type="float">
            <text:p>0,125765</text:p>
          </table:table-cell>
          <table:table-cell/>
          <table:table-cell table:style-name="Default" office:value-type="float" office:value="0.00330127" calcext:value-type="float">
            <text:p>0,00330127</text:p>
          </table:table-cell>
          <table:table-cell office:value-type="float" office:value="0.00237343" calcext:value-type="float">
            <text:p>0,00237343</text:p>
          </table:table-cell>
        </table:table-row>
        <table:table-row table:style-name="ro1">
          <table:table-cell table:formula="of:=[.A61]+0.025" office:value-type="float" office:value="1.5" calcext:value-type="float">
            <text:p>1,5</text:p>
          </table:table-cell>
          <table:table-cell table:style-name="Default" office:value-type="float" office:value="0.0168968" calcext:value-type="float">
            <text:p>0,0168968</text:p>
          </table:table-cell>
          <table:table-cell office:value-type="float" office:value="0.015926" calcext:value-type="float">
            <text:p>0,015926</text:p>
          </table:table-cell>
          <table:table-cell/>
          <table:table-cell table:style-name="Default" office:value-type="float" office:value="0.0965812" calcext:value-type="float">
            <text:p>0,0965812</text:p>
          </table:table-cell>
          <table:table-cell office:value-type="float" office:value="0.124201" calcext:value-type="float">
            <text:p>0,124201</text:p>
          </table:table-cell>
          <table:table-cell/>
          <table:table-cell table:style-name="Default" office:value-type="float" office:value="0.00325102" calcext:value-type="float">
            <text:p>0,00325102</text:p>
          </table:table-cell>
          <table:table-cell office:value-type="float" office:value="0.00234218" calcext:value-type="float">
            <text:p>0,00234218</text:p>
          </table:table-cell>
        </table:table-row>
        <table:table-row table:style-name="ro1">
          <table:table-cell table:formula="of:=[.A62]+0.025" office:value-type="float" office:value="1.525" calcext:value-type="float">
            <text:p>1,525</text:p>
          </table:table-cell>
          <table:table-cell table:style-name="Default" office:value-type="float" office:value="0.0166141" calcext:value-type="float">
            <text:p>0,0166141</text:p>
          </table:table-cell>
          <table:table-cell office:value-type="float" office:value="0.0156456" calcext:value-type="float">
            <text:p>0,0156456</text:p>
          </table:table-cell>
          <table:table-cell/>
          <table:table-cell table:style-name="Default" office:value-type="float" office:value="0.0950614" calcext:value-type="float">
            <text:p>0,0950614</text:p>
          </table:table-cell>
          <table:table-cell office:value-type="float" office:value="0.122604" calcext:value-type="float">
            <text:p>0,122604</text:p>
          </table:table-cell>
          <table:table-cell/>
          <table:table-cell table:style-name="Default" office:value-type="float" office:value="0.00320228" calcext:value-type="float">
            <text:p>0,00320228</text:p>
          </table:table-cell>
          <table:table-cell office:value-type="float" office:value="0.00231102" calcext:value-type="float">
            <text:p>0,00231102</text:p>
          </table:table-cell>
        </table:table-row>
        <table:table-row table:style-name="ro1">
          <table:table-cell table:formula="of:=[.A63]+0.025" office:value-type="float" office:value="1.55" calcext:value-type="float">
            <text:p>1,55</text:p>
          </table:table-cell>
          <table:table-cell table:style-name="Default" office:value-type="float" office:value="0.0163378" calcext:value-type="float">
            <text:p>0,0163378</text:p>
          </table:table-cell>
          <table:table-cell office:value-type="float" office:value="0.0153729" calcext:value-type="float">
            <text:p>0,0153729</text:p>
          </table:table-cell>
          <table:table-cell/>
          <table:table-cell table:style-name="Default" office:value-type="float" office:value="0.0935696" calcext:value-type="float">
            <text:p>0,0935696</text:p>
          </table:table-cell>
          <table:table-cell office:value-type="float" office:value="0.120983" calcext:value-type="float">
            <text:p>0,120983</text:p>
          </table:table-cell>
          <table:table-cell/>
          <table:table-cell table:style-name="Default" office:value-type="float" office:value="0.00315498" calcext:value-type="float">
            <text:p>0,00315498</text:p>
          </table:table-cell>
          <table:table-cell office:value-type="float" office:value="0.00228001" calcext:value-type="float">
            <text:p>0,00228001</text:p>
          </table:table-cell>
        </table:table-row>
        <table:table-row table:style-name="ro1">
          <table:table-cell table:formula="of:=[.A64]+0.025" office:value-type="float" office:value="1.575" calcext:value-type="float">
            <text:p>1,575</text:p>
          </table:table-cell>
          <table:table-cell table:style-name="Default" office:value-type="float" office:value="0.0160679" calcext:value-type="float">
            <text:p>0,0160679</text:p>
          </table:table-cell>
          <table:table-cell office:value-type="float" office:value="0.0151079" calcext:value-type="float">
            <text:p>0,0151079</text:p>
          </table:table-cell>
          <table:table-cell/>
          <table:table-cell table:style-name="Default" office:value-type="float" office:value="0.0921048" calcext:value-type="float">
            <text:p>0,0921048</text:p>
          </table:table-cell>
          <table:table-cell office:value-type="float" office:value="0.119348" calcext:value-type="float">
            <text:p>0,119348</text:p>
          </table:table-cell>
          <table:table-cell/>
          <table:table-cell table:style-name="Default" office:value-type="float" office:value="0.00310905" calcext:value-type="float">
            <text:p>0,00310905</text:p>
          </table:table-cell>
          <table:table-cell office:value-type="float" office:value="0.00224919" calcext:value-type="float">
            <text:p>0,00224919</text:p>
          </table:table-cell>
        </table:table-row>
        <table:table-row table:style-name="ro1">
          <table:table-cell table:formula="of:=[.A65]+0.025" office:value-type="float" office:value="1.6" calcext:value-type="float">
            <text:p>1,6</text:p>
          </table:table-cell>
          <table:table-cell table:style-name="Default" office:value-type="float" office:value="0.0158042" calcext:value-type="float">
            <text:p>0,0158042</text:p>
          </table:table-cell>
          <table:table-cell office:value-type="float" office:value="0.0148506" calcext:value-type="float">
            <text:p>0,0148506</text:p>
          </table:table-cell>
          <table:table-cell/>
          <table:table-cell table:style-name="Default" office:value-type="float" office:value="0.0906697" calcext:value-type="float">
            <text:p>0,0906697</text:p>
          </table:table-cell>
          <table:table-cell office:value-type="float" office:value="0.117703" calcext:value-type="float">
            <text:p>0,117703</text:p>
          </table:table-cell>
          <table:table-cell/>
          <table:table-cell table:style-name="Default" office:value-type="float" office:value="0.00306445" calcext:value-type="float">
            <text:p>0,00306445</text:p>
          </table:table-cell>
          <table:table-cell office:value-type="float" office:value="0.0022186" calcext:value-type="float">
            <text:p>0,0022186</text:p>
          </table:table-cell>
        </table:table-row>
        <table:table-row table:style-name="ro1">
          <table:table-cell table:formula="of:=[.A66]+0.025" office:value-type="float" office:value="1.625" calcext:value-type="float">
            <text:p>1,625</text:p>
          </table:table-cell>
          <table:table-cell table:style-name="Default" office:value-type="float" office:value="0.0155466" calcext:value-type="float">
            <text:p>0,0155466</text:p>
          </table:table-cell>
          <table:table-cell office:value-type="float" office:value="0.0146006" calcext:value-type="float">
            <text:p>0,0146006</text:p>
          </table:table-cell>
          <table:table-cell/>
          <table:table-cell table:style-name="Default" office:value-type="float" office:value="0.0892642" calcext:value-type="float">
            <text:p>0,0892642</text:p>
          </table:table-cell>
          <table:table-cell office:value-type="float" office:value="0.116057" calcext:value-type="float">
            <text:p>0,116057</text:p>
          </table:table-cell>
          <table:table-cell/>
          <table:table-cell table:style-name="Default" office:value-type="float" office:value="0.0030211" calcext:value-type="float">
            <text:p>0,0030211</text:p>
          </table:table-cell>
          <table:table-cell office:value-type="float" office:value="0.00218828" calcext:value-type="float">
            <text:p>0,00218828</text:p>
          </table:table-cell>
        </table:table-row>
        <table:table-row table:style-name="ro1">
          <table:table-cell table:formula="of:=[.A67]+0.025" office:value-type="float" office:value="1.65" calcext:value-type="float">
            <text:p>1,65</text:p>
          </table:table-cell>
          <table:table-cell table:style-name="Default" office:value-type="float" office:value="0.015295" calcext:value-type="float">
            <text:p>0,015295</text:p>
          </table:table-cell>
          <table:table-cell office:value-type="float" office:value="0.0143578" calcext:value-type="float">
            <text:p>0,0143578</text:p>
          </table:table-cell>
          <table:table-cell/>
          <table:table-cell table:style-name="Default" office:value-type="float" office:value="0.0878882" calcext:value-type="float">
            <text:p>0,0878882</text:p>
          </table:table-cell>
          <table:table-cell office:value-type="float" office:value="0.114414" calcext:value-type="float">
            <text:p>0,114414</text:p>
          </table:table-cell>
          <table:table-cell/>
          <table:table-cell table:style-name="Default" office:value-type="float" office:value="0.00297896" calcext:value-type="float">
            <text:p>0,00297896</text:p>
          </table:table-cell>
          <table:table-cell office:value-type="float" office:value="0.00215827" calcext:value-type="float">
            <text:p>0,00215827</text:p>
          </table:table-cell>
        </table:table-row>
        <table:table-row table:style-name="ro1">
          <table:table-cell table:formula="of:=[.A68]+0.025" office:value-type="float" office:value="1.675" calcext:value-type="float">
            <text:p>1,675</text:p>
          </table:table-cell>
          <table:table-cell table:style-name="Default" office:value-type="float" office:value="0.0150493" calcext:value-type="float">
            <text:p>0,0150493</text:p>
          </table:table-cell>
          <table:table-cell office:value-type="float" office:value="0.0141222" calcext:value-type="float">
            <text:p>0,0141222</text:p>
          </table:table-cell>
          <table:table-cell/>
          <table:table-cell table:style-name="Default" office:value-type="float" office:value="0.0865427" calcext:value-type="float">
            <text:p>0,0865427</text:p>
          </table:table-cell>
          <table:table-cell office:value-type="float" office:value="0.112781" calcext:value-type="float">
            <text:p>0,112781</text:p>
          </table:table-cell>
          <table:table-cell/>
          <table:table-cell table:style-name="Default" office:value-type="float" office:value="0.00293797" calcext:value-type="float">
            <text:p>0,00293797</text:p>
          </table:table-cell>
          <table:table-cell office:value-type="float" office:value="0.00212859" calcext:value-type="float">
            <text:p>0,00212859</text:p>
          </table:table-cell>
        </table:table-row>
        <table:table-row table:style-name="ro1">
          <table:table-cell table:formula="of:=[.A69]+0.025" office:value-type="float" office:value="1.7" calcext:value-type="float">
            <text:p>1,7</text:p>
          </table:table-cell>
          <table:table-cell table:style-name="Default" office:value-type="float" office:value="0.0148092" calcext:value-type="float">
            <text:p>0,0148092</text:p>
          </table:table-cell>
          <table:table-cell office:value-type="float" office:value="0.0138933" calcext:value-type="float">
            <text:p>0,0138933</text:p>
          </table:table-cell>
          <table:table-cell/>
          <table:table-cell table:style-name="Default" office:value-type="float" office:value="0.0852259" calcext:value-type="float">
            <text:p>0,0852259</text:p>
          </table:table-cell>
          <table:table-cell office:value-type="float" office:value="0.111161" calcext:value-type="float">
            <text:p>0,111161</text:p>
          </table:table-cell>
          <table:table-cell/>
          <table:table-cell table:style-name="Default" office:value-type="float" office:value="0.00289808" calcext:value-type="float">
            <text:p>0,00289808</text:p>
          </table:table-cell>
          <table:table-cell office:value-type="float" office:value="0.00209926" calcext:value-type="float">
            <text:p>0,00209926</text:p>
          </table:table-cell>
        </table:table-row>
        <table:table-row table:style-name="ro1">
          <table:table-cell table:formula="of:=[.A70]+0.025" office:value-type="float" office:value="1.725" calcext:value-type="float">
            <text:p>1,725</text:p>
          </table:table-cell>
          <table:table-cell table:style-name="Default" office:value-type="float" office:value="0.0145747" calcext:value-type="float">
            <text:p>0,0145747</text:p>
          </table:table-cell>
          <table:table-cell office:value-type="float" office:value="0.0136712" calcext:value-type="float">
            <text:p>0,0136712</text:p>
          </table:table-cell>
          <table:table-cell/>
          <table:table-cell table:style-name="Default" office:value-type="float" office:value="0.0839388" calcext:value-type="float">
            <text:p>0,0839388</text:p>
          </table:table-cell>
          <table:table-cell office:value-type="float" office:value="0.109558" calcext:value-type="float">
            <text:p>0,109558</text:p>
          </table:table-cell>
          <table:table-cell/>
          <table:table-cell table:style-name="Default" office:value-type="float" office:value="0.00285925" calcext:value-type="float">
            <text:p>0,00285925</text:p>
          </table:table-cell>
          <table:table-cell office:value-type="float" office:value="0.00207032" calcext:value-type="float">
            <text:p>0,00207032</text:p>
          </table:table-cell>
        </table:table-row>
        <table:table-row table:style-name="ro1">
          <table:table-cell table:formula="of:=[.A71]+0.025" office:value-type="float" office:value="1.75" calcext:value-type="float">
            <text:p>1,75</text:p>
          </table:table-cell>
          <table:table-cell table:style-name="Default" office:value-type="float" office:value="0.0143457" calcext:value-type="float">
            <text:p>0,0143457</text:p>
          </table:table-cell>
          <table:table-cell office:value-type="float" office:value="0.0134556" calcext:value-type="float">
            <text:p>0,0134556</text:p>
          </table:table-cell>
          <table:table-cell/>
          <table:table-cell table:style-name="Default" office:value-type="float" office:value="0.0826803" calcext:value-type="float">
            <text:p>0,0826803</text:p>
          </table:table-cell>
          <table:table-cell office:value-type="float" office:value="0.107975" calcext:value-type="float">
            <text:p>0,107975</text:p>
          </table:table-cell>
          <table:table-cell/>
          <table:table-cell table:style-name="Default" office:value-type="float" office:value="0.00282144" calcext:value-type="float">
            <text:p>0,00282144</text:p>
          </table:table-cell>
          <table:table-cell office:value-type="float" office:value="0.00204177" calcext:value-type="float">
            <text:p>0,00204177</text:p>
          </table:table-cell>
        </table:table-row>
        <table:table-row table:style-name="ro1">
          <table:table-cell table:formula="of:=[.A72]+0.025" office:value-type="float" office:value="1.775" calcext:value-type="float">
            <text:p>1,775</text:p>
          </table:table-cell>
          <table:table-cell table:style-name="Default" office:value-type="float" office:value="0.0141219" calcext:value-type="float">
            <text:p>0,0141219</text:p>
          </table:table-cell>
          <table:table-cell office:value-type="float" office:value="0.0132461" calcext:value-type="float">
            <text:p>0,0132461</text:p>
          </table:table-cell>
          <table:table-cell/>
          <table:table-cell table:style-name="Default" office:value-type="float" office:value="0.0814503" calcext:value-type="float">
            <text:p>0,0814503</text:p>
          </table:table-cell>
          <table:table-cell office:value-type="float" office:value="0.106414" calcext:value-type="float">
            <text:p>0,106414</text:p>
          </table:table-cell>
          <table:table-cell/>
          <table:table-cell table:style-name="Default" office:value-type="float" office:value="0.00278461" calcext:value-type="float">
            <text:p>0,00278461</text:p>
          </table:table-cell>
          <table:table-cell office:value-type="float" office:value="0.00201363" calcext:value-type="float">
            <text:p>0,00201363</text:p>
          </table:table-cell>
        </table:table-row>
        <table:table-row table:style-name="ro1">
          <table:table-cell table:formula="of:=[.A73]+0.025" office:value-type="float" office:value="1.8" calcext:value-type="float">
            <text:p>1,8</text:p>
          </table:table-cell>
          <table:table-cell table:style-name="Default" office:value-type="float" office:value="0.0139033" calcext:value-type="float">
            <text:p>0,0139033</text:p>
          </table:table-cell>
          <table:table-cell office:value-type="float" office:value="0.0130429" calcext:value-type="float">
            <text:p>0,0130429</text:p>
          </table:table-cell>
          <table:table-cell/>
          <table:table-cell table:style-name="Default" office:value-type="float" office:value="0.0802483" calcext:value-type="float">
            <text:p>0,0802483</text:p>
          </table:table-cell>
          <table:table-cell office:value-type="float" office:value="0.104877" calcext:value-type="float">
            <text:p>0,104877</text:p>
          </table:table-cell>
          <table:table-cell/>
          <table:table-cell table:style-name="Default" office:value-type="float" office:value="0.00274872" calcext:value-type="float">
            <text:p>0,00274872</text:p>
          </table:table-cell>
          <table:table-cell office:value-type="float" office:value="0.00198591" calcext:value-type="float">
            <text:p>0,00198591</text:p>
          </table:table-cell>
        </table:table-row>
        <table:table-row table:style-name="ro1">
          <table:table-cell table:formula="of:=[.A74]+0.025" office:value-type="float" office:value="1.825" calcext:value-type="float">
            <text:p>1,825</text:p>
          </table:table-cell>
          <table:table-cell table:style-name="Default" office:value-type="float" office:value="0.0136897" calcext:value-type="float">
            <text:p>0,0136897</text:p>
          </table:table-cell>
          <table:table-cell office:value-type="float" office:value="0.0128454" calcext:value-type="float">
            <text:p>0,0128454</text:p>
          </table:table-cell>
          <table:table-cell/>
          <table:table-cell table:style-name="Default" office:value-type="float" office:value="0.0790737" calcext:value-type="float">
            <text:p>0,0790737</text:p>
          </table:table-cell>
          <table:table-cell office:value-type="float" office:value="0.103367" calcext:value-type="float">
            <text:p>0,103367</text:p>
          </table:table-cell>
          <table:table-cell/>
          <table:table-cell table:style-name="Default" office:value-type="float" office:value="0.00271372" calcext:value-type="float">
            <text:p>0,00271372</text:p>
          </table:table-cell>
          <table:table-cell office:value-type="float" office:value="0.00195864" calcext:value-type="float">
            <text:p>0,00195864</text:p>
          </table:table-cell>
        </table:table-row>
        <table:table-row table:style-name="ro1">
          <table:table-cell table:formula="of:=[.A75]+0.025" office:value-type="float" office:value="1.85" calcext:value-type="float">
            <text:p>1,85</text:p>
          </table:table-cell>
          <table:table-cell table:style-name="Default" office:value-type="float" office:value="0.0134809" calcext:value-type="float">
            <text:p>0,0134809</text:p>
          </table:table-cell>
          <table:table-cell office:value-type="float" office:value="0.0126537" calcext:value-type="float">
            <text:p>0,0126537</text:p>
          </table:table-cell>
          <table:table-cell/>
          <table:table-cell table:style-name="Default" office:value-type="float" office:value="0.0779259" calcext:value-type="float">
            <text:p>0,0779259</text:p>
          </table:table-cell>
          <table:table-cell office:value-type="float" office:value="0.101884" calcext:value-type="float">
            <text:p>0,101884</text:p>
          </table:table-cell>
          <table:table-cell/>
          <table:table-cell table:style-name="Default" office:value-type="float" office:value="0.0026796" calcext:value-type="float">
            <text:p>0,0026796</text:p>
          </table:table-cell>
          <table:table-cell office:value-type="float" office:value="0.00193181" calcext:value-type="float">
            <text:p>0,00193181</text:p>
          </table:table-cell>
        </table:table-row>
        <table:table-row table:style-name="ro1">
          <table:table-cell table:formula="of:=[.A76]+0.025" office:value-type="float" office:value="1.875" calcext:value-type="float">
            <text:p>1,875</text:p>
          </table:table-cell>
          <table:table-cell table:style-name="Default" office:value-type="float" office:value="0.013277" calcext:value-type="float">
            <text:p>0,013277</text:p>
          </table:table-cell>
          <table:table-cell office:value-type="float" office:value="0.0124674" calcext:value-type="float">
            <text:p>0,0124674</text:p>
          </table:table-cell>
          <table:table-cell/>
          <table:table-cell table:style-name="Default" office:value-type="float" office:value="0.0768042" calcext:value-type="float">
            <text:p>0,0768042</text:p>
          </table:table-cell>
          <table:table-cell office:value-type="float" office:value="0.100429" calcext:value-type="float">
            <text:p>0,100429</text:p>
          </table:table-cell>
          <table:table-cell/>
          <table:table-cell table:style-name="Default" office:value-type="float" office:value="0.00264631" calcext:value-type="float">
            <text:p>0,00264631</text:p>
          </table:table-cell>
          <table:table-cell office:value-type="float" office:value="0.00190542" calcext:value-type="float">
            <text:p>0,00190542</text:p>
          </table:table-cell>
        </table:table-row>
        <table:table-row table:style-name="ro1">
          <table:table-cell table:formula="of:=[.A77]+0.025" office:value-type="float" office:value="1.9" calcext:value-type="float">
            <text:p>1,9</text:p>
          </table:table-cell>
          <table:table-cell table:style-name="Default" office:value-type="float" office:value="0.0130777" calcext:value-type="float">
            <text:p>0,0130777</text:p>
          </table:table-cell>
          <table:table-cell office:value-type="float" office:value="0.0122864" calcext:value-type="float">
            <text:p>0,0122864</text:p>
          </table:table-cell>
          <table:table-cell/>
          <table:table-cell table:style-name="Default" office:value-type="float" office:value="0.075708" calcext:value-type="float">
            <text:p>0,075708</text:p>
          </table:table-cell>
          <table:table-cell office:value-type="float" office:value="0.0990027" calcext:value-type="float">
            <text:p>0,0990027</text:p>
          </table:table-cell>
          <table:table-cell/>
          <table:table-cell table:style-name="Default" office:value-type="float" office:value="0.00261382" calcext:value-type="float">
            <text:p>0,00261382</text:p>
          </table:table-cell>
          <table:table-cell office:value-type="float" office:value="0.00187949" calcext:value-type="float">
            <text:p>0,00187949</text:p>
          </table:table-cell>
        </table:table-row>
        <table:table-row table:style-name="ro1">
          <table:table-cell table:formula="of:=[.A78]+0.025" office:value-type="float" office:value="1.925" calcext:value-type="float">
            <text:p>1,925</text:p>
          </table:table-cell>
          <table:table-cell table:style-name="Default" office:value-type="float" office:value="0.0128828" calcext:value-type="float">
            <text:p>0,0128828</text:p>
          </table:table-cell>
          <table:table-cell office:value-type="float" office:value="0.0121105" calcext:value-type="float">
            <text:p>0,0121105</text:p>
          </table:table-cell>
          <table:table-cell/>
          <table:table-cell table:style-name="Default" office:value-type="float" office:value="0.0746368" calcext:value-type="float">
            <text:p>0,0746368</text:p>
          </table:table-cell>
          <table:table-cell office:value-type="float" office:value="0.0976053" calcext:value-type="float">
            <text:p>0,0976053</text:p>
          </table:table-cell>
          <table:table-cell/>
          <table:table-cell table:style-name="Default" office:value-type="float" office:value="0.00258211" calcext:value-type="float">
            <text:p>0,00258211</text:p>
          </table:table-cell>
          <table:table-cell office:value-type="float" office:value="0.00185402" calcext:value-type="float">
            <text:p>0,00185402</text:p>
          </table:table-cell>
        </table:table-row>
        <table:table-row table:style-name="ro1">
          <table:table-cell table:formula="of:=[.A79]+0.025" office:value-type="float" office:value="1.95" calcext:value-type="float">
            <text:p>1,95</text:p>
          </table:table-cell>
          <table:table-cell table:style-name="Default" office:value-type="float" office:value="0.0126924" calcext:value-type="float">
            <text:p>0,0126924</text:p>
          </table:table-cell>
          <table:table-cell office:value-type="float" office:value="0.0119396" calcext:value-type="float">
            <text:p>0,0119396</text:p>
          </table:table-cell>
          <table:table-cell/>
          <table:table-cell table:style-name="Default" office:value-type="float" office:value="0.0735897" calcext:value-type="float">
            <text:p>0,0735897</text:p>
          </table:table-cell>
          <table:table-cell office:value-type="float" office:value="0.0962384" calcext:value-type="float">
            <text:p>0,0962384</text:p>
          </table:table-cell>
          <table:table-cell/>
          <table:table-cell table:style-name="Default" office:value-type="float" office:value="0.00255114" calcext:value-type="float">
            <text:p>0,00255114</text:p>
          </table:table-cell>
          <table:table-cell office:value-type="float" office:value="0.001829" calcext:value-type="float">
            <text:p>0,001829</text:p>
          </table:table-cell>
        </table:table-row>
        <table:table-row table:style-name="ro1">
          <table:table-cell table:formula="of:=[.A80]+0.025" office:value-type="float" office:value="1.975" calcext:value-type="float">
            <text:p>1,975</text:p>
          </table:table-cell>
          <table:table-cell table:style-name="Default" office:value-type="float" office:value="0.0125063" calcext:value-type="float">
            <text:p>0,0125063</text:p>
          </table:table-cell>
          <table:table-cell office:value-type="float" office:value="0.0117735" calcext:value-type="float">
            <text:p>0,0117735</text:p>
          </table:table-cell>
          <table:table-cell/>
          <table:table-cell table:style-name="Default" office:value-type="float" office:value="0.0725663" calcext:value-type="float">
            <text:p>0,0725663</text:p>
          </table:table-cell>
          <table:table-cell office:value-type="float" office:value="0.0949011" calcext:value-type="float">
            <text:p>0,0949011</text:p>
          </table:table-cell>
          <table:table-cell/>
          <table:table-cell table:style-name="Default" office:value-type="float" office:value="0.00252089" calcext:value-type="float">
            <text:p>0,00252089</text:p>
          </table:table-cell>
          <table:table-cell office:value-type="float" office:value="0.00180444" calcext:value-type="float">
            <text:p>0,00180444</text:p>
          </table:table-cell>
        </table:table-row>
        <table:table-row table:style-name="ro1">
          <table:table-cell table:formula="of:=[.A81]+0.025" office:value-type="float" office:value="2" calcext:value-type="float">
            <text:p>2</text:p>
          </table:table-cell>
          <table:table-cell table:style-name="Default" office:value-type="float" office:value="0.0123243" calcext:value-type="float">
            <text:p>0,0123243</text:p>
          </table:table-cell>
          <table:table-cell office:value-type="float" office:value="0.0116119" calcext:value-type="float">
            <text:p>0,0116119</text:p>
          </table:table-cell>
          <table:table-cell/>
          <table:table-cell table:style-name="Default" office:value-type="float" office:value="0.0715659" calcext:value-type="float">
            <text:p>0,0715659</text:p>
          </table:table-cell>
          <table:table-cell office:value-type="float" office:value="0.0935926" calcext:value-type="float">
            <text:p>0,0935926</text:p>
          </table:table-cell>
          <table:table-cell/>
          <table:table-cell table:style-name="Default" office:value-type="float" office:value="0.00249134" calcext:value-type="float">
            <text:p>0,00249134</text:p>
          </table:table-cell>
          <table:table-cell office:value-type="float" office:value="0.00178034" calcext:value-type="float">
            <text:p>0,00178034</text:p>
          </table:table-cell>
        </table:table-row>
        <table:table-row table:style-name="ro1">
          <table:table-cell table:formula="of:=[.A82]+0.025" office:value-type="float" office:value="2.025" calcext:value-type="float">
            <text:p>2,025</text:p>
          </table:table-cell>
          <table:table-cell table:style-name="Default" office:value-type="float" office:value="0.0121463" calcext:value-type="float">
            <text:p>0,0121463</text:p>
          </table:table-cell>
          <table:table-cell office:value-type="float" office:value="0.0114548" calcext:value-type="float">
            <text:p>0,0114548</text:p>
          </table:table-cell>
          <table:table-cell/>
          <table:table-cell table:style-name="Default" office:value-type="float" office:value="0.070588" calcext:value-type="float">
            <text:p>0,070588</text:p>
          </table:table-cell>
          <table:table-cell office:value-type="float" office:value="0.0923144" calcext:value-type="float">
            <text:p>0,0923144</text:p>
          </table:table-cell>
          <table:table-cell/>
          <table:table-cell table:style-name="Default" office:value-type="float" office:value="0.00246246" calcext:value-type="float">
            <text:p>0,00246246</text:p>
          </table:table-cell>
          <table:table-cell office:value-type="float" office:value="0.0017567" calcext:value-type="float">
            <text:p>0,0017567</text:p>
          </table:table-cell>
        </table:table-row>
        <table:table-row table:style-name="ro1">
          <table:table-cell table:formula="of:=[.A83]+0.025" office:value-type="float" office:value="2.05" calcext:value-type="float">
            <text:p>2,05</text:p>
          </table:table-cell>
          <table:table-cell table:style-name="Default" office:value-type="float" office:value="0.0119723" calcext:value-type="float">
            <text:p>0,0119723</text:p>
          </table:table-cell>
          <table:table-cell office:value-type="float" office:value="0.011302" calcext:value-type="float">
            <text:p>0,011302</text:p>
          </table:table-cell>
          <table:table-cell/>
          <table:table-cell table:style-name="Default" office:value-type="float" office:value="0.0696322" calcext:value-type="float">
            <text:p>0,0696322</text:p>
          </table:table-cell>
          <table:table-cell office:value-type="float" office:value="0.0910659" calcext:value-type="float">
            <text:p>0,0910659</text:p>
          </table:table-cell>
          <table:table-cell/>
          <table:table-cell table:style-name="Default" office:value-type="float" office:value="0.00243422" calcext:value-type="float">
            <text:p>0,00243422</text:p>
          </table:table-cell>
          <table:table-cell office:value-type="float" office:value="0.0017335" calcext:value-type="float">
            <text:p>0,0017335</text:p>
          </table:table-cell>
        </table:table-row>
        <table:table-row table:style-name="ro1">
          <table:table-cell table:formula="of:=[.A84]+0.025" office:value-type="float" office:value="2.075" calcext:value-type="float">
            <text:p>2,075</text:p>
          </table:table-cell>
          <table:table-cell table:style-name="Default" office:value-type="float" office:value="0.0118021" calcext:value-type="float">
            <text:p>0,0118021</text:p>
          </table:table-cell>
          <table:table-cell office:value-type="float" office:value="0.0111532" calcext:value-type="float">
            <text:p>0,0111532</text:p>
          </table:table-cell>
          <table:table-cell/>
          <table:table-cell table:style-name="Default" office:value-type="float" office:value="0.0686976" calcext:value-type="float">
            <text:p>0,0686976</text:p>
          </table:table-cell>
          <table:table-cell office:value-type="float" office:value="0.0898453" calcext:value-type="float">
            <text:p>0,0898453</text:p>
          </table:table-cell>
          <table:table-cell/>
          <table:table-cell table:style-name="Default" office:value-type="float" office:value="0.00240661" calcext:value-type="float">
            <text:p>0,00240661</text:p>
          </table:table-cell>
          <table:table-cell office:value-type="float" office:value="0.00171077" calcext:value-type="float">
            <text:p>0,00171077</text:p>
          </table:table-cell>
        </table:table-row>
        <table:table-row table:style-name="ro1">
          <table:table-cell table:formula="of:=[.A85]+0.025" office:value-type="float" office:value="2.1" calcext:value-type="float">
            <text:p>2,1</text:p>
          </table:table-cell>
          <table:table-cell table:style-name="Default" office:value-type="float" office:value="0.0116356" calcext:value-type="float">
            <text:p>0,0116356</text:p>
          </table:table-cell>
          <table:table-cell office:value-type="float" office:value="0.0110085" calcext:value-type="float">
            <text:p>0,0110085</text:p>
          </table:table-cell>
          <table:table-cell/>
          <table:table-cell table:style-name="Default" office:value-type="float" office:value="0.0677836" calcext:value-type="float">
            <text:p>0,0677836</text:p>
          </table:table-cell>
          <table:table-cell office:value-type="float" office:value="0.0886543" calcext:value-type="float">
            <text:p>0,0886543</text:p>
          </table:table-cell>
          <table:table-cell/>
          <table:table-cell table:style-name="Default" office:value-type="float" office:value="0.00237961" calcext:value-type="float">
            <text:p>0,00237961</text:p>
          </table:table-cell>
          <table:table-cell office:value-type="float" office:value="0.00168847" calcext:value-type="float">
            <text:p>0,00168847</text:p>
          </table:table-cell>
        </table:table-row>
        <table:table-row table:style-name="ro1">
          <table:table-cell table:formula="of:=[.A86]+0.025" office:value-type="float" office:value="2.125" calcext:value-type="float">
            <text:p>2,125</text:p>
          </table:table-cell>
          <table:table-cell table:style-name="Default" office:value-type="float" office:value="0.0114727" calcext:value-type="float">
            <text:p>0,0114727</text:p>
          </table:table-cell>
          <table:table-cell office:value-type="float" office:value="0.0108676" calcext:value-type="float">
            <text:p>0,0108676</text:p>
          </table:table-cell>
          <table:table-cell/>
          <table:table-cell table:style-name="Default" office:value-type="float" office:value="0.0668898" calcext:value-type="float">
            <text:p>0,0668898</text:p>
          </table:table-cell>
          <table:table-cell office:value-type="float" office:value="0.0874904" calcext:value-type="float">
            <text:p>0,0874904</text:p>
          </table:table-cell>
          <table:table-cell/>
          <table:table-cell table:style-name="Default" office:value-type="float" office:value="0.00235319" calcext:value-type="float">
            <text:p>0,00235319</text:p>
          </table:table-cell>
          <table:table-cell office:value-type="float" office:value="0.00166661" calcext:value-type="float">
            <text:p>0,00166661</text:p>
          </table:table-cell>
        </table:table-row>
        <table:table-row table:style-name="ro1">
          <table:table-cell table:formula="of:=[.A87]+0.025" office:value-type="float" office:value="2.15" calcext:value-type="float">
            <text:p>2,15</text:p>
          </table:table-cell>
          <table:table-cell table:style-name="Default" office:value-type="float" office:value="0.0113134" calcext:value-type="float">
            <text:p>0,0113134</text:p>
          </table:table-cell>
          <table:table-cell office:value-type="float" office:value="0.0107304" calcext:value-type="float">
            <text:p>0,0107304</text:p>
          </table:table-cell>
          <table:table-cell/>
          <table:table-cell table:style-name="Default" office:value-type="float" office:value="0.0660153" calcext:value-type="float">
            <text:p>0,0660153</text:p>
          </table:table-cell>
          <table:table-cell office:value-type="float" office:value="0.0863537" calcext:value-type="float">
            <text:p>0,0863537</text:p>
          </table:table-cell>
          <table:table-cell/>
          <table:table-cell table:style-name="Default" office:value-type="float" office:value="0.00232734" calcext:value-type="float">
            <text:p>0,00232734</text:p>
          </table:table-cell>
          <table:table-cell office:value-type="float" office:value="0.00164519" calcext:value-type="float">
            <text:p>0,00164519</text:p>
          </table:table-cell>
        </table:table-row>
        <table:table-row table:style-name="ro1">
          <table:table-cell table:formula="of:=[.A88]+0.025" office:value-type="float" office:value="2.175" calcext:value-type="float">
            <text:p>2,175</text:p>
          </table:table-cell>
          <table:table-cell table:style-name="Default" office:value-type="float" office:value="0.0111574" calcext:value-type="float">
            <text:p>0,0111574</text:p>
          </table:table-cell>
          <table:table-cell office:value-type="float" office:value="0.0105967" calcext:value-type="float">
            <text:p>0,0105967</text:p>
          </table:table-cell>
          <table:table-cell/>
          <table:table-cell table:style-name="Default" office:value-type="float" office:value="0.0651599" calcext:value-type="float">
            <text:p>0,0651599</text:p>
          </table:table-cell>
          <table:table-cell office:value-type="float" office:value="0.0852448" calcext:value-type="float">
            <text:p>0,0852448</text:p>
          </table:table-cell>
          <table:table-cell/>
          <table:table-cell table:style-name="Default" office:value-type="float" office:value="0.00230203" calcext:value-type="float">
            <text:p>0,00230203</text:p>
          </table:table-cell>
          <table:table-cell office:value-type="float" office:value="0.00162421" calcext:value-type="float">
            <text:p>0,00162421</text:p>
          </table:table-cell>
        </table:table-row>
        <table:table-row table:style-name="ro1">
          <table:table-cell table:formula="of:=[.A89]+0.025" office:value-type="float" office:value="2.2" calcext:value-type="float">
            <text:p>2,2</text:p>
          </table:table-cell>
          <table:table-cell table:style-name="Default" office:value-type="float" office:value="0.0110049" calcext:value-type="float">
            <text:p>0,0110049</text:p>
          </table:table-cell>
          <table:table-cell office:value-type="float" office:value="0.0104665" calcext:value-type="float">
            <text:p>0,0104665</text:p>
          </table:table-cell>
          <table:table-cell/>
          <table:table-cell table:style-name="Default" office:value-type="float" office:value="0.0643228" calcext:value-type="float">
            <text:p>0,0643228</text:p>
          </table:table-cell>
          <table:table-cell office:value-type="float" office:value="0.0841615" calcext:value-type="float">
            <text:p>0,0841615</text:p>
          </table:table-cell>
          <table:table-cell/>
          <table:table-cell table:style-name="Default" office:value-type="float" office:value="0.00227725" calcext:value-type="float">
            <text:p>0,00227725</text:p>
          </table:table-cell>
          <table:table-cell office:value-type="float" office:value="0.00160363" calcext:value-type="float">
            <text:p>0,00160363</text:p>
          </table:table-cell>
        </table:table-row>
        <table:table-row table:style-name="ro1">
          <table:table-cell table:formula="of:=[.A90]+0.025" office:value-type="float" office:value="2.225" calcext:value-type="float">
            <text:p>2,225</text:p>
          </table:table-cell>
          <table:table-cell table:style-name="Default" office:value-type="float" office:value="0.0108555" calcext:value-type="float">
            <text:p>0,0108555</text:p>
          </table:table-cell>
          <table:table-cell office:value-type="float" office:value="0.0103396" calcext:value-type="float">
            <text:p>0,0103396</text:p>
          </table:table-cell>
          <table:table-cell/>
          <table:table-cell table:style-name="Default" office:value-type="float" office:value="0.0635036" calcext:value-type="float">
            <text:p>0,0635036</text:p>
          </table:table-cell>
          <table:table-cell office:value-type="float" office:value="0.0831045" calcext:value-type="float">
            <text:p>0,0831045</text:p>
          </table:table-cell>
          <table:table-cell/>
          <table:table-cell table:style-name="Default" office:value-type="float" office:value="0.00225299" calcext:value-type="float">
            <text:p>0,00225299</text:p>
          </table:table-cell>
          <table:table-cell office:value-type="float" office:value="0.00158349" calcext:value-type="float">
            <text:p>0,00158349</text:p>
          </table:table-cell>
        </table:table-row>
        <table:table-row table:style-name="ro1">
          <table:table-cell table:formula="of:=[.A91]+0.025" office:value-type="float" office:value="2.25" calcext:value-type="float">
            <text:p>2,25</text:p>
          </table:table-cell>
          <table:table-cell table:style-name="Default" office:value-type="float" office:value="0.0107094" calcext:value-type="float">
            <text:p>0,0107094</text:p>
          </table:table-cell>
          <table:table-cell office:value-type="float" office:value="0.010216" calcext:value-type="float">
            <text:p>0,010216</text:p>
          </table:table-cell>
          <table:table-cell/>
          <table:table-cell table:style-name="Default" office:value-type="float" office:value="0.0627018" calcext:value-type="float">
            <text:p>0,0627018</text:p>
          </table:table-cell>
          <table:table-cell office:value-type="float" office:value="0.082072" calcext:value-type="float">
            <text:p>0,082072</text:p>
          </table:table-cell>
          <table:table-cell/>
          <table:table-cell table:style-name="Default" office:value-type="float" office:value="0.00222922" calcext:value-type="float">
            <text:p>0,00222922</text:p>
          </table:table-cell>
          <table:table-cell office:value-type="float" office:value="0.00156374" calcext:value-type="float">
            <text:p>0,00156374</text:p>
          </table:table-cell>
        </table:table-row>
        <table:table-row table:style-name="ro1">
          <table:table-cell table:formula="of:=[.A92]+0.025" office:value-type="float" office:value="2.275" calcext:value-type="float">
            <text:p>2,275</text:p>
          </table:table-cell>
          <table:table-cell table:style-name="Default" office:value-type="float" office:value="0.0105662" calcext:value-type="float">
            <text:p>0,0105662</text:p>
          </table:table-cell>
          <table:table-cell office:value-type="float" office:value="0.0100954" calcext:value-type="float">
            <text:p>0,0100954</text:p>
          </table:table-cell>
          <table:table-cell/>
          <table:table-cell table:style-name="Default" office:value-type="float" office:value="0.0619168" calcext:value-type="float">
            <text:p>0,0619168</text:p>
          </table:table-cell>
          <table:table-cell office:value-type="float" office:value="0.0810642" calcext:value-type="float">
            <text:p>0,0810642</text:p>
          </table:table-cell>
          <table:table-cell/>
          <table:table-cell table:style-name="Default" office:value-type="float" office:value="0.00220594" calcext:value-type="float">
            <text:p>0,00220594</text:p>
          </table:table-cell>
          <table:table-cell office:value-type="float" office:value="0.00154441" calcext:value-type="float">
            <text:p>0,00154441</text:p>
          </table:table-cell>
        </table:table-row>
        <table:table-row table:style-name="ro1">
          <table:table-cell table:formula="of:=[.A93]+0.025" office:value-type="float" office:value="2.3" calcext:value-type="float">
            <text:p>2,3</text:p>
          </table:table-cell>
          <table:table-cell table:style-name="Default" office:value-type="float" office:value="0.0104261" calcext:value-type="float">
            <text:p>0,0104261</text:p>
          </table:table-cell>
          <table:table-cell office:value-type="float" office:value="0.00997781" calcext:value-type="float">
            <text:p>0,00997781</text:p>
          </table:table-cell>
          <table:table-cell/>
          <table:table-cell table:style-name="Default" office:value-type="float" office:value="0.0611481" calcext:value-type="float">
            <text:p>0,0611481</text:p>
          </table:table-cell>
          <table:table-cell office:value-type="float" office:value="0.0800801" calcext:value-type="float">
            <text:p>0,0800801</text:p>
          </table:table-cell>
          <table:table-cell/>
          <table:table-cell table:style-name="Default" office:value-type="float" office:value="0.00218312" calcext:value-type="float">
            <text:p>0,00218312</text:p>
          </table:table-cell>
          <table:table-cell office:value-type="float" office:value="0.00152547" calcext:value-type="float">
            <text:p>0,00152547</text:p>
          </table:table-cell>
        </table:table-row>
        <table:table-row table:style-name="ro1">
          <table:table-cell table:formula="of:=[.A94]+0.025" office:value-type="float" office:value="2.325" calcext:value-type="float">
            <text:p>2,325</text:p>
          </table:table-cell>
          <table:table-cell table:style-name="Default" office:value-type="float" office:value="0.0102889" calcext:value-type="float">
            <text:p>0,0102889</text:p>
          </table:table-cell>
          <table:table-cell office:value-type="float" office:value="0.00986315" calcext:value-type="float">
            <text:p>0,00986315</text:p>
          </table:table-cell>
          <table:table-cell/>
          <table:table-cell table:style-name="Default" office:value-type="float" office:value="0.0603953" calcext:value-type="float">
            <text:p>0,0603953</text:p>
          </table:table-cell>
          <table:table-cell office:value-type="float" office:value="0.0791193" calcext:value-type="float">
            <text:p>0,0791193</text:p>
          </table:table-cell>
          <table:table-cell/>
          <table:table-cell table:style-name="Default" office:value-type="float" office:value="0.00216076" calcext:value-type="float">
            <text:p>0,00216076</text:p>
          </table:table-cell>
          <table:table-cell office:value-type="float" office:value="0.00150691" calcext:value-type="float">
            <text:p>0,00150691</text:p>
          </table:table-cell>
        </table:table-row>
        <table:table-row table:style-name="ro1">
          <table:table-cell table:formula="of:=[.A95]+0.025" office:value-type="float" office:value="2.35" calcext:value-type="float">
            <text:p>2,35</text:p>
          </table:table-cell>
          <table:table-cell table:style-name="Default" office:value-type="float" office:value="0.0101546" calcext:value-type="float">
            <text:p>0,0101546</text:p>
          </table:table-cell>
          <table:table-cell office:value-type="float" office:value="0.00975128" calcext:value-type="float">
            <text:p>0,00975128</text:p>
          </table:table-cell>
          <table:table-cell/>
          <table:table-cell table:style-name="Default" office:value-type="float" office:value="0.0596578" calcext:value-type="float">
            <text:p>0,0596578</text:p>
          </table:table-cell>
          <table:table-cell office:value-type="float" office:value="0.0781811" calcext:value-type="float">
            <text:p>0,0781811</text:p>
          </table:table-cell>
          <table:table-cell/>
          <table:table-cell table:style-name="Default" office:value-type="float" office:value="0.00213883" calcext:value-type="float">
            <text:p>0,00213883</text:p>
          </table:table-cell>
          <table:table-cell office:value-type="float" office:value="0.00148875" calcext:value-type="float">
            <text:p>0,00148875</text:p>
          </table:table-cell>
        </table:table-row>
        <table:table-row table:style-name="ro1">
          <table:table-cell table:formula="of:=[.A96]+0.025" office:value-type="float" office:value="2.375" calcext:value-type="float">
            <text:p>2,375</text:p>
          </table:table-cell>
          <table:table-cell table:style-name="Default" office:value-type="float" office:value="0.010023" calcext:value-type="float">
            <text:p>0,010023</text:p>
          </table:table-cell>
          <table:table-cell office:value-type="float" office:value="0.00964204" calcext:value-type="float">
            <text:p>0,00964204</text:p>
          </table:table-cell>
          <table:table-cell/>
          <table:table-cell table:style-name="Default" office:value-type="float" office:value="0.0589354" calcext:value-type="float">
            <text:p>0,0589354</text:p>
          </table:table-cell>
          <table:table-cell office:value-type="float" office:value="0.0772646" calcext:value-type="float">
            <text:p>0,0772646</text:p>
          </table:table-cell>
          <table:table-cell/>
          <table:table-cell table:style-name="Default" office:value-type="float" office:value="0.00211733" calcext:value-type="float">
            <text:p>0,00211733</text:p>
          </table:table-cell>
          <table:table-cell office:value-type="float" office:value="0.00147095" calcext:value-type="float">
            <text:p>0,00147095</text:p>
          </table:table-cell>
        </table:table-row>
        <table:table-row table:style-name="ro1">
          <table:table-cell table:formula="of:=[.A97]+0.025" office:value-type="float" office:value="2.4" calcext:value-type="float">
            <text:p>2,4</text:p>
          </table:table-cell>
          <table:table-cell table:style-name="Default" office:value-type="float" office:value="0.00989405" calcext:value-type="float">
            <text:p>0,00989405</text:p>
          </table:table-cell>
          <table:table-cell office:value-type="float" office:value="0.00953544" calcext:value-type="float">
            <text:p>0,00953544</text:p>
          </table:table-cell>
          <table:table-cell/>
          <table:table-cell table:style-name="Default" office:value-type="float" office:value="0.0582275" calcext:value-type="float">
            <text:p>0,0582275</text:p>
          </table:table-cell>
          <table:table-cell office:value-type="float" office:value="0.0763696" calcext:value-type="float">
            <text:p>0,0763696</text:p>
          </table:table-cell>
          <table:table-cell/>
          <table:table-cell table:style-name="Default" office:value-type="float" office:value="0.00209625" calcext:value-type="float">
            <text:p>0,00209625</text:p>
          </table:table-cell>
          <table:table-cell office:value-type="float" office:value="0.00145352" calcext:value-type="float">
            <text:p>0,00145352</text:p>
          </table:table-cell>
        </table:table-row>
        <table:table-row table:style-name="ro1">
          <table:table-cell table:formula="of:=[.A98]+0.025" office:value-type="float" office:value="2.425" calcext:value-type="float">
            <text:p>2,425</text:p>
          </table:table-cell>
          <table:table-cell table:style-name="Default" office:value-type="float" office:value="0.00976772" calcext:value-type="float">
            <text:p>0,00976772</text:p>
          </table:table-cell>
          <table:table-cell office:value-type="float" office:value="0.00943129" calcext:value-type="float">
            <text:p>0,00943129</text:p>
          </table:table-cell>
          <table:table-cell/>
          <table:table-cell table:style-name="Default" office:value-type="float" office:value="0.0575338" calcext:value-type="float">
            <text:p>0,0575338</text:p>
          </table:table-cell>
          <table:table-cell office:value-type="float" office:value="0.0754953" calcext:value-type="float">
            <text:p>0,0754953</text:p>
          </table:table-cell>
          <table:table-cell/>
          <table:table-cell table:style-name="Default" office:value-type="float" office:value="0.00207557" calcext:value-type="float">
            <text:p>0,00207557</text:p>
          </table:table-cell>
          <table:table-cell office:value-type="float" office:value="0.00143645" calcext:value-type="float">
            <text:p>0,00143645</text:p>
          </table:table-cell>
        </table:table-row>
        <table:table-row table:style-name="ro1">
          <table:table-cell table:formula="of:=[.A99]+0.025" office:value-type="float" office:value="2.45" calcext:value-type="float">
            <text:p>2,45</text:p>
          </table:table-cell>
          <table:table-cell table:style-name="Default" office:value-type="float" office:value="0.00964401" calcext:value-type="float">
            <text:p>0,00964401</text:p>
          </table:table-cell>
          <table:table-cell office:value-type="float" office:value="0.00932962" calcext:value-type="float">
            <text:p>0,00932962</text:p>
          </table:table-cell>
          <table:table-cell/>
          <table:table-cell table:style-name="Default" office:value-type="float" office:value="0.056854" calcext:value-type="float">
            <text:p>0,056854</text:p>
          </table:table-cell>
          <table:table-cell office:value-type="float" office:value="0.0746409" calcext:value-type="float">
            <text:p>0,0746409</text:p>
          </table:table-cell>
          <table:table-cell/>
          <table:table-cell table:style-name="Default" office:value-type="float" office:value="0.00205528" calcext:value-type="float">
            <text:p>0,00205528</text:p>
          </table:table-cell>
          <table:table-cell office:value-type="float" office:value="0.00141972" calcext:value-type="float">
            <text:p>0,00141972</text:p>
          </table:table-cell>
        </table:table-row>
        <table:table-row table:style-name="ro1">
          <table:table-cell table:formula="of:=[.A100]+0.025" office:value-type="float" office:value="2.475" calcext:value-type="float">
            <text:p>2,475</text:p>
          </table:table-cell>
          <table:table-cell table:style-name="Default" office:value-type="float" office:value="0.00952269" calcext:value-type="float">
            <text:p>0,00952269</text:p>
          </table:table-cell>
          <table:table-cell office:value-type="float" office:value="0.00923033" calcext:value-type="float">
            <text:p>0,00923033</text:p>
          </table:table-cell>
          <table:table-cell/>
          <table:table-cell table:style-name="Default" office:value-type="float" office:value="0.0561875" calcext:value-type="float">
            <text:p>0,0561875</text:p>
          </table:table-cell>
          <table:table-cell office:value-type="float" office:value="0.0738063" calcext:value-type="float">
            <text:p>0,0738063</text:p>
          </table:table-cell>
          <table:table-cell/>
          <table:table-cell table:style-name="Default" office:value-type="float" office:value="0.00203536" calcext:value-type="float">
            <text:p>0,00203536</text:p>
          </table:table-cell>
          <table:table-cell office:value-type="float" office:value="0.00140335" calcext:value-type="float">
            <text:p>0,00140335</text:p>
          </table:table-cell>
        </table:table-row>
        <table:table-row table:style-name="ro1">
          <table:table-cell table:formula="of:=[.A101]+0.025" office:value-type="float" office:value="2.5" calcext:value-type="float">
            <text:p>2,5</text:p>
          </table:table-cell>
          <table:table-cell table:style-name="Default" office:value-type="float" office:value="0.00940384" calcext:value-type="float">
            <text:p>0,00940384</text:p>
          </table:table-cell>
          <table:table-cell office:value-type="float" office:value="0.00913334" calcext:value-type="float">
            <text:p>0,00913334</text:p>
          </table:table-cell>
          <table:table-cell/>
          <table:table-cell table:style-name="Default" office:value-type="float" office:value="0.0555341" calcext:value-type="float">
            <text:p>0,0555341</text:p>
          </table:table-cell>
          <table:table-cell office:value-type="float" office:value="0.0729906" calcext:value-type="float">
            <text:p>0,0729906</text:p>
          </table:table-cell>
          <table:table-cell/>
          <table:table-cell table:style-name="Default" office:value-type="float" office:value="0.00201582" calcext:value-type="float">
            <text:p>0,00201582</text:p>
          </table:table-cell>
          <table:table-cell office:value-type="float" office:value="0.0013873" calcext:value-type="float">
            <text:p>0,0013873</text:p>
          </table:table-cell>
        </table:table-row>
        <table:table-row table:style-name="ro1">
          <table:table-cell table:formula="of:=[.A102]+0.025" office:value-type="float" office:value="2.525" calcext:value-type="float">
            <text:p>2,525</text:p>
          </table:table-cell>
          <table:table-cell table:style-name="Default" office:value-type="float" office:value="0.00928737" calcext:value-type="float">
            <text:p>0,00928737</text:p>
          </table:table-cell>
          <table:table-cell office:value-type="float" office:value="0.00903848" calcext:value-type="float">
            <text:p>0,00903848</text:p>
          </table:table-cell>
          <table:table-cell/>
          <table:table-cell table:style-name="Default" office:value-type="float" office:value="0.0548934" calcext:value-type="float">
            <text:p>0,0548934</text:p>
          </table:table-cell>
          <table:table-cell office:value-type="float" office:value="0.0721932" calcext:value-type="float">
            <text:p>0,0721932</text:p>
          </table:table-cell>
          <table:table-cell/>
          <table:table-cell table:style-name="Default" office:value-type="float" office:value="0.00199664" calcext:value-type="float">
            <text:p>0,00199664</text:p>
          </table:table-cell>
          <table:table-cell office:value-type="float" office:value="0.00137159" calcext:value-type="float">
            <text:p>0,00137159</text:p>
          </table:table-cell>
        </table:table-row>
        <table:table-row table:style-name="ro1">
          <table:table-cell table:formula="of:=[.A103]+0.025" office:value-type="float" office:value="2.55" calcext:value-type="float">
            <text:p>2,55</text:p>
          </table:table-cell>
          <table:table-cell table:style-name="Default" office:value-type="float" office:value="0.0091732" calcext:value-type="float">
            <text:p>0,0091732</text:p>
          </table:table-cell>
          <table:table-cell office:value-type="float" office:value="0.00894577" calcext:value-type="float">
            <text:p>0,00894577</text:p>
          </table:table-cell>
          <table:table-cell/>
          <table:table-cell table:style-name="Default" office:value-type="float" office:value="0.0542651" calcext:value-type="float">
            <text:p>0,0542651</text:p>
          </table:table-cell>
          <table:table-cell office:value-type="float" office:value="0.0714139" calcext:value-type="float">
            <text:p>0,0714139</text:p>
          </table:table-cell>
          <table:table-cell/>
          <table:table-cell table:style-name="Default" office:value-type="float" office:value="0.0019778" calcext:value-type="float">
            <text:p>0,0019778</text:p>
          </table:table-cell>
          <table:table-cell office:value-type="float" office:value="0.0013562" calcext:value-type="float">
            <text:p>0,0013562</text:p>
          </table:table-cell>
        </table:table-row>
        <table:table-row table:style-name="ro1">
          <table:table-cell table:formula="of:=[.A104]+0.025" office:value-type="float" office:value="2.575" calcext:value-type="float">
            <text:p>2,575</text:p>
          </table:table-cell>
          <table:table-cell table:style-name="Default" office:value-type="float" office:value="0.00906117" calcext:value-type="float">
            <text:p>0,00906117</text:p>
          </table:table-cell>
          <table:table-cell office:value-type="float" office:value="0.00885511" calcext:value-type="float">
            <text:p>0,00885511</text:p>
          </table:table-cell>
          <table:table-cell/>
          <table:table-cell table:style-name="Default" office:value-type="float" office:value="0.0536489" calcext:value-type="float">
            <text:p>0,0536489</text:p>
          </table:table-cell>
          <table:table-cell office:value-type="float" office:value="0.0706518" calcext:value-type="float">
            <text:p>0,0706518</text:p>
          </table:table-cell>
          <table:table-cell/>
          <table:table-cell table:style-name="Default" office:value-type="float" office:value="0.00195937" calcext:value-type="float">
            <text:p>0,00195937</text:p>
          </table:table-cell>
          <table:table-cell office:value-type="float" office:value="0.00134112" calcext:value-type="float">
            <text:p>0,00134112</text:p>
          </table:table-cell>
        </table:table-row>
        <table:table-row table:style-name="ro1">
          <table:table-cell table:formula="of:=[.A105]+0.025" office:value-type="float" office:value="2.59999999999999" calcext:value-type="float">
            <text:p>2,59999999999999</text:p>
          </table:table-cell>
          <table:table-cell table:style-name="Default" office:value-type="float" office:value="0.00895144" calcext:value-type="float">
            <text:p>0,00895144</text:p>
          </table:table-cell>
          <table:table-cell office:value-type="float" office:value="0.00876642" calcext:value-type="float">
            <text:p>0,00876642</text:p>
          </table:table-cell>
          <table:table-cell/>
          <table:table-cell table:style-name="Default" office:value-type="float" office:value="0.0530444" calcext:value-type="float">
            <text:p>0,0530444</text:p>
          </table:table-cell>
          <table:table-cell office:value-type="float" office:value="0.0699066" calcext:value-type="float">
            <text:p>0,0699066</text:p>
          </table:table-cell>
          <table:table-cell/>
          <table:table-cell table:style-name="Default" office:value-type="float" office:value="0.00194127" calcext:value-type="float">
            <text:p>0,00194127</text:p>
          </table:table-cell>
          <table:table-cell office:value-type="float" office:value="0.00132635" calcext:value-type="float">
            <text:p>0,00132635</text:p>
          </table:table-cell>
        </table:table-row>
        <table:table-row table:style-name="ro1">
          <table:table-cell table:formula="of:=[.A106]+0.025" office:value-type="float" office:value="2.62499999999999" calcext:value-type="float">
            <text:p>2,62499999999999</text:p>
          </table:table-cell>
          <table:table-cell table:style-name="Default" office:value-type="float" office:value="0.00884376" calcext:value-type="float">
            <text:p>0,00884376</text:p>
          </table:table-cell>
          <table:table-cell office:value-type="float" office:value="0.0086797" calcext:value-type="float">
            <text:p>0,0086797</text:p>
          </table:table-cell>
          <table:table-cell/>
          <table:table-cell table:style-name="Default" office:value-type="float" office:value="0.0524513" calcext:value-type="float">
            <text:p>0,0524513</text:p>
          </table:table-cell>
          <table:table-cell office:value-type="float" office:value="0.0691777" calcext:value-type="float">
            <text:p>0,0691777</text:p>
          </table:table-cell>
          <table:table-cell/>
          <table:table-cell table:style-name="Default" office:value-type="float" office:value="0.00192353" calcext:value-type="float">
            <text:p>0,00192353</text:p>
          </table:table-cell>
          <table:table-cell office:value-type="float" office:value="0.00131188" calcext:value-type="float">
            <text:p>0,00131188</text:p>
          </table:table-cell>
        </table:table-row>
        <table:table-row table:style-name="ro1">
          <table:table-cell table:formula="of:=[.A107]+0.025" office:value-type="float" office:value="2.64999999999999" calcext:value-type="float">
            <text:p>2,64999999999999</text:p>
          </table:table-cell>
          <table:table-cell table:style-name="Default" office:value-type="float" office:value="0.00873814" calcext:value-type="float">
            <text:p>0,00873814</text:p>
          </table:table-cell>
          <table:table-cell office:value-type="float" office:value="0.00859488" calcext:value-type="float">
            <text:p>0,00859488</text:p>
          </table:table-cell>
          <table:table-cell/>
          <table:table-cell table:style-name="Default" office:value-type="float" office:value="0.0518693" calcext:value-type="float">
            <text:p>0,0518693</text:p>
          </table:table-cell>
          <table:table-cell office:value-type="float" office:value="0.0684647" calcext:value-type="float">
            <text:p>0,0684647</text:p>
          </table:table-cell>
          <table:table-cell/>
          <table:table-cell table:style-name="Default" office:value-type="float" office:value="0.00190607" calcext:value-type="float">
            <text:p>0,00190607</text:p>
          </table:table-cell>
          <table:table-cell office:value-type="float" office:value="0.0012977" calcext:value-type="float">
            <text:p>0,0012977</text:p>
          </table:table-cell>
        </table:table-row>
        <table:table-row table:style-name="ro1">
          <table:table-cell table:formula="of:=[.A108]+0.025" office:value-type="float" office:value="2.67499999999999" calcext:value-type="float">
            <text:p>2,67499999999999</text:p>
          </table:table-cell>
          <table:table-cell table:style-name="Default" office:value-type="float" office:value="0.00863458" calcext:value-type="float">
            <text:p>0,00863458</text:p>
          </table:table-cell>
          <table:table-cell office:value-type="float" office:value="0.00851178" calcext:value-type="float">
            <text:p>0,00851178</text:p>
          </table:table-cell>
          <table:table-cell/>
          <table:table-cell table:style-name="Default" office:value-type="float" office:value="0.0512981" calcext:value-type="float">
            <text:p>0,0512981</text:p>
          </table:table-cell>
          <table:table-cell office:value-type="float" office:value="0.067767" calcext:value-type="float">
            <text:p>0,067767</text:p>
          </table:table-cell>
          <table:table-cell/>
          <table:table-cell table:style-name="Default" office:value-type="float" office:value="0.00188888" calcext:value-type="float">
            <text:p>0,00188888</text:p>
          </table:table-cell>
          <table:table-cell office:value-type="float" office:value="0.00128381" calcext:value-type="float">
            <text:p>0,00128381</text:p>
          </table:table-cell>
        </table:table-row>
        <table:table-row table:style-name="ro1">
          <table:table-cell table:formula="of:=[.A109]+0.025" office:value-type="float" office:value="2.69999999999999" calcext:value-type="float">
            <text:p>2,69999999999999</text:p>
          </table:table-cell>
          <table:table-cell table:style-name="Default" office:value-type="float" office:value="0.00853298" calcext:value-type="float">
            <text:p>0,00853298</text:p>
          </table:table-cell>
          <table:table-cell office:value-type="float" office:value="0.00843049" calcext:value-type="float">
            <text:p>0,00843049</text:p>
          </table:table-cell>
          <table:table-cell/>
          <table:table-cell table:style-name="Default" office:value-type="float" office:value="0.0507375" calcext:value-type="float">
            <text:p>0,0507375</text:p>
          </table:table-cell>
          <table:table-cell office:value-type="float" office:value="0.0670844" calcext:value-type="float">
            <text:p>0,0670844</text:p>
          </table:table-cell>
          <table:table-cell/>
          <table:table-cell table:style-name="Default" office:value-type="float" office:value="0.00187204" calcext:value-type="float">
            <text:p>0,00187204</text:p>
          </table:table-cell>
          <table:table-cell office:value-type="float" office:value="0.00127019" calcext:value-type="float">
            <text:p>0,00127019</text:p>
          </table:table-cell>
        </table:table-row>
        <table:table-row table:style-name="ro1">
          <table:table-cell table:formula="of:=[.A110]+0.025" office:value-type="float" office:value="2.72499999999999" calcext:value-type="float">
            <text:p>2,72499999999999</text:p>
          </table:table-cell>
          <table:table-cell table:style-name="Default" office:value-type="float" office:value="0.00843328" calcext:value-type="float">
            <text:p>0,00843328</text:p>
          </table:table-cell>
          <table:table-cell office:value-type="float" office:value="0.00835092" calcext:value-type="float">
            <text:p>0,00835092</text:p>
          </table:table-cell>
          <table:table-cell/>
          <table:table-cell table:style-name="Default" office:value-type="float" office:value="0.0501872" calcext:value-type="float">
            <text:p>0,0501872</text:p>
          </table:table-cell>
          <table:table-cell office:value-type="float" office:value="0.0664162" calcext:value-type="float">
            <text:p>0,0664162</text:p>
          </table:table-cell>
          <table:table-cell/>
          <table:table-cell table:style-name="Default" office:value-type="float" office:value="0.00185553" calcext:value-type="float">
            <text:p>0,00185553</text:p>
          </table:table-cell>
          <table:table-cell office:value-type="float" office:value="0.00125686" calcext:value-type="float">
            <text:p>0,00125686</text:p>
          </table:table-cell>
        </table:table-row>
        <table:table-row table:style-name="ro1">
          <table:table-cell table:formula="of:=[.A111]+0.025" office:value-type="float" office:value="2.74999999999999" calcext:value-type="float">
            <text:p>2,74999999999999</text:p>
          </table:table-cell>
          <table:table-cell table:style-name="Default" office:value-type="float" office:value="0.00833547" calcext:value-type="float">
            <text:p>0,00833547</text:p>
          </table:table-cell>
          <table:table-cell office:value-type="float" office:value="0.008273" calcext:value-type="float">
            <text:p>0,008273</text:p>
          </table:table-cell>
          <table:table-cell/>
          <table:table-cell table:style-name="Default" office:value-type="float" office:value="0.0496469" calcext:value-type="float">
            <text:p>0,0496469</text:p>
          </table:table-cell>
          <table:table-cell office:value-type="float" office:value="0.0657621" calcext:value-type="float">
            <text:p>0,0657621</text:p>
          </table:table-cell>
          <table:table-cell/>
          <table:table-cell table:style-name="Default" office:value-type="float" office:value="0.00183921" calcext:value-type="float">
            <text:p>0,00183921</text:p>
          </table:table-cell>
          <table:table-cell office:value-type="float" office:value="0.00124378" calcext:value-type="float">
            <text:p>0,00124378</text:p>
          </table:table-cell>
        </table:table-row>
        <table:table-row table:style-name="ro1">
          <table:table-cell table:formula="of:=[.A112]+0.025" office:value-type="float" office:value="2.77499999999999" calcext:value-type="float">
            <text:p>2,77499999999999</text:p>
          </table:table-cell>
          <table:table-cell table:style-name="Default" office:value-type="float" office:value="0.00823955" calcext:value-type="float">
            <text:p>0,00823955</text:p>
          </table:table-cell>
          <table:table-cell office:value-type="float" office:value="0.00819664" calcext:value-type="float">
            <text:p>0,00819664</text:p>
          </table:table-cell>
          <table:table-cell/>
          <table:table-cell table:style-name="Default" office:value-type="float" office:value="0.0491163" calcext:value-type="float">
            <text:p>0,0491163</text:p>
          </table:table-cell>
          <table:table-cell office:value-type="float" office:value="0.0651217" calcext:value-type="float">
            <text:p>0,0651217</text:p>
          </table:table-cell>
          <table:table-cell/>
          <table:table-cell table:style-name="Default" office:value-type="float" office:value="0.00182323" calcext:value-type="float">
            <text:p>0,00182323</text:p>
          </table:table-cell>
          <table:table-cell office:value-type="float" office:value="0.00123097" calcext:value-type="float">
            <text:p>0,00123097</text:p>
          </table:table-cell>
        </table:table-row>
        <table:table-row table:style-name="ro1">
          <table:table-cell table:formula="of:=[.A113]+0.025" office:value-type="float" office:value="2.79999999999999" calcext:value-type="float">
            <text:p>2,79999999999999</text:p>
          </table:table-cell>
          <table:table-cell table:style-name="Default" office:value-type="float" office:value="0.00814531" calcext:value-type="float">
            <text:p>0,00814531</text:p>
          </table:table-cell>
          <table:table-cell office:value-type="float" office:value="0.00812185" calcext:value-type="float">
            <text:p>0,00812185</text:p>
          </table:table-cell>
          <table:table-cell/>
          <table:table-cell table:style-name="Default" office:value-type="float" office:value="0.0485953" calcext:value-type="float">
            <text:p>0,0485953</text:p>
          </table:table-cell>
          <table:table-cell office:value-type="float" office:value="0.0644946" calcext:value-type="float">
            <text:p>0,0644946</text:p>
          </table:table-cell>
          <table:table-cell/>
          <table:table-cell table:style-name="Default" office:value-type="float" office:value="0.00180743" calcext:value-type="float">
            <text:p>0,00180743</text:p>
          </table:table-cell>
          <table:table-cell office:value-type="float" office:value="0.00121841" calcext:value-type="float">
            <text:p>0,00121841</text:p>
          </table:table-cell>
        </table:table-row>
        <table:table-row table:style-name="ro1">
          <table:table-cell table:formula="of:=[.A114]+0.025" office:value-type="float" office:value="2.82499999999999" calcext:value-type="float">
            <text:p>2,82499999999999</text:p>
          </table:table-cell>
          <table:table-cell table:style-name="Default" office:value-type="float" office:value="0.00805284" calcext:value-type="float">
            <text:p>0,00805284</text:p>
          </table:table-cell>
          <table:table-cell office:value-type="float" office:value="0.00804857" calcext:value-type="float">
            <text:p>0,00804857</text:p>
          </table:table-cell>
          <table:table-cell/>
          <table:table-cell table:style-name="Default" office:value-type="float" office:value="0.0480835" calcext:value-type="float">
            <text:p>0,0480835</text:p>
          </table:table-cell>
          <table:table-cell office:value-type="float" office:value="0.0638803" calcext:value-type="float">
            <text:p>0,0638803</text:p>
          </table:table-cell>
          <table:table-cell/>
          <table:table-cell table:style-name="Default" office:value-type="float" office:value="0.00179196" calcext:value-type="float">
            <text:p>0,00179196</text:p>
          </table:table-cell>
          <table:table-cell office:value-type="float" office:value="0.0012061" calcext:value-type="float">
            <text:p>0,0012061</text:p>
          </table:table-cell>
        </table:table-row>
        <table:table-row table:style-name="ro1">
          <table:table-cell table:formula="of:=[.A115]+0.025" office:value-type="float" office:value="2.84999999999999" calcext:value-type="float">
            <text:p>2,84999999999999</text:p>
          </table:table-cell>
          <table:table-cell table:style-name="Default" office:value-type="float" office:value="0.00796208" calcext:value-type="float">
            <text:p>0,00796208</text:p>
          </table:table-cell>
          <table:table-cell office:value-type="float" office:value="0.00797675" calcext:value-type="float">
            <text:p>0,00797675</text:p>
          </table:table-cell>
          <table:table-cell/>
          <table:table-cell table:style-name="Default" office:value-type="float" office:value="0.0475809" calcext:value-type="float">
            <text:p>0,0475809</text:p>
          </table:table-cell>
          <table:table-cell office:value-type="float" office:value="0.0632786" calcext:value-type="float">
            <text:p>0,0632786</text:p>
          </table:table-cell>
          <table:table-cell/>
          <table:table-cell table:style-name="Default" office:value-type="float" office:value="0.00177666" calcext:value-type="float">
            <text:p>0,00177666</text:p>
          </table:table-cell>
          <table:table-cell office:value-type="float" office:value="0.00119402" calcext:value-type="float">
            <text:p>0,00119402</text:p>
          </table:table-cell>
        </table:table-row>
        <table:table-row table:style-name="ro1">
          <table:table-cell table:formula="of:=[.A116]+0.025" office:value-type="float" office:value="2.87499999999999" calcext:value-type="float">
            <text:p>2,87499999999999</text:p>
          </table:table-cell>
          <table:table-cell table:style-name="Default" office:value-type="float" office:value="0.00787297" calcext:value-type="float">
            <text:p>0,00787297</text:p>
          </table:table-cell>
          <table:table-cell office:value-type="float" office:value="0.00790635" calcext:value-type="float">
            <text:p>0,00790635</text:p>
          </table:table-cell>
          <table:table-cell/>
          <table:table-cell table:style-name="Default" office:value-type="float" office:value="0.047087" calcext:value-type="float">
            <text:p>0,047087</text:p>
          </table:table-cell>
          <table:table-cell office:value-type="float" office:value="0.062689" calcext:value-type="float">
            <text:p>0,062689</text:p>
          </table:table-cell>
          <table:table-cell/>
          <table:table-cell table:style-name="Default" office:value-type="float" office:value="0.00176168" calcext:value-type="float">
            <text:p>0,00176168</text:p>
          </table:table-cell>
          <table:table-cell office:value-type="float" office:value="0.00118219" calcext:value-type="float">
            <text:p>0,00118219</text:p>
          </table:table-cell>
        </table:table-row>
        <table:table-row table:style-name="ro1">
          <table:table-cell table:formula="of:=[.A117]+0.025" office:value-type="float" office:value="2.89999999999999" calcext:value-type="float">
            <text:p>2,89999999999999</text:p>
          </table:table-cell>
          <table:table-cell table:style-name="Default" office:value-type="float" office:value="0.00778548" calcext:value-type="float">
            <text:p>0,00778548</text:p>
          </table:table-cell>
          <table:table-cell office:value-type="float" office:value="0.00783732" calcext:value-type="float">
            <text:p>0,00783732</text:p>
          </table:table-cell>
          <table:table-cell/>
          <table:table-cell table:style-name="Default" office:value-type="float" office:value="0.0466017" calcext:value-type="float">
            <text:p>0,0466017</text:p>
          </table:table-cell>
          <table:table-cell office:value-type="float" office:value="0.0621112" calcext:value-type="float">
            <text:p>0,0621112</text:p>
          </table:table-cell>
          <table:table-cell/>
          <table:table-cell table:style-name="Default" office:value-type="float" office:value="0.0017469" calcext:value-type="float">
            <text:p>0,0017469</text:p>
          </table:table-cell>
          <table:table-cell office:value-type="float" office:value="0.00117058" calcext:value-type="float">
            <text:p>0,00117058</text:p>
          </table:table-cell>
        </table:table-row>
        <table:table-row table:style-name="ro1">
          <table:table-cell table:formula="of:=[.A118]+0.025" office:value-type="float" office:value="2.92499999999999" calcext:value-type="float">
            <text:p>2,92499999999999</text:p>
          </table:table-cell>
          <table:table-cell table:style-name="Default" office:value-type="float" office:value="0.00769956" calcext:value-type="float">
            <text:p>0,00769956</text:p>
          </table:table-cell>
          <table:table-cell office:value-type="float" office:value="0.00776964" calcext:value-type="float">
            <text:p>0,00776964</text:p>
          </table:table-cell>
          <table:table-cell/>
          <table:table-cell table:style-name="Default" office:value-type="float" office:value="0.0461249" calcext:value-type="float">
            <text:p>0,0461249</text:p>
          </table:table-cell>
          <table:table-cell office:value-type="float" office:value="0.0615449" calcext:value-type="float">
            <text:p>0,0615449</text:p>
          </table:table-cell>
          <table:table-cell/>
          <table:table-cell table:style-name="Default" office:value-type="float" office:value="0.00173239" calcext:value-type="float">
            <text:p>0,00173239</text:p>
          </table:table-cell>
          <table:table-cell office:value-type="float" office:value="0.0011592" calcext:value-type="float">
            <text:p>0,0011592</text:p>
          </table:table-cell>
        </table:table-row>
        <table:table-row table:style-name="ro1">
          <table:table-cell table:formula="of:=[.A119]+0.025" office:value-type="float" office:value="2.94999999999999" calcext:value-type="float">
            <text:p>2,94999999999999</text:p>
          </table:table-cell>
          <table:table-cell table:style-name="Default" office:value-type="float" office:value="0.00761519" calcext:value-type="float">
            <text:p>0,00761519</text:p>
          </table:table-cell>
          <table:table-cell office:value-type="float" office:value="0.00770326" calcext:value-type="float">
            <text:p>0,00770326</text:p>
          </table:table-cell>
          <table:table-cell/>
          <table:table-cell table:style-name="Default" office:value-type="float" office:value="0.0456562" calcext:value-type="float">
            <text:p>0,0456562</text:p>
          </table:table-cell>
          <table:table-cell office:value-type="float" office:value="0.0609898" calcext:value-type="float">
            <text:p>0,0609898</text:p>
          </table:table-cell>
          <table:table-cell/>
          <table:table-cell table:style-name="Default" office:value-type="float" office:value="0.00171815" calcext:value-type="float">
            <text:p>0,00171815</text:p>
          </table:table-cell>
          <table:table-cell office:value-type="float" office:value="0.00114803" calcext:value-type="float">
            <text:p>0,00114803</text:p>
          </table:table-cell>
        </table:table-row>
        <table:table-row table:style-name="ro1">
          <table:table-cell table:formula="of:=[.A120]+0.025" office:value-type="float" office:value="2.97499999999999" calcext:value-type="float">
            <text:p>2,97499999999999</text:p>
          </table:table-cell>
          <table:table-cell table:style-name="Default" office:value-type="float" office:value="0.00753232" calcext:value-type="float">
            <text:p>0,00753232</text:p>
          </table:table-cell>
          <table:table-cell office:value-type="float" office:value="0.00763812" calcext:value-type="float">
            <text:p>0,00763812</text:p>
          </table:table-cell>
          <table:table-cell/>
          <table:table-cell table:style-name="Default" office:value-type="float" office:value="0.0451956" calcext:value-type="float">
            <text:p>0,0451956</text:p>
          </table:table-cell>
          <table:table-cell office:value-type="float" office:value="0.0604454" calcext:value-type="float">
            <text:p>0,0604454</text:p>
          </table:table-cell>
          <table:table-cell/>
          <table:table-cell table:style-name="Default" office:value-type="float" office:value="0.00170405" calcext:value-type="float">
            <text:p>0,00170405</text:p>
          </table:table-cell>
          <table:table-cell office:value-type="float" office:value="0.00113709" calcext:value-type="float">
            <text:p>0,00113709</text:p>
          </table:table-cell>
        </table:table-row>
        <table:table-row table:style-name="ro1">
          <table:table-cell table:formula="of:=[.A121]+0.025" office:value-type="float" office:value="2.99999999999999" calcext:value-type="float">
            <text:p>2,99999999999999</text:p>
          </table:table-cell>
          <table:table-cell table:style-name="Default" office:value-type="float" office:value="0.00745092" calcext:value-type="float">
            <text:p>0,00745092</text:p>
          </table:table-cell>
          <table:table-cell office:value-type="float" office:value="0.00757423" calcext:value-type="float">
            <text:p>0,00757423</text:p>
          </table:table-cell>
          <table:table-cell/>
          <table:table-cell table:style-name="Default" office:value-type="float" office:value="0.0447427" calcext:value-type="float">
            <text:p>0,0447427</text:p>
          </table:table-cell>
          <table:table-cell office:value-type="float" office:value="0.0599116" calcext:value-type="float">
            <text:p>0,0599116</text:p>
          </table:table-cell>
          <table:table-cell/>
          <table:table-cell table:style-name="Default" office:value-type="float" office:value="0.00169022" calcext:value-type="float">
            <text:p>0,00169022</text:p>
          </table:table-cell>
          <table:table-cell office:value-type="float" office:value="0.00112634" calcext:value-type="float">
            <text:p>0,00112634</text:p>
          </table:table-cell>
        </table:table-row>
        <table:table-row table:style-name="ro1">
          <table:table-cell table:formula="of:=[.A122]+0.025" office:value-type="float" office:value="3.02499999999999" calcext:value-type="float">
            <text:p>3,02499999999999</text:p>
          </table:table-cell>
          <table:table-cell/>
          <table:table-cell office:value-type="float" office:value="0.00751155" calcext:value-type="float">
            <text:p>0,00751155</text:p>
          </table:table-cell>
          <table:table-cell table:number-columns-repeated="2"/>
          <table:table-cell office:value-type="float" office:value="0.0593883" calcext:value-type="float">
            <text:p>0,0593883</text:p>
          </table:table-cell>
          <table:table-cell table:number-columns-repeated="2"/>
          <table:table-cell office:value-type="float" office:value="0.00111581" calcext:value-type="float">
            <text:p>0,00111581</text:p>
          </table:table-cell>
        </table:table-row>
        <table:table-row table:style-name="ro1">
          <table:table-cell table:formula="of:=[.A123]+0.025" office:value-type="float" office:value="3.04999999999999" calcext:value-type="float">
            <text:p>3,04999999999999</text:p>
          </table:table-cell>
          <table:table-cell/>
          <table:table-cell office:value-type="float" office:value="0.00744995" calcext:value-type="float">
            <text:p>0,00744995</text:p>
          </table:table-cell>
          <table:table-cell table:number-columns-repeated="2"/>
          <table:table-cell office:value-type="float" office:value="0.0588742" calcext:value-type="float">
            <text:p>0,0588742</text:p>
          </table:table-cell>
          <table:table-cell table:number-columns-repeated="2"/>
          <table:table-cell office:value-type="float" office:value="0.00110546" calcext:value-type="float">
            <text:p>0,00110546</text:p>
          </table:table-cell>
        </table:table-row>
        <table:table-row table:style-name="ro1">
          <table:table-cell table:formula="of:=[.A124]+0.025" office:value-type="float" office:value="3.07499999999999" calcext:value-type="float">
            <text:p>3,07499999999999</text:p>
          </table:table-cell>
          <table:table-cell/>
          <table:table-cell office:value-type="float" office:value="0.00738957" calcext:value-type="float">
            <text:p>0,00738957</text:p>
          </table:table-cell>
          <table:table-cell table:number-columns-repeated="2"/>
          <table:table-cell office:value-type="float" office:value="0.0583706" calcext:value-type="float">
            <text:p>0,0583706</text:p>
          </table:table-cell>
          <table:table-cell table:number-columns-repeated="2"/>
          <table:table-cell office:value-type="float" office:value="0.00109532" calcext:value-type="float">
            <text:p>0,00109532</text:p>
          </table:table-cell>
        </table:table-row>
        <table:table-row table:style-name="ro1">
          <table:table-cell table:formula="of:=[.A125]+0.025" office:value-type="float" office:value="3.09999999999999" calcext:value-type="float">
            <text:p>3,09999999999999</text:p>
          </table:table-cell>
          <table:table-cell/>
          <table:table-cell office:value-type="float" office:value="0.00733027" calcext:value-type="float">
            <text:p>0,00733027</text:p>
          </table:table-cell>
          <table:table-cell table:number-columns-repeated="2"/>
          <table:table-cell office:value-type="float" office:value="0.0578763" calcext:value-type="float">
            <text:p>0,0578763</text:p>
          </table:table-cell>
          <table:table-cell table:number-columns-repeated="2"/>
          <table:table-cell office:value-type="float" office:value="0.00108537" calcext:value-type="float">
            <text:p>0,00108537</text:p>
          </table:table-cell>
        </table:table-row>
        <table:table-row table:style-name="ro1">
          <table:table-cell table:formula="of:=[.A126]+0.025" office:value-type="float" office:value="3.12499999999999" calcext:value-type="float">
            <text:p>3,12499999999999</text:p>
          </table:table-cell>
          <table:table-cell/>
          <table:table-cell office:value-type="float" office:value="0.00727197" calcext:value-type="float">
            <text:p>0,00727197</text:p>
          </table:table-cell>
          <table:table-cell table:number-columns-repeated="2"/>
          <table:table-cell office:value-type="float" office:value="0.0573905" calcext:value-type="float">
            <text:p>0,0573905</text:p>
          </table:table-cell>
          <table:table-cell table:number-columns-repeated="2"/>
          <table:table-cell office:value-type="float" office:value="0.00107559" calcext:value-type="float">
            <text:p>0,00107559</text:p>
          </table:table-cell>
        </table:table-row>
        <table:table-row table:style-name="ro1">
          <table:table-cell table:formula="of:=[.A127]+0.025" office:value-type="float" office:value="3.14999999999999" calcext:value-type="float">
            <text:p>3,14999999999999</text:p>
          </table:table-cell>
          <table:table-cell/>
          <table:table-cell office:value-type="float" office:value="0.00721479" calcext:value-type="float">
            <text:p>0,00721479</text:p>
          </table:table-cell>
          <table:table-cell table:number-columns-repeated="2"/>
          <table:table-cell office:value-type="float" office:value="0.0569143" calcext:value-type="float">
            <text:p>0,0569143</text:p>
          </table:table-cell>
          <table:table-cell table:number-columns-repeated="2"/>
          <table:table-cell office:value-type="float" office:value="0.00106599" calcext:value-type="float">
            <text:p>0,00106599</text:p>
          </table:table-cell>
        </table:table-row>
        <table:table-row table:style-name="ro1">
          <table:table-cell table:formula="of:=[.A128]+0.025" office:value-type="float" office:value="3.17499999999999" calcext:value-type="float">
            <text:p>3,17499999999999</text:p>
          </table:table-cell>
          <table:table-cell/>
          <table:table-cell office:value-type="float" office:value="0.00715861" calcext:value-type="float">
            <text:p>0,00715861</text:p>
          </table:table-cell>
          <table:table-cell table:number-columns-repeated="2"/>
          <table:table-cell office:value-type="float" office:value="0.0564468" calcext:value-type="float">
            <text:p>0,0564468</text:p>
          </table:table-cell>
          <table:table-cell table:number-columns-repeated="2"/>
          <table:table-cell office:value-type="float" office:value="0.00105658" calcext:value-type="float">
            <text:p>0,00105658</text:p>
          </table:table-cell>
        </table:table-row>
        <table:table-row table:style-name="ro1">
          <table:table-cell table:formula="of:=[.A129]+0.025" office:value-type="float" office:value="3.19999999999999" calcext:value-type="float">
            <text:p>3,19999999999999</text:p>
          </table:table-cell>
          <table:table-cell/>
          <table:table-cell office:value-type="float" office:value="0.00710335" calcext:value-type="float">
            <text:p>0,00710335</text:p>
          </table:table-cell>
          <table:table-cell table:number-columns-repeated="2"/>
          <table:table-cell office:value-type="float" office:value="0.055987" calcext:value-type="float">
            <text:p>0,055987</text:p>
          </table:table-cell>
          <table:table-cell table:number-columns-repeated="2"/>
          <table:table-cell office:value-type="float" office:value="0.00104734" calcext:value-type="float">
            <text:p>0,00104734</text:p>
          </table:table-cell>
        </table:table-row>
        <table:table-row table:style-name="ro1">
          <table:table-cell table:formula="of:=[.A130]+0.025" office:value-type="float" office:value="3.22499999999999" calcext:value-type="float">
            <text:p>3,22499999999999</text:p>
          </table:table-cell>
          <table:table-cell/>
          <table:table-cell office:value-type="float" office:value="0.00704911" calcext:value-type="float">
            <text:p>0,00704911</text:p>
          </table:table-cell>
          <table:table-cell table:number-columns-repeated="2"/>
          <table:table-cell office:value-type="float" office:value="0.0555361" calcext:value-type="float">
            <text:p>0,0555361</text:p>
          </table:table-cell>
          <table:table-cell table:number-columns-repeated="2"/>
          <table:table-cell office:value-type="float" office:value="0.00103825" calcext:value-type="float">
            <text:p>0,00103825</text:p>
          </table:table-cell>
        </table:table-row>
        <table:table-row table:style-name="ro1">
          <table:table-cell table:formula="of:=[.A131]+0.025" office:value-type="float" office:value="3.24999999999999" calcext:value-type="float">
            <text:p>3,24999999999999</text:p>
          </table:table-cell>
          <table:table-cell/>
          <table:table-cell office:value-type="float" office:value="0.00699582" calcext:value-type="float">
            <text:p>0,00699582</text:p>
          </table:table-cell>
          <table:table-cell table:number-columns-repeated="2"/>
          <table:table-cell office:value-type="float" office:value="0.0550932" calcext:value-type="float">
            <text:p>0,0550932</text:p>
          </table:table-cell>
          <table:table-cell table:number-columns-repeated="2"/>
          <table:table-cell office:value-type="float" office:value="0.00102934" calcext:value-type="float">
            <text:p>0,00102934</text:p>
          </table:table-cell>
        </table:table-row>
        <table:table-row table:style-name="ro1">
          <table:table-cell table:formula="of:=[.A132]+0.025" office:value-type="float" office:value="3.27499999999999" calcext:value-type="float">
            <text:p>3,27499999999999</text:p>
          </table:table-cell>
          <table:table-cell/>
          <table:table-cell office:value-type="float" office:value="0.00694335" calcext:value-type="float">
            <text:p>0,00694335</text:p>
          </table:table-cell>
          <table:table-cell table:number-columns-repeated="2"/>
          <table:table-cell office:value-type="float" office:value="0.0546575" calcext:value-type="float">
            <text:p>0,0546575</text:p>
          </table:table-cell>
          <table:table-cell table:number-columns-repeated="2"/>
          <table:table-cell office:value-type="float" office:value="0.00102058" calcext:value-type="float">
            <text:p>0,00102058</text:p>
          </table:table-cell>
        </table:table-row>
        <table:table-row table:style-name="ro1">
          <table:table-cell table:formula="of:=[.A133]+0.025" office:value-type="float" office:value="3.29999999999999" calcext:value-type="float">
            <text:p>3,29999999999999</text:p>
          </table:table-cell>
          <table:table-cell/>
          <table:table-cell office:value-type="float" office:value="0.00689186" calcext:value-type="float">
            <text:p>0,00689186</text:p>
          </table:table-cell>
          <table:table-cell table:number-columns-repeated="2"/>
          <table:table-cell office:value-type="float" office:value="0.05423" calcext:value-type="float">
            <text:p>0,05423</text:p>
          </table:table-cell>
          <table:table-cell table:number-columns-repeated="2"/>
          <table:table-cell office:value-type="float" office:value="0.00101198" calcext:value-type="float">
            <text:p>0,00101198</text:p>
          </table:table-cell>
        </table:table-row>
        <table:table-row table:style-name="ro1">
          <table:table-cell table:formula="of:=[.A134]+0.025" office:value-type="float" office:value="3.32499999999999" calcext:value-type="float">
            <text:p>3,32499999999999</text:p>
          </table:table-cell>
          <table:table-cell/>
          <table:table-cell office:value-type="float" office:value="0.00684122" calcext:value-type="float">
            <text:p>0,00684122</text:p>
          </table:table-cell>
          <table:table-cell table:number-columns-repeated="2"/>
          <table:table-cell office:value-type="float" office:value="0.0538099" calcext:value-type="float">
            <text:p>0,0538099</text:p>
          </table:table-cell>
          <table:table-cell table:number-columns-repeated="2"/>
          <table:table-cell office:value-type="float" office:value="0.00100354" calcext:value-type="float">
            <text:p>0,00100354</text:p>
          </table:table-cell>
        </table:table-row>
        <table:table-row table:style-name="ro1">
          <table:table-cell table:formula="of:=[.A135]+0.025" office:value-type="float" office:value="3.34999999999999" calcext:value-type="float">
            <text:p>3,34999999999999</text:p>
          </table:table-cell>
          <table:table-cell/>
          <table:table-cell office:value-type="float" office:value="0.00679136" calcext:value-type="float">
            <text:p>0,00679136</text:p>
          </table:table-cell>
          <table:table-cell table:number-columns-repeated="2"/>
          <table:table-cell office:value-type="float" office:value="0.0533963" calcext:value-type="float">
            <text:p>0,0533963</text:p>
          </table:table-cell>
          <table:table-cell table:number-columns-repeated="2"/>
          <table:table-cell office:value-type="float" office:value="0.000995233" calcext:value-type="float">
            <text:p>0,000995233</text:p>
          </table:table-cell>
        </table:table-row>
        <table:table-row table:style-name="ro1">
          <table:table-cell table:formula="of:=[.A136]+0.025" office:value-type="float" office:value="3.37499999999999" calcext:value-type="float">
            <text:p>3,37499999999999</text:p>
          </table:table-cell>
          <table:table-cell/>
          <table:table-cell office:value-type="float" office:value="0.00674239" calcext:value-type="float">
            <text:p>0,00674239</text:p>
          </table:table-cell>
          <table:table-cell table:number-columns-repeated="2"/>
          <table:table-cell office:value-type="float" office:value="0.0529905" calcext:value-type="float">
            <text:p>0,0529905</text:p>
          </table:table-cell>
          <table:table-cell table:number-columns-repeated="2"/>
          <table:table-cell office:value-type="float" office:value="0.000987079" calcext:value-type="float">
            <text:p>0,000987079</text:p>
          </table:table-cell>
        </table:table-row>
        <table:table-row table:style-name="ro1">
          <table:table-cell table:formula="of:=[.A137]+0.025" office:value-type="float" office:value="3.39999999999999" calcext:value-type="float">
            <text:p>3,39999999999999</text:p>
          </table:table-cell>
          <table:table-cell/>
          <table:table-cell office:value-type="float" office:value="0.00669421" calcext:value-type="float">
            <text:p>0,00669421</text:p>
          </table:table-cell>
          <table:table-cell table:number-columns-repeated="2"/>
          <table:table-cell office:value-type="float" office:value="0.0525915" calcext:value-type="float">
            <text:p>0,0525915</text:p>
          </table:table-cell>
          <table:table-cell table:number-columns-repeated="2"/>
          <table:table-cell office:value-type="float" office:value="0.000979065" calcext:value-type="float">
            <text:p>0,000979065</text:p>
          </table:table-cell>
        </table:table-row>
        <table:table-row table:style-name="ro1">
          <table:table-cell table:formula="of:=[.A138]+0.025" office:value-type="float" office:value="3.42499999999999" calcext:value-type="float">
            <text:p>3,42499999999999</text:p>
          </table:table-cell>
          <table:table-cell/>
          <table:table-cell office:value-type="float" office:value="0.00664675" calcext:value-type="float">
            <text:p>0,00664675</text:p>
          </table:table-cell>
          <table:table-cell table:number-columns-repeated="2"/>
          <table:table-cell office:value-type="float" office:value="0.0521985" calcext:value-type="float">
            <text:p>0,0521985</text:p>
          </table:table-cell>
          <table:table-cell table:number-columns-repeated="2"/>
          <table:table-cell office:value-type="float" office:value="0.000971183" calcext:value-type="float">
            <text:p>0,000971183</text:p>
          </table:table-cell>
        </table:table-row>
        <table:table-row table:style-name="ro1">
          <table:table-cell table:formula="of:=[.A139]+0.025" office:value-type="float" office:value="3.44999999999999" calcext:value-type="float">
            <text:p>3,44999999999999</text:p>
          </table:table-cell>
          <table:table-cell/>
          <table:table-cell office:value-type="float" office:value="0.00660012" calcext:value-type="float">
            <text:p>0,00660012</text:p>
          </table:table-cell>
          <table:table-cell table:number-columns-repeated="2"/>
          <table:table-cell office:value-type="float" office:value="0.0518127" calcext:value-type="float">
            <text:p>0,0518127</text:p>
          </table:table-cell>
          <table:table-cell table:number-columns-repeated="2"/>
          <table:table-cell office:value-type="float" office:value="0.000963448" calcext:value-type="float">
            <text:p>0,000963448</text:p>
          </table:table-cell>
        </table:table-row>
        <table:table-row table:style-name="ro1">
          <table:table-cell table:formula="of:=[.A140]+0.025" office:value-type="float" office:value="3.47499999999999" calcext:value-type="float">
            <text:p>3,47499999999999</text:p>
          </table:table-cell>
          <table:table-cell/>
          <table:table-cell office:value-type="float" office:value="0.00655423" calcext:value-type="float">
            <text:p>0,00655423</text:p>
          </table:table-cell>
          <table:table-cell table:number-columns-repeated="2"/>
          <table:table-cell office:value-type="float" office:value="0.0514332" calcext:value-type="float">
            <text:p>0,0514332</text:p>
          </table:table-cell>
          <table:table-cell table:number-columns-repeated="2"/>
          <table:table-cell office:value-type="float" office:value="0.000955837" calcext:value-type="float">
            <text:p>0,000955837</text:p>
          </table:table-cell>
        </table:table-row>
        <table:table-row table:style-name="ro1">
          <table:table-cell table:formula="of:=[.A141]+0.025" office:value-type="float" office:value="3.49999999999999" calcext:value-type="float">
            <text:p>3,49999999999999</text:p>
          </table:table-cell>
          <table:table-cell/>
          <table:table-cell office:value-type="float" office:value="0.00650901" calcext:value-type="float">
            <text:p>0,00650901</text:p>
          </table:table-cell>
          <table:table-cell table:number-columns-repeated="2"/>
          <table:table-cell office:value-type="float" office:value="0.0510593" calcext:value-type="float">
            <text:p>0,0510593</text:p>
          </table:table-cell>
          <table:table-cell table:number-columns-repeated="2"/>
          <table:table-cell office:value-type="float" office:value="0.000948349" calcext:value-type="float">
            <text:p>0,000948349</text:p>
          </table:table-cell>
        </table:table-row>
        <table:table-row table:style-name="ro1">
          <table:table-cell table:formula="of:=[.A142]+0.025" office:value-type="float" office:value="3.52499999999999" calcext:value-type="float">
            <text:p>3,52499999999999</text:p>
          </table:table-cell>
          <table:table-cell/>
          <table:table-cell office:value-type="float" office:value="0.00646456" calcext:value-type="float">
            <text:p>0,00646456</text:p>
          </table:table-cell>
          <table:table-cell table:number-columns-repeated="2"/>
          <table:table-cell office:value-type="float" office:value="0.050692" calcext:value-type="float">
            <text:p>0,050692</text:p>
          </table:table-cell>
          <table:table-cell table:number-columns-repeated="2"/>
          <table:table-cell office:value-type="float" office:value="0.000940992" calcext:value-type="float">
            <text:p>0,000940992</text:p>
          </table:table-cell>
        </table:table-row>
        <table:table-row table:style-name="ro1">
          <table:table-cell table:formula="of:=[.A143]+0.025" office:value-type="float" office:value="3.54999999999999" calcext:value-type="float">
            <text:p>3,54999999999999</text:p>
          </table:table-cell>
          <table:table-cell/>
          <table:table-cell office:value-type="float" office:value="0.0064208" calcext:value-type="float">
            <text:p>0,0064208</text:p>
          </table:table-cell>
          <table:table-cell table:number-columns-repeated="2"/>
          <table:table-cell office:value-type="float" office:value="0.0503306" calcext:value-type="float">
            <text:p>0,0503306</text:p>
          </table:table-cell>
          <table:table-cell table:number-columns-repeated="2"/>
          <table:table-cell office:value-type="float" office:value="0.000933767" calcext:value-type="float">
            <text:p>0,000933767</text:p>
          </table:table-cell>
        </table:table-row>
        <table:table-row table:style-name="ro1">
          <table:table-cell table:formula="of:=[.A144]+0.025" office:value-type="float" office:value="3.57499999999999" calcext:value-type="float">
            <text:p>3,57499999999999</text:p>
          </table:table-cell>
          <table:table-cell/>
          <table:table-cell office:value-type="float" office:value="0.00637765" calcext:value-type="float">
            <text:p>0,00637765</text:p>
          </table:table-cell>
          <table:table-cell table:number-columns-repeated="2"/>
          <table:table-cell office:value-type="float" office:value="0.0499744" calcext:value-type="float">
            <text:p>0,0499744</text:p>
          </table:table-cell>
          <table:table-cell table:number-columns-repeated="2"/>
          <table:table-cell office:value-type="float" office:value="0.000926649" calcext:value-type="float">
            <text:p>0,000926649</text:p>
          </table:table-cell>
        </table:table-row>
        <table:table-row table:style-name="ro1">
          <table:table-cell table:formula="of:=[.A145]+0.025" office:value-type="float" office:value="3.59999999999999" calcext:value-type="float">
            <text:p>3,59999999999999</text:p>
          </table:table-cell>
          <table:table-cell/>
          <table:table-cell office:value-type="float" office:value="0.00633522" calcext:value-type="float">
            <text:p>0,00633522</text:p>
          </table:table-cell>
          <table:table-cell table:number-columns-repeated="2"/>
          <table:table-cell office:value-type="float" office:value="0.0496245" calcext:value-type="float">
            <text:p>0,0496245</text:p>
          </table:table-cell>
          <table:table-cell table:number-columns-repeated="2"/>
          <table:table-cell office:value-type="float" office:value="0.000919654" calcext:value-type="float">
            <text:p>0,000919654</text:p>
          </table:table-cell>
        </table:table-row>
        <table:table-row table:style-name="ro1">
          <table:table-cell table:formula="of:=[.A146]+0.025" office:value-type="float" office:value="3.62499999999999" calcext:value-type="float">
            <text:p>3,62499999999999</text:p>
          </table:table-cell>
          <table:table-cell/>
          <table:table-cell office:value-type="float" office:value="0.00629344" calcext:value-type="float">
            <text:p>0,00629344</text:p>
          </table:table-cell>
          <table:table-cell table:number-columns-repeated="2"/>
          <table:table-cell office:value-type="float" office:value="0.0492798" calcext:value-type="float">
            <text:p>0,0492798</text:p>
          </table:table-cell>
          <table:table-cell table:number-columns-repeated="2"/>
          <table:table-cell office:value-type="float" office:value="0.000912775" calcext:value-type="float">
            <text:p>0,000912775</text:p>
          </table:table-cell>
        </table:table-row>
        <table:table-row table:style-name="ro1">
          <table:table-cell table:formula="of:=[.A147]+0.025" office:value-type="float" office:value="3.64999999999999" calcext:value-type="float">
            <text:p>3,64999999999999</text:p>
          </table:table-cell>
          <table:table-cell/>
          <table:table-cell office:value-type="float" office:value="0.00625223" calcext:value-type="float">
            <text:p>0,00625223</text:p>
          </table:table-cell>
          <table:table-cell table:number-columns-repeated="2"/>
          <table:table-cell office:value-type="float" office:value="0.0489401" calcext:value-type="float">
            <text:p>0,0489401</text:p>
          </table:table-cell>
          <table:table-cell table:number-columns-repeated="2"/>
          <table:table-cell office:value-type="float" office:value="0.000905994" calcext:value-type="float">
            <text:p>0,000905994</text:p>
          </table:table-cell>
        </table:table-row>
        <table:table-row table:style-name="ro1">
          <table:table-cell table:formula="of:=[.A148]+0.025" office:value-type="float" office:value="3.67499999999999" calcext:value-type="float">
            <text:p>3,67499999999999</text:p>
          </table:table-cell>
          <table:table-cell/>
          <table:table-cell office:value-type="float" office:value="0.0062117" calcext:value-type="float">
            <text:p>0,0062117</text:p>
          </table:table-cell>
          <table:table-cell table:number-columns-repeated="2"/>
          <table:table-cell office:value-type="float" office:value="0.0486063" calcext:value-type="float">
            <text:p>0,0486063</text:p>
          </table:table-cell>
          <table:table-cell table:number-columns-repeated="2"/>
          <table:table-cell office:value-type="float" office:value="0.000899336" calcext:value-type="float">
            <text:p>0,000899336</text:p>
          </table:table-cell>
        </table:table-row>
        <table:table-row table:style-name="ro1">
          <table:table-cell table:formula="of:=[.A149]+0.025" office:value-type="float" office:value="3.69999999999999" calcext:value-type="float">
            <text:p>3,69999999999999</text:p>
          </table:table-cell>
          <table:table-cell/>
          <table:table-cell office:value-type="float" office:value="0.00617176" calcext:value-type="float">
            <text:p>0,00617176</text:p>
          </table:table-cell>
          <table:table-cell table:number-columns-repeated="2"/>
          <table:table-cell office:value-type="float" office:value="0.0482774" calcext:value-type="float">
            <text:p>0,0482774</text:p>
          </table:table-cell>
          <table:table-cell table:number-columns-repeated="2"/>
          <table:table-cell office:value-type="float" office:value="0.000892785" calcext:value-type="float">
            <text:p>0,000892785</text:p>
          </table:table-cell>
        </table:table-row>
        <table:table-row table:style-name="ro1">
          <table:table-cell table:formula="of:=[.A150]+0.025" office:value-type="float" office:value="3.72499999999999" calcext:value-type="float">
            <text:p>3,72499999999999</text:p>
          </table:table-cell>
          <table:table-cell/>
          <table:table-cell office:value-type="float" office:value="0.00613236" calcext:value-type="float">
            <text:p>0,00613236</text:p>
          </table:table-cell>
          <table:table-cell table:number-columns-repeated="2"/>
          <table:table-cell office:value-type="float" office:value="0.047953" calcext:value-type="float">
            <text:p>0,047953</text:p>
          </table:table-cell>
          <table:table-cell table:number-columns-repeated="2"/>
          <table:table-cell office:value-type="float" office:value="0.000886332" calcext:value-type="float">
            <text:p>0,000886332</text:p>
          </table:table-cell>
        </table:table-row>
        <table:table-row table:style-name="ro1">
          <table:table-cell table:formula="of:=[.A151]+0.025" office:value-type="float" office:value="3.74999999999999" calcext:value-type="float">
            <text:p>3,74999999999999</text:p>
          </table:table-cell>
          <table:table-cell/>
          <table:table-cell office:value-type="float" office:value="0.00609359" calcext:value-type="float">
            <text:p>0,00609359</text:p>
          </table:table-cell>
          <table:table-cell table:number-columns-repeated="2"/>
          <table:table-cell office:value-type="float" office:value="0.0476341" calcext:value-type="float">
            <text:p>0,0476341</text:p>
          </table:table-cell>
          <table:table-cell table:number-columns-repeated="2"/>
          <table:table-cell office:value-type="float" office:value="0.000879987" calcext:value-type="float">
            <text:p>0,000879987</text:p>
          </table:table-cell>
        </table:table-row>
        <table:table-row table:style-name="ro1">
          <table:table-cell table:formula="of:=[.A152]+0.025" office:value-type="float" office:value="3.77499999999999" calcext:value-type="float">
            <text:p>3,77499999999999</text:p>
          </table:table-cell>
          <table:table-cell/>
          <table:table-cell office:value-type="float" office:value="0.00605537" calcext:value-type="float">
            <text:p>0,00605537</text:p>
          </table:table-cell>
          <table:table-cell table:number-columns-repeated="2"/>
          <table:table-cell office:value-type="float" office:value="0.0473198" calcext:value-type="float">
            <text:p>0,0473198</text:p>
          </table:table-cell>
          <table:table-cell table:number-columns-repeated="2"/>
          <table:table-cell office:value-type="float" office:value="0.00087374" calcext:value-type="float">
            <text:p>0,00087374</text:p>
          </table:table-cell>
        </table:table-row>
        <table:table-row table:style-name="ro1">
          <table:table-cell table:formula="of:=[.A153]+0.025" office:value-type="float" office:value="3.79999999999999" calcext:value-type="float">
            <text:p>3,79999999999999</text:p>
          </table:table-cell>
          <table:table-cell/>
          <table:table-cell office:value-type="float" office:value="0.00601765" calcext:value-type="float">
            <text:p>0,00601765</text:p>
          </table:table-cell>
          <table:table-cell table:number-columns-repeated="2"/>
          <table:table-cell office:value-type="float" office:value="0.0470098" calcext:value-type="float">
            <text:p>0,0470098</text:p>
          </table:table-cell>
          <table:table-cell table:number-columns-repeated="2"/>
          <table:table-cell office:value-type="float" office:value="0.000867584" calcext:value-type="float">
            <text:p>0,000867584</text:p>
          </table:table-cell>
        </table:table-row>
        <table:table-row table:style-name="ro1">
          <table:table-cell table:formula="of:=[.A154]+0.025" office:value-type="float" office:value="3.82499999999999" calcext:value-type="float">
            <text:p>3,82499999999999</text:p>
          </table:table-cell>
          <table:table-cell/>
          <table:table-cell office:value-type="float" office:value="0.00598053" calcext:value-type="float">
            <text:p>0,00598053</text:p>
          </table:table-cell>
          <table:table-cell table:number-columns-repeated="2"/>
          <table:table-cell office:value-type="float" office:value="0.0467048" calcext:value-type="float">
            <text:p>0,0467048</text:p>
          </table:table-cell>
          <table:table-cell table:number-columns-repeated="2"/>
          <table:table-cell office:value-type="float" office:value="0.000861534" calcext:value-type="float">
            <text:p>0,000861534</text:p>
          </table:table-cell>
        </table:table-row>
        <table:table-row table:style-name="ro1">
          <table:table-cell table:formula="of:=[.A155]+0.025" office:value-type="float" office:value="3.84999999999999" calcext:value-type="float">
            <text:p>3,84999999999999</text:p>
          </table:table-cell>
          <table:table-cell/>
          <table:table-cell office:value-type="float" office:value="0.00594393" calcext:value-type="float">
            <text:p>0,00594393</text:p>
          </table:table-cell>
          <table:table-cell table:number-columns-repeated="2"/>
          <table:table-cell office:value-type="float" office:value="0.0464042" calcext:value-type="float">
            <text:p>0,0464042</text:p>
          </table:table-cell>
          <table:table-cell table:number-columns-repeated="2"/>
          <table:table-cell office:value-type="float" office:value="0.000855575" calcext:value-type="float">
            <text:p>0,000855575</text:p>
          </table:table-cell>
        </table:table-row>
        <table:table-row table:style-name="ro1">
          <table:table-cell table:formula="of:=[.A156]+0.025" office:value-type="float" office:value="3.87499999999999" calcext:value-type="float">
            <text:p>3,87499999999999</text:p>
          </table:table-cell>
          <table:table-cell/>
          <table:table-cell office:value-type="float" office:value="0.0059078" calcext:value-type="float">
            <text:p>0,0059078</text:p>
          </table:table-cell>
          <table:table-cell table:number-columns-repeated="2"/>
          <table:table-cell office:value-type="float" office:value="0.0461075" calcext:value-type="float">
            <text:p>0,0461075</text:p>
          </table:table-cell>
          <table:table-cell table:number-columns-repeated="2"/>
          <table:table-cell office:value-type="float" office:value="0.000849698" calcext:value-type="float">
            <text:p>0,000849698</text:p>
          </table:table-cell>
        </table:table-row>
        <table:table-row table:style-name="ro1">
          <table:table-cell table:formula="of:=[.A157]+0.025" office:value-type="float" office:value="3.89999999999999" calcext:value-type="float">
            <text:p>3,89999999999999</text:p>
          </table:table-cell>
          <table:table-cell/>
          <table:table-cell office:value-type="float" office:value="0.00587222" calcext:value-type="float">
            <text:p>0,00587222</text:p>
          </table:table-cell>
          <table:table-cell table:number-columns-repeated="2"/>
          <table:table-cell office:value-type="float" office:value="0.0458156" calcext:value-type="float">
            <text:p>0,0458156</text:p>
          </table:table-cell>
          <table:table-cell table:number-columns-repeated="2"/>
          <table:table-cell office:value-type="float" office:value="0.00084392" calcext:value-type="float">
            <text:p>0,00084392</text:p>
          </table:table-cell>
        </table:table-row>
        <table:table-row table:style-name="ro1">
          <table:table-cell table:formula="of:=[.A158]+0.025" office:value-type="float" office:value="3.92499999999999" calcext:value-type="float">
            <text:p>3,92499999999999</text:p>
          </table:table-cell>
          <table:table-cell/>
          <table:table-cell office:value-type="float" office:value="0.00583713" calcext:value-type="float">
            <text:p>0,00583713</text:p>
          </table:table-cell>
          <table:table-cell table:number-columns-repeated="2"/>
          <table:table-cell office:value-type="float" office:value="0.0455278" calcext:value-type="float">
            <text:p>0,0455278</text:p>
          </table:table-cell>
          <table:table-cell table:number-columns-repeated="2"/>
          <table:table-cell office:value-type="float" office:value="0.000838224" calcext:value-type="float">
            <text:p>0,000838224</text:p>
          </table:table-cell>
        </table:table-row>
        <table:table-row table:style-name="ro1">
          <table:table-cell table:formula="of:=[.A159]+0.025" office:value-type="float" office:value="3.94999999999999" calcext:value-type="float">
            <text:p>3,94999999999999</text:p>
          </table:table-cell>
          <table:table-cell/>
          <table:table-cell office:value-type="float" office:value="0.00580248" calcext:value-type="float">
            <text:p>0,00580248</text:p>
          </table:table-cell>
          <table:table-cell table:number-columns-repeated="2"/>
          <table:table-cell office:value-type="float" office:value="0.0452437" calcext:value-type="float">
            <text:p>0,0452437</text:p>
          </table:table-cell>
          <table:table-cell table:number-columns-repeated="2"/>
          <table:table-cell office:value-type="float" office:value="0.00083261" calcext:value-type="float">
            <text:p>0,00083261</text:p>
          </table:table-cell>
        </table:table-row>
        <table:table-row table:style-name="ro1">
          <table:table-cell table:formula="of:=[.A160]+0.025" office:value-type="float" office:value="3.97499999999999" calcext:value-type="float">
            <text:p>3,97499999999999</text:p>
          </table:table-cell>
          <table:table-cell/>
          <table:table-cell office:value-type="float" office:value="0.00576834" calcext:value-type="float">
            <text:p>0,00576834</text:p>
          </table:table-cell>
          <table:table-cell table:number-columns-repeated="2"/>
          <table:table-cell office:value-type="float" office:value="0.0449639" calcext:value-type="float">
            <text:p>0,0449639</text:p>
          </table:table-cell>
          <table:table-cell table:number-columns-repeated="2"/>
          <table:table-cell office:value-type="float" office:value="0.000827094" calcext:value-type="float">
            <text:p>0,000827094</text:p>
          </table:table-cell>
        </table:table-row>
        <table:table-row table:style-name="ro1">
          <table:table-cell table:formula="of:=[.A161]+0.025" office:value-type="float" office:value="3.99999999999999" calcext:value-type="float">
            <text:p>3,99999999999999</text:p>
          </table:table-cell>
          <table:table-cell/>
          <table:table-cell office:value-type="float" office:value="0.00573466" calcext:value-type="float">
            <text:p>0,00573466</text:p>
          </table:table-cell>
          <table:table-cell table:number-columns-repeated="2"/>
          <table:table-cell office:value-type="float" office:value="0.0446881" calcext:value-type="float">
            <text:p>0,0446881</text:p>
          </table:table-cell>
          <table:table-cell table:number-columns-repeated="2"/>
          <table:table-cell office:value-type="float" office:value="0.000821651" calcext:value-type="float">
            <text:p>0,000821651</text:p>
          </table:table-cell>
        </table:table-row>
        <table:table-row table:style-name="ro1">
          <table:table-cell table:formula="of:=[.A162]+0.025" office:value-type="float" office:value="4.02499999999999" calcext:value-type="float">
            <text:p>4,02499999999999</text:p>
          </table:table-cell>
          <table:table-cell/>
          <table:table-cell office:value-type="float" office:value="0.0057014" calcext:value-type="float">
            <text:p>0,0057014</text:p>
          </table:table-cell>
          <table:table-cell table:number-columns-repeated="2"/>
          <table:table-cell office:value-type="float" office:value="0.0444156" calcext:value-type="float">
            <text:p>0,0444156</text:p>
          </table:table-cell>
          <table:table-cell table:number-columns-repeated="2"/>
          <table:table-cell office:value-type="float" office:value="0.000816285" calcext:value-type="float">
            <text:p>0,000816285</text:p>
          </table:table-cell>
        </table:table-row>
        <table:table-row table:style-name="ro1">
          <table:table-cell table:formula="of:=[.A163]+0.025" office:value-type="float" office:value="4.04999999999999" calcext:value-type="float">
            <text:p>4,04999999999999</text:p>
          </table:table-cell>
          <table:table-cell/>
          <table:table-cell office:value-type="float" office:value="0.00566863" calcext:value-type="float">
            <text:p>0,00566863</text:p>
          </table:table-cell>
          <table:table-cell table:number-columns-repeated="2"/>
          <table:table-cell office:value-type="float" office:value="0.0441474" calcext:value-type="float">
            <text:p>0,0441474</text:p>
          </table:table-cell>
          <table:table-cell table:number-columns-repeated="2"/>
          <table:table-cell office:value-type="float" office:value="0.000811003" calcext:value-type="float">
            <text:p>0,000811003</text:p>
          </table:table-cell>
        </table:table-row>
        <table:table-row table:style-name="ro1">
          <table:table-cell table:formula="of:=[.A164]+0.025" office:value-type="float" office:value="4.07499999999999" calcext:value-type="float">
            <text:p>4,07499999999999</text:p>
          </table:table-cell>
          <table:table-cell/>
          <table:table-cell office:value-type="float" office:value="0.00563628" calcext:value-type="float">
            <text:p>0,00563628</text:p>
          </table:table-cell>
          <table:table-cell table:number-columns-repeated="2"/>
          <table:table-cell office:value-type="float" office:value="0.0438827" calcext:value-type="float">
            <text:p>0,0438827</text:p>
          </table:table-cell>
          <table:table-cell table:number-columns-repeated="2"/>
          <table:table-cell office:value-type="float" office:value="0.000805798" calcext:value-type="float">
            <text:p>0,000805798</text:p>
          </table:table-cell>
        </table:table-row>
        <table:table-row table:style-name="ro1">
          <table:table-cell table:formula="of:=[.A165]+0.025" office:value-type="float" office:value="4.09999999999999" calcext:value-type="float">
            <text:p>4,09999999999999</text:p>
          </table:table-cell>
          <table:table-cell/>
          <table:table-cell office:value-type="float" office:value="0.00560433" calcext:value-type="float">
            <text:p>0,00560433</text:p>
          </table:table-cell>
          <table:table-cell table:number-columns-repeated="2"/>
          <table:table-cell office:value-type="float" office:value="0.0436214" calcext:value-type="float">
            <text:p>0,0436214</text:p>
          </table:table-cell>
          <table:table-cell table:number-columns-repeated="2"/>
          <table:table-cell office:value-type="float" office:value="0.000800663" calcext:value-type="float">
            <text:p>0,000800663</text:p>
          </table:table-cell>
        </table:table-row>
        <table:table-row table:style-name="ro1">
          <table:table-cell table:formula="of:=[.A166]+0.025" office:value-type="float" office:value="4.12499999999999" calcext:value-type="float">
            <text:p>4,12499999999999</text:p>
          </table:table-cell>
          <table:table-cell/>
          <table:table-cell office:value-type="float" office:value="0.00557283" calcext:value-type="float">
            <text:p>0,00557283</text:p>
          </table:table-cell>
          <table:table-cell table:number-columns-repeated="2"/>
          <table:table-cell office:value-type="float" office:value="0.0433638" calcext:value-type="float">
            <text:p>0,0433638</text:p>
          </table:table-cell>
          <table:table-cell table:number-columns-repeated="2"/>
          <table:table-cell office:value-type="float" office:value="0.000795606" calcext:value-type="float">
            <text:p>0,000795606</text:p>
          </table:table-cell>
        </table:table-row>
        <table:table-row table:style-name="ro1">
          <table:table-cell table:formula="of:=[.A167]+0.025" office:value-type="float" office:value="4.14999999999999" calcext:value-type="float">
            <text:p>4,14999999999999</text:p>
          </table:table-cell>
          <table:table-cell/>
          <table:table-cell office:value-type="float" office:value="0.00554174" calcext:value-type="float">
            <text:p>0,00554174</text:p>
          </table:table-cell>
          <table:table-cell table:number-columns-repeated="2"/>
          <table:table-cell office:value-type="float" office:value="0.0431098" calcext:value-type="float">
            <text:p>0,0431098</text:p>
          </table:table-cell>
          <table:table-cell table:number-columns-repeated="2"/>
          <table:table-cell office:value-type="float" office:value="0.000790623" calcext:value-type="float">
            <text:p>0,000790623</text:p>
          </table:table-cell>
        </table:table-row>
        <table:table-row table:style-name="ro1">
          <table:table-cell table:formula="of:=[.A168]+0.025" office:value-type="float" office:value="4.17499999999999" calcext:value-type="float">
            <text:p>4,17499999999999</text:p>
          </table:table-cell>
          <table:table-cell/>
          <table:table-cell office:value-type="float" office:value="0.005511" calcext:value-type="float">
            <text:p>0,005511</text:p>
          </table:table-cell>
          <table:table-cell table:number-columns-repeated="2"/>
          <table:table-cell office:value-type="float" office:value="0.0428587" calcext:value-type="float">
            <text:p>0,0428587</text:p>
          </table:table-cell>
          <table:table-cell table:number-columns-repeated="2"/>
          <table:table-cell office:value-type="float" office:value="0.000785703" calcext:value-type="float">
            <text:p>0,000785703</text:p>
          </table:table-cell>
        </table:table-row>
        <table:table-row table:style-name="ro1">
          <table:table-cell table:formula="of:=[.A169]+0.025" office:value-type="float" office:value="4.19999999999999" calcext:value-type="float">
            <text:p>4,19999999999999</text:p>
          </table:table-cell>
          <table:table-cell/>
          <table:table-cell office:value-type="float" office:value="0.00548071" calcext:value-type="float">
            <text:p>0,00548071</text:p>
          </table:table-cell>
          <table:table-cell table:number-columns-repeated="2"/>
          <table:table-cell office:value-type="float" office:value="0.0426113" calcext:value-type="float">
            <text:p>0,0426113</text:p>
          </table:table-cell>
          <table:table-cell table:number-columns-repeated="2"/>
          <table:table-cell office:value-type="float" office:value="0.000780859" calcext:value-type="float">
            <text:p>0,000780859</text:p>
          </table:table-cell>
        </table:table-row>
        <table:table-row table:style-name="ro1">
          <table:table-cell table:formula="of:=[.A170]+0.025" office:value-type="float" office:value="4.22499999999999" calcext:value-type="float">
            <text:p>4,22499999999999</text:p>
          </table:table-cell>
          <table:table-cell/>
          <table:table-cell office:value-type="float" office:value="0.0054508" calcext:value-type="float">
            <text:p>0,0054508</text:p>
          </table:table-cell>
          <table:table-cell table:number-columns-repeated="2"/>
          <table:table-cell office:value-type="float" office:value="0.0423671" calcext:value-type="float">
            <text:p>0,0423671</text:p>
          </table:table-cell>
          <table:table-cell table:number-columns-repeated="2"/>
          <table:table-cell office:value-type="float" office:value="0.000776083" calcext:value-type="float">
            <text:p>0,000776083</text:p>
          </table:table-cell>
        </table:table-row>
        <table:table-row table:style-name="ro1">
          <table:table-cell table:formula="of:=[.A171]+0.025" office:value-type="float" office:value="4.24999999999999" calcext:value-type="float">
            <text:p>4,24999999999999</text:p>
          </table:table-cell>
          <table:table-cell/>
          <table:table-cell office:value-type="float" office:value="0.00542122" calcext:value-type="float">
            <text:p>0,00542122</text:p>
          </table:table-cell>
          <table:table-cell table:number-columns-repeated="2"/>
          <table:table-cell office:value-type="float" office:value="0.0421257" calcext:value-type="float">
            <text:p>0,0421257</text:p>
          </table:table-cell>
          <table:table-cell table:number-columns-repeated="2"/>
          <table:table-cell office:value-type="float" office:value="0.000771368" calcext:value-type="float">
            <text:p>0,000771368</text:p>
          </table:table-cell>
        </table:table-row>
        <table:table-row table:style-name="ro1">
          <table:table-cell table:formula="of:=[.A172]+0.025" office:value-type="float" office:value="4.27499999999999" calcext:value-type="float">
            <text:p>4,27499999999999</text:p>
          </table:table-cell>
          <table:table-cell/>
          <table:table-cell office:value-type="float" office:value="0.00539207" calcext:value-type="float">
            <text:p>0,00539207</text:p>
          </table:table-cell>
          <table:table-cell table:number-columns-repeated="2"/>
          <table:table-cell office:value-type="float" office:value="0.0418879" calcext:value-type="float">
            <text:p>0,0418879</text:p>
          </table:table-cell>
          <table:table-cell table:number-columns-repeated="2"/>
          <table:table-cell office:value-type="float" office:value="0.000766722" calcext:value-type="float">
            <text:p>0,000766722</text:p>
          </table:table-cell>
        </table:table-row>
        <table:table-row table:style-name="ro1">
          <table:table-cell table:formula="of:=[.A173]+0.025" office:value-type="float" office:value="4.29999999999999" calcext:value-type="float">
            <text:p>4,29999999999999</text:p>
          </table:table-cell>
          <table:table-cell/>
          <table:table-cell office:value-type="float" office:value="0.00536327" calcext:value-type="float">
            <text:p>0,00536327</text:p>
          </table:table-cell>
          <table:table-cell table:number-columns-repeated="2"/>
          <table:table-cell office:value-type="float" office:value="0.041653" calcext:value-type="float">
            <text:p>0,041653</text:p>
          </table:table-cell>
          <table:table-cell table:number-columns-repeated="2"/>
          <table:table-cell office:value-type="float" office:value="0.000762141" calcext:value-type="float">
            <text:p>0,000762141</text:p>
          </table:table-cell>
        </table:table-row>
        <table:table-row table:style-name="ro1">
          <table:table-cell table:formula="of:=[.A174]+0.025" office:value-type="float" office:value="4.32499999999999" calcext:value-type="float">
            <text:p>4,32499999999999</text:p>
          </table:table-cell>
          <table:table-cell/>
          <table:table-cell office:value-type="float" office:value="0.00533478" calcext:value-type="float">
            <text:p>0,00533478</text:p>
          </table:table-cell>
          <table:table-cell table:number-columns-repeated="2"/>
          <table:table-cell office:value-type="float" office:value="0.0414208" calcext:value-type="float">
            <text:p>0,0414208</text:p>
          </table:table-cell>
          <table:table-cell table:number-columns-repeated="2"/>
          <table:table-cell office:value-type="float" office:value="0.000757617" calcext:value-type="float">
            <text:p>0,000757617</text:p>
          </table:table-cell>
        </table:table-row>
        <table:table-row table:style-name="ro1">
          <table:table-cell table:formula="of:=[.A175]+0.025" office:value-type="float" office:value="4.34999999999999" calcext:value-type="float">
            <text:p>4,34999999999999</text:p>
          </table:table-cell>
          <table:table-cell/>
          <table:table-cell office:value-type="float" office:value="0.00530668" calcext:value-type="float">
            <text:p>0,00530668</text:p>
          </table:table-cell>
          <table:table-cell table:number-columns-repeated="2"/>
          <table:table-cell office:value-type="float" office:value="0.0411918" calcext:value-type="float">
            <text:p>0,0411918</text:p>
          </table:table-cell>
          <table:table-cell table:number-columns-repeated="2"/>
          <table:table-cell office:value-type="float" office:value="0.00075316" calcext:value-type="float">
            <text:p>0,00075316</text:p>
          </table:table-cell>
        </table:table-row>
        <table:table-row table:style-name="ro1">
          <table:table-cell table:formula="of:=[.A176]+0.025" office:value-type="float" office:value="4.375" calcext:value-type="float">
            <text:p>4,375</text:p>
          </table:table-cell>
          <table:table-cell/>
          <table:table-cell office:value-type="float" office:value="0.00527893" calcext:value-type="float">
            <text:p>0,00527893</text:p>
          </table:table-cell>
          <table:table-cell table:number-columns-repeated="2"/>
          <table:table-cell office:value-type="float" office:value="0.0409658" calcext:value-type="float">
            <text:p>0,0409658</text:p>
          </table:table-cell>
          <table:table-cell table:number-columns-repeated="2"/>
          <table:table-cell office:value-type="float" office:value="0.000748762" calcext:value-type="float">
            <text:p>0,000748762</text:p>
          </table:table-cell>
        </table:table-row>
        <table:table-row table:style-name="ro1">
          <table:table-cell table:formula="of:=[.A177]+0.025" office:value-type="float" office:value="4.4" calcext:value-type="float">
            <text:p>4,4</text:p>
          </table:table-cell>
          <table:table-cell/>
          <table:table-cell office:value-type="float" office:value="0.00525148" calcext:value-type="float">
            <text:p>0,00525148</text:p>
          </table:table-cell>
          <table:table-cell table:number-columns-repeated="2"/>
          <table:table-cell office:value-type="float" office:value="0.0407421" calcext:value-type="float">
            <text:p>0,0407421</text:p>
          </table:table-cell>
          <table:table-cell table:number-columns-repeated="2"/>
          <table:table-cell office:value-type="float" office:value="0.000744419" calcext:value-type="float">
            <text:p>0,000744419</text:p>
          </table:table-cell>
        </table:table-row>
        <table:table-row table:style-name="ro1">
          <table:table-cell table:formula="of:=[.A178]+0.025" office:value-type="float" office:value="4.425" calcext:value-type="float">
            <text:p>4,425</text:p>
          </table:table-cell>
          <table:table-cell/>
          <table:table-cell office:value-type="float" office:value="0.0052244" calcext:value-type="float">
            <text:p>0,0052244</text:p>
          </table:table-cell>
          <table:table-cell table:number-columns-repeated="2"/>
          <table:table-cell office:value-type="float" office:value="0.0405217" calcext:value-type="float">
            <text:p>0,0405217</text:p>
          </table:table-cell>
          <table:table-cell table:number-columns-repeated="2"/>
          <table:table-cell office:value-type="float" office:value="0.000740138" calcext:value-type="float">
            <text:p>0,000740138</text:p>
          </table:table-cell>
        </table:table-row>
        <table:table-row table:style-name="ro1">
          <table:table-cell table:formula="of:=[.A179]+0.025" office:value-type="float" office:value="4.45" calcext:value-type="float">
            <text:p>4,45</text:p>
          </table:table-cell>
          <table:table-cell/>
          <table:table-cell office:value-type="float" office:value="0.00519763" calcext:value-type="float">
            <text:p>0,00519763</text:p>
          </table:table-cell>
          <table:table-cell table:number-columns-repeated="2"/>
          <table:table-cell office:value-type="float" office:value="0.040304" calcext:value-type="float">
            <text:p>0,040304</text:p>
          </table:table-cell>
          <table:table-cell table:number-columns-repeated="2"/>
          <table:table-cell office:value-type="float" office:value="0.000735913" calcext:value-type="float">
            <text:p>0,000735913</text:p>
          </table:table-cell>
        </table:table-row>
        <table:table-row table:style-name="ro1">
          <table:table-cell table:formula="of:=[.A180]+0.025" office:value-type="float" office:value="4.475" calcext:value-type="float">
            <text:p>4,475</text:p>
          </table:table-cell>
          <table:table-cell/>
          <table:table-cell office:value-type="float" office:value="0.00517115" calcext:value-type="float">
            <text:p>0,00517115</text:p>
          </table:table-cell>
          <table:table-cell table:number-columns-repeated="2"/>
          <table:table-cell office:value-type="float" office:value="0.0400885" calcext:value-type="float">
            <text:p>0,0400885</text:p>
          </table:table-cell>
          <table:table-cell table:number-columns-repeated="2"/>
          <table:table-cell office:value-type="float" office:value="0.00073174" calcext:value-type="float">
            <text:p>0,00073174</text:p>
          </table:table-cell>
        </table:table-row>
        <table:table-row table:style-name="ro1">
          <table:table-cell table:formula="of:=[.A181]+0.025" office:value-type="float" office:value="4.5" calcext:value-type="float">
            <text:p>4,5</text:p>
          </table:table-cell>
          <table:table-cell/>
          <table:table-cell office:value-type="float" office:value="0.00514502" calcext:value-type="float">
            <text:p>0,00514502</text:p>
          </table:table-cell>
          <table:table-cell table:number-columns-repeated="2"/>
          <table:table-cell office:value-type="float" office:value="0.039876" calcext:value-type="float">
            <text:p>0,039876</text:p>
          </table:table-cell>
          <table:table-cell table:number-columns-repeated="2"/>
          <table:table-cell office:value-type="float" office:value="0.000727625" calcext:value-type="float">
            <text:p>0,000727625</text:p>
          </table:table-cell>
        </table:table-row>
        <table:table-row table:style-name="ro1">
          <table:table-cell table:formula="of:=[.A182]+0.025" office:value-type="float" office:value="4.525" calcext:value-type="float">
            <text:p>4,525</text:p>
          </table:table-cell>
          <table:table-cell/>
          <table:table-cell office:value-type="float" office:value="0.0051192" calcext:value-type="float">
            <text:p>0,0051192</text:p>
          </table:table-cell>
          <table:table-cell table:number-columns-repeated="2"/>
          <table:table-cell office:value-type="float" office:value="0.0396661" calcext:value-type="float">
            <text:p>0,0396661</text:p>
          </table:table-cell>
          <table:table-cell table:number-columns-repeated="2"/>
          <table:table-cell office:value-type="float" office:value="0.000723564" calcext:value-type="float">
            <text:p>0,000723564</text:p>
          </table:table-cell>
        </table:table-row>
        <table:table-row table:style-name="ro1">
          <table:table-cell table:formula="of:=[.A183]+0.025" office:value-type="float" office:value="4.55" calcext:value-type="float">
            <text:p>4,55</text:p>
          </table:table-cell>
          <table:table-cell/>
          <table:table-cell office:value-type="float" office:value="0.00509364" calcext:value-type="float">
            <text:p>0,00509364</text:p>
          </table:table-cell>
          <table:table-cell table:number-columns-repeated="2"/>
          <table:table-cell office:value-type="float" office:value="0.0394583" calcext:value-type="float">
            <text:p>0,0394583</text:p>
          </table:table-cell>
          <table:table-cell table:number-columns-repeated="2"/>
          <table:table-cell office:value-type="float" office:value="0.00071955" calcext:value-type="float">
            <text:p>0,00071955</text:p>
          </table:table-cell>
        </table:table-row>
        <table:table-row table:style-name="ro1">
          <table:table-cell table:formula="of:=[.A184]+0.025" office:value-type="float" office:value="4.575" calcext:value-type="float">
            <text:p>4,575</text:p>
          </table:table-cell>
          <table:table-cell/>
          <table:table-cell office:value-type="float" office:value="0.00506841" calcext:value-type="float">
            <text:p>0,00506841</text:p>
          </table:table-cell>
          <table:table-cell table:number-columns-repeated="2"/>
          <table:table-cell office:value-type="float" office:value="0.0392533" calcext:value-type="float">
            <text:p>0,0392533</text:p>
          </table:table-cell>
          <table:table-cell table:number-columns-repeated="2"/>
          <table:table-cell office:value-type="float" office:value="0.000715593" calcext:value-type="float">
            <text:p>0,000715593</text:p>
          </table:table-cell>
        </table:table-row>
        <table:table-row table:style-name="ro1">
          <table:table-cell table:formula="of:=[.A185]+0.025" office:value-type="float" office:value="4.6" calcext:value-type="float">
            <text:p>4,6</text:p>
          </table:table-cell>
          <table:table-cell/>
          <table:table-cell office:value-type="float" office:value="0.00504348" calcext:value-type="float">
            <text:p>0,00504348</text:p>
          </table:table-cell>
          <table:table-cell table:number-columns-repeated="2"/>
          <table:table-cell office:value-type="float" office:value="0.0390507" calcext:value-type="float">
            <text:p>0,0390507</text:p>
          </table:table-cell>
          <table:table-cell table:number-columns-repeated="2"/>
          <table:table-cell office:value-type="float" office:value="0.000711685" calcext:value-type="float">
            <text:p>0,000711685</text:p>
          </table:table-cell>
        </table:table-row>
        <table:table-row table:style-name="ro1">
          <table:table-cell table:formula="of:=[.A186]+0.025" office:value-type="float" office:value="4.625" calcext:value-type="float">
            <text:p>4,625</text:p>
          </table:table-cell>
          <table:table-cell/>
          <table:table-cell office:value-type="float" office:value="0.00501879" calcext:value-type="float">
            <text:p>0,00501879</text:p>
          </table:table-cell>
          <table:table-cell table:number-columns-repeated="2"/>
          <table:table-cell office:value-type="float" office:value="0.0388503" calcext:value-type="float">
            <text:p>0,0388503</text:p>
          </table:table-cell>
          <table:table-cell table:number-columns-repeated="2"/>
          <table:table-cell office:value-type="float" office:value="0.000707823" calcext:value-type="float">
            <text:p>0,000707823</text:p>
          </table:table-cell>
        </table:table-row>
        <table:table-row table:style-name="ro1">
          <table:table-cell table:formula="of:=[.A187]+0.025" office:value-type="float" office:value="4.65" calcext:value-type="float">
            <text:p>4,65</text:p>
          </table:table-cell>
          <table:table-cell/>
          <table:table-cell office:value-type="float" office:value="0.00499442" calcext:value-type="float">
            <text:p>0,00499442</text:p>
          </table:table-cell>
          <table:table-cell table:number-columns-repeated="2"/>
          <table:table-cell office:value-type="float" office:value="0.0386525" calcext:value-type="float">
            <text:p>0,0386525</text:p>
          </table:table-cell>
          <table:table-cell table:number-columns-repeated="2"/>
          <table:table-cell office:value-type="float" office:value="0.000704013" calcext:value-type="float">
            <text:p>0,000704013</text:p>
          </table:table-cell>
        </table:table-row>
        <table:table-row table:style-name="ro1">
          <table:table-cell table:formula="of:=[.A188]+0.025" office:value-type="float" office:value="4.675" calcext:value-type="float">
            <text:p>4,675</text:p>
          </table:table-cell>
          <table:table-cell/>
          <table:table-cell office:value-type="float" office:value="0.00497032" calcext:value-type="float">
            <text:p>0,00497032</text:p>
          </table:table-cell>
          <table:table-cell table:number-columns-repeated="2"/>
          <table:table-cell office:value-type="float" office:value="0.038457" calcext:value-type="float">
            <text:p>0,038457</text:p>
          </table:table-cell>
          <table:table-cell table:number-columns-repeated="2"/>
          <table:table-cell office:value-type="float" office:value="0.000700252" calcext:value-type="float">
            <text:p>0,000700252</text:p>
          </table:table-cell>
        </table:table-row>
        <table:table-row table:style-name="ro1">
          <table:table-cell table:formula="of:=[.A189]+0.025" office:value-type="float" office:value="4.7" calcext:value-type="float">
            <text:p>4,7</text:p>
          </table:table-cell>
          <table:table-cell/>
          <table:table-cell office:value-type="float" office:value="0.00494646" calcext:value-type="float">
            <text:p>0,00494646</text:p>
          </table:table-cell>
          <table:table-cell table:number-columns-repeated="2"/>
          <table:table-cell office:value-type="float" office:value="0.0382634" calcext:value-type="float">
            <text:p>0,0382634</text:p>
          </table:table-cell>
          <table:table-cell table:number-columns-repeated="2"/>
          <table:table-cell office:value-type="float" office:value="0.000696532" calcext:value-type="float">
            <text:p>0,000696532</text:p>
          </table:table-cell>
        </table:table-row>
        <table:table-row table:style-name="ro1">
          <table:table-cell table:formula="of:=[.A190]+0.025" office:value-type="float" office:value="4.725" calcext:value-type="float">
            <text:p>4,725</text:p>
          </table:table-cell>
          <table:table-cell/>
          <table:table-cell office:value-type="float" office:value="0.0049229" calcext:value-type="float">
            <text:p>0,0049229</text:p>
          </table:table-cell>
          <table:table-cell table:number-columns-repeated="2"/>
          <table:table-cell office:value-type="float" office:value="0.0380723" calcext:value-type="float">
            <text:p>0,0380723</text:p>
          </table:table-cell>
          <table:table-cell table:number-columns-repeated="2"/>
          <table:table-cell office:value-type="float" office:value="0.000692862" calcext:value-type="float">
            <text:p>0,000692862</text:p>
          </table:table-cell>
        </table:table-row>
        <table:table-row table:style-name="ro1">
          <table:table-cell table:formula="of:=[.A191]+0.025" office:value-type="float" office:value="4.75" calcext:value-type="float">
            <text:p>4,75</text:p>
          </table:table-cell>
          <table:table-cell/>
          <table:table-cell office:value-type="float" office:value="0.00489961" calcext:value-type="float">
            <text:p>0,00489961</text:p>
          </table:table-cell>
          <table:table-cell table:number-columns-repeated="2"/>
          <table:table-cell office:value-type="float" office:value="0.0378834" calcext:value-type="float">
            <text:p>0,0378834</text:p>
          </table:table-cell>
          <table:table-cell table:number-columns-repeated="2"/>
          <table:table-cell office:value-type="float" office:value="0.000689238" calcext:value-type="float">
            <text:p>0,000689238</text:p>
          </table:table-cell>
        </table:table-row>
        <table:table-row table:style-name="ro1">
          <table:table-cell table:formula="of:=[.A192]+0.025" office:value-type="float" office:value="4.775" calcext:value-type="float">
            <text:p>4,775</text:p>
          </table:table-cell>
          <table:table-cell/>
          <table:table-cell office:value-type="float" office:value="0.00487654" calcext:value-type="float">
            <text:p>0,00487654</text:p>
          </table:table-cell>
          <table:table-cell table:number-columns-repeated="2"/>
          <table:table-cell office:value-type="float" office:value="0.0376963" calcext:value-type="float">
            <text:p>0,0376963</text:p>
          </table:table-cell>
          <table:table-cell table:number-columns-repeated="2"/>
          <table:table-cell office:value-type="float" office:value="0.000685655" calcext:value-type="float">
            <text:p>0,000685655</text:p>
          </table:table-cell>
        </table:table-row>
        <table:table-row table:style-name="ro1">
          <table:table-cell table:formula="of:=[.A193]+0.025" office:value-type="float" office:value="4.8" calcext:value-type="float">
            <text:p>4,8</text:p>
          </table:table-cell>
          <table:table-cell/>
          <table:table-cell office:value-type="float" office:value="0.00485375" calcext:value-type="float">
            <text:p>0,00485375</text:p>
          </table:table-cell>
          <table:table-cell table:number-columns-repeated="2"/>
          <table:table-cell office:value-type="float" office:value="0.0375117" calcext:value-type="float">
            <text:p>0,0375117</text:p>
          </table:table-cell>
          <table:table-cell table:number-columns-repeated="2"/>
          <table:table-cell office:value-type="float" office:value="0.000682118" calcext:value-type="float">
            <text:p>0,000682118</text:p>
          </table:table-cell>
        </table:table-row>
        <table:table-row table:style-name="ro1">
          <table:table-cell table:formula="of:=[.A194]+0.025" office:value-type="float" office:value="4.825" calcext:value-type="float">
            <text:p>4,825</text:p>
          </table:table-cell>
          <table:table-cell/>
          <table:table-cell office:value-type="float" office:value="0.00483121" calcext:value-type="float">
            <text:p>0,00483121</text:p>
          </table:table-cell>
          <table:table-cell table:number-columns-repeated="2"/>
          <table:table-cell office:value-type="float" office:value="0.0373291" calcext:value-type="float">
            <text:p>0,0373291</text:p>
          </table:table-cell>
          <table:table-cell table:number-columns-repeated="2"/>
          <table:table-cell office:value-type="float" office:value="0.000678624" calcext:value-type="float">
            <text:p>0,000678624</text:p>
          </table:table-cell>
        </table:table-row>
        <table:table-row table:style-name="ro1">
          <table:table-cell table:formula="of:=[.A195]+0.025" office:value-type="float" office:value="4.85" calcext:value-type="float">
            <text:p>4,85</text:p>
          </table:table-cell>
          <table:table-cell/>
          <table:table-cell office:value-type="float" office:value="0.00480888" calcext:value-type="float">
            <text:p>0,00480888</text:p>
          </table:table-cell>
          <table:table-cell table:number-columns-repeated="2"/>
          <table:table-cell office:value-type="float" office:value="0.0371482" calcext:value-type="float">
            <text:p>0,0371482</text:p>
          </table:table-cell>
          <table:table-cell table:number-columns-repeated="2"/>
          <table:table-cell office:value-type="float" office:value="0.000675167" calcext:value-type="float">
            <text:p>0,000675167</text:p>
          </table:table-cell>
        </table:table-row>
        <table:table-row table:style-name="ro1">
          <table:table-cell table:formula="of:=[.A196]+0.025" office:value-type="float" office:value="4.875" calcext:value-type="float">
            <text:p>4,875</text:p>
          </table:table-cell>
          <table:table-cell/>
          <table:table-cell office:value-type="float" office:value="0.00478682" calcext:value-type="float">
            <text:p>0,00478682</text:p>
          </table:table-cell>
          <table:table-cell table:number-columns-repeated="2"/>
          <table:table-cell office:value-type="float" office:value="0.0369696" calcext:value-type="float">
            <text:p>0,0369696</text:p>
          </table:table-cell>
          <table:table-cell table:number-columns-repeated="2"/>
          <table:table-cell office:value-type="float" office:value="0.000671755" calcext:value-type="float">
            <text:p>0,000671755</text:p>
          </table:table-cell>
        </table:table-row>
        <table:table-row table:style-name="ro1">
          <table:table-cell table:formula="of:=[.A197]+0.025" office:value-type="float" office:value="4.9" calcext:value-type="float">
            <text:p>4,9</text:p>
          </table:table-cell>
          <table:table-cell/>
          <table:table-cell office:value-type="float" office:value="0.004765" calcext:value-type="float">
            <text:p>0,004765</text:p>
          </table:table-cell>
          <table:table-cell table:number-columns-repeated="2"/>
          <table:table-cell office:value-type="float" office:value="0.036793" calcext:value-type="float">
            <text:p>0,036793</text:p>
          </table:table-cell>
          <table:table-cell table:number-columns-repeated="2"/>
          <table:table-cell office:value-type="float" office:value="0.000668385" calcext:value-type="float">
            <text:p>0,000668385</text:p>
          </table:table-cell>
        </table:table-row>
        <table:table-row table:style-name="ro1">
          <table:table-cell table:formula="of:=[.A198]+0.025" office:value-type="float" office:value="4.925" calcext:value-type="float">
            <text:p>4,925</text:p>
          </table:table-cell>
          <table:table-cell/>
          <table:table-cell office:value-type="float" office:value="0.00474338" calcext:value-type="float">
            <text:p>0,00474338</text:p>
          </table:table-cell>
          <table:table-cell table:number-columns-repeated="2"/>
          <table:table-cell office:value-type="float" office:value="0.0366181" calcext:value-type="float">
            <text:p>0,0366181</text:p>
          </table:table-cell>
          <table:table-cell table:number-columns-repeated="2"/>
          <table:table-cell office:value-type="float" office:value="0.00066505" calcext:value-type="float">
            <text:p>0,00066505</text:p>
          </table:table-cell>
        </table:table-row>
        <table:table-row table:style-name="ro1">
          <table:table-cell table:formula="of:=[.A199]+0.025" office:value-type="float" office:value="4.95" calcext:value-type="float">
            <text:p>4,95</text:p>
          </table:table-cell>
          <table:table-cell/>
          <table:table-cell office:value-type="float" office:value="0.00472202" calcext:value-type="float">
            <text:p>0,00472202</text:p>
          </table:table-cell>
          <table:table-cell table:number-columns-repeated="2"/>
          <table:table-cell office:value-type="float" office:value="0.0364453" calcext:value-type="float">
            <text:p>0,0364453</text:p>
          </table:table-cell>
          <table:table-cell table:number-columns-repeated="2"/>
          <table:table-cell office:value-type="float" office:value="0.000661757" calcext:value-type="float">
            <text:p>0,000661757</text:p>
          </table:table-cell>
        </table:table-row>
        <table:table-row table:style-name="ro1">
          <table:table-cell table:formula="of:=[.A200]+0.025" office:value-type="float" office:value="4.975" calcext:value-type="float">
            <text:p>4,975</text:p>
          </table:table-cell>
          <table:table-cell/>
          <table:table-cell office:value-type="float" office:value="0.00470089" calcext:value-type="float">
            <text:p>0,00470089</text:p>
          </table:table-cell>
          <table:table-cell table:number-columns-repeated="2"/>
          <table:table-cell office:value-type="float" office:value="0.0362743" calcext:value-type="float">
            <text:p>0,0362743</text:p>
          </table:table-cell>
          <table:table-cell table:number-columns-repeated="2"/>
          <table:table-cell office:value-type="float" office:value="0.000658503" calcext:value-type="float">
            <text:p>0,000658503</text:p>
          </table:table-cell>
        </table:table-row>
        <table:table-row table:style-name="ro1">
          <table:table-cell table:formula="of:=[.A201]+0.025" office:value-type="float" office:value="5" calcext:value-type="float">
            <text:p>5</text:p>
          </table:table-cell>
          <table:table-cell/>
          <table:table-cell office:value-type="float" office:value="0.00467994" calcext:value-type="float">
            <text:p>0,00467994</text:p>
          </table:table-cell>
          <table:table-cell table:number-columns-repeated="2"/>
          <table:table-cell office:value-type="float" office:value="0.0361049" calcext:value-type="float">
            <text:p>0,0361049</text:p>
          </table:table-cell>
          <table:table-cell table:number-columns-repeated="2"/>
          <table:table-cell office:value-type="float" office:value="0.000655283" calcext:value-type="float">
            <text:p>0,000655283</text:p>
          </table:table-cell>
        </table:table-row>
        <table:table-row table:style-name="ro1">
          <table:table-cell table:formula="of:=[.A202]+0.025" office:value-type="float" office:value="5.025" calcext:value-type="float">
            <text:p>5,025</text:p>
          </table:table-cell>
          <table:table-cell/>
          <table:table-cell office:value-type="float" office:value="0.00465925" calcext:value-type="float">
            <text:p>0,00465925</text:p>
          </table:table-cell>
          <table:table-cell table:number-columns-repeated="2"/>
          <table:table-cell office:value-type="float" office:value="0.0359377" calcext:value-type="float">
            <text:p>0,0359377</text:p>
          </table:table-cell>
          <table:table-cell table:number-columns-repeated="2"/>
          <table:table-cell office:value-type="float" office:value="0.000652102" calcext:value-type="float">
            <text:p>0,000652102</text:p>
          </table:table-cell>
        </table:table-row>
        <table:table-row table:style-name="ro1">
          <table:table-cell table:formula="of:=[.A203]+0.025" office:value-type="float" office:value="5.05" calcext:value-type="float">
            <text:p>5,05</text:p>
          </table:table-cell>
          <table:table-cell/>
          <table:table-cell office:value-type="float" office:value="0.00463876" calcext:value-type="float">
            <text:p>0,00463876</text:p>
          </table:table-cell>
          <table:table-cell table:number-columns-repeated="2"/>
          <table:table-cell office:value-type="float" office:value="0.0357721" calcext:value-type="float">
            <text:p>0,0357721</text:p>
          </table:table-cell>
          <table:table-cell table:number-columns-repeated="2"/>
          <table:table-cell office:value-type="float" office:value="0.000648959" calcext:value-type="float">
            <text:p>0,000648959</text:p>
          </table:table-cell>
        </table:table-row>
        <table:table-row table:style-name="ro1">
          <table:table-cell table:formula="of:=[.A204]+0.025" office:value-type="float" office:value="5.07500000000001" calcext:value-type="float">
            <text:p>5,07500000000001</text:p>
          </table:table-cell>
          <table:table-cell/>
          <table:table-cell office:value-type="float" office:value="0.00461846" calcext:value-type="float">
            <text:p>0,00461846</text:p>
          </table:table-cell>
          <table:table-cell table:number-columns-repeated="2"/>
          <table:table-cell office:value-type="float" office:value="0.035608" calcext:value-type="float">
            <text:p>0,035608</text:p>
          </table:table-cell>
          <table:table-cell table:number-columns-repeated="2"/>
          <table:table-cell office:value-type="float" office:value="0.000645848" calcext:value-type="float">
            <text:p>0,000645848</text:p>
          </table:table-cell>
        </table:table-row>
        <table:table-row table:style-name="ro1">
          <table:table-cell table:formula="of:=[.A205]+0.025" office:value-type="float" office:value="5.10000000000001" calcext:value-type="float">
            <text:p>5,10000000000001</text:p>
          </table:table-cell>
          <table:table-cell/>
          <table:table-cell office:value-type="float" office:value="0.00459839" calcext:value-type="float">
            <text:p>0,00459839</text:p>
          </table:table-cell>
          <table:table-cell table:number-columns-repeated="2"/>
          <table:table-cell office:value-type="float" office:value="0.035446" calcext:value-type="float">
            <text:p>0,035446</text:p>
          </table:table-cell>
          <table:table-cell table:number-columns-repeated="2"/>
          <table:table-cell office:value-type="float" office:value="0.000642776" calcext:value-type="float">
            <text:p>0,000642776</text:p>
          </table:table-cell>
        </table:table-row>
        <table:table-row table:style-name="ro1">
          <table:table-cell table:formula="of:=[.A206]+0.025" office:value-type="float" office:value="5.12500000000001" calcext:value-type="float">
            <text:p>5,12500000000001</text:p>
          </table:table-cell>
          <table:table-cell/>
          <table:table-cell office:value-type="float" office:value="0.00457853" calcext:value-type="float">
            <text:p>0,00457853</text:p>
          </table:table-cell>
          <table:table-cell table:number-columns-repeated="2"/>
          <table:table-cell office:value-type="float" office:value="0.0352855" calcext:value-type="float">
            <text:p>0,0352855</text:p>
          </table:table-cell>
          <table:table-cell table:number-columns-repeated="2"/>
          <table:table-cell office:value-type="float" office:value="0.000639737" calcext:value-type="float">
            <text:p>0,000639737</text:p>
          </table:table-cell>
        </table:table-row>
        <table:table-row table:style-name="ro1">
          <table:table-cell table:formula="of:=[.A207]+0.025" office:value-type="float" office:value="5.15000000000001" calcext:value-type="float">
            <text:p>5,15000000000001</text:p>
          </table:table-cell>
          <table:table-cell/>
          <table:table-cell office:value-type="float" office:value="0.00455884" calcext:value-type="float">
            <text:p>0,00455884</text:p>
          </table:table-cell>
          <table:table-cell table:number-columns-repeated="2"/>
          <table:table-cell office:value-type="float" office:value="0.0351266" calcext:value-type="float">
            <text:p>0,0351266</text:p>
          </table:table-cell>
          <table:table-cell table:number-columns-repeated="2"/>
          <table:table-cell office:value-type="float" office:value="0.00063673" calcext:value-type="float">
            <text:p>0,00063673</text:p>
          </table:table-cell>
        </table:table-row>
        <table:table-row table:style-name="ro1">
          <table:table-cell table:formula="of:=[.A208]+0.025" office:value-type="float" office:value="5.17500000000001" calcext:value-type="float">
            <text:p>5,17500000000001</text:p>
          </table:table-cell>
          <table:table-cell/>
          <table:table-cell office:value-type="float" office:value="0.00453937" calcext:value-type="float">
            <text:p>0,00453937</text:p>
          </table:table-cell>
          <table:table-cell table:number-columns-repeated="2"/>
          <table:table-cell office:value-type="float" office:value="0.0349694" calcext:value-type="float">
            <text:p>0,0349694</text:p>
          </table:table-cell>
          <table:table-cell table:number-columns-repeated="2"/>
          <table:table-cell office:value-type="float" office:value="0.000633758" calcext:value-type="float">
            <text:p>0,000633758</text:p>
          </table:table-cell>
        </table:table-row>
        <table:table-row table:style-name="ro1">
          <table:table-cell table:formula="of:=[.A209]+0.025" office:value-type="float" office:value="5.20000000000001" calcext:value-type="float">
            <text:p>5,20000000000001</text:p>
          </table:table-cell>
          <table:table-cell/>
          <table:table-cell office:value-type="float" office:value="0.00452011" calcext:value-type="float">
            <text:p>0,00452011</text:p>
          </table:table-cell>
          <table:table-cell table:number-columns-repeated="2"/>
          <table:table-cell office:value-type="float" office:value="0.0348139" calcext:value-type="float">
            <text:p>0,0348139</text:p>
          </table:table-cell>
          <table:table-cell table:number-columns-repeated="2"/>
          <table:table-cell office:value-type="float" office:value="0.000630821" calcext:value-type="float">
            <text:p>0,000630821</text:p>
          </table:table-cell>
        </table:table-row>
        <table:table-row table:style-name="ro1">
          <table:table-cell table:formula="of:=[.A210]+0.025" office:value-type="float" office:value="5.22500000000001" calcext:value-type="float">
            <text:p>5,22500000000001</text:p>
          </table:table-cell>
          <table:table-cell/>
          <table:table-cell office:value-type="float" office:value="0.00450101" calcext:value-type="float">
            <text:p>0,00450101</text:p>
          </table:table-cell>
          <table:table-cell table:number-columns-repeated="2"/>
          <table:table-cell office:value-type="float" office:value="0.0346598" calcext:value-type="float">
            <text:p>0,0346598</text:p>
          </table:table-cell>
          <table:table-cell table:number-columns-repeated="2"/>
          <table:table-cell office:value-type="float" office:value="0.000627911" calcext:value-type="float">
            <text:p>0,000627911</text:p>
          </table:table-cell>
        </table:table-row>
        <table:table-row table:style-name="ro1">
          <table:table-cell table:formula="of:=[.A211]+0.025" office:value-type="float" office:value="5.25000000000001" calcext:value-type="float">
            <text:p>5,25000000000001</text:p>
          </table:table-cell>
          <table:table-cell/>
          <table:table-cell office:value-type="float" office:value="0.00448212" calcext:value-type="float">
            <text:p>0,00448212</text:p>
          </table:table-cell>
          <table:table-cell table:number-columns-repeated="2"/>
          <table:table-cell office:value-type="float" office:value="0.0345074" calcext:value-type="float">
            <text:p>0,0345074</text:p>
          </table:table-cell>
          <table:table-cell table:number-columns-repeated="2"/>
          <table:table-cell office:value-type="float" office:value="0.000625036" calcext:value-type="float">
            <text:p>0,000625036</text:p>
          </table:table-cell>
        </table:table-row>
        <table:table-row table:style-name="ro1">
          <table:table-cell table:formula="of:=[.A212]+0.025" office:value-type="float" office:value="5.27500000000001" calcext:value-type="float">
            <text:p>5,27500000000001</text:p>
          </table:table-cell>
          <table:table-cell/>
          <table:table-cell office:value-type="float" office:value="0.00446341" calcext:value-type="float">
            <text:p>0,00446341</text:p>
          </table:table-cell>
          <table:table-cell table:number-columns-repeated="2"/>
          <table:table-cell office:value-type="float" office:value="0.0343566" calcext:value-type="float">
            <text:p>0,0343566</text:p>
          </table:table-cell>
          <table:table-cell table:number-columns-repeated="2"/>
          <table:table-cell office:value-type="float" office:value="0.000622193" calcext:value-type="float">
            <text:p>0,000622193</text:p>
          </table:table-cell>
        </table:table-row>
        <table:table-row table:style-name="ro1">
          <table:table-cell table:formula="of:=[.A213]+0.025" office:value-type="float" office:value="5.30000000000001" calcext:value-type="float">
            <text:p>5,30000000000001</text:p>
          </table:table-cell>
          <table:table-cell/>
          <table:table-cell office:value-type="float" office:value="0.00444486" calcext:value-type="float">
            <text:p>0,00444486</text:p>
          </table:table-cell>
          <table:table-cell table:number-columns-repeated="2"/>
          <table:table-cell office:value-type="float" office:value="0.034207" calcext:value-type="float">
            <text:p>0,034207</text:p>
          </table:table-cell>
          <table:table-cell table:number-columns-repeated="2"/>
          <table:table-cell office:value-type="float" office:value="0.000619377" calcext:value-type="float">
            <text:p>0,000619377</text:p>
          </table:table-cell>
        </table:table-row>
        <table:table-row table:style-name="ro1">
          <table:table-cell table:formula="of:=[.A214]+0.025" office:value-type="float" office:value="5.32500000000001" calcext:value-type="float">
            <text:p>5,32500000000001</text:p>
          </table:table-cell>
          <table:table-cell/>
          <table:table-cell office:value-type="float" office:value="0.00442652" calcext:value-type="float">
            <text:p>0,00442652</text:p>
          </table:table-cell>
          <table:table-cell table:number-columns-repeated="2"/>
          <table:table-cell office:value-type="float" office:value="0.0340592" calcext:value-type="float">
            <text:p>0,0340592</text:p>
          </table:table-cell>
          <table:table-cell table:number-columns-repeated="2"/>
          <table:table-cell office:value-type="float" office:value="0.000616595" calcext:value-type="float">
            <text:p>0,000616595</text:p>
          </table:table-cell>
        </table:table-row>
        <table:table-row table:style-name="ro1">
          <table:table-cell table:formula="of:=[.A215]+0.025" office:value-type="float" office:value="5.35000000000001" calcext:value-type="float">
            <text:p>5,35000000000001</text:p>
          </table:table-cell>
          <table:table-cell/>
          <table:table-cell office:value-type="float" office:value="0.00440835" calcext:value-type="float">
            <text:p>0,00440835</text:p>
          </table:table-cell>
          <table:table-cell table:number-columns-repeated="2"/>
          <table:table-cell office:value-type="float" office:value="0.0339128" calcext:value-type="float">
            <text:p>0,0339128</text:p>
          </table:table-cell>
          <table:table-cell table:number-columns-repeated="2"/>
          <table:table-cell office:value-type="float" office:value="0.000613842" calcext:value-type="float">
            <text:p>0,000613842</text:p>
          </table:table-cell>
        </table:table-row>
        <table:table-row table:style-name="ro1">
          <table:table-cell table:formula="of:=[.A216]+0.025" office:value-type="float" office:value="5.37500000000001" calcext:value-type="float">
            <text:p>5,37500000000001</text:p>
          </table:table-cell>
          <table:table-cell/>
          <table:table-cell office:value-type="float" office:value="0.00439034" calcext:value-type="float">
            <text:p>0,00439034</text:p>
          </table:table-cell>
          <table:table-cell table:number-columns-repeated="2"/>
          <table:table-cell office:value-type="float" office:value="0.0337676" calcext:value-type="float">
            <text:p>0,0337676</text:p>
          </table:table-cell>
          <table:table-cell table:number-columns-repeated="2"/>
          <table:table-cell office:value-type="float" office:value="0.000611115" calcext:value-type="float">
            <text:p>0,000611115</text:p>
          </table:table-cell>
        </table:table-row>
        <table:table-row table:style-name="ro1">
          <table:table-cell table:formula="of:=[.A217]+0.025" office:value-type="float" office:value="5.40000000000001" calcext:value-type="float">
            <text:p>5,40000000000001</text:p>
          </table:table-cell>
          <table:table-cell/>
          <table:table-cell office:value-type="float" office:value="0.00437252" calcext:value-type="float">
            <text:p>0,00437252</text:p>
          </table:table-cell>
          <table:table-cell table:number-columns-repeated="2"/>
          <table:table-cell office:value-type="float" office:value="0.0336241" calcext:value-type="float">
            <text:p>0,0336241</text:p>
          </table:table-cell>
          <table:table-cell table:number-columns-repeated="2"/>
          <table:table-cell office:value-type="float" office:value="0.000608421" calcext:value-type="float">
            <text:p>0,000608421</text:p>
          </table:table-cell>
        </table:table-row>
        <table:table-row table:style-name="ro1">
          <table:table-cell table:formula="of:=[.A218]+0.025" office:value-type="float" office:value="5.42500000000001" calcext:value-type="float">
            <text:p>5,42500000000001</text:p>
          </table:table-cell>
          <table:table-cell/>
          <table:table-cell office:value-type="float" office:value="0.00435487" calcext:value-type="float">
            <text:p>0,00435487</text:p>
          </table:table-cell>
          <table:table-cell table:number-columns-repeated="2"/>
          <table:table-cell office:value-type="float" office:value="0.0334819" calcext:value-type="float">
            <text:p>0,0334819</text:p>
          </table:table-cell>
          <table:table-cell table:number-columns-repeated="2"/>
          <table:table-cell office:value-type="float" office:value="0.000605753" calcext:value-type="float">
            <text:p>0,000605753</text:p>
          </table:table-cell>
        </table:table-row>
        <table:table-row table:style-name="ro1">
          <table:table-cell table:formula="of:=[.A219]+0.025" office:value-type="float" office:value="5.45000000000001" calcext:value-type="float">
            <text:p>5,45000000000001</text:p>
          </table:table-cell>
          <table:table-cell/>
          <table:table-cell office:value-type="float" office:value="0.00433736" calcext:value-type="float">
            <text:p>0,00433736</text:p>
          </table:table-cell>
          <table:table-cell table:number-columns-repeated="2"/>
          <table:table-cell office:value-type="float" office:value="0.033341" calcext:value-type="float">
            <text:p>0,033341</text:p>
          </table:table-cell>
          <table:table-cell table:number-columns-repeated="2"/>
          <table:table-cell office:value-type="float" office:value="0.000603112" calcext:value-type="float">
            <text:p>0,000603112</text:p>
          </table:table-cell>
        </table:table-row>
        <table:table-row table:style-name="ro1">
          <table:table-cell table:formula="of:=[.A220]+0.025" office:value-type="float" office:value="5.47500000000001" calcext:value-type="float">
            <text:p>5,47500000000001</text:p>
          </table:table-cell>
          <table:table-cell/>
          <table:table-cell office:value-type="float" office:value="0.00432005" calcext:value-type="float">
            <text:p>0,00432005</text:p>
          </table:table-cell>
          <table:table-cell table:number-columns-repeated="2"/>
          <table:table-cell office:value-type="float" office:value="0.0332016" calcext:value-type="float">
            <text:p>0,0332016</text:p>
          </table:table-cell>
          <table:table-cell table:number-columns-repeated="2"/>
          <table:table-cell office:value-type="float" office:value="0.0006005" calcext:value-type="float">
            <text:p>0,0006005</text:p>
          </table:table-cell>
        </table:table-row>
        <table:table-row table:style-name="ro1">
          <table:table-cell table:formula="of:=[.A221]+0.025" office:value-type="float" office:value="5.50000000000001" calcext:value-type="float">
            <text:p>5,50000000000001</text:p>
          </table:table-cell>
          <table:table-cell/>
          <table:table-cell office:value-type="float" office:value="0.00430289" calcext:value-type="float">
            <text:p>0,00430289</text:p>
          </table:table-cell>
          <table:table-cell table:number-columns-repeated="2"/>
          <table:table-cell office:value-type="float" office:value="0.0330635" calcext:value-type="float">
            <text:p>0,0330635</text:p>
          </table:table-cell>
          <table:table-cell table:number-columns-repeated="2"/>
          <table:table-cell office:value-type="float" office:value="0.000597915" calcext:value-type="float">
            <text:p>0,000597915</text:p>
          </table:table-cell>
        </table:table-row>
        <table:table-row table:style-name="ro1">
          <table:table-cell table:formula="of:=[.A222]+0.025" office:value-type="float" office:value="5.52500000000001" calcext:value-type="float">
            <text:p>5,52500000000001</text:p>
          </table:table-cell>
          <table:table-cell/>
          <table:table-cell office:value-type="float" office:value="0.00428588" calcext:value-type="float">
            <text:p>0,00428588</text:p>
          </table:table-cell>
          <table:table-cell table:number-columns-repeated="2"/>
          <table:table-cell office:value-type="float" office:value="0.0329265" calcext:value-type="float">
            <text:p>0,0329265</text:p>
          </table:table-cell>
          <table:table-cell table:number-columns-repeated="2"/>
          <table:table-cell office:value-type="float" office:value="0.000595354" calcext:value-type="float">
            <text:p>0,000595354</text:p>
          </table:table-cell>
        </table:table-row>
        <table:table-row table:style-name="ro1">
          <table:table-cell table:formula="of:=[.A223]+0.025" office:value-type="float" office:value="5.55000000000001" calcext:value-type="float">
            <text:p>5,55000000000001</text:p>
          </table:table-cell>
          <table:table-cell/>
          <table:table-cell office:value-type="float" office:value="0.00426904" calcext:value-type="float">
            <text:p>0,00426904</text:p>
          </table:table-cell>
          <table:table-cell table:number-columns-repeated="2"/>
          <table:table-cell office:value-type="float" office:value="0.0327911" calcext:value-type="float">
            <text:p>0,0327911</text:p>
          </table:table-cell>
          <table:table-cell table:number-columns-repeated="2"/>
          <table:table-cell office:value-type="float" office:value="0.000592822" calcext:value-type="float">
            <text:p>0,000592822</text:p>
          </table:table-cell>
        </table:table-row>
        <table:table-row table:style-name="ro1">
          <table:table-cell table:formula="of:=[.A224]+0.025" office:value-type="float" office:value="5.57500000000001" calcext:value-type="float">
            <text:p>5,57500000000001</text:p>
          </table:table-cell>
          <table:table-cell/>
          <table:table-cell office:value-type="float" office:value="0.00425236" calcext:value-type="float">
            <text:p>0,00425236</text:p>
          </table:table-cell>
          <table:table-cell table:number-columns-repeated="2"/>
          <table:table-cell office:value-type="float" office:value="0.0326569" calcext:value-type="float">
            <text:p>0,0326569</text:p>
          </table:table-cell>
          <table:table-cell table:number-columns-repeated="2"/>
          <table:table-cell office:value-type="float" office:value="0.000590316" calcext:value-type="float">
            <text:p>0,000590316</text:p>
          </table:table-cell>
        </table:table-row>
        <table:table-row table:style-name="ro1">
          <table:table-cell table:formula="of:=[.A225]+0.025" office:value-type="float" office:value="5.60000000000001" calcext:value-type="float">
            <text:p>5,60000000000001</text:p>
          </table:table-cell>
          <table:table-cell/>
          <table:table-cell office:value-type="float" office:value="0.0042358" calcext:value-type="float">
            <text:p>0,0042358</text:p>
          </table:table-cell>
          <table:table-cell table:number-columns-repeated="2"/>
          <table:table-cell office:value-type="float" office:value="0.0325238" calcext:value-type="float">
            <text:p>0,0325238</text:p>
          </table:table-cell>
          <table:table-cell table:number-columns-repeated="2"/>
          <table:table-cell office:value-type="float" office:value="0.000587832" calcext:value-type="float">
            <text:p>0,000587832</text:p>
          </table:table-cell>
        </table:table-row>
        <table:table-row table:style-name="ro1">
          <table:table-cell table:formula="of:=[.A226]+0.025" office:value-type="float" office:value="5.62500000000001" calcext:value-type="float">
            <text:p>5,62500000000001</text:p>
          </table:table-cell>
          <table:table-cell/>
          <table:table-cell office:value-type="float" office:value="0.00421942" calcext:value-type="float">
            <text:p>0,00421942</text:p>
          </table:table-cell>
          <table:table-cell table:number-columns-repeated="2"/>
          <table:table-cell office:value-type="float" office:value="0.0323921" calcext:value-type="float">
            <text:p>0,0323921</text:p>
          </table:table-cell>
          <table:table-cell table:number-columns-repeated="2"/>
          <table:table-cell office:value-type="float" office:value="0.000585375" calcext:value-type="float">
            <text:p>0,000585375</text:p>
          </table:table-cell>
        </table:table-row>
        <table:table-row table:style-name="ro1">
          <table:table-cell table:formula="of:=[.A227]+0.025" office:value-type="float" office:value="5.65000000000001" calcext:value-type="float">
            <text:p>5,65000000000001</text:p>
          </table:table-cell>
          <table:table-cell/>
          <table:table-cell office:value-type="float" office:value="0.0042032" calcext:value-type="float">
            <text:p>0,0042032</text:p>
          </table:table-cell>
          <table:table-cell table:number-columns-repeated="2"/>
          <table:table-cell office:value-type="float" office:value="0.0322616" calcext:value-type="float">
            <text:p>0,0322616</text:p>
          </table:table-cell>
          <table:table-cell table:number-columns-repeated="2"/>
          <table:table-cell office:value-type="float" office:value="0.000582943" calcext:value-type="float">
            <text:p>0,000582943</text:p>
          </table:table-cell>
        </table:table-row>
        <table:table-row table:style-name="ro1">
          <table:table-cell table:formula="of:=[.A228]+0.025" office:value-type="float" office:value="5.67500000000001" calcext:value-type="float">
            <text:p>5,67500000000001</text:p>
          </table:table-cell>
          <table:table-cell/>
          <table:table-cell office:value-type="float" office:value="0.00418709" calcext:value-type="float">
            <text:p>0,00418709</text:p>
          </table:table-cell>
          <table:table-cell table:number-columns-repeated="2"/>
          <table:table-cell office:value-type="float" office:value="0.0321321" calcext:value-type="float">
            <text:p>0,0321321</text:p>
          </table:table-cell>
          <table:table-cell table:number-columns-repeated="2"/>
          <table:table-cell office:value-type="float" office:value="0.000580533" calcext:value-type="float">
            <text:p>0,000580533</text:p>
          </table:table-cell>
        </table:table-row>
        <table:table-row table:style-name="ro1">
          <table:table-cell table:formula="of:=[.A229]+0.025" office:value-type="float" office:value="5.70000000000001" calcext:value-type="float">
            <text:p>5,70000000000001</text:p>
          </table:table-cell>
          <table:table-cell/>
          <table:table-cell office:value-type="float" office:value="0.00417115" calcext:value-type="float">
            <text:p>0,00417115</text:p>
          </table:table-cell>
          <table:table-cell table:number-columns-repeated="2"/>
          <table:table-cell office:value-type="float" office:value="0.0320041" calcext:value-type="float">
            <text:p>0,0320041</text:p>
          </table:table-cell>
          <table:table-cell table:number-columns-repeated="2"/>
          <table:table-cell office:value-type="float" office:value="0.000578149" calcext:value-type="float">
            <text:p>0,000578149</text:p>
          </table:table-cell>
        </table:table-row>
        <table:table-row table:style-name="ro1">
          <table:table-cell table:formula="of:=[.A230]+0.025" office:value-type="float" office:value="5.72500000000001" calcext:value-type="float">
            <text:p>5,72500000000001</text:p>
          </table:table-cell>
          <table:table-cell/>
          <table:table-cell office:value-type="float" office:value="0.00415535" calcext:value-type="float">
            <text:p>0,00415535</text:p>
          </table:table-cell>
          <table:table-cell table:number-columns-repeated="2"/>
          <table:table-cell office:value-type="float" office:value="0.0318772" calcext:value-type="float">
            <text:p>0,0318772</text:p>
          </table:table-cell>
          <table:table-cell table:number-columns-repeated="2"/>
          <table:table-cell office:value-type="float" office:value="0.000575788" calcext:value-type="float">
            <text:p>0,000575788</text:p>
          </table:table-cell>
        </table:table-row>
        <table:table-row table:style-name="ro1">
          <table:table-cell table:formula="of:=[.A231]+0.025" office:value-type="float" office:value="5.75000000000001" calcext:value-type="float">
            <text:p>5,75000000000001</text:p>
          </table:table-cell>
          <table:table-cell/>
          <table:table-cell office:value-type="float" office:value="0.00413968" calcext:value-type="float">
            <text:p>0,00413968</text:p>
          </table:table-cell>
          <table:table-cell table:number-columns-repeated="2"/>
          <table:table-cell office:value-type="float" office:value="0.0317512" calcext:value-type="float">
            <text:p>0,0317512</text:p>
          </table:table-cell>
          <table:table-cell table:number-columns-repeated="2"/>
          <table:table-cell office:value-type="float" office:value="0.000573448" calcext:value-type="float">
            <text:p>0,000573448</text:p>
          </table:table-cell>
        </table:table-row>
        <table:table-row table:style-name="ro1">
          <table:table-cell table:formula="of:=[.A232]+0.025" office:value-type="float" office:value="5.77500000000002" calcext:value-type="float">
            <text:p>5,77500000000002</text:p>
          </table:table-cell>
          <table:table-cell/>
          <table:table-cell office:value-type="float" office:value="0.00412416" calcext:value-type="float">
            <text:p>0,00412416</text:p>
          </table:table-cell>
          <table:table-cell table:number-columns-repeated="2"/>
          <table:table-cell office:value-type="float" office:value="0.0316266" calcext:value-type="float">
            <text:p>0,0316266</text:p>
          </table:table-cell>
          <table:table-cell table:number-columns-repeated="2"/>
          <table:table-cell office:value-type="float" office:value="0.000571134" calcext:value-type="float">
            <text:p>0,000571134</text:p>
          </table:table-cell>
        </table:table-row>
        <table:table-row table:style-name="ro1">
          <table:table-cell table:formula="of:=[.A233]+0.025" office:value-type="float" office:value="5.80000000000002" calcext:value-type="float">
            <text:p>5,80000000000002</text:p>
          </table:table-cell>
          <table:table-cell/>
          <table:table-cell office:value-type="float" office:value="0.00410878" calcext:value-type="float">
            <text:p>0,00410878</text:p>
          </table:table-cell>
          <table:table-cell table:number-columns-repeated="2"/>
          <table:table-cell office:value-type="float" office:value="0.0315032" calcext:value-type="float">
            <text:p>0,0315032</text:p>
          </table:table-cell>
          <table:table-cell table:number-columns-repeated="2"/>
          <table:table-cell office:value-type="float" office:value="0.000568841" calcext:value-type="float">
            <text:p>0,000568841</text:p>
          </table:table-cell>
        </table:table-row>
        <table:table-row table:style-name="ro1">
          <table:table-cell table:formula="of:=[.A234]+0.025" office:value-type="float" office:value="5.82500000000002" calcext:value-type="float">
            <text:p>5,82500000000002</text:p>
          </table:table-cell>
          <table:table-cell/>
          <table:table-cell office:value-type="float" office:value="0.00409351" calcext:value-type="float">
            <text:p>0,00409351</text:p>
          </table:table-cell>
          <table:table-cell table:number-columns-repeated="2"/>
          <table:table-cell office:value-type="float" office:value="0.0313805" calcext:value-type="float">
            <text:p>0,0313805</text:p>
          </table:table-cell>
          <table:table-cell table:number-columns-repeated="2"/>
          <table:table-cell office:value-type="float" office:value="0.000566569" calcext:value-type="float">
            <text:p>0,000566569</text:p>
          </table:table-cell>
        </table:table-row>
        <table:table-row table:style-name="ro1">
          <table:table-cell table:formula="of:=[.A235]+0.025" office:value-type="float" office:value="5.85000000000002" calcext:value-type="float">
            <text:p>5,85000000000002</text:p>
          </table:table-cell>
          <table:table-cell/>
          <table:table-cell office:value-type="float" office:value="0.0040784" calcext:value-type="float">
            <text:p>0,0040784</text:p>
          </table:table-cell>
          <table:table-cell table:number-columns-repeated="2"/>
          <table:table-cell office:value-type="float" office:value="0.0312593" calcext:value-type="float">
            <text:p>0,0312593</text:p>
          </table:table-cell>
          <table:table-cell table:number-columns-repeated="2"/>
          <table:table-cell office:value-type="float" office:value="0.00056432" calcext:value-type="float">
            <text:p>0,00056432</text:p>
          </table:table-cell>
        </table:table-row>
        <table:table-row table:style-name="ro1">
          <table:table-cell table:formula="of:=[.A236]+0.025" office:value-type="float" office:value="5.87500000000002" calcext:value-type="float">
            <text:p>5,87500000000002</text:p>
          </table:table-cell>
          <table:table-cell/>
          <table:table-cell office:value-type="float" office:value="0.00406341" calcext:value-type="float">
            <text:p>0,00406341</text:p>
          </table:table-cell>
          <table:table-cell table:number-columns-repeated="2"/>
          <table:table-cell office:value-type="float" office:value="0.031139" calcext:value-type="float">
            <text:p>0,031139</text:p>
          </table:table-cell>
          <table:table-cell table:number-columns-repeated="2"/>
          <table:table-cell office:value-type="float" office:value="0.000562092" calcext:value-type="float">
            <text:p>0,000562092</text:p>
          </table:table-cell>
        </table:table-row>
        <table:table-row table:style-name="ro1">
          <table:table-cell table:formula="of:=[.A237]+0.025" office:value-type="float" office:value="5.90000000000002" calcext:value-type="float">
            <text:p>5,90000000000002</text:p>
          </table:table-cell>
          <table:table-cell/>
          <table:table-cell office:value-type="float" office:value="0.00404855" calcext:value-type="float">
            <text:p>0,00404855</text:p>
          </table:table-cell>
          <table:table-cell table:number-columns-repeated="2"/>
          <table:table-cell office:value-type="float" office:value="0.0310197" calcext:value-type="float">
            <text:p>0,0310197</text:p>
          </table:table-cell>
          <table:table-cell table:number-columns-repeated="2"/>
          <table:table-cell office:value-type="float" office:value="0.000559884" calcext:value-type="float">
            <text:p>0,000559884</text:p>
          </table:table-cell>
        </table:table-row>
        <table:table-row table:style-name="ro1">
          <table:table-cell table:formula="of:=[.A238]+0.025" office:value-type="float" office:value="5.92500000000002" calcext:value-type="float">
            <text:p>5,92500000000002</text:p>
          </table:table-cell>
          <table:table-cell/>
          <table:table-cell office:value-type="float" office:value="0.00403382" calcext:value-type="float">
            <text:p>0,00403382</text:p>
          </table:table-cell>
          <table:table-cell table:number-columns-repeated="2"/>
          <table:table-cell office:value-type="float" office:value="0.0309016" calcext:value-type="float">
            <text:p>0,0309016</text:p>
          </table:table-cell>
          <table:table-cell table:number-columns-repeated="2"/>
          <table:table-cell office:value-type="float" office:value="0.000557698" calcext:value-type="float">
            <text:p>0,000557698</text:p>
          </table:table-cell>
        </table:table-row>
        <table:table-row table:style-name="ro1">
          <table:table-cell table:formula="of:=[.A239]+0.025" office:value-type="float" office:value="5.95000000000002" calcext:value-type="float">
            <text:p>5,95000000000002</text:p>
          </table:table-cell>
          <table:table-cell/>
          <table:table-cell office:value-type="float" office:value="0.00401922" calcext:value-type="float">
            <text:p>0,00401922</text:p>
          </table:table-cell>
          <table:table-cell table:number-columns-repeated="2"/>
          <table:table-cell office:value-type="float" office:value="0.0307845" calcext:value-type="float">
            <text:p>0,0307845</text:p>
          </table:table-cell>
          <table:table-cell table:number-columns-repeated="2"/>
          <table:table-cell office:value-type="float" office:value="0.000555533" calcext:value-type="float">
            <text:p>0,000555533</text:p>
          </table:table-cell>
        </table:table-row>
        <table:table-row table:style-name="ro1">
          <table:table-cell table:formula="of:=[.A240]+0.025" office:value-type="float" office:value="5.97500000000002" calcext:value-type="float">
            <text:p>5,97500000000002</text:p>
          </table:table-cell>
          <table:table-cell/>
          <table:table-cell office:value-type="float" office:value="0.00400473" calcext:value-type="float">
            <text:p>0,00400473</text:p>
          </table:table-cell>
          <table:table-cell table:number-columns-repeated="2"/>
          <table:table-cell office:value-type="float" office:value="0.0306682" calcext:value-type="float">
            <text:p>0,0306682</text:p>
          </table:table-cell>
          <table:table-cell table:number-columns-repeated="2"/>
          <table:table-cell office:value-type="float" office:value="0.000553386" calcext:value-type="float">
            <text:p>0,000553386</text:p>
          </table:table-cell>
        </table:table-row>
        <table:table-row table:style-name="ro1">
          <table:table-cell table:formula="of:=[.A241]+0.025" office:value-type="float" office:value="6.00000000000002" calcext:value-type="float">
            <text:p>6,00000000000002</text:p>
          </table:table-cell>
          <table:table-cell/>
          <table:table-cell office:value-type="float" office:value="0.00399038" calcext:value-type="float">
            <text:p>0,00399038</text:p>
          </table:table-cell>
          <table:table-cell table:number-columns-repeated="2"/>
          <table:table-cell office:value-type="float" office:value="0.0305532" calcext:value-type="float">
            <text:p>0,0305532</text:p>
          </table:table-cell>
          <table:table-cell table:number-columns-repeated="2"/>
          <table:table-cell office:value-type="float" office:value="0.000551261" calcext:value-type="float">
            <text:p>0,000551261</text:p>
          </table:table-cell>
        </table:table-row>
        <table:table-row table:style-name="ro1">
          <table:table-cell table:formula="of:=[.A242]+0.025" office:value-type="float" office:value="6.02500000000002" calcext:value-type="float">
            <text:p>6,02500000000002</text:p>
          </table:table-cell>
          <table:table-cell/>
          <table:table-cell office:value-type="float" office:value="0.00397614" calcext:value-type="float">
            <text:p>0,00397614</text:p>
          </table:table-cell>
          <table:table-cell table:number-columns-repeated="2"/>
          <table:table-cell office:value-type="float" office:value="0.0304391" calcext:value-type="float">
            <text:p>0,0304391</text:p>
          </table:table-cell>
          <table:table-cell table:number-columns-repeated="2"/>
          <table:table-cell office:value-type="float" office:value="0.000549155" calcext:value-type="float">
            <text:p>0,000549155</text:p>
          </table:table-cell>
        </table:table-row>
        <table:table-row table:style-name="ro1">
          <table:table-cell table:formula="of:=[.A243]+0.025" office:value-type="float" office:value="6.05000000000002" calcext:value-type="float">
            <text:p>6,05000000000002</text:p>
          </table:table-cell>
          <table:table-cell/>
          <table:table-cell office:value-type="float" office:value="0.00396201" calcext:value-type="float">
            <text:p>0,00396201</text:p>
          </table:table-cell>
          <table:table-cell table:number-columns-repeated="2"/>
          <table:table-cell office:value-type="float" office:value="0.0303258" calcext:value-type="float">
            <text:p>0,0303258</text:p>
          </table:table-cell>
          <table:table-cell table:number-columns-repeated="2"/>
          <table:table-cell office:value-type="float" office:value="0.000547068" calcext:value-type="float">
            <text:p>0,000547068</text:p>
          </table:table-cell>
        </table:table-row>
        <table:table-row table:style-name="ro1">
          <table:table-cell table:formula="of:=[.A244]+0.025" office:value-type="float" office:value="6.07500000000002" calcext:value-type="float">
            <text:p>6,07500000000002</text:p>
          </table:table-cell>
          <table:table-cell/>
          <table:table-cell office:value-type="float" office:value="0.00394802" calcext:value-type="float">
            <text:p>0,00394802</text:p>
          </table:table-cell>
          <table:table-cell table:number-columns-repeated="2"/>
          <table:table-cell office:value-type="float" office:value="0.0302137" calcext:value-type="float">
            <text:p>0,0302137</text:p>
          </table:table-cell>
          <table:table-cell table:number-columns-repeated="2"/>
          <table:table-cell office:value-type="float" office:value="0.000545001" calcext:value-type="float">
            <text:p>0,000545001</text:p>
          </table:table-cell>
        </table:table-row>
        <table:table-row table:style-name="ro1">
          <table:table-cell table:formula="of:=[.A245]+0.025" office:value-type="float" office:value="6.10000000000002" calcext:value-type="float">
            <text:p>6,10000000000002</text:p>
          </table:table-cell>
          <table:table-cell/>
          <table:table-cell office:value-type="float" office:value="0.00393414" calcext:value-type="float">
            <text:p>0,00393414</text:p>
          </table:table-cell>
          <table:table-cell table:number-columns-repeated="2"/>
          <table:table-cell office:value-type="float" office:value="0.0301025" calcext:value-type="float">
            <text:p>0,0301025</text:p>
          </table:table-cell>
          <table:table-cell table:number-columns-repeated="2"/>
          <table:table-cell office:value-type="float" office:value="0.000542952" calcext:value-type="float">
            <text:p>0,000542952</text:p>
          </table:table-cell>
        </table:table-row>
        <table:table-row table:style-name="ro1">
          <table:table-cell table:formula="of:=[.A246]+0.025" office:value-type="float" office:value="6.12500000000002" calcext:value-type="float">
            <text:p>6,12500000000002</text:p>
          </table:table-cell>
          <table:table-cell/>
          <table:table-cell office:value-type="float" office:value="0.00392035" calcext:value-type="float">
            <text:p>0,00392035</text:p>
          </table:table-cell>
          <table:table-cell table:number-columns-repeated="2"/>
          <table:table-cell office:value-type="float" office:value="0.0299921" calcext:value-type="float">
            <text:p>0,0299921</text:p>
          </table:table-cell>
          <table:table-cell table:number-columns-repeated="2"/>
          <table:table-cell office:value-type="float" office:value="0.00054092" calcext:value-type="float">
            <text:p>0,00054092</text:p>
          </table:table-cell>
        </table:table-row>
        <table:table-row table:style-name="ro1">
          <table:table-cell table:formula="of:=[.A247]+0.025" office:value-type="float" office:value="6.15000000000002" calcext:value-type="float">
            <text:p>6,15000000000002</text:p>
          </table:table-cell>
          <table:table-cell/>
          <table:table-cell office:value-type="float" office:value="0.00390671" calcext:value-type="float">
            <text:p>0,00390671</text:p>
          </table:table-cell>
          <table:table-cell table:number-columns-repeated="2"/>
          <table:table-cell office:value-type="float" office:value="0.0298828" calcext:value-type="float">
            <text:p>0,0298828</text:p>
          </table:table-cell>
          <table:table-cell table:number-columns-repeated="2"/>
          <table:table-cell office:value-type="float" office:value="0.000538909" calcext:value-type="float">
            <text:p>0,000538909</text:p>
          </table:table-cell>
        </table:table-row>
        <table:table-row table:style-name="ro1">
          <table:table-cell table:formula="of:=[.A248]+0.025" office:value-type="float" office:value="6.17500000000002" calcext:value-type="float">
            <text:p>6,17500000000002</text:p>
          </table:table-cell>
          <table:table-cell/>
          <table:table-cell office:value-type="float" office:value="0.00389317" calcext:value-type="float">
            <text:p>0,00389317</text:p>
          </table:table-cell>
          <table:table-cell table:number-columns-repeated="2"/>
          <table:table-cell office:value-type="float" office:value="0.0297744" calcext:value-type="float">
            <text:p>0,0297744</text:p>
          </table:table-cell>
          <table:table-cell table:number-columns-repeated="2"/>
          <table:table-cell office:value-type="float" office:value="0.000536916" calcext:value-type="float">
            <text:p>0,000536916</text:p>
          </table:table-cell>
        </table:table-row>
        <table:table-row table:style-name="ro1">
          <table:table-cell table:formula="of:=[.A249]+0.025" office:value-type="float" office:value="6.20000000000002" calcext:value-type="float">
            <text:p>6,20000000000002</text:p>
          </table:table-cell>
          <table:table-cell/>
          <table:table-cell office:value-type="float" office:value="0.00387972" calcext:value-type="float">
            <text:p>0,00387972</text:p>
          </table:table-cell>
          <table:table-cell table:number-columns-repeated="2"/>
          <table:table-cell office:value-type="float" office:value="0.0296667" calcext:value-type="float">
            <text:p>0,0296667</text:p>
          </table:table-cell>
          <table:table-cell table:number-columns-repeated="2"/>
          <table:table-cell office:value-type="float" office:value="0.000534938" calcext:value-type="float">
            <text:p>0,000534938</text:p>
          </table:table-cell>
        </table:table-row>
        <table:table-row table:style-name="ro1">
          <table:table-cell table:formula="of:=[.A250]+0.025" office:value-type="float" office:value="6.22500000000002" calcext:value-type="float">
            <text:p>6,22500000000002</text:p>
          </table:table-cell>
          <table:table-cell/>
          <table:table-cell office:value-type="float" office:value="0.00386641" calcext:value-type="float">
            <text:p>0,00386641</text:p>
          </table:table-cell>
          <table:table-cell table:number-columns-repeated="2"/>
          <table:table-cell office:value-type="float" office:value="0.0295602" calcext:value-type="float">
            <text:p>0,0295602</text:p>
          </table:table-cell>
          <table:table-cell table:number-columns-repeated="2"/>
          <table:table-cell office:value-type="float" office:value="0.000532979" calcext:value-type="float">
            <text:p>0,000532979</text:p>
          </table:table-cell>
        </table:table-row>
        <table:table-row table:style-name="ro1">
          <table:table-cell table:formula="of:=[.A251]+0.025" office:value-type="float" office:value="6.25000000000002" calcext:value-type="float">
            <text:p>6,25000000000002</text:p>
          </table:table-cell>
          <table:table-cell/>
          <table:table-cell office:value-type="float" office:value="0.0038532" calcext:value-type="float">
            <text:p>0,0038532</text:p>
          </table:table-cell>
          <table:table-cell table:number-columns-repeated="2"/>
          <table:table-cell office:value-type="float" office:value="0.0294544" calcext:value-type="float">
            <text:p>0,0294544</text:p>
          </table:table-cell>
          <table:table-cell table:number-columns-repeated="2"/>
          <table:table-cell office:value-type="float" office:value="0.000531039" calcext:value-type="float">
            <text:p>0,000531039</text:p>
          </table:table-cell>
        </table:table-row>
        <table:table-row table:style-name="ro1">
          <table:table-cell table:formula="of:=[.A252]+0.025" office:value-type="float" office:value="6.27500000000002" calcext:value-type="float">
            <text:p>6,27500000000002</text:p>
          </table:table-cell>
          <table:table-cell/>
          <table:table-cell office:value-type="float" office:value="0.00384007" calcext:value-type="float">
            <text:p>0,00384007</text:p>
          </table:table-cell>
          <table:table-cell table:number-columns-repeated="2"/>
          <table:table-cell office:value-type="float" office:value="0.0293493" calcext:value-type="float">
            <text:p>0,0293493</text:p>
          </table:table-cell>
          <table:table-cell table:number-columns-repeated="2"/>
          <table:table-cell office:value-type="float" office:value="0.000529113" calcext:value-type="float">
            <text:p>0,000529113</text:p>
          </table:table-cell>
        </table:table-row>
        <table:table-row table:style-name="ro1">
          <table:table-cell table:formula="of:=[.A253]+0.025" office:value-type="float" office:value="6.30000000000002" calcext:value-type="float">
            <text:p>6,30000000000002</text:p>
          </table:table-cell>
          <table:table-cell/>
          <table:table-cell office:value-type="float" office:value="0.00382708" calcext:value-type="float">
            <text:p>0,00382708</text:p>
          </table:table-cell>
          <table:table-cell table:number-columns-repeated="2"/>
          <table:table-cell office:value-type="float" office:value="0.0292453" calcext:value-type="float">
            <text:p>0,0292453</text:p>
          </table:table-cell>
          <table:table-cell table:number-columns-repeated="2"/>
          <table:table-cell office:value-type="float" office:value="0.000527206" calcext:value-type="float">
            <text:p>0,000527206</text:p>
          </table:table-cell>
        </table:table-row>
        <table:table-row table:style-name="ro1">
          <table:table-cell table:formula="of:=[.A254]+0.025" office:value-type="float" office:value="6.32500000000002" calcext:value-type="float">
            <text:p>6,32500000000002</text:p>
          </table:table-cell>
          <table:table-cell/>
          <table:table-cell office:value-type="float" office:value="0.00381418" calcext:value-type="float">
            <text:p>0,00381418</text:p>
          </table:table-cell>
          <table:table-cell table:number-columns-repeated="2"/>
          <table:table-cell office:value-type="float" office:value="0.0291422" calcext:value-type="float">
            <text:p>0,0291422</text:p>
          </table:table-cell>
          <table:table-cell table:number-columns-repeated="2"/>
          <table:table-cell office:value-type="float" office:value="0.000525316" calcext:value-type="float">
            <text:p>0,000525316</text:p>
          </table:table-cell>
        </table:table-row>
        <table:table-row table:style-name="ro1">
          <table:table-cell table:formula="of:=[.A255]+0.025" office:value-type="float" office:value="6.35000000000002" calcext:value-type="float">
            <text:p>6,35000000000002</text:p>
          </table:table-cell>
          <table:table-cell/>
          <table:table-cell office:value-type="float" office:value="0.00380138" calcext:value-type="float">
            <text:p>0,00380138</text:p>
          </table:table-cell>
          <table:table-cell table:number-columns-repeated="2"/>
          <table:table-cell office:value-type="float" office:value="0.0290397" calcext:value-type="float">
            <text:p>0,0290397</text:p>
          </table:table-cell>
          <table:table-cell table:number-columns-repeated="2"/>
          <table:table-cell office:value-type="float" office:value="0.00052344" calcext:value-type="float">
            <text:p>0,00052344</text:p>
          </table:table-cell>
        </table:table-row>
        <table:table-row table:style-name="ro1">
          <table:table-cell table:formula="of:=[.A256]+0.025" office:value-type="float" office:value="6.37500000000002" calcext:value-type="float">
            <text:p>6,37500000000002</text:p>
          </table:table-cell>
          <table:table-cell/>
          <table:table-cell office:value-type="float" office:value="0.00378869" calcext:value-type="float">
            <text:p>0,00378869</text:p>
          </table:table-cell>
          <table:table-cell table:number-columns-repeated="2"/>
          <table:table-cell office:value-type="float" office:value="0.0289383" calcext:value-type="float">
            <text:p>0,0289383</text:p>
          </table:table-cell>
          <table:table-cell table:number-columns-repeated="2"/>
          <table:table-cell office:value-type="float" office:value="0.000521581" calcext:value-type="float">
            <text:p>0,000521581</text:p>
          </table:table-cell>
        </table:table-row>
        <table:table-row table:style-name="ro1">
          <table:table-cell table:formula="of:=[.A257]+0.025" office:value-type="float" office:value="6.40000000000002" calcext:value-type="float">
            <text:p>6,40000000000002</text:p>
          </table:table-cell>
          <table:table-cell/>
          <table:table-cell office:value-type="float" office:value="0.00377609" calcext:value-type="float">
            <text:p>0,00377609</text:p>
          </table:table-cell>
          <table:table-cell table:number-columns-repeated="2"/>
          <table:table-cell office:value-type="float" office:value="0.0288375" calcext:value-type="float">
            <text:p>0,0288375</text:p>
          </table:table-cell>
          <table:table-cell table:number-columns-repeated="2"/>
          <table:table-cell office:value-type="float" office:value="0.000519739" calcext:value-type="float">
            <text:p>0,000519739</text:p>
          </table:table-cell>
        </table:table-row>
        <table:table-row table:style-name="ro1">
          <table:table-cell table:formula="of:=[.A258]+0.025" office:value-type="float" office:value="6.42500000000002" calcext:value-type="float">
            <text:p>6,42500000000002</text:p>
          </table:table-cell>
          <table:table-cell/>
          <table:table-cell office:value-type="float" office:value="0.00376358" calcext:value-type="float">
            <text:p>0,00376358</text:p>
          </table:table-cell>
          <table:table-cell table:number-columns-repeated="2"/>
          <table:table-cell office:value-type="float" office:value="0.0287375" calcext:value-type="float">
            <text:p>0,0287375</text:p>
          </table:table-cell>
          <table:table-cell table:number-columns-repeated="2"/>
          <table:table-cell office:value-type="float" office:value="0.000517911" calcext:value-type="float">
            <text:p>0,000517911</text:p>
          </table:table-cell>
        </table:table-row>
        <table:table-row table:style-name="ro1">
          <table:table-cell table:formula="of:=[.A259]+0.025" office:value-type="float" office:value="6.45000000000002" calcext:value-type="float">
            <text:p>6,45000000000002</text:p>
          </table:table-cell>
          <table:table-cell/>
          <table:table-cell office:value-type="float" office:value="0.00375119" calcext:value-type="float">
            <text:p>0,00375119</text:p>
          </table:table-cell>
          <table:table-cell table:number-columns-repeated="2"/>
          <table:table-cell office:value-type="float" office:value="0.0286384" calcext:value-type="float">
            <text:p>0,0286384</text:p>
          </table:table-cell>
          <table:table-cell table:number-columns-repeated="2"/>
          <table:table-cell office:value-type="float" office:value="0.000516101" calcext:value-type="float">
            <text:p>0,000516101</text:p>
          </table:table-cell>
        </table:table-row>
        <table:table-row table:style-name="ro1">
          <table:table-cell table:formula="of:=[.A260]+0.025" office:value-type="float" office:value="6.47500000000002" calcext:value-type="float">
            <text:p>6,47500000000002</text:p>
          </table:table-cell>
          <table:table-cell/>
          <table:table-cell office:value-type="float" office:value="0.00373888" calcext:value-type="float">
            <text:p>0,00373888</text:p>
          </table:table-cell>
          <table:table-cell table:number-columns-repeated="2"/>
          <table:table-cell office:value-type="float" office:value="0.0285401" calcext:value-type="float">
            <text:p>0,0285401</text:p>
          </table:table-cell>
          <table:table-cell table:number-columns-repeated="2"/>
          <table:table-cell office:value-type="float" office:value="0.000514305" calcext:value-type="float">
            <text:p>0,000514305</text:p>
          </table:table-cell>
        </table:table-row>
        <table:table-row table:style-name="ro1">
          <table:table-cell table:formula="of:=[.A261]+0.025" office:value-type="float" office:value="6.50000000000003" calcext:value-type="float">
            <text:p>6,50000000000003</text:p>
          </table:table-cell>
          <table:table-cell/>
          <table:table-cell office:value-type="float" office:value="0.00372667" calcext:value-type="float">
            <text:p>0,00372667</text:p>
          </table:table-cell>
          <table:table-cell table:number-columns-repeated="2"/>
          <table:table-cell office:value-type="float" office:value="0.0284425" calcext:value-type="float">
            <text:p>0,0284425</text:p>
          </table:table-cell>
          <table:table-cell table:number-columns-repeated="2"/>
          <table:table-cell office:value-type="float" office:value="0.000512523" calcext:value-type="float">
            <text:p>0,000512523</text:p>
          </table:table-cell>
        </table:table-row>
        <table:table-row table:style-name="ro1">
          <table:table-cell table:formula="of:=[.A262]+0.025" office:value-type="float" office:value="6.52500000000003" calcext:value-type="float">
            <text:p>6,52500000000003</text:p>
          </table:table-cell>
          <table:table-cell/>
          <table:table-cell office:value-type="float" office:value="0.00371455" calcext:value-type="float">
            <text:p>0,00371455</text:p>
          </table:table-cell>
          <table:table-cell table:number-columns-repeated="2"/>
          <table:table-cell office:value-type="float" office:value="0.0283457" calcext:value-type="float">
            <text:p>0,0283457</text:p>
          </table:table-cell>
          <table:table-cell table:number-columns-repeated="2"/>
          <table:table-cell office:value-type="float" office:value="0.000510757" calcext:value-type="float">
            <text:p>0,000510757</text:p>
          </table:table-cell>
        </table:table-row>
        <table:table-row table:style-name="ro1">
          <table:table-cell table:formula="of:=[.A263]+0.025" office:value-type="float" office:value="6.55000000000003" calcext:value-type="float">
            <text:p>6,55000000000003</text:p>
          </table:table-cell>
          <table:table-cell/>
          <table:table-cell office:value-type="float" office:value="0.00370254" calcext:value-type="float">
            <text:p>0,00370254</text:p>
          </table:table-cell>
          <table:table-cell table:number-columns-repeated="2"/>
          <table:table-cell office:value-type="float" office:value="0.0282496" calcext:value-type="float">
            <text:p>0,0282496</text:p>
          </table:table-cell>
          <table:table-cell table:number-columns-repeated="2"/>
          <table:table-cell office:value-type="float" office:value="0.000509006" calcext:value-type="float">
            <text:p>0,000509006</text:p>
          </table:table-cell>
        </table:table-row>
        <table:table-row table:style-name="ro1">
          <table:table-cell table:formula="of:=[.A264]+0.025" office:value-type="float" office:value="6.57500000000003" calcext:value-type="float">
            <text:p>6,57500000000003</text:p>
          </table:table-cell>
          <table:table-cell/>
          <table:table-cell office:value-type="float" office:value="0.00369059" calcext:value-type="float">
            <text:p>0,00369059</text:p>
          </table:table-cell>
          <table:table-cell table:number-columns-repeated="2"/>
          <table:table-cell office:value-type="float" office:value="0.0281543" calcext:value-type="float">
            <text:p>0,0281543</text:p>
          </table:table-cell>
          <table:table-cell table:number-columns-repeated="2"/>
          <table:table-cell office:value-type="float" office:value="0.000507268" calcext:value-type="float">
            <text:p>0,000507268</text:p>
          </table:table-cell>
        </table:table-row>
        <table:table-row table:style-name="ro1">
          <table:table-cell table:formula="of:=[.A265]+0.025" office:value-type="float" office:value="6.60000000000003" calcext:value-type="float">
            <text:p>6,60000000000003</text:p>
          </table:table-cell>
          <table:table-cell/>
          <table:table-cell office:value-type="float" office:value="0.00367877" calcext:value-type="float">
            <text:p>0,00367877</text:p>
          </table:table-cell>
          <table:table-cell table:number-columns-repeated="2"/>
          <table:table-cell office:value-type="float" office:value="0.0280598" calcext:value-type="float">
            <text:p>0,0280598</text:p>
          </table:table-cell>
          <table:table-cell table:number-columns-repeated="2"/>
          <table:table-cell office:value-type="float" office:value="0.000505546" calcext:value-type="float">
            <text:p>0,000505546</text:p>
          </table:table-cell>
        </table:table-row>
        <table:table-row table:style-name="ro1">
          <table:table-cell table:formula="of:=[.A266]+0.025" office:value-type="float" office:value="6.62500000000003" calcext:value-type="float">
            <text:p>6,62500000000003</text:p>
          </table:table-cell>
          <table:table-cell/>
          <table:table-cell office:value-type="float" office:value="0.00366702" calcext:value-type="float">
            <text:p>0,00366702</text:p>
          </table:table-cell>
          <table:table-cell table:number-columns-repeated="2"/>
          <table:table-cell office:value-type="float" office:value="0.027966" calcext:value-type="float">
            <text:p>0,027966</text:p>
          </table:table-cell>
          <table:table-cell table:number-columns-repeated="2"/>
          <table:table-cell office:value-type="float" office:value="0.000503839" calcext:value-type="float">
            <text:p>0,000503839</text:p>
          </table:table-cell>
        </table:table-row>
        <table:table-row table:style-name="ro1">
          <table:table-cell table:formula="of:=[.A267]+0.025" office:value-type="float" office:value="6.65000000000003" calcext:value-type="float">
            <text:p>6,65000000000003</text:p>
          </table:table-cell>
          <table:table-cell/>
          <table:table-cell office:value-type="float" office:value="0.00365535" calcext:value-type="float">
            <text:p>0,00365535</text:p>
          </table:table-cell>
          <table:table-cell table:number-columns-repeated="2"/>
          <table:table-cell office:value-type="float" office:value="0.0278728" calcext:value-type="float">
            <text:p>0,0278728</text:p>
          </table:table-cell>
          <table:table-cell table:number-columns-repeated="2"/>
          <table:table-cell office:value-type="float" office:value="0.000502143" calcext:value-type="float">
            <text:p>0,000502143</text:p>
          </table:table-cell>
        </table:table-row>
        <table:table-row table:style-name="ro1">
          <table:table-cell table:formula="of:=[.A268]+0.025" office:value-type="float" office:value="6.67500000000003" calcext:value-type="float">
            <text:p>6,67500000000003</text:p>
          </table:table-cell>
          <table:table-cell/>
          <table:table-cell office:value-type="float" office:value="0.00364378" calcext:value-type="float">
            <text:p>0,00364378</text:p>
          </table:table-cell>
          <table:table-cell table:number-columns-repeated="2"/>
          <table:table-cell office:value-type="float" office:value="0.0277804" calcext:value-type="float">
            <text:p>0,0277804</text:p>
          </table:table-cell>
          <table:table-cell table:number-columns-repeated="2"/>
          <table:table-cell office:value-type="float" office:value="0.000500463" calcext:value-type="float">
            <text:p>0,000500463</text:p>
          </table:table-cell>
        </table:table-row>
        <table:table-row table:style-name="ro1">
          <table:table-cell table:formula="of:=[.A269]+0.025" office:value-type="float" office:value="6.70000000000003" calcext:value-type="float">
            <text:p>6,70000000000003</text:p>
          </table:table-cell>
          <table:table-cell/>
          <table:table-cell office:value-type="float" office:value="0.00363229" calcext:value-type="float">
            <text:p>0,00363229</text:p>
          </table:table-cell>
          <table:table-cell table:number-columns-repeated="2"/>
          <table:table-cell office:value-type="float" office:value="0.0276887" calcext:value-type="float">
            <text:p>0,0276887</text:p>
          </table:table-cell>
          <table:table-cell table:number-columns-repeated="2"/>
          <table:table-cell office:value-type="float" office:value="0.000498796" calcext:value-type="float">
            <text:p>0,000498796</text:p>
          </table:table-cell>
        </table:table-row>
        <table:table-row table:style-name="ro1">
          <table:table-cell table:formula="of:=[.A270]+0.025" office:value-type="float" office:value="6.72500000000003" calcext:value-type="float">
            <text:p>6,72500000000003</text:p>
          </table:table-cell>
          <table:table-cell/>
          <table:table-cell office:value-type="float" office:value="0.00362088" calcext:value-type="float">
            <text:p>0,00362088</text:p>
          </table:table-cell>
          <table:table-cell table:number-columns-repeated="2"/>
          <table:table-cell office:value-type="float" office:value="0.0275977" calcext:value-type="float">
            <text:p>0,0275977</text:p>
          </table:table-cell>
          <table:table-cell table:number-columns-repeated="2"/>
          <table:table-cell office:value-type="float" office:value="0.000497142" calcext:value-type="float">
            <text:p>0,000497142</text:p>
          </table:table-cell>
        </table:table-row>
        <table:table-row table:style-name="ro1">
          <table:table-cell table:formula="of:=[.A271]+0.025" office:value-type="float" office:value="6.75000000000003" calcext:value-type="float">
            <text:p>6,75000000000003</text:p>
          </table:table-cell>
          <table:table-cell/>
          <table:table-cell office:value-type="float" office:value="0.00360957" calcext:value-type="float">
            <text:p>0,00360957</text:p>
          </table:table-cell>
          <table:table-cell table:number-columns-repeated="2"/>
          <table:table-cell office:value-type="float" office:value="0.0275074" calcext:value-type="float">
            <text:p>0,0275074</text:p>
          </table:table-cell>
          <table:table-cell table:number-columns-repeated="2"/>
          <table:table-cell office:value-type="float" office:value="0.000495502" calcext:value-type="float">
            <text:p>0,000495502</text:p>
          </table:table-cell>
        </table:table-row>
        <table:table-row table:style-name="ro1">
          <table:table-cell table:formula="of:=[.A272]+0.025" office:value-type="float" office:value="6.77500000000003" calcext:value-type="float">
            <text:p>6,77500000000003</text:p>
          </table:table-cell>
          <table:table-cell/>
          <table:table-cell office:value-type="float" office:value="0.00359834" calcext:value-type="float">
            <text:p>0,00359834</text:p>
          </table:table-cell>
          <table:table-cell table:number-columns-repeated="2"/>
          <table:table-cell office:value-type="float" office:value="0.0274177" calcext:value-type="float">
            <text:p>0,0274177</text:p>
          </table:table-cell>
          <table:table-cell table:number-columns-repeated="2"/>
          <table:table-cell office:value-type="float" office:value="0.000493875" calcext:value-type="float">
            <text:p>0,000493875</text:p>
          </table:table-cell>
        </table:table-row>
        <table:table-row table:style-name="ro1">
          <table:table-cell table:formula="of:=[.A273]+0.025" office:value-type="float" office:value="6.80000000000003" calcext:value-type="float">
            <text:p>6,80000000000003</text:p>
          </table:table-cell>
          <table:table-cell/>
          <table:table-cell office:value-type="float" office:value="0.00358718" calcext:value-type="float">
            <text:p>0,00358718</text:p>
          </table:table-cell>
          <table:table-cell table:number-columns-repeated="2"/>
          <table:table-cell office:value-type="float" office:value="0.0273287" calcext:value-type="float">
            <text:p>0,0273287</text:p>
          </table:table-cell>
          <table:table-cell table:number-columns-repeated="2"/>
          <table:table-cell office:value-type="float" office:value="0.00049226" calcext:value-type="float">
            <text:p>0,00049226</text:p>
          </table:table-cell>
        </table:table-row>
        <table:table-row table:style-name="ro1">
          <table:table-cell table:formula="of:=[.A274]+0.025" office:value-type="float" office:value="6.82500000000003" calcext:value-type="float">
            <text:p>6,82500000000003</text:p>
          </table:table-cell>
          <table:table-cell/>
          <table:table-cell office:value-type="float" office:value="0.00357611" calcext:value-type="float">
            <text:p>0,00357611</text:p>
          </table:table-cell>
          <table:table-cell table:number-columns-repeated="2"/>
          <table:table-cell office:value-type="float" office:value="0.0272404" calcext:value-type="float">
            <text:p>0,0272404</text:p>
          </table:table-cell>
          <table:table-cell table:number-columns-repeated="2"/>
          <table:table-cell office:value-type="float" office:value="0.000490659" calcext:value-type="float">
            <text:p>0,000490659</text:p>
          </table:table-cell>
        </table:table-row>
        <table:table-row table:style-name="ro1">
          <table:table-cell table:formula="of:=[.A275]+0.025" office:value-type="float" office:value="6.85000000000003" calcext:value-type="float">
            <text:p>6,85000000000003</text:p>
          </table:table-cell>
          <table:table-cell/>
          <table:table-cell office:value-type="float" office:value="0.00356512" calcext:value-type="float">
            <text:p>0,00356512</text:p>
          </table:table-cell>
          <table:table-cell table:number-columns-repeated="2"/>
          <table:table-cell office:value-type="float" office:value="0.0271528" calcext:value-type="float">
            <text:p>0,0271528</text:p>
          </table:table-cell>
          <table:table-cell table:number-columns-repeated="2"/>
          <table:table-cell office:value-type="float" office:value="0.000489071" calcext:value-type="float">
            <text:p>0,000489071</text:p>
          </table:table-cell>
        </table:table-row>
        <table:table-row table:style-name="ro1">
          <table:table-cell table:formula="of:=[.A276]+0.025" office:value-type="float" office:value="6.87500000000003" calcext:value-type="float">
            <text:p>6,87500000000003</text:p>
          </table:table-cell>
          <table:table-cell/>
          <table:table-cell office:value-type="float" office:value="0.00355421" calcext:value-type="float">
            <text:p>0,00355421</text:p>
          </table:table-cell>
          <table:table-cell table:number-columns-repeated="2"/>
          <table:table-cell office:value-type="float" office:value="0.0270658" calcext:value-type="float">
            <text:p>0,0270658</text:p>
          </table:table-cell>
          <table:table-cell table:number-columns-repeated="2"/>
          <table:table-cell office:value-type="float" office:value="0.000487493" calcext:value-type="float">
            <text:p>0,000487493</text:p>
          </table:table-cell>
        </table:table-row>
        <table:table-row table:style-name="ro1">
          <table:table-cell table:formula="of:=[.A277]+0.025" office:value-type="float" office:value="6.90000000000003" calcext:value-type="float">
            <text:p>6,90000000000003</text:p>
          </table:table-cell>
          <table:table-cell/>
          <table:table-cell office:value-type="float" office:value="0.00354338" calcext:value-type="float">
            <text:p>0,00354338</text:p>
          </table:table-cell>
          <table:table-cell table:number-columns-repeated="2"/>
          <table:table-cell office:value-type="float" office:value="0.0269795" calcext:value-type="float">
            <text:p>0,0269795</text:p>
          </table:table-cell>
          <table:table-cell table:number-columns-repeated="2"/>
          <table:table-cell office:value-type="float" office:value="0.000485929" calcext:value-type="float">
            <text:p>0,000485929</text:p>
          </table:table-cell>
        </table:table-row>
        <table:table-row table:style-name="ro1">
          <table:table-cell table:formula="of:=[.A278]+0.025" office:value-type="float" office:value="6.92500000000003" calcext:value-type="float">
            <text:p>6,92500000000003</text:p>
          </table:table-cell>
          <table:table-cell/>
          <table:table-cell office:value-type="float" office:value="0.00353263" calcext:value-type="float">
            <text:p>0,00353263</text:p>
          </table:table-cell>
          <table:table-cell table:number-columns-repeated="2"/>
          <table:table-cell office:value-type="float" office:value="0.0268937" calcext:value-type="float">
            <text:p>0,0268937</text:p>
          </table:table-cell>
          <table:table-cell table:number-columns-repeated="2"/>
          <table:table-cell office:value-type="float" office:value="0.000484378" calcext:value-type="float">
            <text:p>0,000484378</text:p>
          </table:table-cell>
        </table:table-row>
        <table:table-row table:style-name="ro1">
          <table:table-cell table:formula="of:=[.A279]+0.025" office:value-type="float" office:value="6.95000000000003" calcext:value-type="float">
            <text:p>6,95000000000003</text:p>
          </table:table-cell>
          <table:table-cell/>
          <table:table-cell office:value-type="float" office:value="0.00352195" calcext:value-type="float">
            <text:p>0,00352195</text:p>
          </table:table-cell>
          <table:table-cell table:number-columns-repeated="2"/>
          <table:table-cell office:value-type="float" office:value="0.0268085" calcext:value-type="float">
            <text:p>0,0268085</text:p>
          </table:table-cell>
          <table:table-cell table:number-columns-repeated="2"/>
          <table:table-cell office:value-type="float" office:value="0.000482837" calcext:value-type="float">
            <text:p>0,000482837</text:p>
          </table:table-cell>
        </table:table-row>
        <table:table-row table:style-name="ro1">
          <table:table-cell table:formula="of:=[.A280]+0.025" office:value-type="float" office:value="6.97500000000003" calcext:value-type="float">
            <text:p>6,97500000000003</text:p>
          </table:table-cell>
          <table:table-cell/>
          <table:table-cell office:value-type="float" office:value="0.00351135" calcext:value-type="float">
            <text:p>0,00351135</text:p>
          </table:table-cell>
          <table:table-cell table:number-columns-repeated="2"/>
          <table:table-cell office:value-type="float" office:value="0.0267241" calcext:value-type="float">
            <text:p>0,0267241</text:p>
          </table:table-cell>
          <table:table-cell table:number-columns-repeated="2"/>
          <table:table-cell office:value-type="float" office:value="0.00048131" calcext:value-type="float">
            <text:p>0,00048131</text:p>
          </table:table-cell>
        </table:table-row>
        <table:table-row table:style-name="ro1">
          <table:table-cell table:formula="of:=[.A281]+0.025" office:value-type="float" office:value="7.00000000000003" calcext:value-type="float">
            <text:p>7,00000000000003</text:p>
          </table:table-cell>
          <table:table-cell/>
          <table:table-cell office:value-type="float" office:value="0.00350083" calcext:value-type="float">
            <text:p>0,00350083</text:p>
          </table:table-cell>
          <table:table-cell table:number-columns-repeated="2"/>
          <table:table-cell office:value-type="float" office:value="0.0266403" calcext:value-type="float">
            <text:p>0,0266403</text:p>
          </table:table-cell>
          <table:table-cell table:number-columns-repeated="2"/>
          <table:table-cell office:value-type="float" office:value="0.000479794" calcext:value-type="float">
            <text:p>0,000479794</text:p>
          </table:table-cell>
        </table:table-row>
        <table:table-row table:style-name="ro1">
          <table:table-cell table:formula="of:=[.A282]+0.025" office:value-type="float" office:value="7.02500000000003" calcext:value-type="float">
            <text:p>7,02500000000003</text:p>
          </table:table-cell>
          <table:table-cell/>
          <table:table-cell office:value-type="float" office:value="0.00349037" calcext:value-type="float">
            <text:p>0,00349037</text:p>
          </table:table-cell>
          <table:table-cell table:number-columns-repeated="2"/>
          <table:table-cell office:value-type="float" office:value="0.0265569" calcext:value-type="float">
            <text:p>0,0265569</text:p>
          </table:table-cell>
          <table:table-cell table:number-columns-repeated="2"/>
          <table:table-cell office:value-type="float" office:value="0.000478288" calcext:value-type="float">
            <text:p>0,000478288</text:p>
          </table:table-cell>
        </table:table-row>
        <table:table-row table:style-name="ro1">
          <table:table-cell table:formula="of:=[.A283]+0.025" office:value-type="float" office:value="7.05000000000003" calcext:value-type="float">
            <text:p>7,05000000000003</text:p>
          </table:table-cell>
          <table:table-cell/>
          <table:table-cell office:value-type="float" office:value="0.00348" calcext:value-type="float">
            <text:p>0,00348</text:p>
          </table:table-cell>
          <table:table-cell table:number-columns-repeated="2"/>
          <table:table-cell office:value-type="float" office:value="0.0264743" calcext:value-type="float">
            <text:p>0,0264743</text:p>
          </table:table-cell>
          <table:table-cell table:number-columns-repeated="2"/>
          <table:table-cell office:value-type="float" office:value="0.000476796" calcext:value-type="float">
            <text:p>0,000476796</text:p>
          </table:table-cell>
        </table:table-row>
        <table:table-row table:style-name="ro1">
          <table:table-cell table:formula="of:=[.A284]+0.025" office:value-type="float" office:value="7.07500000000003" calcext:value-type="float">
            <text:p>7,07500000000003</text:p>
          </table:table-cell>
          <table:table-cell/>
          <table:table-cell office:value-type="float" office:value="0.0034697" calcext:value-type="float">
            <text:p>0,0034697</text:p>
          </table:table-cell>
          <table:table-cell table:number-columns-repeated="2"/>
          <table:table-cell office:value-type="float" office:value="0.0263923" calcext:value-type="float">
            <text:p>0,0263923</text:p>
          </table:table-cell>
          <table:table-cell table:number-columns-repeated="2"/>
          <table:table-cell office:value-type="float" office:value="0.000475315" calcext:value-type="float">
            <text:p>0,000475315</text:p>
          </table:table-cell>
        </table:table-row>
        <table:table-row table:style-name="ro1">
          <table:table-cell table:formula="of:=[.A285]+0.025" office:value-type="float" office:value="7.10000000000003" calcext:value-type="float">
            <text:p>7,10000000000003</text:p>
          </table:table-cell>
          <table:table-cell/>
          <table:table-cell office:value-type="float" office:value="0.00345946" calcext:value-type="float">
            <text:p>0,00345946</text:p>
          </table:table-cell>
          <table:table-cell table:number-columns-repeated="2"/>
          <table:table-cell office:value-type="float" office:value="0.0263106" calcext:value-type="float">
            <text:p>0,0263106</text:p>
          </table:table-cell>
          <table:table-cell table:number-columns-repeated="2"/>
          <table:table-cell office:value-type="float" office:value="0.000473843" calcext:value-type="float">
            <text:p>0,000473843</text:p>
          </table:table-cell>
        </table:table-row>
        <table:table-row table:style-name="ro1">
          <table:table-cell table:formula="of:=[.A286]+0.025" office:value-type="float" office:value="7.12500000000003" calcext:value-type="float">
            <text:p>7,12500000000003</text:p>
          </table:table-cell>
          <table:table-cell/>
          <table:table-cell office:value-type="float" office:value="0.0034493" calcext:value-type="float">
            <text:p>0,0034493</text:p>
          </table:table-cell>
          <table:table-cell table:number-columns-repeated="2"/>
          <table:table-cell office:value-type="float" office:value="0.0262298" calcext:value-type="float">
            <text:p>0,0262298</text:p>
          </table:table-cell>
          <table:table-cell table:number-columns-repeated="2"/>
          <table:table-cell office:value-type="float" office:value="0.000472384" calcext:value-type="float">
            <text:p>0,000472384</text:p>
          </table:table-cell>
        </table:table-row>
        <table:table-row table:style-name="ro1">
          <table:table-cell table:formula="of:=[.A287]+0.025" office:value-type="float" office:value="7.15000000000003" calcext:value-type="float">
            <text:p>7,15000000000003</text:p>
          </table:table-cell>
          <table:table-cell/>
          <table:table-cell office:value-type="float" office:value="0.00343922" calcext:value-type="float">
            <text:p>0,00343922</text:p>
          </table:table-cell>
          <table:table-cell table:number-columns-repeated="2"/>
          <table:table-cell office:value-type="float" office:value="0.0261495" calcext:value-type="float">
            <text:p>0,0261495</text:p>
          </table:table-cell>
          <table:table-cell table:number-columns-repeated="2"/>
          <table:table-cell office:value-type="float" office:value="0.000470935" calcext:value-type="float">
            <text:p>0,000470935</text:p>
          </table:table-cell>
        </table:table-row>
        <table:table-row table:style-name="ro1">
          <table:table-cell table:formula="of:=[.A288]+0.025" office:value-type="float" office:value="7.17500000000003" calcext:value-type="float">
            <text:p>7,17500000000003</text:p>
          </table:table-cell>
          <table:table-cell/>
          <table:table-cell office:value-type="float" office:value="0.00342919" calcext:value-type="float">
            <text:p>0,00342919</text:p>
          </table:table-cell>
          <table:table-cell table:number-columns-repeated="2"/>
          <table:table-cell office:value-type="float" office:value="0.0260697" calcext:value-type="float">
            <text:p>0,0260697</text:p>
          </table:table-cell>
          <table:table-cell table:number-columns-repeated="2"/>
          <table:table-cell office:value-type="float" office:value="0.000469496" calcext:value-type="float">
            <text:p>0,000469496</text:p>
          </table:table-cell>
        </table:table-row>
        <table:table-row table:style-name="ro1">
          <table:table-cell table:formula="of:=[.A289]+0.025" office:value-type="float" office:value="7.20000000000004" calcext:value-type="float">
            <text:p>7,20000000000004</text:p>
          </table:table-cell>
          <table:table-cell/>
          <table:table-cell office:value-type="float" office:value="0.00341924" calcext:value-type="float">
            <text:p>0,00341924</text:p>
          </table:table-cell>
          <table:table-cell table:number-columns-repeated="2"/>
          <table:table-cell office:value-type="float" office:value="0.0259905" calcext:value-type="float">
            <text:p>0,0259905</text:p>
          </table:table-cell>
          <table:table-cell table:number-columns-repeated="2"/>
          <table:table-cell office:value-type="float" office:value="0.00046807" calcext:value-type="float">
            <text:p>0,00046807</text:p>
          </table:table-cell>
        </table:table-row>
        <table:table-row table:style-name="ro1">
          <table:table-cell table:formula="of:=[.A290]+0.025" office:value-type="float" office:value="7.22500000000004" calcext:value-type="float">
            <text:p>7,22500000000004</text:p>
          </table:table-cell>
          <table:table-cell/>
          <table:table-cell office:value-type="float" office:value="0.00340937" calcext:value-type="float">
            <text:p>0,00340937</text:p>
          </table:table-cell>
          <table:table-cell table:number-columns-repeated="2"/>
          <table:table-cell office:value-type="float" office:value="0.0259118" calcext:value-type="float">
            <text:p>0,0259118</text:p>
          </table:table-cell>
          <table:table-cell table:number-columns-repeated="2"/>
          <table:table-cell office:value-type="float" office:value="0.000466654" calcext:value-type="float">
            <text:p>0,000466654</text:p>
          </table:table-cell>
        </table:table-row>
        <table:table-row table:style-name="ro1">
          <table:table-cell table:formula="of:=[.A291]+0.025" office:value-type="float" office:value="7.25000000000004" calcext:value-type="float">
            <text:p>7,25000000000004</text:p>
          </table:table-cell>
          <table:table-cell/>
          <table:table-cell office:value-type="float" office:value="0.00339954" calcext:value-type="float">
            <text:p>0,00339954</text:p>
          </table:table-cell>
          <table:table-cell table:number-columns-repeated="2"/>
          <table:table-cell office:value-type="float" office:value="0.0258336" calcext:value-type="float">
            <text:p>0,0258336</text:p>
          </table:table-cell>
          <table:table-cell table:number-columns-repeated="2"/>
          <table:table-cell office:value-type="float" office:value="0.000465247" calcext:value-type="float">
            <text:p>0,000465247</text:p>
          </table:table-cell>
        </table:table-row>
        <table:table-row table:style-name="ro1">
          <table:table-cell table:formula="of:=[.A292]+0.025" office:value-type="float" office:value="7.27500000000004" calcext:value-type="float">
            <text:p>7,27500000000004</text:p>
          </table:table-cell>
          <table:table-cell/>
          <table:table-cell office:value-type="float" office:value="0.0033898" calcext:value-type="float">
            <text:p>0,0033898</text:p>
          </table:table-cell>
          <table:table-cell table:number-columns-repeated="2"/>
          <table:table-cell office:value-type="float" office:value="0.0257561" calcext:value-type="float">
            <text:p>0,0257561</text:p>
          </table:table-cell>
          <table:table-cell table:number-columns-repeated="2"/>
          <table:table-cell office:value-type="float" office:value="0.000463851" calcext:value-type="float">
            <text:p>0,000463851</text:p>
          </table:table-cell>
        </table:table-row>
        <table:table-row table:style-name="ro1">
          <table:table-cell table:formula="of:=[.A293]+0.025" office:value-type="float" office:value="7.30000000000004" calcext:value-type="float">
            <text:p>7,30000000000004</text:p>
          </table:table-cell>
          <table:table-cell/>
          <table:table-cell office:value-type="float" office:value="0.00338013" calcext:value-type="float">
            <text:p>0,00338013</text:p>
          </table:table-cell>
          <table:table-cell table:number-columns-repeated="2"/>
          <table:table-cell office:value-type="float" office:value="0.0256791" calcext:value-type="float">
            <text:p>0,0256791</text:p>
          </table:table-cell>
          <table:table-cell table:number-columns-repeated="2"/>
          <table:table-cell office:value-type="float" office:value="0.000462466" calcext:value-type="float">
            <text:p>0,000462466</text:p>
          </table:table-cell>
        </table:table-row>
        <table:table-row table:style-name="ro1">
          <table:table-cell table:formula="of:=[.A294]+0.025" office:value-type="float" office:value="7.32500000000004" calcext:value-type="float">
            <text:p>7,32500000000004</text:p>
          </table:table-cell>
          <table:table-cell/>
          <table:table-cell office:value-type="float" office:value="0.0033705" calcext:value-type="float">
            <text:p>0,0033705</text:p>
          </table:table-cell>
          <table:table-cell table:number-columns-repeated="2"/>
          <table:table-cell office:value-type="float" office:value="0.0256025" calcext:value-type="float">
            <text:p>0,0256025</text:p>
          </table:table-cell>
          <table:table-cell table:number-columns-repeated="2"/>
          <table:table-cell office:value-type="float" office:value="0.000461089" calcext:value-type="float">
            <text:p>0,000461089</text:p>
          </table:table-cell>
        </table:table-row>
        <table:table-row table:style-name="ro1">
          <table:table-cell table:formula="of:=[.A295]+0.025" office:value-type="float" office:value="7.35000000000004" calcext:value-type="float">
            <text:p>7,35000000000004</text:p>
          </table:table-cell>
          <table:table-cell/>
          <table:table-cell office:value-type="float" office:value="0.00336095" calcext:value-type="float">
            <text:p>0,00336095</text:p>
          </table:table-cell>
          <table:table-cell table:number-columns-repeated="2"/>
          <table:table-cell office:value-type="float" office:value="0.0255266" calcext:value-type="float">
            <text:p>0,0255266</text:p>
          </table:table-cell>
          <table:table-cell table:number-columns-repeated="2"/>
          <table:table-cell office:value-type="float" office:value="0.000459724" calcext:value-type="float">
            <text:p>0,000459724</text:p>
          </table:table-cell>
        </table:table-row>
        <table:table-row table:style-name="ro1">
          <table:table-cell table:formula="of:=[.A296]+0.025" office:value-type="float" office:value="7.37500000000004" calcext:value-type="float">
            <text:p>7,37500000000004</text:p>
          </table:table-cell>
          <table:table-cell/>
          <table:table-cell office:value-type="float" office:value="0.00335146" calcext:value-type="float">
            <text:p>0,00335146</text:p>
          </table:table-cell>
          <table:table-cell table:number-columns-repeated="2"/>
          <table:table-cell office:value-type="float" office:value="0.0254511" calcext:value-type="float">
            <text:p>0,0254511</text:p>
          </table:table-cell>
          <table:table-cell table:number-columns-repeated="2"/>
          <table:table-cell office:value-type="float" office:value="0.000458368" calcext:value-type="float">
            <text:p>0,000458368</text:p>
          </table:table-cell>
        </table:table-row>
        <table:table-row table:style-name="ro1">
          <table:table-cell table:formula="of:=[.A297]+0.025" office:value-type="float" office:value="7.40000000000004" calcext:value-type="float">
            <text:p>7,40000000000004</text:p>
          </table:table-cell>
          <table:table-cell/>
          <table:table-cell office:value-type="float" office:value="0.00334204" calcext:value-type="float">
            <text:p>0,00334204</text:p>
          </table:table-cell>
          <table:table-cell table:number-columns-repeated="2"/>
          <table:table-cell office:value-type="float" office:value="0.0253761" calcext:value-type="float">
            <text:p>0,0253761</text:p>
          </table:table-cell>
          <table:table-cell table:number-columns-repeated="2"/>
          <table:table-cell office:value-type="float" office:value="0.000457021" calcext:value-type="float">
            <text:p>0,000457021</text:p>
          </table:table-cell>
        </table:table-row>
        <table:table-row table:style-name="ro1">
          <table:table-cell table:formula="of:=[.A298]+0.025" office:value-type="float" office:value="7.42500000000004" calcext:value-type="float">
            <text:p>7,42500000000004</text:p>
          </table:table-cell>
          <table:table-cell/>
          <table:table-cell office:value-type="float" office:value="0.00333267" calcext:value-type="float">
            <text:p>0,00333267</text:p>
          </table:table-cell>
          <table:table-cell table:number-columns-repeated="2"/>
          <table:table-cell office:value-type="float" office:value="0.0253017" calcext:value-type="float">
            <text:p>0,0253017</text:p>
          </table:table-cell>
          <table:table-cell table:number-columns-repeated="2"/>
          <table:table-cell office:value-type="float" office:value="0.000455685" calcext:value-type="float">
            <text:p>0,000455685</text:p>
          </table:table-cell>
        </table:table-row>
        <table:table-row table:style-name="ro1">
          <table:table-cell table:formula="of:=[.A299]+0.025" office:value-type="float" office:value="7.45000000000004" calcext:value-type="float">
            <text:p>7,45000000000004</text:p>
          </table:table-cell>
          <table:table-cell/>
          <table:table-cell office:value-type="float" office:value="0.00332338" calcext:value-type="float">
            <text:p>0,00332338</text:p>
          </table:table-cell>
          <table:table-cell table:number-columns-repeated="2"/>
          <table:table-cell office:value-type="float" office:value="0.0252278" calcext:value-type="float">
            <text:p>0,0252278</text:p>
          </table:table-cell>
          <table:table-cell table:number-columns-repeated="2"/>
          <table:table-cell office:value-type="float" office:value="0.000454358" calcext:value-type="float">
            <text:p>0,000454358</text:p>
          </table:table-cell>
        </table:table-row>
        <table:table-row table:style-name="ro1">
          <table:table-cell table:formula="of:=[.A300]+0.025" office:value-type="float" office:value="7.47500000000004" calcext:value-type="float">
            <text:p>7,47500000000004</text:p>
          </table:table-cell>
          <table:table-cell/>
          <table:table-cell office:value-type="float" office:value="0.00331413" calcext:value-type="float">
            <text:p>0,00331413</text:p>
          </table:table-cell>
          <table:table-cell table:number-columns-repeated="2"/>
          <table:table-cell office:value-type="float" office:value="0.0251542" calcext:value-type="float">
            <text:p>0,0251542</text:p>
          </table:table-cell>
          <table:table-cell table:number-columns-repeated="2"/>
          <table:table-cell office:value-type="float" office:value="0.00045304" calcext:value-type="float">
            <text:p>0,00045304</text:p>
          </table:table-cell>
        </table:table-row>
        <table:table-row table:style-name="ro1">
          <table:table-cell table:formula="of:=[.A301]+0.025" office:value-type="float" office:value="7.50000000000004" calcext:value-type="float">
            <text:p>7,50000000000004</text:p>
          </table:table-cell>
          <table:table-cell/>
          <table:table-cell office:value-type="float" office:value="0.00330497" calcext:value-type="float">
            <text:p>0,00330497</text:p>
          </table:table-cell>
          <table:table-cell table:number-columns-repeated="2"/>
          <table:table-cell office:value-type="float" office:value="0.0250813" calcext:value-type="float">
            <text:p>0,0250813</text:p>
          </table:table-cell>
          <table:table-cell table:number-columns-repeated="2"/>
          <table:table-cell office:value-type="float" office:value="0.000451732" calcext:value-type="float">
            <text:p>0,000451732</text:p>
          </table:table-cell>
        </table:table-row>
        <table:table-row table:style-name="ro1">
          <table:table-cell table:formula="of:=[.A302]+0.025" office:value-type="float" office:value="7.52500000000004" calcext:value-type="float">
            <text:p>7,52500000000004</text:p>
          </table:table-cell>
          <table:table-cell/>
          <table:table-cell office:value-type="float" office:value="0.00329585" calcext:value-type="float">
            <text:p>0,00329585</text:p>
          </table:table-cell>
          <table:table-cell table:number-columns-repeated="2"/>
          <table:table-cell office:value-type="float" office:value="0.0250089" calcext:value-type="float">
            <text:p>0,0250089</text:p>
          </table:table-cell>
          <table:table-cell table:number-columns-repeated="2"/>
          <table:table-cell office:value-type="float" office:value="0.000450433" calcext:value-type="float">
            <text:p>0,000450433</text:p>
          </table:table-cell>
        </table:table-row>
        <table:table-row table:style-name="ro1">
          <table:table-cell table:formula="of:=[.A303]+0.025" office:value-type="float" office:value="7.55000000000004" calcext:value-type="float">
            <text:p>7,55000000000004</text:p>
          </table:table-cell>
          <table:table-cell/>
          <table:table-cell office:value-type="float" office:value="0.00328679" calcext:value-type="float">
            <text:p>0,00328679</text:p>
          </table:table-cell>
          <table:table-cell table:number-columns-repeated="2"/>
          <table:table-cell office:value-type="float" office:value="0.0249368" calcext:value-type="float">
            <text:p>0,0249368</text:p>
          </table:table-cell>
          <table:table-cell table:number-columns-repeated="2"/>
          <table:table-cell office:value-type="float" office:value="0.000449142" calcext:value-type="float">
            <text:p>0,000449142</text:p>
          </table:table-cell>
        </table:table-row>
        <table:table-row table:style-name="ro1">
          <table:table-cell table:formula="of:=[.A304]+0.025" office:value-type="float" office:value="7.57500000000004" calcext:value-type="float">
            <text:p>7,57500000000004</text:p>
          </table:table-cell>
          <table:table-cell/>
          <table:table-cell office:value-type="float" office:value="0.00327779" calcext:value-type="float">
            <text:p>0,00327779</text:p>
          </table:table-cell>
          <table:table-cell table:number-columns-repeated="2"/>
          <table:table-cell office:value-type="float" office:value="0.0248653" calcext:value-type="float">
            <text:p>0,0248653</text:p>
          </table:table-cell>
          <table:table-cell table:number-columns-repeated="2"/>
          <table:table-cell office:value-type="float" office:value="0.000447861" calcext:value-type="float">
            <text:p>0,000447861</text:p>
          </table:table-cell>
        </table:table-row>
        <table:table-row table:style-name="ro1">
          <table:table-cell table:formula="of:=[.A305]+0.025" office:value-type="float" office:value="7.60000000000004" calcext:value-type="float">
            <text:p>7,60000000000004</text:p>
          </table:table-cell>
          <table:table-cell/>
          <table:table-cell office:value-type="float" office:value="0.00326885" calcext:value-type="float">
            <text:p>0,00326885</text:p>
          </table:table-cell>
          <table:table-cell table:number-columns-repeated="2"/>
          <table:table-cell office:value-type="float" office:value="0.0247943" calcext:value-type="float">
            <text:p>0,0247943</text:p>
          </table:table-cell>
          <table:table-cell table:number-columns-repeated="2"/>
          <table:table-cell office:value-type="float" office:value="0.00044659" calcext:value-type="float">
            <text:p>0,00044659</text:p>
          </table:table-cell>
        </table:table-row>
        <table:table-row table:style-name="ro1">
          <table:table-cell table:formula="of:=[.A306]+0.025" office:value-type="float" office:value="7.62500000000004" calcext:value-type="float">
            <text:p>7,62500000000004</text:p>
          </table:table-cell>
          <table:table-cell/>
          <table:table-cell office:value-type="float" office:value="0.00325996" calcext:value-type="float">
            <text:p>0,00325996</text:p>
          </table:table-cell>
          <table:table-cell table:number-columns-repeated="2"/>
          <table:table-cell office:value-type="float" office:value="0.0247237" calcext:value-type="float">
            <text:p>0,0247237</text:p>
          </table:table-cell>
          <table:table-cell table:number-columns-repeated="2"/>
          <table:table-cell office:value-type="float" office:value="0.000445326" calcext:value-type="float">
            <text:p>0,000445326</text:p>
          </table:table-cell>
        </table:table-row>
        <table:table-row table:style-name="ro1">
          <table:table-cell table:formula="of:=[.A307]+0.025" office:value-type="float" office:value="7.65000000000004" calcext:value-type="float">
            <text:p>7,65000000000004</text:p>
          </table:table-cell>
          <table:table-cell/>
          <table:table-cell office:value-type="float" office:value="0.00325114" calcext:value-type="float">
            <text:p>0,00325114</text:p>
          </table:table-cell>
          <table:table-cell table:number-columns-repeated="2"/>
          <table:table-cell office:value-type="float" office:value="0.0246536" calcext:value-type="float">
            <text:p>0,0246536</text:p>
          </table:table-cell>
          <table:table-cell table:number-columns-repeated="2"/>
          <table:table-cell office:value-type="float" office:value="0.000444071" calcext:value-type="float">
            <text:p>0,000444071</text:p>
          </table:table-cell>
        </table:table-row>
        <table:table-row table:style-name="ro1">
          <table:table-cell table:formula="of:=[.A308]+0.025" office:value-type="float" office:value="7.67500000000004" calcext:value-type="float">
            <text:p>7,67500000000004</text:p>
          </table:table-cell>
          <table:table-cell/>
          <table:table-cell office:value-type="float" office:value="0.00324238" calcext:value-type="float">
            <text:p>0,00324238</text:p>
          </table:table-cell>
          <table:table-cell table:number-columns-repeated="2"/>
          <table:table-cell office:value-type="float" office:value="0.024584" calcext:value-type="float">
            <text:p>0,024584</text:p>
          </table:table-cell>
          <table:table-cell table:number-columns-repeated="2"/>
          <table:table-cell office:value-type="float" office:value="0.000442826" calcext:value-type="float">
            <text:p>0,000442826</text:p>
          </table:table-cell>
        </table:table-row>
        <table:table-row table:style-name="ro1">
          <table:table-cell table:formula="of:=[.A309]+0.025" office:value-type="float" office:value="7.70000000000004" calcext:value-type="float">
            <text:p>7,70000000000004</text:p>
          </table:table-cell>
          <table:table-cell/>
          <table:table-cell office:value-type="float" office:value="0.00323365" calcext:value-type="float">
            <text:p>0,00323365</text:p>
          </table:table-cell>
          <table:table-cell table:number-columns-repeated="2"/>
          <table:table-cell office:value-type="float" office:value="0.0245147" calcext:value-type="float">
            <text:p>0,0245147</text:p>
          </table:table-cell>
          <table:table-cell table:number-columns-repeated="2"/>
          <table:table-cell office:value-type="float" office:value="0.000441587" calcext:value-type="float">
            <text:p>0,000441587</text:p>
          </table:table-cell>
        </table:table-row>
        <table:table-row table:style-name="ro1">
          <table:table-cell table:formula="of:=[.A310]+0.025" office:value-type="float" office:value="7.72500000000004" calcext:value-type="float">
            <text:p>7,72500000000004</text:p>
          </table:table-cell>
          <table:table-cell/>
          <table:table-cell office:value-type="float" office:value="0.003225" calcext:value-type="float">
            <text:p>0,003225</text:p>
          </table:table-cell>
          <table:table-cell table:number-columns-repeated="2"/>
          <table:table-cell office:value-type="float" office:value="0.0244461" calcext:value-type="float">
            <text:p>0,0244461</text:p>
          </table:table-cell>
          <table:table-cell table:number-columns-repeated="2"/>
          <table:table-cell office:value-type="float" office:value="0.000440359" calcext:value-type="float">
            <text:p>0,000440359</text:p>
          </table:table-cell>
        </table:table-row>
        <table:table-row table:style-name="ro1">
          <table:table-cell table:formula="of:=[.A311]+0.025" office:value-type="float" office:value="7.75000000000004" calcext:value-type="float">
            <text:p>7,75000000000004</text:p>
          </table:table-cell>
          <table:table-cell/>
          <table:table-cell office:value-type="float" office:value="0.0032164" calcext:value-type="float">
            <text:p>0,0032164</text:p>
          </table:table-cell>
          <table:table-cell table:number-columns-repeated="2"/>
          <table:table-cell office:value-type="float" office:value="0.0243777" calcext:value-type="float">
            <text:p>0,0243777</text:p>
          </table:table-cell>
          <table:table-cell table:number-columns-repeated="2"/>
          <table:table-cell office:value-type="float" office:value="0.000439139" calcext:value-type="float">
            <text:p>0,000439139</text:p>
          </table:table-cell>
        </table:table-row>
        <table:table-row table:style-name="ro1">
          <table:table-cell table:formula="of:=[.A312]+0.025" office:value-type="float" office:value="7.77500000000004" calcext:value-type="float">
            <text:p>7,77500000000004</text:p>
          </table:table-cell>
          <table:table-cell/>
          <table:table-cell office:value-type="float" office:value="0.00320784" calcext:value-type="float">
            <text:p>0,00320784</text:p>
          </table:table-cell>
          <table:table-cell table:number-columns-repeated="2"/>
          <table:table-cell office:value-type="float" office:value="0.0243098" calcext:value-type="float">
            <text:p>0,0243098</text:p>
          </table:table-cell>
          <table:table-cell table:number-columns-repeated="2"/>
          <table:table-cell office:value-type="float" office:value="0.000437926" calcext:value-type="float">
            <text:p>0,000437926</text:p>
          </table:table-cell>
        </table:table-row>
        <table:table-row table:style-name="ro1">
          <table:table-cell table:formula="of:=[.A313]+0.025" office:value-type="float" office:value="7.80000000000004" calcext:value-type="float">
            <text:p>7,80000000000004</text:p>
          </table:table-cell>
          <table:table-cell/>
          <table:table-cell office:value-type="float" office:value="0.00319935" calcext:value-type="float">
            <text:p>0,00319935</text:p>
          </table:table-cell>
          <table:table-cell table:number-columns-repeated="2"/>
          <table:table-cell office:value-type="float" office:value="0.0242424" calcext:value-type="float">
            <text:p>0,0242424</text:p>
          </table:table-cell>
          <table:table-cell table:number-columns-repeated="2"/>
          <table:table-cell office:value-type="float" office:value="0.000436722" calcext:value-type="float">
            <text:p>0,000436722</text:p>
          </table:table-cell>
        </table:table-row>
        <table:table-row table:style-name="ro1">
          <table:table-cell table:formula="of:=[.A314]+0.025" office:value-type="float" office:value="7.82500000000004" calcext:value-type="float">
            <text:p>7,82500000000004</text:p>
          </table:table-cell>
          <table:table-cell/>
          <table:table-cell office:value-type="float" office:value="0.00319092" calcext:value-type="float">
            <text:p>0,00319092</text:p>
          </table:table-cell>
          <table:table-cell table:number-columns-repeated="2"/>
          <table:table-cell office:value-type="float" office:value="0.0241754" calcext:value-type="float">
            <text:p>0,0241754</text:p>
          </table:table-cell>
          <table:table-cell table:number-columns-repeated="2"/>
          <table:table-cell office:value-type="float" office:value="0.000435526" calcext:value-type="float">
            <text:p>0,000435526</text:p>
          </table:table-cell>
        </table:table-row>
        <table:table-row table:style-name="ro1">
          <table:table-cell table:formula="of:=[.A315]+0.025" office:value-type="float" office:value="7.85000000000004" calcext:value-type="float">
            <text:p>7,85000000000004</text:p>
          </table:table-cell>
          <table:table-cell/>
          <table:table-cell office:value-type="float" office:value="0.00318252" calcext:value-type="float">
            <text:p>0,00318252</text:p>
          </table:table-cell>
          <table:table-cell table:number-columns-repeated="2"/>
          <table:table-cell office:value-type="float" office:value="0.0241087" calcext:value-type="float">
            <text:p>0,0241087</text:p>
          </table:table-cell>
          <table:table-cell table:number-columns-repeated="2"/>
          <table:table-cell office:value-type="float" office:value="0.000434337" calcext:value-type="float">
            <text:p>0,000434337</text:p>
          </table:table-cell>
        </table:table-row>
        <table:table-row table:style-name="ro1">
          <table:table-cell table:formula="of:=[.A316]+0.025" office:value-type="float" office:value="7.87500000000004" calcext:value-type="float">
            <text:p>7,87500000000004</text:p>
          </table:table-cell>
          <table:table-cell/>
          <table:table-cell office:value-type="float" office:value="0.00317419" calcext:value-type="float">
            <text:p>0,00317419</text:p>
          </table:table-cell>
          <table:table-cell table:number-columns-repeated="2"/>
          <table:table-cell office:value-type="float" office:value="0.0240426" calcext:value-type="float">
            <text:p>0,0240426</text:p>
          </table:table-cell>
          <table:table-cell table:number-columns-repeated="2"/>
          <table:table-cell office:value-type="float" office:value="0.000433158" calcext:value-type="float">
            <text:p>0,000433158</text:p>
          </table:table-cell>
        </table:table-row>
        <table:table-row table:style-name="ro1">
          <table:table-cell table:formula="of:=[.A317]+0.025" office:value-type="float" office:value="7.90000000000005" calcext:value-type="float">
            <text:p>7,90000000000005</text:p>
          </table:table-cell>
          <table:table-cell/>
          <table:table-cell office:value-type="float" office:value="0.00316591" calcext:value-type="float">
            <text:p>0,00316591</text:p>
          </table:table-cell>
          <table:table-cell table:number-columns-repeated="2"/>
          <table:table-cell office:value-type="float" office:value="0.023977" calcext:value-type="float">
            <text:p>0,023977</text:p>
          </table:table-cell>
          <table:table-cell table:number-columns-repeated="2"/>
          <table:table-cell office:value-type="float" office:value="0.000431985" calcext:value-type="float">
            <text:p>0,000431985</text:p>
          </table:table-cell>
        </table:table-row>
        <table:table-row table:style-name="ro1">
          <table:table-cell table:formula="of:=[.A318]+0.025" office:value-type="float" office:value="7.92500000000005" calcext:value-type="float">
            <text:p>7,92500000000005</text:p>
          </table:table-cell>
          <table:table-cell/>
          <table:table-cell office:value-type="float" office:value="0.00315767" calcext:value-type="float">
            <text:p>0,00315767</text:p>
          </table:table-cell>
          <table:table-cell table:number-columns-repeated="2"/>
          <table:table-cell office:value-type="float" office:value="0.0239115" calcext:value-type="float">
            <text:p>0,0239115</text:p>
          </table:table-cell>
          <table:table-cell table:number-columns-repeated="2"/>
          <table:table-cell office:value-type="float" office:value="0.00043082" calcext:value-type="float">
            <text:p>0,00043082</text:p>
          </table:table-cell>
        </table:table-row>
        <table:table-row table:style-name="ro1">
          <table:table-cell table:formula="of:=[.A319]+0.025" office:value-type="float" office:value="7.95000000000005" calcext:value-type="float">
            <text:p>7,95000000000005</text:p>
          </table:table-cell>
          <table:table-cell/>
          <table:table-cell office:value-type="float" office:value="0.00314949" calcext:value-type="float">
            <text:p>0,00314949</text:p>
          </table:table-cell>
          <table:table-cell table:number-columns-repeated="2"/>
          <table:table-cell office:value-type="float" office:value="0.0238467" calcext:value-type="float">
            <text:p>0,0238467</text:p>
          </table:table-cell>
          <table:table-cell table:number-columns-repeated="2"/>
          <table:table-cell office:value-type="float" office:value="0.000429663" calcext:value-type="float">
            <text:p>0,000429663</text:p>
          </table:table-cell>
        </table:table-row>
        <table:table-row table:style-name="ro1">
          <table:table-cell table:formula="of:=[.A320]+0.025" office:value-type="float" office:value="7.97500000000005" calcext:value-type="float">
            <text:p>7,97500000000005</text:p>
          </table:table-cell>
          <table:table-cell/>
          <table:table-cell office:value-type="float" office:value="0.00314137" calcext:value-type="float">
            <text:p>0,00314137</text:p>
          </table:table-cell>
          <table:table-cell table:number-columns-repeated="2"/>
          <table:table-cell office:value-type="float" office:value="0.0237822" calcext:value-type="float">
            <text:p>0,0237822</text:p>
          </table:table-cell>
          <table:table-cell table:number-columns-repeated="2"/>
          <table:table-cell office:value-type="float" office:value="0.000428514" calcext:value-type="float">
            <text:p>0,000428514</text:p>
          </table:table-cell>
        </table:table-row>
        <table:table-row table:style-name="ro1">
          <table:table-cell table:formula="of:=[.A321]+0.025" office:value-type="float" office:value="8.00000000000005" calcext:value-type="float">
            <text:p>8,00000000000005</text:p>
          </table:table-cell>
          <table:table-cell/>
          <table:table-cell office:value-type="float" office:value="0.00313328" calcext:value-type="float">
            <text:p>0,00313328</text:p>
          </table:table-cell>
          <table:table-cell table:number-columns-repeated="2"/>
          <table:table-cell office:value-type="float" office:value="0.023718" calcext:value-type="float">
            <text:p>0,023718</text:p>
          </table:table-cell>
          <table:table-cell table:number-columns-repeated="2"/>
          <table:table-cell office:value-type="float" office:value="0.000427371" calcext:value-type="float">
            <text:p>0,000427371</text:p>
          </table:table-cell>
        </table:table-row>
        <table:table-row table:style-name="ro1">
          <table:table-cell table:formula="of:=[.A322]+0.025" office:value-type="float" office:value="8.02500000000005" calcext:value-type="float">
            <text:p>8,02500000000005</text:p>
          </table:table-cell>
          <table:table-cell/>
          <table:table-cell office:value-type="float" office:value="0.00312525" calcext:value-type="float">
            <text:p>0,00312525</text:p>
          </table:table-cell>
          <table:table-cell table:number-columns-repeated="2"/>
          <table:table-cell office:value-type="float" office:value="0.0236543" calcext:value-type="float">
            <text:p>0,0236543</text:p>
          </table:table-cell>
          <table:table-cell table:number-columns-repeated="2"/>
          <table:table-cell office:value-type="float" office:value="0.000426237" calcext:value-type="float">
            <text:p>0,000426237</text:p>
          </table:table-cell>
        </table:table-row>
        <table:table-row table:style-name="ro1">
          <table:table-cell table:formula="of:=[.A323]+0.025" office:value-type="float" office:value="8.05000000000005" calcext:value-type="float">
            <text:p>8,05000000000005</text:p>
          </table:table-cell>
          <table:table-cell/>
          <table:table-cell office:value-type="float" office:value="0.00311727" calcext:value-type="float">
            <text:p>0,00311727</text:p>
          </table:table-cell>
          <table:table-cell table:number-columns-repeated="2"/>
          <table:table-cell office:value-type="float" office:value="0.0235911" calcext:value-type="float">
            <text:p>0,0235911</text:p>
          </table:table-cell>
          <table:table-cell table:number-columns-repeated="2"/>
          <table:table-cell office:value-type="float" office:value="0.00042511" calcext:value-type="float">
            <text:p>0,00042511</text:p>
          </table:table-cell>
        </table:table-row>
        <table:table-row table:style-name="ro1">
          <table:table-cell table:formula="of:=[.A324]+0.025" office:value-type="float" office:value="8.07500000000005" calcext:value-type="float">
            <text:p>8,07500000000005</text:p>
          </table:table-cell>
          <table:table-cell/>
          <table:table-cell office:value-type="float" office:value="0.00310932" calcext:value-type="float">
            <text:p>0,00310932</text:p>
          </table:table-cell>
          <table:table-cell table:number-columns-repeated="2"/>
          <table:table-cell office:value-type="float" office:value="0.023528" calcext:value-type="float">
            <text:p>0,023528</text:p>
          </table:table-cell>
          <table:table-cell table:number-columns-repeated="2"/>
          <table:table-cell office:value-type="float" office:value="0.000423989" calcext:value-type="float">
            <text:p>0,000423989</text:p>
          </table:table-cell>
        </table:table-row>
        <table:table-row table:style-name="ro1">
          <table:table-cell table:formula="of:=[.A325]+0.025" office:value-type="float" office:value="8.10000000000005" calcext:value-type="float">
            <text:p>8,10000000000005</text:p>
          </table:table-cell>
          <table:table-cell/>
          <table:table-cell office:value-type="float" office:value="0.00310143" calcext:value-type="float">
            <text:p>0,00310143</text:p>
          </table:table-cell>
          <table:table-cell table:number-columns-repeated="2"/>
          <table:table-cell office:value-type="float" office:value="0.0234655" calcext:value-type="float">
            <text:p>0,0234655</text:p>
          </table:table-cell>
          <table:table-cell table:number-columns-repeated="2"/>
          <table:table-cell office:value-type="float" office:value="0.000422877" calcext:value-type="float">
            <text:p>0,000422877</text:p>
          </table:table-cell>
        </table:table-row>
        <table:table-row table:style-name="ro1">
          <table:table-cell table:formula="of:=[.A326]+0.025" office:value-type="float" office:value="8.12500000000005" calcext:value-type="float">
            <text:p>8,12500000000005</text:p>
          </table:table-cell>
          <table:table-cell/>
          <table:table-cell office:value-type="float" office:value="0.0030936" calcext:value-type="float">
            <text:p>0,0030936</text:p>
          </table:table-cell>
          <table:table-cell table:number-columns-repeated="2"/>
          <table:table-cell office:value-type="float" office:value="0.0234034" calcext:value-type="float">
            <text:p>0,0234034</text:p>
          </table:table-cell>
          <table:table-cell table:number-columns-repeated="2"/>
          <table:table-cell office:value-type="float" office:value="0.000421772" calcext:value-type="float">
            <text:p>0,000421772</text:p>
          </table:table-cell>
        </table:table-row>
        <table:table-row table:style-name="ro1">
          <table:table-cell table:formula="of:=[.A327]+0.025" office:value-type="float" office:value="8.15000000000005" calcext:value-type="float">
            <text:p>8,15000000000005</text:p>
          </table:table-cell>
          <table:table-cell/>
          <table:table-cell office:value-type="float" office:value="0.0030858" calcext:value-type="float">
            <text:p>0,0030858</text:p>
          </table:table-cell>
          <table:table-cell table:number-columns-repeated="2"/>
          <table:table-cell office:value-type="float" office:value="0.0233415" calcext:value-type="float">
            <text:p>0,0233415</text:p>
          </table:table-cell>
          <table:table-cell table:number-columns-repeated="2"/>
          <table:table-cell office:value-type="float" office:value="0.000420673" calcext:value-type="float">
            <text:p>0,000420673</text:p>
          </table:table-cell>
        </table:table-row>
        <table:table-row table:style-name="ro1">
          <table:table-cell table:formula="of:=[.A328]+0.025" office:value-type="float" office:value="8.17500000000005" calcext:value-type="float">
            <text:p>8,17500000000005</text:p>
          </table:table-cell>
          <table:table-cell/>
          <table:table-cell office:value-type="float" office:value="0.00307806" calcext:value-type="float">
            <text:p>0,00307806</text:p>
          </table:table-cell>
          <table:table-cell table:number-columns-repeated="2"/>
          <table:table-cell office:value-type="float" office:value="0.0232802" calcext:value-type="float">
            <text:p>0,0232802</text:p>
          </table:table-cell>
          <table:table-cell table:number-columns-repeated="2"/>
          <table:table-cell office:value-type="float" office:value="0.000419581" calcext:value-type="float">
            <text:p>0,000419581</text:p>
          </table:table-cell>
        </table:table-row>
        <table:table-row table:style-name="ro1">
          <table:table-cell table:formula="of:=[.A329]+0.025" office:value-type="float" office:value="8.20000000000005" calcext:value-type="float">
            <text:p>8,20000000000005</text:p>
          </table:table-cell>
          <table:table-cell/>
          <table:table-cell office:value-type="float" office:value="0.00307036" calcext:value-type="float">
            <text:p>0,00307036</text:p>
          </table:table-cell>
          <table:table-cell table:number-columns-repeated="2"/>
          <table:table-cell office:value-type="float" office:value="0.0232191" calcext:value-type="float">
            <text:p>0,0232191</text:p>
          </table:table-cell>
          <table:table-cell table:number-columns-repeated="2"/>
          <table:table-cell office:value-type="float" office:value="0.000418497" calcext:value-type="float">
            <text:p>0,000418497</text:p>
          </table:table-cell>
        </table:table-row>
        <table:table-row table:style-name="ro1">
          <table:table-cell table:formula="of:=[.A330]+0.025" office:value-type="float" office:value="8.22500000000005" calcext:value-type="float">
            <text:p>8,22500000000005</text:p>
          </table:table-cell>
          <table:table-cell/>
          <table:table-cell office:value-type="float" office:value="0.0030627" calcext:value-type="float">
            <text:p>0,0030627</text:p>
          </table:table-cell>
          <table:table-cell table:number-columns-repeated="2"/>
          <table:table-cell office:value-type="float" office:value="0.0231585" calcext:value-type="float">
            <text:p>0,0231585</text:p>
          </table:table-cell>
          <table:table-cell table:number-columns-repeated="2"/>
          <table:table-cell office:value-type="float" office:value="0.000417419" calcext:value-type="float">
            <text:p>0,000417419</text:p>
          </table:table-cell>
        </table:table-row>
        <table:table-row table:style-name="ro1">
          <table:table-cell table:formula="of:=[.A331]+0.025" office:value-type="float" office:value="8.25000000000005" calcext:value-type="float">
            <text:p>8,25000000000005</text:p>
          </table:table-cell>
          <table:table-cell/>
          <table:table-cell office:value-type="float" office:value="0.00305509" calcext:value-type="float">
            <text:p>0,00305509</text:p>
          </table:table-cell>
          <table:table-cell table:number-columns-repeated="2"/>
          <table:table-cell office:value-type="float" office:value="0.0230981" calcext:value-type="float">
            <text:p>0,0230981</text:p>
          </table:table-cell>
          <table:table-cell table:number-columns-repeated="2"/>
          <table:table-cell office:value-type="float" office:value="0.000416348" calcext:value-type="float">
            <text:p>0,000416348</text:p>
          </table:table-cell>
        </table:table-row>
        <table:table-row table:style-name="ro1">
          <table:table-cell table:formula="of:=[.A332]+0.025" office:value-type="float" office:value="8.27500000000005" calcext:value-type="float">
            <text:p>8,27500000000005</text:p>
          </table:table-cell>
          <table:table-cell/>
          <table:table-cell office:value-type="float" office:value="0.00304753" calcext:value-type="float">
            <text:p>0,00304753</text:p>
          </table:table-cell>
          <table:table-cell table:number-columns-repeated="2"/>
          <table:table-cell office:value-type="float" office:value="0.0230382" calcext:value-type="float">
            <text:p>0,0230382</text:p>
          </table:table-cell>
          <table:table-cell table:number-columns-repeated="2"/>
          <table:table-cell office:value-type="float" office:value="0.000415284" calcext:value-type="float">
            <text:p>0,000415284</text:p>
          </table:table-cell>
        </table:table-row>
        <table:table-row table:style-name="ro1">
          <table:table-cell table:formula="of:=[.A333]+0.025" office:value-type="float" office:value="8.30000000000005" calcext:value-type="float">
            <text:p>8,30000000000005</text:p>
          </table:table-cell>
          <table:table-cell/>
          <table:table-cell office:value-type="float" office:value="0.00304" calcext:value-type="float">
            <text:p>0,00304</text:p>
          </table:table-cell>
          <table:table-cell table:number-columns-repeated="2"/>
          <table:table-cell office:value-type="float" office:value="0.0229786" calcext:value-type="float">
            <text:p>0,0229786</text:p>
          </table:table-cell>
          <table:table-cell table:number-columns-repeated="2"/>
          <table:table-cell office:value-type="float" office:value="0.000414226" calcext:value-type="float">
            <text:p>0,000414226</text:p>
          </table:table-cell>
        </table:table-row>
        <table:table-row table:style-name="ro1">
          <table:table-cell table:formula="of:=[.A334]+0.025" office:value-type="float" office:value="8.32500000000005" calcext:value-type="float">
            <text:p>8,32500000000005</text:p>
          </table:table-cell>
          <table:table-cell/>
          <table:table-cell office:value-type="float" office:value="0.00303253" calcext:value-type="float">
            <text:p>0,00303253</text:p>
          </table:table-cell>
          <table:table-cell table:number-columns-repeated="2"/>
          <table:table-cell office:value-type="float" office:value="0.0229194" calcext:value-type="float">
            <text:p>0,0229194</text:p>
          </table:table-cell>
          <table:table-cell table:number-columns-repeated="2"/>
          <table:table-cell office:value-type="float" office:value="0.000413175" calcext:value-type="float">
            <text:p>0,000413175</text:p>
          </table:table-cell>
        </table:table-row>
        <table:table-row table:style-name="ro1">
          <table:table-cell table:formula="of:=[.A335]+0.025" office:value-type="float" office:value="8.35000000000005" calcext:value-type="float">
            <text:p>8,35000000000005</text:p>
          </table:table-cell>
          <table:table-cell/>
          <table:table-cell office:value-type="float" office:value="0.0030251" calcext:value-type="float">
            <text:p>0,0030251</text:p>
          </table:table-cell>
          <table:table-cell table:number-columns-repeated="2"/>
          <table:table-cell office:value-type="float" office:value="0.0228606" calcext:value-type="float">
            <text:p>0,0228606</text:p>
          </table:table-cell>
          <table:table-cell table:number-columns-repeated="2"/>
          <table:table-cell office:value-type="float" office:value="0.000412131" calcext:value-type="float">
            <text:p>0,000412131</text:p>
          </table:table-cell>
        </table:table-row>
        <table:table-row table:style-name="ro1">
          <table:table-cell table:formula="of:=[.A336]+0.025" office:value-type="float" office:value="8.37500000000005" calcext:value-type="float">
            <text:p>8,37500000000005</text:p>
          </table:table-cell>
          <table:table-cell/>
          <table:table-cell office:value-type="float" office:value="0.0030177" calcext:value-type="float">
            <text:p>0,0030177</text:p>
          </table:table-cell>
          <table:table-cell table:number-columns-repeated="2"/>
          <table:table-cell office:value-type="float" office:value="0.022802" calcext:value-type="float">
            <text:p>0,022802</text:p>
          </table:table-cell>
          <table:table-cell table:number-columns-repeated="2"/>
          <table:table-cell office:value-type="float" office:value="0.000411092" calcext:value-type="float">
            <text:p>0,000411092</text:p>
          </table:table-cell>
        </table:table-row>
        <table:table-row table:style-name="ro1">
          <table:table-cell table:formula="of:=[.A337]+0.025" office:value-type="float" office:value="8.40000000000005" calcext:value-type="float">
            <text:p>8,40000000000005</text:p>
          </table:table-cell>
          <table:table-cell/>
          <table:table-cell office:value-type="float" office:value="0.00301036" calcext:value-type="float">
            <text:p>0,00301036</text:p>
          </table:table-cell>
          <table:table-cell table:number-columns-repeated="2"/>
          <table:table-cell office:value-type="float" office:value="0.0227438" calcext:value-type="float">
            <text:p>0,0227438</text:p>
          </table:table-cell>
          <table:table-cell table:number-columns-repeated="2"/>
          <table:table-cell office:value-type="float" office:value="0.000410061" calcext:value-type="float">
            <text:p>0,000410061</text:p>
          </table:table-cell>
        </table:table-row>
        <table:table-row table:style-name="ro1">
          <table:table-cell table:formula="of:=[.A338]+0.025" office:value-type="float" office:value="8.42500000000005" calcext:value-type="float">
            <text:p>8,42500000000005</text:p>
          </table:table-cell>
          <table:table-cell/>
          <table:table-cell office:value-type="float" office:value="0.00300306" calcext:value-type="float">
            <text:p>0,00300306</text:p>
          </table:table-cell>
          <table:table-cell table:number-columns-repeated="2"/>
          <table:table-cell office:value-type="float" office:value="0.022686" calcext:value-type="float">
            <text:p>0,022686</text:p>
          </table:table-cell>
          <table:table-cell table:number-columns-repeated="2"/>
          <table:table-cell office:value-type="float" office:value="0.000409037" calcext:value-type="float">
            <text:p>0,000409037</text:p>
          </table:table-cell>
        </table:table-row>
        <table:table-row table:style-name="ro1">
          <table:table-cell table:formula="of:=[.A339]+0.025" office:value-type="float" office:value="8.45000000000005" calcext:value-type="float">
            <text:p>8,45000000000005</text:p>
          </table:table-cell>
          <table:table-cell/>
          <table:table-cell office:value-type="float" office:value="0.00299579" calcext:value-type="float">
            <text:p>0,00299579</text:p>
          </table:table-cell>
          <table:table-cell table:number-columns-repeated="2"/>
          <table:table-cell office:value-type="float" office:value="0.0226285" calcext:value-type="float">
            <text:p>0,0226285</text:p>
          </table:table-cell>
          <table:table-cell table:number-columns-repeated="2"/>
          <table:table-cell office:value-type="float" office:value="0.000408017" calcext:value-type="float">
            <text:p>0,000408017</text:p>
          </table:table-cell>
        </table:table-row>
        <table:table-row table:style-name="ro1">
          <table:table-cell table:formula="of:=[.A340]+0.025" office:value-type="float" office:value="8.47500000000005" calcext:value-type="float">
            <text:p>8,47500000000005</text:p>
          </table:table-cell>
          <table:table-cell/>
          <table:table-cell office:value-type="float" office:value="0.00298857" calcext:value-type="float">
            <text:p>0,00298857</text:p>
          </table:table-cell>
          <table:table-cell table:number-columns-repeated="2"/>
          <table:table-cell office:value-type="float" office:value="0.0225713" calcext:value-type="float">
            <text:p>0,0225713</text:p>
          </table:table-cell>
          <table:table-cell table:number-columns-repeated="2"/>
          <table:table-cell office:value-type="float" office:value="0.000407004" calcext:value-type="float">
            <text:p>0,000407004</text:p>
          </table:table-cell>
        </table:table-row>
        <table:table-row table:style-name="ro1">
          <table:table-cell table:formula="of:=[.A341]+0.025" office:value-type="float" office:value="8.50000000000005" calcext:value-type="float">
            <text:p>8,50000000000005</text:p>
          </table:table-cell>
          <table:table-cell/>
          <table:table-cell office:value-type="float" office:value="0.0029814" calcext:value-type="float">
            <text:p>0,0029814</text:p>
          </table:table-cell>
          <table:table-cell table:number-columns-repeated="2"/>
          <table:table-cell office:value-type="float" office:value="0.0225145" calcext:value-type="float">
            <text:p>0,0225145</text:p>
          </table:table-cell>
          <table:table-cell table:number-columns-repeated="2"/>
          <table:table-cell office:value-type="float" office:value="0.000405998" calcext:value-type="float">
            <text:p>0,000405998</text:p>
          </table:table-cell>
        </table:table-row>
        <table:table-row table:style-name="ro1">
          <table:table-cell table:formula="of:=[.A342]+0.025" office:value-type="float" office:value="8.52500000000005" calcext:value-type="float">
            <text:p>8,52500000000005</text:p>
          </table:table-cell>
          <table:table-cell/>
          <table:table-cell office:value-type="float" office:value="0.00297425" calcext:value-type="float">
            <text:p>0,00297425</text:p>
          </table:table-cell>
          <table:table-cell table:number-columns-repeated="2"/>
          <table:table-cell office:value-type="float" office:value="0.0224579" calcext:value-type="float">
            <text:p>0,0224579</text:p>
          </table:table-cell>
          <table:table-cell table:number-columns-repeated="2"/>
          <table:table-cell office:value-type="float" office:value="0.000404996" calcext:value-type="float">
            <text:p>0,000404996</text:p>
          </table:table-cell>
        </table:table-row>
        <table:table-row table:style-name="ro1">
          <table:table-cell table:formula="of:=[.A343]+0.025" office:value-type="float" office:value="8.55000000000005" calcext:value-type="float">
            <text:p>8,55000000000005</text:p>
          </table:table-cell>
          <table:table-cell/>
          <table:table-cell office:value-type="float" office:value="0.00296716" calcext:value-type="float">
            <text:p>0,00296716</text:p>
          </table:table-cell>
          <table:table-cell table:number-columns-repeated="2"/>
          <table:table-cell office:value-type="float" office:value="0.0224018" calcext:value-type="float">
            <text:p>0,0224018</text:p>
          </table:table-cell>
          <table:table-cell table:number-columns-repeated="2"/>
          <table:table-cell office:value-type="float" office:value="0.000404002" calcext:value-type="float">
            <text:p>0,000404002</text:p>
          </table:table-cell>
        </table:table-row>
        <table:table-row table:style-name="ro1">
          <table:table-cell table:formula="of:=[.A344]+0.025" office:value-type="float" office:value="8.57500000000005" calcext:value-type="float">
            <text:p>8,57500000000005</text:p>
          </table:table-cell>
          <table:table-cell/>
          <table:table-cell office:value-type="float" office:value="0.00296011" calcext:value-type="float">
            <text:p>0,00296011</text:p>
          </table:table-cell>
          <table:table-cell table:number-columns-repeated="2"/>
          <table:table-cell office:value-type="float" office:value="0.022346" calcext:value-type="float">
            <text:p>0,022346</text:p>
          </table:table-cell>
          <table:table-cell table:number-columns-repeated="2"/>
          <table:table-cell office:value-type="float" office:value="0.000403014" calcext:value-type="float">
            <text:p>0,000403014</text:p>
          </table:table-cell>
        </table:table-row>
        <table:table-row table:style-name="ro1">
          <table:table-cell table:formula="of:=[.A345]+0.025" office:value-type="float" office:value="8.60000000000006" calcext:value-type="float">
            <text:p>8,60000000000006</text:p>
          </table:table-cell>
          <table:table-cell/>
          <table:table-cell office:value-type="float" office:value="0.00295308" calcext:value-type="float">
            <text:p>0,00295308</text:p>
          </table:table-cell>
          <table:table-cell table:number-columns-repeated="2"/>
          <table:table-cell office:value-type="float" office:value="0.0222903" calcext:value-type="float">
            <text:p>0,0222903</text:p>
          </table:table-cell>
          <table:table-cell table:number-columns-repeated="2"/>
          <table:table-cell office:value-type="float" office:value="0.00040203" calcext:value-type="float">
            <text:p>0,00040203</text:p>
          </table:table-cell>
        </table:table-row>
        <table:table-row table:style-name="ro1">
          <table:table-cell table:formula="of:=[.A346]+0.025" office:value-type="float" office:value="8.62500000000006" calcext:value-type="float">
            <text:p>8,62500000000006</text:p>
          </table:table-cell>
          <table:table-cell/>
          <table:table-cell office:value-type="float" office:value="0.0029461" calcext:value-type="float">
            <text:p>0,0029461</text:p>
          </table:table-cell>
          <table:table-cell table:number-columns-repeated="2"/>
          <table:table-cell office:value-type="float" office:value="0.0222352" calcext:value-type="float">
            <text:p>0,0222352</text:p>
          </table:table-cell>
          <table:table-cell table:number-columns-repeated="2"/>
          <table:table-cell office:value-type="float" office:value="0.000401054" calcext:value-type="float">
            <text:p>0,000401054</text:p>
          </table:table-cell>
        </table:table-row>
        <table:table-row table:style-name="ro1">
          <table:table-cell table:formula="of:=[.A347]+0.025" office:value-type="float" office:value="8.65000000000006" calcext:value-type="float">
            <text:p>8,65000000000006</text:p>
          </table:table-cell>
          <table:table-cell/>
          <table:table-cell office:value-type="float" office:value="0.00293917" calcext:value-type="float">
            <text:p>0,00293917</text:p>
          </table:table-cell>
          <table:table-cell table:number-columns-repeated="2"/>
          <table:table-cell office:value-type="float" office:value="0.0221803" calcext:value-type="float">
            <text:p>0,0221803</text:p>
          </table:table-cell>
          <table:table-cell table:number-columns-repeated="2"/>
          <table:table-cell office:value-type="float" office:value="0.000400083" calcext:value-type="float">
            <text:p>0,000400083</text:p>
          </table:table-cell>
        </table:table-row>
        <table:table-row table:style-name="ro1">
          <table:table-cell table:formula="of:=[.A348]+0.025" office:value-type="float" office:value="8.67500000000006" calcext:value-type="float">
            <text:p>8,67500000000006</text:p>
          </table:table-cell>
          <table:table-cell/>
          <table:table-cell office:value-type="float" office:value="0.00293226" calcext:value-type="float">
            <text:p>0,00293226</text:p>
          </table:table-cell>
          <table:table-cell table:number-columns-repeated="2"/>
          <table:table-cell office:value-type="float" office:value="0.0221257" calcext:value-type="float">
            <text:p>0,0221257</text:p>
          </table:table-cell>
          <table:table-cell table:number-columns-repeated="2"/>
          <table:table-cell office:value-type="float" office:value="0.000399117" calcext:value-type="float">
            <text:p>0,000399117</text:p>
          </table:table-cell>
        </table:table-row>
        <table:table-row table:style-name="ro1">
          <table:table-cell table:formula="of:=[.A349]+0.025" office:value-type="float" office:value="8.70000000000006" calcext:value-type="float">
            <text:p>8,70000000000006</text:p>
          </table:table-cell>
          <table:table-cell/>
          <table:table-cell office:value-type="float" office:value="0.00292541" calcext:value-type="float">
            <text:p>0,00292541</text:p>
          </table:table-cell>
          <table:table-cell table:number-columns-repeated="2"/>
          <table:table-cell office:value-type="float" office:value="0.0220714" calcext:value-type="float">
            <text:p>0,0220714</text:p>
          </table:table-cell>
          <table:table-cell table:number-columns-repeated="2"/>
          <table:table-cell office:value-type="float" office:value="0.000398158" calcext:value-type="float">
            <text:p>0,000398158</text:p>
          </table:table-cell>
        </table:table-row>
        <table:table-row table:style-name="ro1">
          <table:table-cell table:formula="of:=[.A350]+0.025" office:value-type="float" office:value="8.72500000000006" calcext:value-type="float">
            <text:p>8,72500000000006</text:p>
          </table:table-cell>
          <table:table-cell/>
          <table:table-cell office:value-type="float" office:value="0.00291858" calcext:value-type="float">
            <text:p>0,00291858</text:p>
          </table:table-cell>
          <table:table-cell table:number-columns-repeated="2"/>
          <table:table-cell office:value-type="float" office:value="0.0220174" calcext:value-type="float">
            <text:p>0,0220174</text:p>
          </table:table-cell>
          <table:table-cell table:number-columns-repeated="2"/>
          <table:table-cell office:value-type="float" office:value="0.000397205" calcext:value-type="float">
            <text:p>0,000397205</text:p>
          </table:table-cell>
        </table:table-row>
        <table:table-row table:style-name="ro1">
          <table:table-cell table:formula="of:=[.A351]+0.025" office:value-type="float" office:value="8.75000000000006" calcext:value-type="float">
            <text:p>8,75000000000006</text:p>
          </table:table-cell>
          <table:table-cell/>
          <table:table-cell office:value-type="float" office:value="0.00291179" calcext:value-type="float">
            <text:p>0,00291179</text:p>
          </table:table-cell>
          <table:table-cell table:number-columns-repeated="2"/>
          <table:table-cell office:value-type="float" office:value="0.0219637" calcext:value-type="float">
            <text:p>0,0219637</text:p>
          </table:table-cell>
          <table:table-cell table:number-columns-repeated="2"/>
          <table:table-cell office:value-type="float" office:value="0.000396255" calcext:value-type="float">
            <text:p>0,000396255</text:p>
          </table:table-cell>
        </table:table-row>
        <table:table-row table:style-name="ro1">
          <table:table-cell table:formula="of:=[.A352]+0.025" office:value-type="float" office:value="8.77500000000006" calcext:value-type="float">
            <text:p>8,77500000000006</text:p>
          </table:table-cell>
          <table:table-cell/>
          <table:table-cell office:value-type="float" office:value="0.00290505" calcext:value-type="float">
            <text:p>0,00290505</text:p>
          </table:table-cell>
          <table:table-cell table:number-columns-repeated="2"/>
          <table:table-cell office:value-type="float" office:value="0.0219104" calcext:value-type="float">
            <text:p>0,0219104</text:p>
          </table:table-cell>
          <table:table-cell table:number-columns-repeated="2"/>
          <table:table-cell office:value-type="float" office:value="0.000395313" calcext:value-type="float">
            <text:p>0,000395313</text:p>
          </table:table-cell>
        </table:table-row>
        <table:table-row table:style-name="ro1">
          <table:table-cell table:formula="of:=[.A353]+0.025" office:value-type="float" office:value="8.80000000000006" calcext:value-type="float">
            <text:p>8,80000000000006</text:p>
          </table:table-cell>
          <table:table-cell/>
          <table:table-cell office:value-type="float" office:value="0.00289834" calcext:value-type="float">
            <text:p>0,00289834</text:p>
          </table:table-cell>
          <table:table-cell table:number-columns-repeated="2"/>
          <table:table-cell office:value-type="float" office:value="0.0218573" calcext:value-type="float">
            <text:p>0,0218573</text:p>
          </table:table-cell>
          <table:table-cell table:number-columns-repeated="2"/>
          <table:table-cell office:value-type="float" office:value="0.000394376" calcext:value-type="float">
            <text:p>0,000394376</text:p>
          </table:table-cell>
        </table:table-row>
        <table:table-row table:style-name="ro1">
          <table:table-cell table:formula="of:=[.A354]+0.025" office:value-type="float" office:value="8.82500000000006" calcext:value-type="float">
            <text:p>8,82500000000006</text:p>
          </table:table-cell>
          <table:table-cell/>
          <table:table-cell office:value-type="float" office:value="0.00289166" calcext:value-type="float">
            <text:p>0,00289166</text:p>
          </table:table-cell>
          <table:table-cell table:number-columns-repeated="2"/>
          <table:table-cell office:value-type="float" office:value="0.0218045" calcext:value-type="float">
            <text:p>0,0218045</text:p>
          </table:table-cell>
          <table:table-cell table:number-columns-repeated="2"/>
          <table:table-cell office:value-type="float" office:value="0.000393443" calcext:value-type="float">
            <text:p>0,000393443</text:p>
          </table:table-cell>
        </table:table-row>
        <table:table-row table:style-name="ro1">
          <table:table-cell table:formula="of:=[.A355]+0.025" office:value-type="float" office:value="8.85000000000006" calcext:value-type="float">
            <text:p>8,85000000000006</text:p>
          </table:table-cell>
          <table:table-cell/>
          <table:table-cell office:value-type="float" office:value="0.00288502" calcext:value-type="float">
            <text:p>0,00288502</text:p>
          </table:table-cell>
          <table:table-cell table:number-columns-repeated="2"/>
          <table:table-cell office:value-type="float" office:value="0.021752" calcext:value-type="float">
            <text:p>0,021752</text:p>
          </table:table-cell>
          <table:table-cell table:number-columns-repeated="2"/>
          <table:table-cell office:value-type="float" office:value="0.000392518" calcext:value-type="float">
            <text:p>0,000392518</text:p>
          </table:table-cell>
        </table:table-row>
        <table:table-row table:style-name="ro1">
          <table:table-cell table:formula="of:=[.A356]+0.025" office:value-type="float" office:value="8.87500000000006" calcext:value-type="float">
            <text:p>8,87500000000006</text:p>
          </table:table-cell>
          <table:table-cell/>
          <table:table-cell office:value-type="float" office:value="0.00287842" calcext:value-type="float">
            <text:p>0,00287842</text:p>
          </table:table-cell>
          <table:table-cell table:number-columns-repeated="2"/>
          <table:table-cell office:value-type="float" office:value="0.0216999" calcext:value-type="float">
            <text:p>0,0216999</text:p>
          </table:table-cell>
          <table:table-cell table:number-columns-repeated="2"/>
          <table:table-cell office:value-type="float" office:value="0.000391596" calcext:value-type="float">
            <text:p>0,000391596</text:p>
          </table:table-cell>
        </table:table-row>
        <table:table-row table:style-name="ro1">
          <table:table-cell table:formula="of:=[.A357]+0.025" office:value-type="float" office:value="8.90000000000006" calcext:value-type="float">
            <text:p>8,90000000000006</text:p>
          </table:table-cell>
          <table:table-cell/>
          <table:table-cell office:value-type="float" office:value="0.00287186" calcext:value-type="float">
            <text:p>0,00287186</text:p>
          </table:table-cell>
          <table:table-cell table:number-columns-repeated="2"/>
          <table:table-cell office:value-type="float" office:value="0.0216479" calcext:value-type="float">
            <text:p>0,0216479</text:p>
          </table:table-cell>
          <table:table-cell table:number-columns-repeated="2"/>
          <table:table-cell office:value-type="float" office:value="0.00039068" calcext:value-type="float">
            <text:p>0,00039068</text:p>
          </table:table-cell>
        </table:table-row>
        <table:table-row table:style-name="ro1">
          <table:table-cell table:formula="of:=[.A358]+0.025" office:value-type="float" office:value="8.92500000000006" calcext:value-type="float">
            <text:p>8,92500000000006</text:p>
          </table:table-cell>
          <table:table-cell/>
          <table:table-cell office:value-type="float" office:value="0.00286533" calcext:value-type="float">
            <text:p>0,00286533</text:p>
          </table:table-cell>
          <table:table-cell table:number-columns-repeated="2"/>
          <table:table-cell office:value-type="float" office:value="0.0215963" calcext:value-type="float">
            <text:p>0,0215963</text:p>
          </table:table-cell>
          <table:table-cell table:number-columns-repeated="2"/>
          <table:table-cell office:value-type="float" office:value="0.00038977" calcext:value-type="float">
            <text:p>0,00038977</text:p>
          </table:table-cell>
        </table:table-row>
        <table:table-row table:style-name="ro1">
          <table:table-cell table:formula="of:=[.A359]+0.025" office:value-type="float" office:value="8.95000000000006" calcext:value-type="float">
            <text:p>8,95000000000006</text:p>
          </table:table-cell>
          <table:table-cell/>
          <table:table-cell office:value-type="float" office:value="0.00285884" calcext:value-type="float">
            <text:p>0,00285884</text:p>
          </table:table-cell>
          <table:table-cell table:number-columns-repeated="2"/>
          <table:table-cell office:value-type="float" office:value="0.0215451" calcext:value-type="float">
            <text:p>0,0215451</text:p>
          </table:table-cell>
          <table:table-cell table:number-columns-repeated="2"/>
          <table:table-cell office:value-type="float" office:value="0.000388865" calcext:value-type="float">
            <text:p>0,000388865</text:p>
          </table:table-cell>
        </table:table-row>
        <table:table-row table:style-name="ro1">
          <table:table-cell table:formula="of:=[.A360]+0.025" office:value-type="float" office:value="8.97500000000006" calcext:value-type="float">
            <text:p>8,97500000000006</text:p>
          </table:table-cell>
          <table:table-cell/>
          <table:table-cell office:value-type="float" office:value="0.00285237" calcext:value-type="float">
            <text:p>0,00285237</text:p>
          </table:table-cell>
          <table:table-cell table:number-columns-repeated="2"/>
          <table:table-cell office:value-type="float" office:value="0.0214939" calcext:value-type="float">
            <text:p>0,0214939</text:p>
          </table:table-cell>
          <table:table-cell table:number-columns-repeated="2"/>
          <table:table-cell office:value-type="float" office:value="0.000387964" calcext:value-type="float">
            <text:p>0,000387964</text:p>
          </table:table-cell>
        </table:table-row>
        <table:table-row table:style-name="ro1">
          <table:table-cell table:formula="of:=[.A361]+0.025" office:value-type="float" office:value="9.00000000000006" calcext:value-type="float">
            <text:p>9,00000000000006</text:p>
          </table:table-cell>
          <table:table-cell/>
          <table:table-cell office:value-type="float" office:value="0.00284595" calcext:value-type="float">
            <text:p>0,00284595</text:p>
          </table:table-cell>
          <table:table-cell table:number-columns-repeated="2"/>
          <table:table-cell office:value-type="float" office:value="0.0214432" calcext:value-type="float">
            <text:p>0,0214432</text:p>
          </table:table-cell>
          <table:table-cell table:number-columns-repeated="2"/>
          <table:table-cell office:value-type="float" office:value="0.000387069" calcext:value-type="float">
            <text:p>0,000387069</text:p>
          </table:table-cell>
        </table:table-row>
        <table:table-row table:style-name="ro1">
          <table:table-cell table:formula="of:=[.A362]+0.025" office:value-type="float" office:value="9.02500000000006" calcext:value-type="float">
            <text:p>9,02500000000006</text:p>
          </table:table-cell>
          <table:table-cell/>
          <table:table-cell office:value-type="float" office:value="0.00283956" calcext:value-type="float">
            <text:p>0,00283956</text:p>
          </table:table-cell>
          <table:table-cell table:number-columns-repeated="2"/>
          <table:table-cell office:value-type="float" office:value="0.0213927" calcext:value-type="float">
            <text:p>0,0213927</text:p>
          </table:table-cell>
          <table:table-cell table:number-columns-repeated="2"/>
          <table:table-cell office:value-type="float" office:value="0.00038618" calcext:value-type="float">
            <text:p>0,00038618</text:p>
          </table:table-cell>
        </table:table-row>
        <table:table-row table:style-name="ro1">
          <table:table-cell table:formula="of:=[.A363]+0.025" office:value-type="float" office:value="9.05000000000006" calcext:value-type="float">
            <text:p>9,05000000000006</text:p>
          </table:table-cell>
          <table:table-cell/>
          <table:table-cell office:value-type="float" office:value="0.0028332" calcext:value-type="float">
            <text:p>0,0028332</text:p>
          </table:table-cell>
          <table:table-cell table:number-columns-repeated="2"/>
          <table:table-cell office:value-type="float" office:value="0.0213424" calcext:value-type="float">
            <text:p>0,0213424</text:p>
          </table:table-cell>
          <table:table-cell table:number-columns-repeated="2"/>
          <table:table-cell office:value-type="float" office:value="0.000385294" calcext:value-type="float">
            <text:p>0,000385294</text:p>
          </table:table-cell>
        </table:table-row>
        <table:table-row table:style-name="ro1">
          <table:table-cell table:formula="of:=[.A364]+0.025" office:value-type="float" office:value="9.07500000000006" calcext:value-type="float">
            <text:p>9,07500000000006</text:p>
          </table:table-cell>
          <table:table-cell/>
          <table:table-cell office:value-type="float" office:value="0.00282688" calcext:value-type="float">
            <text:p>0,00282688</text:p>
          </table:table-cell>
          <table:table-cell table:number-columns-repeated="2"/>
          <table:table-cell office:value-type="float" office:value="0.0212925" calcext:value-type="float">
            <text:p>0,0212925</text:p>
          </table:table-cell>
          <table:table-cell table:number-columns-repeated="2"/>
          <table:table-cell office:value-type="float" office:value="0.000384414" calcext:value-type="float">
            <text:p>0,000384414</text:p>
          </table:table-cell>
        </table:table-row>
        <table:table-row table:style-name="ro1">
          <table:table-cell table:formula="of:=[.A365]+0.025" office:value-type="float" office:value="9.10000000000006" calcext:value-type="float">
            <text:p>9,10000000000006</text:p>
          </table:table-cell>
          <table:table-cell/>
          <table:table-cell office:value-type="float" office:value="0.00282059" calcext:value-type="float">
            <text:p>0,00282059</text:p>
          </table:table-cell>
          <table:table-cell table:number-columns-repeated="2"/>
          <table:table-cell office:value-type="float" office:value="0.0212428" calcext:value-type="float">
            <text:p>0,0212428</text:p>
          </table:table-cell>
          <table:table-cell table:number-columns-repeated="2"/>
          <table:table-cell office:value-type="float" office:value="0.00038354" calcext:value-type="float">
            <text:p>0,00038354</text:p>
          </table:table-cell>
        </table:table-row>
        <table:table-row table:style-name="ro1">
          <table:table-cell table:formula="of:=[.A366]+0.025" office:value-type="float" office:value="9.12500000000006" calcext:value-type="float">
            <text:p>9,12500000000006</text:p>
          </table:table-cell>
          <table:table-cell/>
          <table:table-cell office:value-type="float" office:value="0.00281433" calcext:value-type="float">
            <text:p>0,00281433</text:p>
          </table:table-cell>
          <table:table-cell table:number-columns-repeated="2"/>
          <table:table-cell office:value-type="float" office:value="0.0211933" calcext:value-type="float">
            <text:p>0,0211933</text:p>
          </table:table-cell>
          <table:table-cell table:number-columns-repeated="2"/>
          <table:table-cell office:value-type="float" office:value="0.000382668" calcext:value-type="float">
            <text:p>0,000382668</text:p>
          </table:table-cell>
        </table:table-row>
        <table:table-row table:style-name="ro1">
          <table:table-cell table:formula="of:=[.A367]+0.025" office:value-type="float" office:value="9.15000000000006" calcext:value-type="float">
            <text:p>9,15000000000006</text:p>
          </table:table-cell>
          <table:table-cell/>
          <table:table-cell office:value-type="float" office:value="0.00280811" calcext:value-type="float">
            <text:p>0,00280811</text:p>
          </table:table-cell>
          <table:table-cell table:number-columns-repeated="2"/>
          <table:table-cell office:value-type="float" office:value="0.0211443" calcext:value-type="float">
            <text:p>0,0211443</text:p>
          </table:table-cell>
          <table:table-cell table:number-columns-repeated="2"/>
          <table:table-cell office:value-type="float" office:value="0.000381804" calcext:value-type="float">
            <text:p>0,000381804</text:p>
          </table:table-cell>
        </table:table-row>
        <table:table-row table:style-name="ro1">
          <table:table-cell table:formula="of:=[.A368]+0.025" office:value-type="float" office:value="9.17500000000006" calcext:value-type="float">
            <text:p>9,17500000000006</text:p>
          </table:table-cell>
          <table:table-cell/>
          <table:table-cell office:value-type="float" office:value="0.00280192" calcext:value-type="float">
            <text:p>0,00280192</text:p>
          </table:table-cell>
          <table:table-cell table:number-columns-repeated="2"/>
          <table:table-cell office:value-type="float" office:value="0.0210954" calcext:value-type="float">
            <text:p>0,0210954</text:p>
          </table:table-cell>
          <table:table-cell table:number-columns-repeated="2"/>
          <table:table-cell office:value-type="float" office:value="0.000380943" calcext:value-type="float">
            <text:p>0,000380943</text:p>
          </table:table-cell>
        </table:table-row>
        <table:table-row table:style-name="ro1">
          <table:table-cell table:formula="of:=[.A369]+0.025" office:value-type="float" office:value="9.20000000000006" calcext:value-type="float">
            <text:p>9,20000000000006</text:p>
          </table:table-cell>
          <table:table-cell/>
          <table:table-cell office:value-type="float" office:value="0.00279576" calcext:value-type="float">
            <text:p>0,00279576</text:p>
          </table:table-cell>
          <table:table-cell table:number-columns-repeated="2"/>
          <table:table-cell office:value-type="float" office:value="0.0210467" calcext:value-type="float">
            <text:p>0,0210467</text:p>
          </table:table-cell>
          <table:table-cell table:number-columns-repeated="2"/>
          <table:table-cell office:value-type="float" office:value="0.000380087" calcext:value-type="float">
            <text:p>0,000380087</text:p>
          </table:table-cell>
        </table:table-row>
        <table:table-row table:style-name="ro1">
          <table:table-cell table:formula="of:=[.A370]+0.025" office:value-type="float" office:value="9.22500000000006" calcext:value-type="float">
            <text:p>9,22500000000006</text:p>
          </table:table-cell>
          <table:table-cell/>
          <table:table-cell office:value-type="float" office:value="0.00278964" calcext:value-type="float">
            <text:p>0,00278964</text:p>
          </table:table-cell>
          <table:table-cell table:number-columns-repeated="2"/>
          <table:table-cell office:value-type="float" office:value="0.0209984" calcext:value-type="float">
            <text:p>0,0209984</text:p>
          </table:table-cell>
          <table:table-cell table:number-columns-repeated="2"/>
          <table:table-cell office:value-type="float" office:value="0.000379236" calcext:value-type="float">
            <text:p>0,000379236</text:p>
          </table:table-cell>
        </table:table-row>
        <table:table-row table:style-name="ro1">
          <table:table-cell table:formula="of:=[.A371]+0.025" office:value-type="float" office:value="9.25000000000006" calcext:value-type="float">
            <text:p>9,25000000000006</text:p>
          </table:table-cell>
          <table:table-cell/>
          <table:table-cell office:value-type="float" office:value="0.00278355" calcext:value-type="float">
            <text:p>0,00278355</text:p>
          </table:table-cell>
          <table:table-cell table:number-columns-repeated="2"/>
          <table:table-cell office:value-type="float" office:value="0.0209503" calcext:value-type="float">
            <text:p>0,0209503</text:p>
          </table:table-cell>
          <table:table-cell table:number-columns-repeated="2"/>
          <table:table-cell office:value-type="float" office:value="0.000378389" calcext:value-type="float">
            <text:p>0,000378389</text:p>
          </table:table-cell>
        </table:table-row>
        <table:table-row table:style-name="ro1">
          <table:table-cell table:formula="of:=[.A372]+0.025" office:value-type="float" office:value="9.27500000000006" calcext:value-type="float">
            <text:p>9,27500000000006</text:p>
          </table:table-cell>
          <table:table-cell/>
          <table:table-cell office:value-type="float" office:value="0.00277748" calcext:value-type="float">
            <text:p>0,00277748</text:p>
          </table:table-cell>
          <table:table-cell table:number-columns-repeated="2"/>
          <table:table-cell office:value-type="float" office:value="0.0209024" calcext:value-type="float">
            <text:p>0,0209024</text:p>
          </table:table-cell>
          <table:table-cell table:number-columns-repeated="2"/>
          <table:table-cell office:value-type="float" office:value="0.000377547" calcext:value-type="float">
            <text:p>0,000377547</text:p>
          </table:table-cell>
        </table:table-row>
        <table:table-row table:style-name="ro1">
          <table:table-cell table:formula="of:=[.A373]+0.025" office:value-type="float" office:value="9.30000000000007" calcext:value-type="float">
            <text:p>9,30000000000007</text:p>
          </table:table-cell>
          <table:table-cell/>
          <table:table-cell office:value-type="float" office:value="0.00277145" calcext:value-type="float">
            <text:p>0,00277145</text:p>
          </table:table-cell>
          <table:table-cell table:number-columns-repeated="2"/>
          <table:table-cell office:value-type="float" office:value="0.0208548" calcext:value-type="float">
            <text:p>0,0208548</text:p>
          </table:table-cell>
          <table:table-cell table:number-columns-repeated="2"/>
          <table:table-cell office:value-type="float" office:value="0.00037671" calcext:value-type="float">
            <text:p>0,00037671</text:p>
          </table:table-cell>
        </table:table-row>
        <table:table-row table:style-name="ro1">
          <table:table-cell table:formula="of:=[.A374]+0.025" office:value-type="float" office:value="9.32500000000007" calcext:value-type="float">
            <text:p>9,32500000000007</text:p>
          </table:table-cell>
          <table:table-cell/>
          <table:table-cell office:value-type="float" office:value="0.00276545" calcext:value-type="float">
            <text:p>0,00276545</text:p>
          </table:table-cell>
          <table:table-cell table:number-columns-repeated="2"/>
          <table:table-cell office:value-type="float" office:value="0.0208074" calcext:value-type="float">
            <text:p>0,0208074</text:p>
          </table:table-cell>
          <table:table-cell table:number-columns-repeated="2"/>
          <table:table-cell office:value-type="float" office:value="0.000375877" calcext:value-type="float">
            <text:p>0,000375877</text:p>
          </table:table-cell>
        </table:table-row>
        <table:table-row table:style-name="ro1">
          <table:table-cell table:formula="of:=[.A375]+0.025" office:value-type="float" office:value="9.35000000000007" calcext:value-type="float">
            <text:p>9,35000000000007</text:p>
          </table:table-cell>
          <table:table-cell/>
          <table:table-cell office:value-type="float" office:value="0.00275948" calcext:value-type="float">
            <text:p>0,00275948</text:p>
          </table:table-cell>
          <table:table-cell table:number-columns-repeated="2"/>
          <table:table-cell office:value-type="float" office:value="0.0207603" calcext:value-type="float">
            <text:p>0,0207603</text:p>
          </table:table-cell>
          <table:table-cell table:number-columns-repeated="2"/>
          <table:table-cell office:value-type="float" office:value="0.000375049" calcext:value-type="float">
            <text:p>0,000375049</text:p>
          </table:table-cell>
        </table:table-row>
        <table:table-row table:style-name="ro1">
          <table:table-cell table:formula="of:=[.A376]+0.025" office:value-type="float" office:value="9.37500000000007" calcext:value-type="float">
            <text:p>9,37500000000007</text:p>
          </table:table-cell>
          <table:table-cell/>
          <table:table-cell office:value-type="float" office:value="0.00275354" calcext:value-type="float">
            <text:p>0,00275354</text:p>
          </table:table-cell>
          <table:table-cell table:number-columns-repeated="2"/>
          <table:table-cell office:value-type="float" office:value="0.0207134" calcext:value-type="float">
            <text:p>0,0207134</text:p>
          </table:table-cell>
          <table:table-cell table:number-columns-repeated="2"/>
          <table:table-cell office:value-type="float" office:value="0.000374225" calcext:value-type="float">
            <text:p>0,000374225</text:p>
          </table:table-cell>
        </table:table-row>
        <table:table-row table:style-name="ro1">
          <table:table-cell table:formula="of:=[.A377]+0.025" office:value-type="float" office:value="9.40000000000007" calcext:value-type="float">
            <text:p>9,40000000000007</text:p>
          </table:table-cell>
          <table:table-cell/>
          <table:table-cell office:value-type="float" office:value="0.00274763" calcext:value-type="float">
            <text:p>0,00274763</text:p>
          </table:table-cell>
          <table:table-cell table:number-columns-repeated="2"/>
          <table:table-cell office:value-type="float" office:value="0.0206668" calcext:value-type="float">
            <text:p>0,0206668</text:p>
          </table:table-cell>
          <table:table-cell table:number-columns-repeated="2"/>
          <table:table-cell office:value-type="float" office:value="0.000373407" calcext:value-type="float">
            <text:p>0,000373407</text:p>
          </table:table-cell>
        </table:table-row>
        <table:table-row table:style-name="ro1">
          <table:table-cell table:formula="of:=[.A378]+0.025" office:value-type="float" office:value="9.42500000000007" calcext:value-type="float">
            <text:p>9,42500000000007</text:p>
          </table:table-cell>
          <table:table-cell/>
          <table:table-cell office:value-type="float" office:value="0.00274176" calcext:value-type="float">
            <text:p>0,00274176</text:p>
          </table:table-cell>
          <table:table-cell table:number-columns-repeated="2"/>
          <table:table-cell office:value-type="float" office:value="0.0206204" calcext:value-type="float">
            <text:p>0,0206204</text:p>
          </table:table-cell>
          <table:table-cell table:number-columns-repeated="2"/>
          <table:table-cell office:value-type="float" office:value="0.000372591" calcext:value-type="float">
            <text:p>0,000372591</text:p>
          </table:table-cell>
        </table:table-row>
        <table:table-row table:style-name="ro1">
          <table:table-cell table:formula="of:=[.A379]+0.025" office:value-type="float" office:value="9.45000000000007" calcext:value-type="float">
            <text:p>9,45000000000007</text:p>
          </table:table-cell>
          <table:table-cell/>
          <table:table-cell office:value-type="float" office:value="0.0027359" calcext:value-type="float">
            <text:p>0,0027359</text:p>
          </table:table-cell>
          <table:table-cell table:number-columns-repeated="2"/>
          <table:table-cell office:value-type="float" office:value="0.0205742" calcext:value-type="float">
            <text:p>0,0205742</text:p>
          </table:table-cell>
          <table:table-cell table:number-columns-repeated="2"/>
          <table:table-cell office:value-type="float" office:value="0.000371781" calcext:value-type="float">
            <text:p>0,000371781</text:p>
          </table:table-cell>
        </table:table-row>
        <table:table-row table:style-name="ro1">
          <table:table-cell table:formula="of:=[.A380]+0.025" office:value-type="float" office:value="9.47500000000007" calcext:value-type="float">
            <text:p>9,47500000000007</text:p>
          </table:table-cell>
          <table:table-cell/>
          <table:table-cell office:value-type="float" office:value="0.00273009" calcext:value-type="float">
            <text:p>0,00273009</text:p>
          </table:table-cell>
          <table:table-cell table:number-columns-repeated="2"/>
          <table:table-cell office:value-type="float" office:value="0.0205284" calcext:value-type="float">
            <text:p>0,0205284</text:p>
          </table:table-cell>
          <table:table-cell table:number-columns-repeated="2"/>
          <table:table-cell office:value-type="float" office:value="0.000370974" calcext:value-type="float">
            <text:p>0,000370974</text:p>
          </table:table-cell>
        </table:table-row>
        <table:table-row table:style-name="ro1">
          <table:table-cell table:formula="of:=[.A381]+0.025" office:value-type="float" office:value="9.50000000000007" calcext:value-type="float">
            <text:p>9,50000000000007</text:p>
          </table:table-cell>
          <table:table-cell/>
          <table:table-cell office:value-type="float" office:value="0.0027243" calcext:value-type="float">
            <text:p>0,0027243</text:p>
          </table:table-cell>
          <table:table-cell table:number-columns-repeated="2"/>
          <table:table-cell office:value-type="float" office:value="0.0204827" calcext:value-type="float">
            <text:p>0,0204827</text:p>
          </table:table-cell>
          <table:table-cell table:number-columns-repeated="2"/>
          <table:table-cell office:value-type="float" office:value="0.000370172" calcext:value-type="float">
            <text:p>0,000370172</text:p>
          </table:table-cell>
        </table:table-row>
        <table:table-row table:style-name="ro1">
          <table:table-cell table:formula="of:=[.A382]+0.025" office:value-type="float" office:value="9.52500000000007" calcext:value-type="float">
            <text:p>9,52500000000007</text:p>
          </table:table-cell>
          <table:table-cell/>
          <table:table-cell office:value-type="float" office:value="0.00271855" calcext:value-type="float">
            <text:p>0,00271855</text:p>
          </table:table-cell>
          <table:table-cell table:number-columns-repeated="2"/>
          <table:table-cell office:value-type="float" office:value="0.0204373" calcext:value-type="float">
            <text:p>0,0204373</text:p>
          </table:table-cell>
          <table:table-cell table:number-columns-repeated="2"/>
          <table:table-cell office:value-type="float" office:value="0.000369375" calcext:value-type="float">
            <text:p>0,000369375</text:p>
          </table:table-cell>
        </table:table-row>
        <table:table-row table:style-name="ro1">
          <table:table-cell table:formula="of:=[.A383]+0.025" office:value-type="float" office:value="9.55000000000007" calcext:value-type="float">
            <text:p>9,55000000000007</text:p>
          </table:table-cell>
          <table:table-cell/>
          <table:table-cell office:value-type="float" office:value="0.00271282" calcext:value-type="float">
            <text:p>0,00271282</text:p>
          </table:table-cell>
          <table:table-cell table:number-columns-repeated="2"/>
          <table:table-cell office:value-type="float" office:value="0.0203921" calcext:value-type="float">
            <text:p>0,0203921</text:p>
          </table:table-cell>
          <table:table-cell table:number-columns-repeated="2"/>
          <table:table-cell office:value-type="float" office:value="0.000368582" calcext:value-type="float">
            <text:p>0,000368582</text:p>
          </table:table-cell>
        </table:table-row>
        <table:table-row table:style-name="ro1">
          <table:table-cell table:formula="of:=[.A384]+0.025" office:value-type="float" office:value="9.57500000000007" calcext:value-type="float">
            <text:p>9,57500000000007</text:p>
          </table:table-cell>
          <table:table-cell/>
          <table:table-cell office:value-type="float" office:value="0.0027071" calcext:value-type="float">
            <text:p>0,0027071</text:p>
          </table:table-cell>
          <table:table-cell table:number-columns-repeated="2"/>
          <table:table-cell office:value-type="float" office:value="0.0203471" calcext:value-type="float">
            <text:p>0,0203471</text:p>
          </table:table-cell>
          <table:table-cell table:number-columns-repeated="2"/>
          <table:table-cell office:value-type="float" office:value="0.000367792" calcext:value-type="float">
            <text:p>0,000367792</text:p>
          </table:table-cell>
        </table:table-row>
        <table:table-row table:style-name="ro1">
          <table:table-cell table:formula="of:=[.A385]+0.025" office:value-type="float" office:value="9.60000000000007" calcext:value-type="float">
            <text:p>9,60000000000007</text:p>
          </table:table-cell>
          <table:table-cell/>
          <table:table-cell office:value-type="float" office:value="0.00270144" calcext:value-type="float">
            <text:p>0,00270144</text:p>
          </table:table-cell>
          <table:table-cell table:number-columns-repeated="2"/>
          <table:table-cell office:value-type="float" office:value="0.0203023" calcext:value-type="float">
            <text:p>0,0203023</text:p>
          </table:table-cell>
          <table:table-cell table:number-columns-repeated="2"/>
          <table:table-cell office:value-type="float" office:value="0.000367007" calcext:value-type="float">
            <text:p>0,000367007</text:p>
          </table:table-cell>
        </table:table-row>
        <table:table-row table:style-name="ro1">
          <table:table-cell table:formula="of:=[.A386]+0.025" office:value-type="float" office:value="9.62500000000007" calcext:value-type="float">
            <text:p>9,62500000000007</text:p>
          </table:table-cell>
          <table:table-cell/>
          <table:table-cell office:value-type="float" office:value="0.00269579" calcext:value-type="float">
            <text:p>0,00269579</text:p>
          </table:table-cell>
          <table:table-cell table:number-columns-repeated="2"/>
          <table:table-cell office:value-type="float" office:value="0.0202579" calcext:value-type="float">
            <text:p>0,0202579</text:p>
          </table:table-cell>
          <table:table-cell table:number-columns-repeated="2"/>
          <table:table-cell office:value-type="float" office:value="0.000366226" calcext:value-type="float">
            <text:p>0,000366226</text:p>
          </table:table-cell>
        </table:table-row>
        <table:table-row table:style-name="ro1">
          <table:table-cell table:formula="of:=[.A387]+0.025" office:value-type="float" office:value="9.65000000000007" calcext:value-type="float">
            <text:p>9,65000000000007</text:p>
          </table:table-cell>
          <table:table-cell/>
          <table:table-cell office:value-type="float" office:value="0.00269017" calcext:value-type="float">
            <text:p>0,00269017</text:p>
          </table:table-cell>
          <table:table-cell table:number-columns-repeated="2"/>
          <table:table-cell office:value-type="float" office:value="0.0202135" calcext:value-type="float">
            <text:p>0,0202135</text:p>
          </table:table-cell>
          <table:table-cell table:number-columns-repeated="2"/>
          <table:table-cell office:value-type="float" office:value="0.000365448" calcext:value-type="float">
            <text:p>0,000365448</text:p>
          </table:table-cell>
        </table:table-row>
        <table:table-row table:style-name="ro1">
          <table:table-cell table:formula="of:=[.A388]+0.025" office:value-type="float" office:value="9.67500000000007" calcext:value-type="float">
            <text:p>9,67500000000007</text:p>
          </table:table-cell>
          <table:table-cell/>
          <table:table-cell office:value-type="float" office:value="0.00268459" calcext:value-type="float">
            <text:p>0,00268459</text:p>
          </table:table-cell>
          <table:table-cell table:number-columns-repeated="2"/>
          <table:table-cell office:value-type="float" office:value="0.0201695" calcext:value-type="float">
            <text:p>0,0201695</text:p>
          </table:table-cell>
          <table:table-cell table:number-columns-repeated="2"/>
          <table:table-cell office:value-type="float" office:value="0.000364676" calcext:value-type="float">
            <text:p>0,000364676</text:p>
          </table:table-cell>
        </table:table-row>
        <table:table-row table:style-name="ro1">
          <table:table-cell table:formula="of:=[.A389]+0.025" office:value-type="float" office:value="9.70000000000007" calcext:value-type="float">
            <text:p>9,70000000000007</text:p>
          </table:table-cell>
          <table:table-cell/>
          <table:table-cell office:value-type="float" office:value="0.00267903" calcext:value-type="float">
            <text:p>0,00267903</text:p>
          </table:table-cell>
          <table:table-cell table:number-columns-repeated="2"/>
          <table:table-cell office:value-type="float" office:value="0.0201256" calcext:value-type="float">
            <text:p>0,0201256</text:p>
          </table:table-cell>
          <table:table-cell table:number-columns-repeated="2"/>
          <table:table-cell office:value-type="float" office:value="0.000363907" calcext:value-type="float">
            <text:p>0,000363907</text:p>
          </table:table-cell>
        </table:table-row>
        <table:table-row table:style-name="ro1">
          <table:table-cell table:formula="of:=[.A390]+0.025" office:value-type="float" office:value="9.72500000000007" calcext:value-type="float">
            <text:p>9,72500000000007</text:p>
          </table:table-cell>
          <table:table-cell/>
          <table:table-cell office:value-type="float" office:value="0.00267349" calcext:value-type="float">
            <text:p>0,00267349</text:p>
          </table:table-cell>
          <table:table-cell table:number-columns-repeated="2"/>
          <table:table-cell office:value-type="float" office:value="0.020082" calcext:value-type="float">
            <text:p>0,020082</text:p>
          </table:table-cell>
          <table:table-cell table:number-columns-repeated="2"/>
          <table:table-cell office:value-type="float" office:value="0.000363142" calcext:value-type="float">
            <text:p>0,000363142</text:p>
          </table:table-cell>
        </table:table-row>
        <table:table-row table:style-name="ro1">
          <table:table-cell table:formula="of:=[.A391]+0.025" office:value-type="float" office:value="9.75000000000007" calcext:value-type="float">
            <text:p>9,75000000000007</text:p>
          </table:table-cell>
          <table:table-cell/>
          <table:table-cell office:value-type="float" office:value="0.00266799" calcext:value-type="float">
            <text:p>0,00266799</text:p>
          </table:table-cell>
          <table:table-cell table:number-columns-repeated="2"/>
          <table:table-cell office:value-type="float" office:value="0.0200386" calcext:value-type="float">
            <text:p>0,0200386</text:p>
          </table:table-cell>
          <table:table-cell table:number-columns-repeated="2"/>
          <table:table-cell office:value-type="float" office:value="0.000362381" calcext:value-type="float">
            <text:p>0,000362381</text:p>
          </table:table-cell>
        </table:table-row>
        <table:table-row table:style-name="ro1">
          <table:table-cell table:formula="of:=[.A392]+0.025" office:value-type="float" office:value="9.77500000000007" calcext:value-type="float">
            <text:p>9,77500000000007</text:p>
          </table:table-cell>
          <table:table-cell/>
          <table:table-cell office:value-type="float" office:value="0.0026625" calcext:value-type="float">
            <text:p>0,0026625</text:p>
          </table:table-cell>
          <table:table-cell table:number-columns-repeated="2"/>
          <table:table-cell office:value-type="float" office:value="0.0199954" calcext:value-type="float">
            <text:p>0,0199954</text:p>
          </table:table-cell>
          <table:table-cell table:number-columns-repeated="2"/>
          <table:table-cell office:value-type="float" office:value="0.000361625" calcext:value-type="float">
            <text:p>0,000361625</text:p>
          </table:table-cell>
        </table:table-row>
        <table:table-row table:style-name="ro1">
          <table:table-cell table:formula="of:=[.A393]+0.025" office:value-type="float" office:value="9.80000000000007" calcext:value-type="float">
            <text:p>9,80000000000007</text:p>
          </table:table-cell>
          <table:table-cell/>
          <table:table-cell office:value-type="float" office:value="0.00265705" calcext:value-type="float">
            <text:p>0,00265705</text:p>
          </table:table-cell>
          <table:table-cell table:number-columns-repeated="2"/>
          <table:table-cell office:value-type="float" office:value="0.0199524" calcext:value-type="float">
            <text:p>0,0199524</text:p>
          </table:table-cell>
          <table:table-cell table:number-columns-repeated="2"/>
          <table:table-cell office:value-type="float" office:value="0.000360871" calcext:value-type="float">
            <text:p>0,000360871</text:p>
          </table:table-cell>
        </table:table-row>
        <table:table-row table:style-name="ro1">
          <table:table-cell table:formula="of:=[.A394]+0.025" office:value-type="float" office:value="9.82500000000007" calcext:value-type="float">
            <text:p>9,82500000000007</text:p>
          </table:table-cell>
          <table:table-cell/>
          <table:table-cell office:value-type="float" office:value="0.00265162" calcext:value-type="float">
            <text:p>0,00265162</text:p>
          </table:table-cell>
          <table:table-cell table:number-columns-repeated="2"/>
          <table:table-cell office:value-type="float" office:value="0.0199097" calcext:value-type="float">
            <text:p>0,0199097</text:p>
          </table:table-cell>
          <table:table-cell table:number-columns-repeated="2"/>
          <table:table-cell office:value-type="float" office:value="0.000360121" calcext:value-type="float">
            <text:p>0,000360121</text:p>
          </table:table-cell>
        </table:table-row>
        <table:table-row table:style-name="ro1">
          <table:table-cell table:formula="of:=[.A395]+0.025" office:value-type="float" office:value="9.85000000000007" calcext:value-type="float">
            <text:p>9,85000000000007</text:p>
          </table:table-cell>
          <table:table-cell/>
          <table:table-cell office:value-type="float" office:value="0.00264623" calcext:value-type="float">
            <text:p>0,00264623</text:p>
          </table:table-cell>
          <table:table-cell table:number-columns-repeated="2"/>
          <table:table-cell office:value-type="float" office:value="0.0198671" calcext:value-type="float">
            <text:p>0,0198671</text:p>
          </table:table-cell>
          <table:table-cell table:number-columns-repeated="2"/>
          <table:table-cell office:value-type="float" office:value="0.000359377" calcext:value-type="float">
            <text:p>0,000359377</text:p>
          </table:table-cell>
        </table:table-row>
        <table:table-row table:style-name="ro1">
          <table:table-cell table:formula="of:=[.A396]+0.025" office:value-type="float" office:value="9.87500000000007" calcext:value-type="float">
            <text:p>9,87500000000007</text:p>
          </table:table-cell>
          <table:table-cell/>
          <table:table-cell office:value-type="float" office:value="0.00264085" calcext:value-type="float">
            <text:p>0,00264085</text:p>
          </table:table-cell>
          <table:table-cell table:number-columns-repeated="2"/>
          <table:table-cell office:value-type="float" office:value="0.0198247" calcext:value-type="float">
            <text:p>0,0198247</text:p>
          </table:table-cell>
          <table:table-cell table:number-columns-repeated="2"/>
          <table:table-cell office:value-type="float" office:value="0.000358634" calcext:value-type="float">
            <text:p>0,000358634</text:p>
          </table:table-cell>
        </table:table-row>
        <table:table-row table:style-name="ro1">
          <table:table-cell table:formula="of:=[.A397]+0.025" office:value-type="float" office:value="9.90000000000007" calcext:value-type="float">
            <text:p>9,90000000000007</text:p>
          </table:table-cell>
          <table:table-cell/>
          <table:table-cell office:value-type="float" office:value="0.0026355" calcext:value-type="float">
            <text:p>0,0026355</text:p>
          </table:table-cell>
          <table:table-cell table:number-columns-repeated="2"/>
          <table:table-cell office:value-type="float" office:value="0.0197826" calcext:value-type="float">
            <text:p>0,0197826</text:p>
          </table:table-cell>
          <table:table-cell table:number-columns-repeated="2"/>
          <table:table-cell office:value-type="float" office:value="0.000357896" calcext:value-type="float">
            <text:p>0,000357896</text:p>
          </table:table-cell>
        </table:table-row>
        <table:table-row table:style-name="ro1">
          <table:table-cell table:formula="of:=[.A398]+0.025" office:value-type="float" office:value="9.92500000000007" calcext:value-type="float">
            <text:p>9,92500000000007</text:p>
          </table:table-cell>
          <table:table-cell/>
          <table:table-cell office:value-type="float" office:value="0.00263019" calcext:value-type="float">
            <text:p>0,00263019</text:p>
          </table:table-cell>
          <table:table-cell table:number-columns-repeated="2"/>
          <table:table-cell office:value-type="float" office:value="0.0197407" calcext:value-type="float">
            <text:p>0,0197407</text:p>
          </table:table-cell>
          <table:table-cell table:number-columns-repeated="2"/>
          <table:table-cell office:value-type="float" office:value="0.000357162" calcext:value-type="float">
            <text:p>0,000357162</text:p>
          </table:table-cell>
        </table:table-row>
        <table:table-row table:style-name="ro1">
          <table:table-cell table:formula="of:=[.A399]+0.025" office:value-type="float" office:value="9.95000000000007" calcext:value-type="float">
            <text:p>9,95000000000007</text:p>
          </table:table-cell>
          <table:table-cell/>
          <table:table-cell office:value-type="float" office:value="0.00262488" calcext:value-type="float">
            <text:p>0,00262488</text:p>
          </table:table-cell>
          <table:table-cell table:number-columns-repeated="2"/>
          <table:table-cell office:value-type="float" office:value="0.019699" calcext:value-type="float">
            <text:p>0,019699</text:p>
          </table:table-cell>
          <table:table-cell table:number-columns-repeated="2"/>
          <table:table-cell office:value-type="float" office:value="0.000356432" calcext:value-type="float">
            <text:p>0,000356432</text:p>
          </table:table-cell>
        </table:table-row>
        <table:table-row table:style-name="ro1">
          <table:table-cell table:formula="of:=[.A400]+0.025" office:value-type="float" office:value="9.97500000000007" calcext:value-type="float">
            <text:p>9,97500000000007</text:p>
          </table:table-cell>
          <table:table-cell/>
          <table:table-cell office:value-type="float" office:value="0.00261962" calcext:value-type="float">
            <text:p>0,00261962</text:p>
          </table:table-cell>
          <table:table-cell table:number-columns-repeated="2"/>
          <table:table-cell office:value-type="float" office:value="0.0196574" calcext:value-type="float">
            <text:p>0,0196574</text:p>
          </table:table-cell>
          <table:table-cell table:number-columns-repeated="2"/>
          <table:table-cell office:value-type="float" office:value="0.000355705" calcext:value-type="float">
            <text:p>0,000355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5T15:24:46.821836093</dc:date>
    <meta:editing-duration>PT9M22S</meta:editing-duration>
    <meta:editing-cycles>4</meta:editing-cycles>
    <meta:generator>LibreOffice/25.8.2.2$Linux_X86_64 LibreOffice_project/d401f2107ccab8f924a8e2df40f573aab7605b6f</meta:generator>
    <meta:document-statistic meta:table-count="1" meta:cell-count="19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6.962cm" svg:y="5.071cm" style:legend-expansion="custom" svg:width="3.785cm" svg:height="3.04cm" style:legend-expansion-aspect-ratio="1.24506578947368" chart:style-name="ch2"/>
        <chart:plot-area chart:style-name="ch3" svg:x="0.32cm" svg:y="0.179cm" svg:width="14.746cm" svg:height="8.639cm">
          <chart:coordinate-region svg:x="2.023cm" svg:y="0.374cm" svg:width="12.848cm" svg:height="7.805cm"/>
          <chart:axis chart:dimension="x" chart:name="primary-x" chart:style-name="ch4">
            <chart:title svg:x="15.292cm" svg:y="7.929cm" chart:style-name="ch5">
              <text:p><text:span text:style-name="T1">t</text:span></text:p>
            </chart:title>
          </chart:axis>
          <chart:axis chart:dimension="y" chart:name="primary-y" chart:style-name="ch6">
            <chart:title svg:x="0.447cm" svg:y="0.819cm" chart:style-name="ch7">
              <text:p><text:span text:style-name="T1">C</text:span></text:p>
            </chart:title>
            <chart:grid chart:style-name="ch8" chart:class="major"/>
          </chart:axis>
          <chart:series chart:style-name="ch9" chart:values-cell-range-address="out_gprog_t_1.B2:out_gprog_t_1.B401" chart:label-cell-address="out_gprog_t_1.B1:out_gprog_t_1.B1" chart:class="chart:scatter">
            <chart:domain table:cell-range-address="out_gprog_t_1.A2:out_gprog_t_1.A401"/>
            <chart:data-point chart:repeated="400"/>
          </chart:series>
          <chart:series chart:style-name="ch10" chart:values-cell-range-address="out_gprog_t_1.C2:out_gprog_t_1.C401" chart:label-cell-address="out_gprog_t_1.C1:out_gprog_t_1.C1" chart:class="chart:scatter">
            <chart:data-point chart:repeated="400"/>
          </chart:series>
          <chart:series chart:style-name="ch11" chart:values-cell-range-address="out_gprog_t_1.E2:out_gprog_t_1.E401" chart:label-cell-address="out_gprog_t_1.E1:out_gprog_t_1.E1" chart:class="chart:scatter">
            <chart:data-point chart:repeated="400"/>
          </chart:series>
          <chart:series chart:style-name="ch12" chart:values-cell-range-address="out_gprog_t_1.F2:out_gprog_t_1.F401" chart:label-cell-address="out_gprog_t_1.F1:out_gprog_t_1.F1" chart:class="chart:scatter">
            <chart:data-point chart:repeated="400"/>
          </chart:series>
          <chart:series chart:style-name="ch13" chart:values-cell-range-address="out_gprog_t_1.H2:out_gprog_t_1.H401" chart:label-cell-address="out_gprog_t_1.H1:out_gprog_t_1.H1" chart:class="chart:scatter">
            <chart:data-point chart:repeated="400"/>
          </chart:series>
          <chart:series chart:style-name="ch14" chart:values-cell-range-address="out_gprog_t_1.I2:out_gprog_t_1.I401" chart:label-cell-address="out_gprog_t_1.I1:out_gprog_t_1.I1" chart:class="chart:scatter">
            <chart:data-point chart:repeated="4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erical (set 1)</text:p>
                <draw:g>
                  <svg:desc>out_gprog_t_1.B1:out_gprog_t_1.B1</svg:desc>
                </draw:g>
              </table:table-cell>
              <table:table-cell office:value-type="string">
                <text:p>Surrogate (set 1)</text:p>
                <draw:g>
                  <svg:desc>out_gprog_t_1.C1:out_gprog_t_1.C1</svg:desc>
                </draw:g>
              </table:table-cell>
              <table:table-cell office:value-type="string">
                <text:p>Numerical (set 2)</text:p>
                <draw:g>
                  <svg:desc>out_gprog_t_1.E1:out_gprog_t_1.E1</svg:desc>
                </draw:g>
              </table:table-cell>
              <table:table-cell office:value-type="string">
                <text:p>Surrogate (set 2)</text:p>
                <draw:g>
                  <svg:desc>out_gprog_t_1.F1:out_gprog_t_1.F1</svg:desc>
                </draw:g>
              </table:table-cell>
              <table:table-cell office:value-type="string">
                <text:p>Numerical (set 4)</text:p>
                <draw:g>
                  <svg:desc>out_gprog_t_1.H1:out_gprog_t_1.H1</svg:desc>
                </draw:g>
              </table:table-cell>
              <table:table-cell office:value-type="string">
                <text:p>Surrogate (set 4)</text:p>
                <draw:g>
                  <svg:desc>out_gprog_t_1.I1:out_gprog_t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gprog_t_1.A2:out_gprog_t_1.A401</svg:desc>
                </draw:g>
              </table:table-cell>
              <table:table-cell office:value-type="float" office:value="0.00000410377">
                <text:p>0.00000410377</text:p>
                <draw:g>
                  <svg:desc>out_gprog_t_1.B2:out_gprog_t_1.B401</svg:desc>
                </draw:g>
              </table:table-cell>
              <table:table-cell office:value-type="float" office:value="0.0001702">
                <text:p>0.0001702</text:p>
                <draw:g>
                  <svg:desc>out_gprog_t_1.C2:out_gprog_t_1.C401</svg:desc>
                </draw:g>
              </table:table-cell>
              <table:table-cell office:value-type="float" office:value="0.0000069587">
                <text:p>0.0000069587</text:p>
                <draw:g>
                  <svg:desc>out_gprog_t_1.E2:out_gprog_t_1.E401</svg:desc>
                </draw:g>
              </table:table-cell>
              <table:table-cell office:value-type="float" office:value="0.000731008">
                <text:p>0.000731008</text:p>
                <draw:g>
                  <svg:desc>out_gprog_t_1.F2:out_gprog_t_1.F401</svg:desc>
                </draw:g>
              </table:table-cell>
              <table:table-cell office:value-type="float" office:value="0.0000455219">
                <text:p>0.0000455219</text:p>
                <draw:g>
                  <svg:desc>out_gprog_t_1.H2:out_gprog_t_1.H401</svg:desc>
                </draw:g>
              </table:table-cell>
              <table:table-cell office:value-type="float" office:value="0.000533081">
                <text:p>0.000533081</text:p>
                <draw:g>
                  <svg:desc>out_gprog_t_1.I2:out_gprog_t_1.I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0204642">
                <text:p>0.000204642</text:p>
              </table:table-cell>
              <table:table-cell office:value-type="float" office:value="0.000353696">
                <text:p>0.000353696</text:p>
              </table:table-cell>
              <table:table-cell office:value-type="float" office:value="0.000320364">
                <text:p>0.000320364</text:p>
              </table:table-cell>
              <table:table-cell office:value-type="float" office:value="0.0020268">
                <text:p>0.0020268</text:p>
              </table:table-cell>
              <table:table-cell office:value-type="float" office:value="0.000699046">
                <text:p>0.000699046</text:p>
              </table:table-cell>
              <table:table-cell office:value-type="float" office:value="0.000405963">
                <text:p>0.000405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00553405">
                <text:p>0.000553405</text:p>
              </table:table-cell>
              <table:table-cell office:value-type="float" office:value="0.000678039">
                <text:p>0.000678039</text:p>
              </table:table-cell>
              <table:table-cell office:value-type="float" office:value="0.00106181">
                <text:p>0.00106181</text:p>
              </table:table-cell>
              <table:table-cell office:value-type="float" office:value="0.00413081">
                <text:p>0.00413081</text:p>
              </table:table-cell>
              <table:table-cell office:value-type="float" office:value="0.00122404">
                <text:p>0.00122404</text:p>
              </table:table-cell>
              <table:table-cell office:value-type="float" office:value="0.000479465">
                <text:p>0.000479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00105267">
                <text:p>0.00105267</text:p>
              </table:table-cell>
              <table:table-cell office:value-type="float" office:value="0.00112993">
                <text:p>0.00112993</text:p>
              </table:table-cell>
              <table:table-cell office:value-type="float" office:value="0.00243339">
                <text:p>0.00243339</text:p>
              </table:table-cell>
              <table:table-cell office:value-type="float" office:value="0.00677914">
                <text:p>0.00677914</text:p>
              </table:table-cell>
              <table:table-cell office:value-type="float" office:value="0.00170005">
                <text:p>0.00170005</text:p>
              </table:table-cell>
              <table:table-cell office:value-type="float" office:value="0.000577454">
                <text:p>0.000577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0171204">
                <text:p>0.00171204</text:p>
              </table:table-cell>
              <table:table-cell office:value-type="float" office:value="0.00169743">
                <text:p>0.00169743</text:p>
              </table:table-cell>
              <table:table-cell office:value-type="float" office:value="0.00442374">
                <text:p>0.00442374</text:p>
              </table:table-cell>
              <table:table-cell office:value-type="float" office:value="0.00977446">
                <text:p>0.00977446</text:p>
              </table:table-cell>
              <table:table-cell office:value-type="float" office:value="0.00214144">
                <text:p>0.00214144</text:p>
              </table:table-cell>
              <table:table-cell office:value-type="float" office:value="0.000682859">
                <text:p>0.000682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00253172">
                <text:p>0.00253172</text:p>
              </table:table-cell>
              <table:table-cell office:value-type="float" office:value="0.00236667">
                <text:p>0.00236667</text:p>
              </table:table-cell>
              <table:table-cell office:value-type="float" office:value="0.00692442">
                <text:p>0.00692442</text:p>
              </table:table-cell>
              <table:table-cell office:value-type="float" office:value="0.0130005">
                <text:p>0.0130005</text:p>
              </table:table-cell>
              <table:table-cell office:value-type="float" office:value="0.0025552">
                <text:p>0.0025552</text:p>
              </table:table-cell>
              <table:table-cell office:value-type="float" office:value="0.000791967">
                <text:p>0.000791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00350109">
                <text:p>0.00350109</text:p>
              </table:table-cell>
              <table:table-cell office:value-type="float" office:value="0.00312405">
                <text:p>0.00312405</text:p>
              </table:table-cell>
              <table:table-cell office:value-type="float" office:value="0.00981515">
                <text:p>0.00981515</text:p>
              </table:table-cell>
              <table:table-cell office:value-type="float" office:value="0.0163927">
                <text:p>0.0163927</text:p>
              </table:table-cell>
              <table:table-cell office:value-type="float" office:value="0.00294569">
                <text:p>0.00294569</text:p>
              </table:table-cell>
              <table:table-cell office:value-type="float" office:value="0.000903207">
                <text:p>0.000903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00460214">
                <text:p>0.00460214</text:p>
              </table:table-cell>
              <table:table-cell office:value-type="float" office:value="0.00395719">
                <text:p>0.00395719</text:p>
              </table:table-cell>
              <table:table-cell office:value-type="float" office:value="0.0129913">
                <text:p>0.0129913</text:p>
              </table:table-cell>
              <table:table-cell office:value-type="float" office:value="0.0199132">
                <text:p>0.0199132</text:p>
              </table:table-cell>
              <table:table-cell office:value-type="float" office:value="0.00331595">
                <text:p>0.00331595</text:p>
              </table:table-cell>
              <table:table-cell office:value-type="float" office:value="0.00101558">
                <text:p>0.00101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0581343">
                <text:p>0.00581343</text:p>
              </table:table-cell>
              <table:table-cell office:value-type="float" office:value="0.00485499">
                <text:p>0.00485499</text:p>
              </table:table-cell>
              <table:table-cell office:value-type="float" office:value="0.016369">
                <text:p>0.016369</text:p>
              </table:table-cell>
              <table:table-cell office:value-type="float" office:value="0.023538">
                <text:p>0.023538</text:p>
              </table:table-cell>
              <table:table-cell office:value-type="float" office:value="0.00366846">
                <text:p>0.00366846</text:p>
              </table:table-cell>
              <table:table-cell office:value-type="float" office:value="0.00112832">
                <text:p>0.00112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00711305">
                <text:p>0.00711305</text:p>
              </table:table-cell>
              <table:table-cell office:value-type="float" office:value="0.00580736">
                <text:p>0.00580736</text:p>
              </table:table-cell>
              <table:table-cell office:value-type="float" office:value="0.0198836">
                <text:p>0.0198836</text:p>
              </table:table-cell>
              <table:table-cell office:value-type="float" office:value="0.0272489">
                <text:p>0.0272489</text:p>
              </table:table-cell>
              <table:table-cell office:value-type="float" office:value="0.00400512">
                <text:p>0.00400512</text:p>
              </table:table-cell>
              <table:table-cell office:value-type="float" office:value="0.00124076">
                <text:p>0.00124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00848046">
                <text:p>0.00848046</text:p>
              </table:table-cell>
              <table:table-cell office:value-type="float" office:value="0.00680494">
                <text:p>0.00680494</text:p>
              </table:table-cell>
              <table:table-cell office:value-type="float" office:value="0.0234848">
                <text:p>0.0234848</text:p>
              </table:table-cell>
              <table:table-cell office:value-type="float" office:value="0.0310318">
                <text:p>0.0310318</text:p>
              </table:table-cell>
              <table:table-cell office:value-type="float" office:value="0.00432746">
                <text:p>0.00432746</text:p>
              </table:table-cell>
              <table:table-cell office:value-type="float" office:value="0.0013523">
                <text:p>0.0013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00989734">
                <text:p>0.00989734</text:p>
              </table:table-cell>
              <table:table-cell office:value-type="float" office:value="0.00783885">
                <text:p>0.00783885</text:p>
              </table:table-cell>
              <table:table-cell office:value-type="float" office:value="0.0271342">
                <text:p>0.0271342</text:p>
              </table:table-cell>
              <table:table-cell office:value-type="float" office:value="0.0348742">
                <text:p>0.0348742</text:p>
              </table:table-cell>
              <table:table-cell office:value-type="float" office:value="0.00463678">
                <text:p>0.00463678</text:p>
              </table:table-cell>
              <table:table-cell office:value-type="float" office:value="0.00146239">
                <text:p>0.00146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113478">
                <text:p>0.0113478</text:p>
              </table:table-cell>
              <table:table-cell office:value-type="float" office:value="0.00890048">
                <text:p>0.00890048</text:p>
              </table:table-cell>
              <table:table-cell office:value-type="float" office:value="0.0308028">
                <text:p>0.0308028</text:p>
              </table:table-cell>
              <table:table-cell office:value-type="float" office:value="0.0387647">
                <text:p>0.0387647</text:p>
              </table:table-cell>
              <table:table-cell office:value-type="float" office:value="0.00493417">
                <text:p>0.00493417</text:p>
              </table:table-cell>
              <table:table-cell office:value-type="float" office:value="0.00157053">
                <text:p>0.00157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0128186">
                <text:p>0.0128186</text:p>
              </table:table-cell>
              <table:table-cell office:value-type="float" office:value="0.00998118">
                <text:p>0.00998118</text:p>
              </table:table-cell>
              <table:table-cell office:value-type="float" office:value="0.0344685">
                <text:p>0.0344685</text:p>
              </table:table-cell>
              <table:table-cell office:value-type="float" office:value="0.042693">
                <text:p>0.042693</text:p>
              </table:table-cell>
              <table:table-cell office:value-type="float" office:value="0.0052206">
                <text:p>0.0052206</text:p>
              </table:table-cell>
              <table:table-cell office:value-type="float" office:value="0.00167621">
                <text:p>0.00167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0142988">
                <text:p>0.0142988</text:p>
              </table:table-cell>
              <table:table-cell office:value-type="float" office:value="0.0110726">
                <text:p>0.0110726</text:p>
              </table:table-cell>
              <table:table-cell office:value-type="float" office:value="0.0381144">
                <text:p>0.0381144</text:p>
              </table:table-cell>
              <table:table-cell office:value-type="float" office:value="0.04665">
                <text:p>0.04665</text:p>
              </table:table-cell>
              <table:table-cell office:value-type="float" office:value="0.0054969">
                <text:p>0.0054969</text:p>
              </table:table-cell>
              <table:table-cell office:value-type="float" office:value="0.00177903">
                <text:p>0.00177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0157791">
                <text:p>0.0157791</text:p>
              </table:table-cell>
              <table:table-cell office:value-type="float" office:value="0.012166">
                <text:p>0.012166</text:p>
              </table:table-cell>
              <table:table-cell office:value-type="float" office:value="0.0417279">
                <text:p>0.0417279</text:p>
              </table:table-cell>
              <table:table-cell office:value-type="float" office:value="0.0506258">
                <text:p>0.0506258</text:p>
              </table:table-cell>
              <table:table-cell office:value-type="float" office:value="0.00576379">
                <text:p>0.00576379</text:p>
              </table:table-cell>
              <table:table-cell office:value-type="float" office:value="0.00187855">
                <text:p>0.00187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172525">
                <text:p>0.0172525</text:p>
              </table:table-cell>
              <table:table-cell office:value-type="float" office:value="0.0132528">
                <text:p>0.0132528</text:p>
              </table:table-cell>
              <table:table-cell office:value-type="float" office:value="0.0452996">
                <text:p>0.0452996</text:p>
              </table:table-cell>
              <table:table-cell office:value-type="float" office:value="0.0546123">
                <text:p>0.0546123</text:p>
              </table:table-cell>
              <table:table-cell office:value-type="float" office:value="0.00602193">
                <text:p>0.00602193</text:p>
              </table:table-cell>
              <table:table-cell office:value-type="float" office:value="0.0019744">
                <text:p>0.0019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0187132">
                <text:p>0.0187132</text:p>
              </table:table-cell>
              <table:table-cell office:value-type="float" office:value="0.0143243">
                <text:p>0.0143243</text:p>
              </table:table-cell>
              <table:table-cell office:value-type="float" office:value="0.0488225">
                <text:p>0.0488225</text:p>
              </table:table-cell>
              <table:table-cell office:value-type="float" office:value="0.0586019">
                <text:p>0.0586019</text:p>
              </table:table-cell>
              <table:table-cell office:value-type="float" office:value="0.0062719">
                <text:p>0.0062719</text:p>
              </table:table-cell>
              <table:table-cell office:value-type="float" office:value="0.00206626">
                <text:p>0.00206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0201564">
                <text:p>0.0201564</text:p>
              </table:table-cell>
              <table:table-cell office:value-type="float" office:value="0.0153715">
                <text:p>0.0153715</text:p>
              </table:table-cell>
              <table:table-cell office:value-type="float" office:value="0.0522915">
                <text:p>0.0522915</text:p>
              </table:table-cell>
              <table:table-cell office:value-type="float" office:value="0.0625862">
                <text:p>0.0625862</text:p>
              </table:table-cell>
              <table:table-cell office:value-type="float" office:value="0.00651421">
                <text:p>0.00651421</text:p>
              </table:table-cell>
              <table:table-cell office:value-type="float" office:value="0.00215382">
                <text:p>0.00215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0215787">
                <text:p>0.0215787</text:p>
              </table:table-cell>
              <table:table-cell office:value-type="float" office:value="0.0163858">
                <text:p>0.0163858</text:p>
              </table:table-cell>
              <table:table-cell office:value-type="float" office:value="0.0557029">
                <text:p>0.0557029</text:p>
              </table:table-cell>
              <table:table-cell office:value-type="float" office:value="0.0665582">
                <text:p>0.0665582</text:p>
              </table:table-cell>
              <table:table-cell office:value-type="float" office:value="0.00674934">
                <text:p>0.00674934</text:p>
              </table:table-cell>
              <table:table-cell office:value-type="float" office:value="0.00223682">
                <text:p>0.00223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228199">
                <text:p>0.0228199</text:p>
              </table:table-cell>
              <table:table-cell office:value-type="float" office:value="0.0173589">
                <text:p>0.0173589</text:p>
              </table:table-cell>
              <table:table-cell office:value-type="float" office:value="0.0590544">
                <text:p>0.0590544</text:p>
              </table:table-cell>
              <table:table-cell office:value-type="float" office:value="0.0705113">
                <text:p>0.0705113</text:p>
              </table:table-cell>
              <table:table-cell office:value-type="float" office:value="0.00697769">
                <text:p>0.00697769</text:p>
              </table:table-cell>
              <table:table-cell office:value-type="float" office:value="0.00231507">
                <text:p>0.002315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0238985">
                <text:p>0.0238985</text:p>
              </table:table-cell>
              <table:table-cell office:value-type="float" office:value="0.0182826">
                <text:p>0.0182826</text:p>
              </table:table-cell>
              <table:table-cell office:value-type="float" office:value="0.0623451">
                <text:p>0.0623451</text:p>
              </table:table-cell>
              <table:table-cell office:value-type="float" office:value="0.0744377">
                <text:p>0.0744377</text:p>
              </table:table-cell>
              <table:table-cell office:value-type="float" office:value="0.00719967">
                <text:p>0.00719967</text:p>
              </table:table-cell>
              <table:table-cell office:value-type="float" office:value="0.00238837">
                <text:p>0.00238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0248231">
                <text:p>0.0248231</text:p>
              </table:table-cell>
              <table:table-cell office:value-type="float" office:value="0.0191491">
                <text:p>0.0191491</text:p>
              </table:table-cell>
              <table:table-cell office:value-type="float" office:value="0.0655739">
                <text:p>0.0655739</text:p>
              </table:table-cell>
              <table:table-cell office:value-type="float" office:value="0.0783307">
                <text:p>0.0783307</text:p>
              </table:table-cell>
              <table:table-cell office:value-type="float" office:value="0.00741562">
                <text:p>0.00741562</text:p>
              </table:table-cell>
              <table:table-cell office:value-type="float" office:value="0.00245659">
                <text:p>0.00245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0255853">
                <text:p>0.0255853</text:p>
              </table:table-cell>
              <table:table-cell office:value-type="float" office:value="0.0199518">
                <text:p>0.0199518</text:p>
              </table:table-cell>
              <table:table-cell office:value-type="float" office:value="0.0687401">
                <text:p>0.0687401</text:p>
              </table:table-cell>
              <table:table-cell office:value-type="float" office:value="0.0821836">
                <text:p>0.0821836</text:p>
              </table:table-cell>
              <table:table-cell office:value-type="float" office:value="0.00762586">
                <text:p>0.00762586</text:p>
              </table:table-cell>
              <table:table-cell office:value-type="float" office:value="0.00251965">
                <text:p>0.00251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026184">
                <text:p>0.026184</text:p>
              </table:table-cell>
              <table:table-cell office:value-type="float" office:value="0.0206846">
                <text:p>0.0206846</text:p>
              </table:table-cell>
              <table:table-cell office:value-type="float" office:value="0.0718437">
                <text:p>0.0718437</text:p>
              </table:table-cell>
              <table:table-cell office:value-type="float" office:value="0.0859887">
                <text:p>0.0859887</text:p>
              </table:table-cell>
              <table:table-cell office:value-type="float" office:value="0.00771737">
                <text:p>0.00771737</text:p>
              </table:table-cell>
              <table:table-cell office:value-type="float" office:value="0.00257748">
                <text:p>0.00257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0266264">
                <text:p>0.0266264</text:p>
              </table:table-cell>
              <table:table-cell office:value-type="float" office:value="0.0213428">
                <text:p>0.0213428</text:p>
              </table:table-cell>
              <table:table-cell office:value-type="float" office:value="0.0748852">
                <text:p>0.0748852</text:p>
              </table:table-cell>
              <table:table-cell office:value-type="float" office:value="0.0897376">
                <text:p>0.0897376</text:p>
              </table:table-cell>
              <table:table-cell office:value-type="float" office:value="0.00731553">
                <text:p>0.00731553</text:p>
              </table:table-cell>
              <table:table-cell office:value-type="float" office:value="0.00263007">
                <text:p>0.00263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0269259">
                <text:p>0.0269259</text:p>
              </table:table-cell>
              <table:table-cell office:value-type="float" office:value="0.0219227">
                <text:p>0.0219227</text:p>
              </table:table-cell>
              <table:table-cell office:value-type="float" office:value="0.0778651">
                <text:p>0.0778651</text:p>
              </table:table-cell>
              <table:table-cell office:value-type="float" office:value="0.0934224">
                <text:p>0.0934224</text:p>
              </table:table-cell>
              <table:table-cell office:value-type="float" office:value="0.00701184">
                <text:p>0.00701184</text:p>
              </table:table-cell>
              <table:table-cell office:value-type="float" office:value="0.00267745">
                <text:p>0.00267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027099">
                <text:p>0.027099</text:p>
              </table:table-cell>
              <table:table-cell office:value-type="float" office:value="0.0224217">
                <text:p>0.0224217</text:p>
              </table:table-cell>
              <table:table-cell office:value-type="float" office:value="0.0807843">
                <text:p>0.0807843</text:p>
              </table:table-cell>
              <table:table-cell office:value-type="float" office:value="0.0970341">
                <text:p>0.0970341</text:p>
              </table:table-cell>
              <table:table-cell office:value-type="float" office:value="0.00674766">
                <text:p>0.00674766</text:p>
              </table:table-cell>
              <table:table-cell office:value-type="float" office:value="0.00271964">
                <text:p>0.00271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027163">
                <text:p>0.027163</text:p>
              </table:table-cell>
              <table:table-cell office:value-type="float" office:value="0.0228392">
                <text:p>0.0228392</text:p>
              </table:table-cell>
              <table:table-cell office:value-type="float" office:value="0.0836437">
                <text:p>0.0836437</text:p>
              </table:table-cell>
              <table:table-cell office:value-type="float" office:value="0.100564">
                <text:p>0.100564</text:p>
              </table:table-cell>
              <table:table-cell office:value-type="float" office:value="0.00651056">
                <text:p>0.00651056</text:p>
              </table:table-cell>
              <table:table-cell office:value-type="float" office:value="0.00275675">
                <text:p>0.00275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0271343">
                <text:p>0.0271343</text:p>
              </table:table-cell>
              <table:table-cell office:value-type="float" office:value="0.0231754">
                <text:p>0.0231754</text:p>
              </table:table-cell>
              <table:table-cell office:value-type="float" office:value="0.0864449">
                <text:p>0.0864449</text:p>
              </table:table-cell>
              <table:table-cell office:value-type="float" office:value="0.104001">
                <text:p>0.104001</text:p>
              </table:table-cell>
              <table:table-cell office:value-type="float" office:value="0.0062945">
                <text:p>0.0062945</text:p>
              </table:table-cell>
              <table:table-cell office:value-type="float" office:value="0.00278887">
                <text:p>0.002788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027028">
                <text:p>0.027028</text:p>
              </table:table-cell>
              <table:table-cell office:value-type="float" office:value="0.023432">
                <text:p>0.023432</text:p>
              </table:table-cell>
              <table:table-cell office:value-type="float" office:value="0.0891886">
                <text:p>0.0891886</text:p>
              </table:table-cell>
              <table:table-cell office:value-type="float" office:value="0.107334">
                <text:p>0.107334</text:p>
              </table:table-cell>
              <table:table-cell office:value-type="float" office:value="0.00609576">
                <text:p>0.00609576</text:p>
              </table:table-cell>
              <table:table-cell office:value-type="float" office:value="0.00281614">
                <text:p>0.00281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0268577">
                <text:p>0.0268577</text:p>
              </table:table-cell>
              <table:table-cell office:value-type="float" office:value="0.0236119">
                <text:p>0.0236119</text:p>
              </table:table-cell>
              <table:table-cell office:value-type="float" office:value="0.0918763">
                <text:p>0.0918763</text:p>
              </table:table-cell>
              <table:table-cell office:value-type="float" office:value="0.110552">
                <text:p>0.110552</text:p>
              </table:table-cell>
              <table:table-cell office:value-type="float" office:value="0.0059117">
                <text:p>0.0059117</text:p>
              </table:table-cell>
              <table:table-cell office:value-type="float" office:value="0.00283873">
                <text:p>0.00283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0266348">
                <text:p>0.0266348</text:p>
              </table:table-cell>
              <table:table-cell office:value-type="float" office:value="0.0237189">
                <text:p>0.0237189</text:p>
              </table:table-cell>
              <table:table-cell office:value-type="float" office:value="0.0945091">
                <text:p>0.0945091</text:p>
              </table:table-cell>
              <table:table-cell office:value-type="float" office:value="0.113642">
                <text:p>0.113642</text:p>
              </table:table-cell>
              <table:table-cell office:value-type="float" office:value="0.00574035">
                <text:p>0.00574035</text:p>
              </table:table-cell>
              <table:table-cell office:value-type="float" office:value="0.00285679">
                <text:p>0.00285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0263695">
                <text:p>0.0263695</text:p>
              </table:table-cell>
              <table:table-cell office:value-type="float" office:value="0.0237577">
                <text:p>0.0237577</text:p>
              </table:table-cell>
              <table:table-cell office:value-type="float" office:value="0.0970883">
                <text:p>0.0970883</text:p>
              </table:table-cell>
              <table:table-cell office:value-type="float" office:value="0.116593">
                <text:p>0.116593</text:p>
              </table:table-cell>
              <table:table-cell office:value-type="float" office:value="0.00558016">
                <text:p>0.00558016</text:p>
              </table:table-cell>
              <table:table-cell office:value-type="float" office:value="0.00287052">
                <text:p>0.00287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0260702">
                <text:p>0.0260702</text:p>
              </table:table-cell>
              <table:table-cell office:value-type="float" office:value="0.0237335">
                <text:p>0.0237335</text:p>
              </table:table-cell>
              <table:table-cell office:value-type="float" office:value="0.099615">
                <text:p>0.099615</text:p>
              </table:table-cell>
              <table:table-cell office:value-type="float" office:value="0.119392">
                <text:p>0.119392</text:p>
              </table:table-cell>
              <table:table-cell office:value-type="float" office:value="0.00542987">
                <text:p>0.00542987</text:p>
              </table:table-cell>
              <table:table-cell office:value-type="float" office:value="0.00288012">
                <text:p>0.00288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025744">
                <text:p>0.025744</text:p>
              </table:table-cell>
              <table:table-cell office:value-type="float" office:value="0.0236523">
                <text:p>0.0236523</text:p>
              </table:table-cell>
              <table:table-cell office:value-type="float" office:value="0.102092">
                <text:p>0.102092</text:p>
              </table:table-cell>
              <table:table-cell office:value-type="float" office:value="0.122025">
                <text:p>0.122025</text:p>
              </table:table-cell>
              <table:table-cell office:value-type="float" office:value="0.00528844">
                <text:p>0.00528844</text:p>
              </table:table-cell>
              <table:table-cell office:value-type="float" office:value="0.00288579">
                <text:p>0.00288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25397">
                <text:p>0.025397</text:p>
              </table:table-cell>
              <table:table-cell office:value-type="float" office:value="0.0235199">
                <text:p>0.0235199</text:p>
              </table:table-cell>
              <table:table-cell office:value-type="float" office:value="0.104519">
                <text:p>0.104519</text:p>
              </table:table-cell>
              <table:table-cell office:value-type="float" office:value="0.12448">
                <text:p>0.12448</text:p>
              </table:table-cell>
              <table:table-cell office:value-type="float" office:value="0.00515547">
                <text:p>0.00515547</text:p>
              </table:table-cell>
              <table:table-cell office:value-type="float" office:value="0.00288776">
                <text:p>0.00288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0.0250343">
                <text:p>0.0250343</text:p>
              </table:table-cell>
              <table:table-cell office:value-type="float" office:value="0.0233423">
                <text:p>0.0233423</text:p>
              </table:table-cell>
              <table:table-cell office:value-type="float" office:value="0.106897">
                <text:p>0.106897</text:p>
              </table:table-cell>
              <table:table-cell office:value-type="float" office:value="0.126746">
                <text:p>0.126746</text:p>
              </table:table-cell>
              <table:table-cell office:value-type="float" office:value="0.00502953">
                <text:p>0.00502953</text:p>
              </table:table-cell>
              <table:table-cell office:value-type="float" office:value="0.00288625">
                <text:p>0.00288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2466">
                <text:p>0.02466</text:p>
              </table:table-cell>
              <table:table-cell office:value-type="float" office:value="0.0231254">
                <text:p>0.0231254</text:p>
              </table:table-cell>
              <table:table-cell office:value-type="float" office:value="0.109229">
                <text:p>0.109229</text:p>
              </table:table-cell>
              <table:table-cell office:value-type="float" office:value="0.128811">
                <text:p>0.128811</text:p>
              </table:table-cell>
              <table:table-cell office:value-type="float" office:value="0.00491008">
                <text:p>0.00491008</text:p>
              </table:table-cell>
              <table:table-cell office:value-type="float" office:value="0.00288148">
                <text:p>0.00288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0242777">
                <text:p>0.0242777</text:p>
              </table:table-cell>
              <table:table-cell office:value-type="float" office:value="0.0228751">
                <text:p>0.0228751</text:p>
              </table:table-cell>
              <table:table-cell office:value-type="float" office:value="0.111515">
                <text:p>0.111515</text:p>
              </table:table-cell>
              <table:table-cell office:value-type="float" office:value="0.130665">
                <text:p>0.130665</text:p>
              </table:table-cell>
              <table:table-cell office:value-type="float" office:value="0.00479659">
                <text:p>0.00479659</text:p>
              </table:table-cell>
              <table:table-cell office:value-type="float" office:value="0.00287368">
                <text:p>0.00287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902">
                <text:p>0.0238902</text:p>
              </table:table-cell>
              <table:table-cell office:value-type="float" office:value="0.0225965">
                <text:p>0.0225965</text:p>
              </table:table-cell>
              <table:table-cell office:value-type="float" office:value="0.113735">
                <text:p>0.113735</text:p>
              </table:table-cell>
              <table:table-cell office:value-type="float" office:value="0.132301">
                <text:p>0.132301</text:p>
              </table:table-cell>
              <table:table-cell office:value-type="float" office:value="0.00468861">
                <text:p>0.00468861</text:p>
              </table:table-cell>
              <table:table-cell office:value-type="float" office:value="0.00286307">
                <text:p>0.00286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25">
                <text:p>1.025</text:p>
              </table:table-cell>
              <table:table-cell office:value-type="float" office:value="0.0234999">
                <text:p>0.0234999</text:p>
              </table:table-cell>
              <table:table-cell office:value-type="float" office:value="0.0222947">
                <text:p>0.0222947</text:p>
              </table:table-cell>
              <table:table-cell office:value-type="float" office:value="0.115615">
                <text:p>0.115615</text:p>
              </table:table-cell>
              <table:table-cell office:value-type="float" office:value="0.133712">
                <text:p>0.133712</text:p>
              </table:table-cell>
              <table:table-cell office:value-type="float" office:value="0.00458569">
                <text:p>0.00458569</text:p>
              </table:table-cell>
              <table:table-cell office:value-type="float" office:value="0.00284986">
                <text:p>0.00284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">
                <text:p>1.05</text:p>
              </table:table-cell>
              <table:table-cell office:value-type="float" office:value="0.0231089">
                <text:p>0.0231089</text:p>
              </table:table-cell>
              <table:table-cell office:value-type="float" office:value="0.0219743">
                <text:p>0.0219743</text:p>
              </table:table-cell>
              <table:table-cell office:value-type="float" office:value="0.117047">
                <text:p>0.117047</text:p>
              </table:table-cell>
              <table:table-cell office:value-type="float" office:value="0.134893">
                <text:p>0.134893</text:p>
              </table:table-cell>
              <table:table-cell office:value-type="float" office:value="0.00448746">
                <text:p>0.00448746</text:p>
              </table:table-cell>
              <table:table-cell office:value-type="float" office:value="0.00283428">
                <text:p>0.002834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5">
                <text:p>1.075</text:p>
              </table:table-cell>
              <table:table-cell office:value-type="float" office:value="0.0227188">
                <text:p>0.0227188</text:p>
              </table:table-cell>
              <table:table-cell office:value-type="float" office:value="0.0216395">
                <text:p>0.0216395</text:p>
              </table:table-cell>
              <table:table-cell office:value-type="float" office:value="0.117867">
                <text:p>0.117867</text:p>
              </table:table-cell>
              <table:table-cell office:value-type="float" office:value="0.135843">
                <text:p>0.135843</text:p>
              </table:table-cell>
              <table:table-cell office:value-type="float" office:value="0.00439359">
                <text:p>0.00439359</text:p>
              </table:table-cell>
              <table:table-cell office:value-type="float" office:value="0.00281651">
                <text:p>0.00281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">
                <text:p>1.1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212938">
                <text:p>0.0212938</text:p>
              </table:table-cell>
              <table:table-cell office:value-type="float" office:value="0.118096">
                <text:p>0.118096</text:p>
              </table:table-cell>
              <table:table-cell office:value-type="float" office:value="0.136563">
                <text:p>0.136563</text:p>
              </table:table-cell>
              <table:table-cell office:value-type="float" office:value="0.00430376">
                <text:p>0.00430376</text:p>
              </table:table-cell>
              <table:table-cell office:value-type="float" office:value="0.00279678">
                <text:p>0.00279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5">
                <text:p>1.125</text:p>
              </table:table-cell>
              <table:table-cell office:value-type="float" office:value="0.0219463">
                <text:p>0.0219463</text:p>
              </table:table-cell>
              <table:table-cell office:value-type="float" office:value="0.0209405">
                <text:p>0.0209405</text:p>
              </table:table-cell>
              <table:table-cell office:value-type="float" office:value="0.117836">
                <text:p>0.117836</text:p>
              </table:table-cell>
              <table:table-cell office:value-type="float" office:value="0.137053">
                <text:p>0.137053</text:p>
              </table:table-cell>
              <table:table-cell office:value-type="float" office:value="0.0042177">
                <text:p>0.0042177</text:p>
              </table:table-cell>
              <table:table-cell office:value-type="float" office:value="0.00277527">
                <text:p>0.00277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">
                <text:p>1.15</text:p>
              </table:table-cell>
              <table:table-cell office:value-type="float" office:value="0.021566">
                <text:p>0.021566</text:p>
              </table:table-cell>
              <table:table-cell office:value-type="float" office:value="0.0205825">
                <text:p>0.0205825</text:p>
              </table:table-cell>
              <table:table-cell office:value-type="float" office:value="0.117194">
                <text:p>0.117194</text:p>
              </table:table-cell>
              <table:table-cell office:value-type="float" office:value="0.137321">
                <text:p>0.137321</text:p>
              </table:table-cell>
              <table:table-cell office:value-type="float" office:value="0.00413515">
                <text:p>0.00413515</text:p>
              </table:table-cell>
              <table:table-cell office:value-type="float" office:value="0.00275215">
                <text:p>0.00275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5">
                <text:p>1.175</text:p>
              </table:table-cell>
              <table:table-cell office:value-type="float" office:value="0.0211905">
                <text:p>0.0211905</text:p>
              </table:table-cell>
              <table:table-cell office:value-type="float" office:value="0.0202222">
                <text:p>0.0202222</text:p>
              </table:table-cell>
              <table:table-cell office:value-type="float" office:value="0.116262">
                <text:p>0.116262</text:p>
              </table:table-cell>
              <table:table-cell office:value-type="float" office:value="0.137374">
                <text:p>0.137374</text:p>
              </table:table-cell>
              <table:table-cell office:value-type="float" office:value="0.0040559">
                <text:p>0.0040559</text:p>
              </table:table-cell>
              <table:table-cell office:value-type="float" office:value="0.00272763">
                <text:p>0.002727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">
                <text:p>1.2</text:p>
              </table:table-cell>
              <table:table-cell office:value-type="float" office:value="0.0208206">
                <text:p>0.0208206</text:p>
              </table:table-cell>
              <table:table-cell office:value-type="float" office:value="0.0198616">
                <text:p>0.0198616</text:p>
              </table:table-cell>
              <table:table-cell office:value-type="float" office:value="0.115113">
                <text:p>0.115113</text:p>
              </table:table-cell>
              <table:table-cell office:value-type="float" office:value="0.13722">
                <text:p>0.13722</text:p>
              </table:table-cell>
              <table:table-cell office:value-type="float" office:value="0.00397974">
                <text:p>0.00397974</text:p>
              </table:table-cell>
              <table:table-cell office:value-type="float" office:value="0.00270184">
                <text:p>0.00270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5">
                <text:p>1.225</text:p>
              </table:table-cell>
              <table:table-cell office:value-type="float" office:value="0.0204566">
                <text:p>0.0204566</text:p>
              </table:table-cell>
              <table:table-cell office:value-type="float" office:value="0.0195026">
                <text:p>0.0195026</text:p>
              </table:table-cell>
              <table:table-cell office:value-type="float" office:value="0.113805">
                <text:p>0.113805</text:p>
              </table:table-cell>
              <table:table-cell office:value-type="float" office:value="0.136872">
                <text:p>0.136872</text:p>
              </table:table-cell>
              <table:table-cell office:value-type="float" office:value="0.00390647">
                <text:p>0.00390647</text:p>
              </table:table-cell>
              <table:table-cell office:value-type="float" office:value="0.00267496">
                <text:p>0.00267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0.020099">
                <text:p>0.020099</text:p>
              </table:table-cell>
              <table:table-cell office:value-type="float" office:value="0.0191465">
                <text:p>0.0191465</text:p>
              </table:table-cell>
              <table:table-cell office:value-type="float" office:value="0.112382">
                <text:p>0.112382</text:p>
              </table:table-cell>
              <table:table-cell office:value-type="float" office:value="0.136342">
                <text:p>0.136342</text:p>
              </table:table-cell>
              <table:table-cell office:value-type="float" office:value="0.00383593">
                <text:p>0.00383593</text:p>
              </table:table-cell>
              <table:table-cell office:value-type="float" office:value="0.00264712">
                <text:p>0.002647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75">
                <text:p>1.275</text:p>
              </table:table-cell>
              <table:table-cell office:value-type="float" office:value="0.0197478">
                <text:p>0.0197478</text:p>
              </table:table-cell>
              <table:table-cell office:value-type="float" office:value="0.0187947">
                <text:p>0.0187947</text:p>
              </table:table-cell>
              <table:table-cell office:value-type="float" office:value="0.110879">
                <text:p>0.110879</text:p>
              </table:table-cell>
              <table:table-cell office:value-type="float" office:value="0.135644">
                <text:p>0.135644</text:p>
              </table:table-cell>
              <table:table-cell office:value-type="float" office:value="0.00376796">
                <text:p>0.00376796</text:p>
              </table:table-cell>
              <table:table-cell office:value-type="float" office:value="0.00261846">
                <text:p>0.00261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">
                <text:p>1.3</text:p>
              </table:table-cell>
              <table:table-cell office:value-type="float" office:value="0.0194034">
                <text:p>0.0194034</text:p>
              </table:table-cell>
              <table:table-cell office:value-type="float" office:value="0.0184481">
                <text:p>0.0184481</text:p>
              </table:table-cell>
              <table:table-cell office:value-type="float" office:value="0.10932">
                <text:p>0.10932</text:p>
              </table:table-cell>
              <table:table-cell office:value-type="float" office:value="0.134792">
                <text:p>0.134792</text:p>
              </table:table-cell>
              <table:table-cell office:value-type="float" office:value="0.00370241">
                <text:p>0.00370241</text:p>
              </table:table-cell>
              <table:table-cell office:value-type="float" office:value="0.00258913">
                <text:p>0.00258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5">
                <text:p>1.325</text:p>
              </table:table-cell>
              <table:table-cell office:value-type="float" office:value="0.0190659">
                <text:p>0.0190659</text:p>
              </table:table-cell>
              <table:table-cell office:value-type="float" office:value="0.0181074">
                <text:p>0.0181074</text:p>
              </table:table-cell>
              <table:table-cell office:value-type="float" office:value="0.107728">
                <text:p>0.107728</text:p>
              </table:table-cell>
              <table:table-cell office:value-type="float" office:value="0.133802">
                <text:p>0.133802</text:p>
              </table:table-cell>
              <table:table-cell office:value-type="float" office:value="0.00363914">
                <text:p>0.00363914</text:p>
              </table:table-cell>
              <table:table-cell office:value-type="float" office:value="0.00255922">
                <text:p>0.00255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">
                <text:p>1.35</text:p>
              </table:table-cell>
              <table:table-cell office:value-type="float" office:value="0.0187353">
                <text:p>0.0187353</text:p>
              </table:table-cell>
              <table:table-cell office:value-type="float" office:value="0.0177734">
                <text:p>0.0177734</text:p>
              </table:table-cell>
              <table:table-cell office:value-type="float" office:value="0.106118">
                <text:p>0.106118</text:p>
              </table:table-cell>
              <table:table-cell office:value-type="float" office:value="0.132687">
                <text:p>0.132687</text:p>
              </table:table-cell>
              <table:table-cell office:value-type="float" office:value="0.00357804">
                <text:p>0.00357804</text:p>
              </table:table-cell>
              <table:table-cell office:value-type="float" office:value="0.00252886">
                <text:p>0.002528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5">
                <text:p>1.375</text:p>
              </table:table-cell>
              <table:table-cell office:value-type="float" office:value="0.0184116">
                <text:p>0.0184116</text:p>
              </table:table-cell>
              <table:table-cell office:value-type="float" office:value="0.0174463">
                <text:p>0.0174463</text:p>
              </table:table-cell>
              <table:table-cell office:value-type="float" office:value="0.104501">
                <text:p>0.104501</text:p>
              </table:table-cell>
              <table:table-cell office:value-type="float" office:value="0.131464">
                <text:p>0.131464</text:p>
              </table:table-cell>
              <table:table-cell office:value-type="float" office:value="0.00351899">
                <text:p>0.00351899</text:p>
              </table:table-cell>
              <table:table-cell office:value-type="float" office:value="0.00249813">
                <text:p>0.00249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">
                <text:p>1.4</text:p>
              </table:table-cell>
              <table:table-cell office:value-type="float" office:value="0.0180949">
                <text:p>0.0180949</text:p>
              </table:table-cell>
              <table:table-cell office:value-type="float" office:value="0.0171267">
                <text:p>0.0171267</text:p>
              </table:table-cell>
              <table:table-cell office:value-type="float" office:value="0.102887">
                <text:p>0.102887</text:p>
              </table:table-cell>
              <table:table-cell office:value-type="float" office:value="0.130146">
                <text:p>0.130146</text:p>
              </table:table-cell>
              <table:table-cell office:value-type="float" office:value="0.00346189">
                <text:p>0.00346189</text:p>
              </table:table-cell>
              <table:table-cell office:value-type="float" office:value="0.00246714">
                <text:p>0.00246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25">
                <text:p>1.425</text:p>
              </table:table-cell>
              <table:table-cell office:value-type="float" office:value="0.0177852">
                <text:p>0.0177852</text:p>
              </table:table-cell>
              <table:table-cell office:value-type="float" office:value="0.0168147">
                <text:p>0.0168147</text:p>
              </table:table-cell>
              <table:table-cell office:value-type="float" office:value="0.101283">
                <text:p>0.101283</text:p>
              </table:table-cell>
              <table:table-cell office:value-type="float" office:value="0.128749">
                <text:p>0.128749</text:p>
              </table:table-cell>
              <table:table-cell office:value-type="float" office:value="0.00340663">
                <text:p>0.00340663</text:p>
              </table:table-cell>
              <table:table-cell office:value-type="float" office:value="0.00243598">
                <text:p>0.00243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">
                <text:p>1.45</text:p>
              </table:table-cell>
              <table:table-cell office:value-type="float" office:value="0.0174823">
                <text:p>0.0174823</text:p>
              </table:table-cell>
              <table:table-cell office:value-type="float" office:value="0.0165106">
                <text:p>0.0165106</text:p>
              </table:table-cell>
              <table:table-cell office:value-type="float" office:value="0.0996948">
                <text:p>0.0996948</text:p>
              </table:table-cell>
              <table:table-cell office:value-type="float" office:value="0.127284">
                <text:p>0.127284</text:p>
              </table:table-cell>
              <table:table-cell office:value-type="float" office:value="0.00335312">
                <text:p>0.00335312</text:p>
              </table:table-cell>
              <table:table-cell office:value-type="float" office:value="0.00240472">
                <text:p>0.00240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75">
                <text:p>1.475</text:p>
              </table:table-cell>
              <table:table-cell office:value-type="float" office:value="0.0171862">
                <text:p>0.0171862</text:p>
              </table:table-cell>
              <table:table-cell office:value-type="float" office:value="0.0162144">
                <text:p>0.0162144</text:p>
              </table:table-cell>
              <table:table-cell office:value-type="float" office:value="0.0981265">
                <text:p>0.0981265</text:p>
              </table:table-cell>
              <table:table-cell office:value-type="float" office:value="0.125765">
                <text:p>0.125765</text:p>
              </table:table-cell>
              <table:table-cell office:value-type="float" office:value="0.00330127">
                <text:p>0.00330127</text:p>
              </table:table-cell>
              <table:table-cell office:value-type="float" office:value="0.00237343">
                <text:p>0.002373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">
                <text:p>1.5</text:p>
              </table:table-cell>
              <table:table-cell office:value-type="float" office:value="0.0168968">
                <text:p>0.0168968</text:p>
              </table:table-cell>
              <table:table-cell office:value-type="float" office:value="0.015926">
                <text:p>0.015926</text:p>
              </table:table-cell>
              <table:table-cell office:value-type="float" office:value="0.0965812">
                <text:p>0.0965812</text:p>
              </table:table-cell>
              <table:table-cell office:value-type="float" office:value="0.124201">
                <text:p>0.124201</text:p>
              </table:table-cell>
              <table:table-cell office:value-type="float" office:value="0.00325102">
                <text:p>0.00325102</text:p>
              </table:table-cell>
              <table:table-cell office:value-type="float" office:value="0.00234218">
                <text:p>0.00234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25">
                <text:p>1.525</text:p>
              </table:table-cell>
              <table:table-cell office:value-type="float" office:value="0.0166141">
                <text:p>0.0166141</text:p>
              </table:table-cell>
              <table:table-cell office:value-type="float" office:value="0.0156456">
                <text:p>0.0156456</text:p>
              </table:table-cell>
              <table:table-cell office:value-type="float" office:value="0.0950614">
                <text:p>0.0950614</text:p>
              </table:table-cell>
              <table:table-cell office:value-type="float" office:value="0.122604">
                <text:p>0.122604</text:p>
              </table:table-cell>
              <table:table-cell office:value-type="float" office:value="0.00320228">
                <text:p>0.00320228</text:p>
              </table:table-cell>
              <table:table-cell office:value-type="float" office:value="0.00231102">
                <text:p>0.00231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5">
                <text:p>1.55</text:p>
              </table:table-cell>
              <table:table-cell office:value-type="float" office:value="0.0163378">
                <text:p>0.0163378</text:p>
              </table:table-cell>
              <table:table-cell office:value-type="float" office:value="0.0153729">
                <text:p>0.0153729</text:p>
              </table:table-cell>
              <table:table-cell office:value-type="float" office:value="0.0935696">
                <text:p>0.0935696</text:p>
              </table:table-cell>
              <table:table-cell office:value-type="float" office:value="0.120983">
                <text:p>0.120983</text:p>
              </table:table-cell>
              <table:table-cell office:value-type="float" office:value="0.00315498">
                <text:p>0.00315498</text:p>
              </table:table-cell>
              <table:table-cell office:value-type="float" office:value="0.00228001">
                <text:p>0.00228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75">
                <text:p>1.575</text:p>
              </table:table-cell>
              <table:table-cell office:value-type="float" office:value="0.0160679">
                <text:p>0.0160679</text:p>
              </table:table-cell>
              <table:table-cell office:value-type="float" office:value="0.0151079">
                <text:p>0.0151079</text:p>
              </table:table-cell>
              <table:table-cell office:value-type="float" office:value="0.0921048">
                <text:p>0.0921048</text:p>
              </table:table-cell>
              <table:table-cell office:value-type="float" office:value="0.119348">
                <text:p>0.119348</text:p>
              </table:table-cell>
              <table:table-cell office:value-type="float" office:value="0.00310905">
                <text:p>0.00310905</text:p>
              </table:table-cell>
              <table:table-cell office:value-type="float" office:value="0.00224919">
                <text:p>0.00224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">
                <text:p>1.6</text:p>
              </table:table-cell>
              <table:table-cell office:value-type="float" office:value="0.0158042">
                <text:p>0.0158042</text:p>
              </table:table-cell>
              <table:table-cell office:value-type="float" office:value="0.0148506">
                <text:p>0.0148506</text:p>
              </table:table-cell>
              <table:table-cell office:value-type="float" office:value="0.0906697">
                <text:p>0.0906697</text:p>
              </table:table-cell>
              <table:table-cell office:value-type="float" office:value="0.117703">
                <text:p>0.117703</text:p>
              </table:table-cell>
              <table:table-cell office:value-type="float" office:value="0.00306445">
                <text:p>0.00306445</text:p>
              </table:table-cell>
              <table:table-cell office:value-type="float" office:value="0.0022186">
                <text:p>0.0022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25">
                <text:p>1.625</text:p>
              </table:table-cell>
              <table:table-cell office:value-type="float" office:value="0.0155466">
                <text:p>0.0155466</text:p>
              </table:table-cell>
              <table:table-cell office:value-type="float" office:value="0.0146006">
                <text:p>0.0146006</text:p>
              </table:table-cell>
              <table:table-cell office:value-type="float" office:value="0.0892642">
                <text:p>0.0892642</text:p>
              </table:table-cell>
              <table:table-cell office:value-type="float" office:value="0.116057">
                <text:p>0.116057</text:p>
              </table:table-cell>
              <table:table-cell office:value-type="float" office:value="0.0030211">
                <text:p>0.0030211</text:p>
              </table:table-cell>
              <table:table-cell office:value-type="float" office:value="0.00218828">
                <text:p>0.00218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">
                <text:p>1.65</text:p>
              </table:table-cell>
              <table:table-cell office:value-type="float" office:value="0.015295">
                <text:p>0.015295</text:p>
              </table:table-cell>
              <table:table-cell office:value-type="float" office:value="0.0143578">
                <text:p>0.0143578</text:p>
              </table:table-cell>
              <table:table-cell office:value-type="float" office:value="0.0878882">
                <text:p>0.0878882</text:p>
              </table:table-cell>
              <table:table-cell office:value-type="float" office:value="0.114414">
                <text:p>0.114414</text:p>
              </table:table-cell>
              <table:table-cell office:value-type="float" office:value="0.00297896">
                <text:p>0.00297896</text:p>
              </table:table-cell>
              <table:table-cell office:value-type="float" office:value="0.00215827">
                <text:p>0.00215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5">
                <text:p>1.675</text:p>
              </table:table-cell>
              <table:table-cell office:value-type="float" office:value="0.0150493">
                <text:p>0.0150493</text:p>
              </table:table-cell>
              <table:table-cell office:value-type="float" office:value="0.0141222">
                <text:p>0.0141222</text:p>
              </table:table-cell>
              <table:table-cell office:value-type="float" office:value="0.0865427">
                <text:p>0.0865427</text:p>
              </table:table-cell>
              <table:table-cell office:value-type="float" office:value="0.112781">
                <text:p>0.112781</text:p>
              </table:table-cell>
              <table:table-cell office:value-type="float" office:value="0.00293797">
                <text:p>0.00293797</text:p>
              </table:table-cell>
              <table:table-cell office:value-type="float" office:value="0.00212859">
                <text:p>0.002128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">
                <text:p>1.7</text:p>
              </table:table-cell>
              <table:table-cell office:value-type="float" office:value="0.0148092">
                <text:p>0.0148092</text:p>
              </table:table-cell>
              <table:table-cell office:value-type="float" office:value="0.0138933">
                <text:p>0.0138933</text:p>
              </table:table-cell>
              <table:table-cell office:value-type="float" office:value="0.0852259">
                <text:p>0.0852259</text:p>
              </table:table-cell>
              <table:table-cell office:value-type="float" office:value="0.111161">
                <text:p>0.111161</text:p>
              </table:table-cell>
              <table:table-cell office:value-type="float" office:value="0.00289808">
                <text:p>0.00289808</text:p>
              </table:table-cell>
              <table:table-cell office:value-type="float" office:value="0.00209926">
                <text:p>0.002099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25">
                <text:p>1.725</text:p>
              </table:table-cell>
              <table:table-cell office:value-type="float" office:value="0.0145747">
                <text:p>0.0145747</text:p>
              </table:table-cell>
              <table:table-cell office:value-type="float" office:value="0.0136712">
                <text:p>0.0136712</text:p>
              </table:table-cell>
              <table:table-cell office:value-type="float" office:value="0.0839388">
                <text:p>0.0839388</text:p>
              </table:table-cell>
              <table:table-cell office:value-type="float" office:value="0.109558">
                <text:p>0.109558</text:p>
              </table:table-cell>
              <table:table-cell office:value-type="float" office:value="0.00285925">
                <text:p>0.00285925</text:p>
              </table:table-cell>
              <table:table-cell office:value-type="float" office:value="0.00207032">
                <text:p>0.002070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">
                <text:p>1.75</text:p>
              </table:table-cell>
              <table:table-cell office:value-type="float" office:value="0.0143457">
                <text:p>0.0143457</text:p>
              </table:table-cell>
              <table:table-cell office:value-type="float" office:value="0.0134556">
                <text:p>0.0134556</text:p>
              </table:table-cell>
              <table:table-cell office:value-type="float" office:value="0.0826803">
                <text:p>0.0826803</text:p>
              </table:table-cell>
              <table:table-cell office:value-type="float" office:value="0.107975">
                <text:p>0.107975</text:p>
              </table:table-cell>
              <table:table-cell office:value-type="float" office:value="0.00282144">
                <text:p>0.00282144</text:p>
              </table:table-cell>
              <table:table-cell office:value-type="float" office:value="0.00204177">
                <text:p>0.002041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75">
                <text:p>1.775</text:p>
              </table:table-cell>
              <table:table-cell office:value-type="float" office:value="0.0141219">
                <text:p>0.0141219</text:p>
              </table:table-cell>
              <table:table-cell office:value-type="float" office:value="0.0132461">
                <text:p>0.0132461</text:p>
              </table:table-cell>
              <table:table-cell office:value-type="float" office:value="0.0814503">
                <text:p>0.0814503</text:p>
              </table:table-cell>
              <table:table-cell office:value-type="float" office:value="0.106414">
                <text:p>0.106414</text:p>
              </table:table-cell>
              <table:table-cell office:value-type="float" office:value="0.00278461">
                <text:p>0.00278461</text:p>
              </table:table-cell>
              <table:table-cell office:value-type="float" office:value="0.00201363">
                <text:p>0.002013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">
                <text:p>1.8</text:p>
              </table:table-cell>
              <table:table-cell office:value-type="float" office:value="0.0139033">
                <text:p>0.0139033</text:p>
              </table:table-cell>
              <table:table-cell office:value-type="float" office:value="0.0130429">
                <text:p>0.0130429</text:p>
              </table:table-cell>
              <table:table-cell office:value-type="float" office:value="0.0802483">
                <text:p>0.0802483</text:p>
              </table:table-cell>
              <table:table-cell office:value-type="float" office:value="0.104877">
                <text:p>0.104877</text:p>
              </table:table-cell>
              <table:table-cell office:value-type="float" office:value="0.00274872">
                <text:p>0.00274872</text:p>
              </table:table-cell>
              <table:table-cell office:value-type="float" office:value="0.00198591">
                <text:p>0.001985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25">
                <text:p>1.825</text:p>
              </table:table-cell>
              <table:table-cell office:value-type="float" office:value="0.0136897">
                <text:p>0.0136897</text:p>
              </table:table-cell>
              <table:table-cell office:value-type="float" office:value="0.0128454">
                <text:p>0.0128454</text:p>
              </table:table-cell>
              <table:table-cell office:value-type="float" office:value="0.0790737">
                <text:p>0.0790737</text:p>
              </table:table-cell>
              <table:table-cell office:value-type="float" office:value="0.103367">
                <text:p>0.103367</text:p>
              </table:table-cell>
              <table:table-cell office:value-type="float" office:value="0.00271372">
                <text:p>0.00271372</text:p>
              </table:table-cell>
              <table:table-cell office:value-type="float" office:value="0.00195864">
                <text:p>0.001958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">
                <text:p>1.85</text:p>
              </table:table-cell>
              <table:table-cell office:value-type="float" office:value="0.0134809">
                <text:p>0.0134809</text:p>
              </table:table-cell>
              <table:table-cell office:value-type="float" office:value="0.0126537">
                <text:p>0.0126537</text:p>
              </table:table-cell>
              <table:table-cell office:value-type="float" office:value="0.0779259">
                <text:p>0.0779259</text:p>
              </table:table-cell>
              <table:table-cell office:value-type="float" office:value="0.101884">
                <text:p>0.101884</text:p>
              </table:table-cell>
              <table:table-cell office:value-type="float" office:value="0.0026796">
                <text:p>0.0026796</text:p>
              </table:table-cell>
              <table:table-cell office:value-type="float" office:value="0.00193181">
                <text:p>0.001931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75">
                <text:p>1.875</text:p>
              </table:table-cell>
              <table:table-cell office:value-type="float" office:value="0.013277">
                <text:p>0.013277</text:p>
              </table:table-cell>
              <table:table-cell office:value-type="float" office:value="0.0124674">
                <text:p>0.0124674</text:p>
              </table:table-cell>
              <table:table-cell office:value-type="float" office:value="0.0768042">
                <text:p>0.0768042</text:p>
              </table:table-cell>
              <table:table-cell office:value-type="float" office:value="0.100429">
                <text:p>0.100429</text:p>
              </table:table-cell>
              <table:table-cell office:value-type="float" office:value="0.00264631">
                <text:p>0.00264631</text:p>
              </table:table-cell>
              <table:table-cell office:value-type="float" office:value="0.00190542">
                <text:p>0.00190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">
                <text:p>1.9</text:p>
              </table:table-cell>
              <table:table-cell office:value-type="float" office:value="0.0130777">
                <text:p>0.0130777</text:p>
              </table:table-cell>
              <table:table-cell office:value-type="float" office:value="0.0122864">
                <text:p>0.0122864</text:p>
              </table:table-cell>
              <table:table-cell office:value-type="float" office:value="0.075708">
                <text:p>0.075708</text:p>
              </table:table-cell>
              <table:table-cell office:value-type="float" office:value="0.0990027">
                <text:p>0.0990027</text:p>
              </table:table-cell>
              <table:table-cell office:value-type="float" office:value="0.00261382">
                <text:p>0.00261382</text:p>
              </table:table-cell>
              <table:table-cell office:value-type="float" office:value="0.00187949">
                <text:p>0.00187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25">
                <text:p>1.925</text:p>
              </table:table-cell>
              <table:table-cell office:value-type="float" office:value="0.0128828">
                <text:p>0.0128828</text:p>
              </table:table-cell>
              <table:table-cell office:value-type="float" office:value="0.0121105">
                <text:p>0.0121105</text:p>
              </table:table-cell>
              <table:table-cell office:value-type="float" office:value="0.0746368">
                <text:p>0.0746368</text:p>
              </table:table-cell>
              <table:table-cell office:value-type="float" office:value="0.0976053">
                <text:p>0.0976053</text:p>
              </table:table-cell>
              <table:table-cell office:value-type="float" office:value="0.00258211">
                <text:p>0.00258211</text:p>
              </table:table-cell>
              <table:table-cell office:value-type="float" office:value="0.00185402">
                <text:p>0.00185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5">
                <text:p>1.95</text:p>
              </table:table-cell>
              <table:table-cell office:value-type="float" office:value="0.0126924">
                <text:p>0.0126924</text:p>
              </table:table-cell>
              <table:table-cell office:value-type="float" office:value="0.0119396">
                <text:p>0.0119396</text:p>
              </table:table-cell>
              <table:table-cell office:value-type="float" office:value="0.0735897">
                <text:p>0.0735897</text:p>
              </table:table-cell>
              <table:table-cell office:value-type="float" office:value="0.0962384">
                <text:p>0.0962384</text:p>
              </table:table-cell>
              <table:table-cell office:value-type="float" office:value="0.00255114">
                <text:p>0.00255114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75">
                <text:p>1.975</text:p>
              </table:table-cell>
              <table:table-cell office:value-type="float" office:value="0.0125063">
                <text:p>0.0125063</text:p>
              </table:table-cell>
              <table:table-cell office:value-type="float" office:value="0.0117735">
                <text:p>0.0117735</text:p>
              </table:table-cell>
              <table:table-cell office:value-type="float" office:value="0.0725663">
                <text:p>0.0725663</text:p>
              </table:table-cell>
              <table:table-cell office:value-type="float" office:value="0.0949011">
                <text:p>0.0949011</text:p>
              </table:table-cell>
              <table:table-cell office:value-type="float" office:value="0.00252089">
                <text:p>0.00252089</text:p>
              </table:table-cell>
              <table:table-cell office:value-type="float" office:value="0.00180444">
                <text:p>0.00180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0123243">
                <text:p>0.0123243</text:p>
              </table:table-cell>
              <table:table-cell office:value-type="float" office:value="0.0116119">
                <text:p>0.0116119</text:p>
              </table:table-cell>
              <table:table-cell office:value-type="float" office:value="0.0715659">
                <text:p>0.0715659</text:p>
              </table:table-cell>
              <table:table-cell office:value-type="float" office:value="0.0935926">
                <text:p>0.0935926</text:p>
              </table:table-cell>
              <table:table-cell office:value-type="float" office:value="0.00249134">
                <text:p>0.00249134</text:p>
              </table:table-cell>
              <table:table-cell office:value-type="float" office:value="0.00178034">
                <text:p>0.001780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5">
                <text:p>2.025</text:p>
              </table:table-cell>
              <table:table-cell office:value-type="float" office:value="0.0121463">
                <text:p>0.0121463</text:p>
              </table:table-cell>
              <table:table-cell office:value-type="float" office:value="0.0114548">
                <text:p>0.0114548</text:p>
              </table:table-cell>
              <table:table-cell office:value-type="float" office:value="0.070588">
                <text:p>0.070588</text:p>
              </table:table-cell>
              <table:table-cell office:value-type="float" office:value="0.0923144">
                <text:p>0.0923144</text:p>
              </table:table-cell>
              <table:table-cell office:value-type="float" office:value="0.00246246">
                <text:p>0.00246246</text:p>
              </table:table-cell>
              <table:table-cell office:value-type="float" office:value="0.0017567">
                <text:p>0.0017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">
                <text:p>2.05</text:p>
              </table:table-cell>
              <table:table-cell office:value-type="float" office:value="0.0119723">
                <text:p>0.0119723</text:p>
              </table:table-cell>
              <table:table-cell office:value-type="float" office:value="0.011302">
                <text:p>0.011302</text:p>
              </table:table-cell>
              <table:table-cell office:value-type="float" office:value="0.0696322">
                <text:p>0.0696322</text:p>
              </table:table-cell>
              <table:table-cell office:value-type="float" office:value="0.0910659">
                <text:p>0.0910659</text:p>
              </table:table-cell>
              <table:table-cell office:value-type="float" office:value="0.00243422">
                <text:p>0.00243422</text:p>
              </table:table-cell>
              <table:table-cell office:value-type="float" office:value="0.0017335">
                <text:p>0.0017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5">
                <text:p>2.075</text:p>
              </table:table-cell>
              <table:table-cell office:value-type="float" office:value="0.0118021">
                <text:p>0.0118021</text:p>
              </table:table-cell>
              <table:table-cell office:value-type="float" office:value="0.0111532">
                <text:p>0.0111532</text:p>
              </table:table-cell>
              <table:table-cell office:value-type="float" office:value="0.0686976">
                <text:p>0.0686976</text:p>
              </table:table-cell>
              <table:table-cell office:value-type="float" office:value="0.0898453">
                <text:p>0.0898453</text:p>
              </table:table-cell>
              <table:table-cell office:value-type="float" office:value="0.00240661">
                <text:p>0.00240661</text:p>
              </table:table-cell>
              <table:table-cell office:value-type="float" office:value="0.00171077">
                <text:p>0.001710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">
                <text:p>2.1</text:p>
              </table:table-cell>
              <table:table-cell office:value-type="float" office:value="0.0116356">
                <text:p>0.0116356</text:p>
              </table:table-cell>
              <table:table-cell office:value-type="float" office:value="0.0110085">
                <text:p>0.0110085</text:p>
              </table:table-cell>
              <table:table-cell office:value-type="float" office:value="0.0677836">
                <text:p>0.0677836</text:p>
              </table:table-cell>
              <table:table-cell office:value-type="float" office:value="0.0886543">
                <text:p>0.0886543</text:p>
              </table:table-cell>
              <table:table-cell office:value-type="float" office:value="0.00237961">
                <text:p>0.00237961</text:p>
              </table:table-cell>
              <table:table-cell office:value-type="float" office:value="0.00168847">
                <text:p>0.001688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5">
                <text:p>2.125</text:p>
              </table:table-cell>
              <table:table-cell office:value-type="float" office:value="0.0114727">
                <text:p>0.0114727</text:p>
              </table:table-cell>
              <table:table-cell office:value-type="float" office:value="0.0108676">
                <text:p>0.0108676</text:p>
              </table:table-cell>
              <table:table-cell office:value-type="float" office:value="0.0668898">
                <text:p>0.0668898</text:p>
              </table:table-cell>
              <table:table-cell office:value-type="float" office:value="0.0874904">
                <text:p>0.0874904</text:p>
              </table:table-cell>
              <table:table-cell office:value-type="float" office:value="0.00235319">
                <text:p>0.00235319</text:p>
              </table:table-cell>
              <table:table-cell office:value-type="float" office:value="0.00166661">
                <text:p>0.001666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5">
                <text:p>2.15</text:p>
              </table:table-cell>
              <table:table-cell office:value-type="float" office:value="0.0113134">
                <text:p>0.0113134</text:p>
              </table:table-cell>
              <table:table-cell office:value-type="float" office:value="0.0107304">
                <text:p>0.0107304</text:p>
              </table:table-cell>
              <table:table-cell office:value-type="float" office:value="0.0660153">
                <text:p>0.0660153</text:p>
              </table:table-cell>
              <table:table-cell office:value-type="float" office:value="0.0863537">
                <text:p>0.0863537</text:p>
              </table:table-cell>
              <table:table-cell office:value-type="float" office:value="0.00232734">
                <text:p>0.00232734</text:p>
              </table:table-cell>
              <table:table-cell office:value-type="float" office:value="0.00164519">
                <text:p>0.00164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5">
                <text:p>2.175</text:p>
              </table:table-cell>
              <table:table-cell office:value-type="float" office:value="0.0111574">
                <text:p>0.0111574</text:p>
              </table:table-cell>
              <table:table-cell office:value-type="float" office:value="0.0105967">
                <text:p>0.0105967</text:p>
              </table:table-cell>
              <table:table-cell office:value-type="float" office:value="0.0651599">
                <text:p>0.0651599</text:p>
              </table:table-cell>
              <table:table-cell office:value-type="float" office:value="0.0852448">
                <text:p>0.0852448</text:p>
              </table:table-cell>
              <table:table-cell office:value-type="float" office:value="0.00230203">
                <text:p>0.00230203</text:p>
              </table:table-cell>
              <table:table-cell office:value-type="float" office:value="0.00162421">
                <text:p>0.00162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0.0110049">
                <text:p>0.0110049</text:p>
              </table:table-cell>
              <table:table-cell office:value-type="float" office:value="0.0104665">
                <text:p>0.0104665</text:p>
              </table:table-cell>
              <table:table-cell office:value-type="float" office:value="0.0643228">
                <text:p>0.0643228</text:p>
              </table:table-cell>
              <table:table-cell office:value-type="float" office:value="0.0841615">
                <text:p>0.0841615</text:p>
              </table:table-cell>
              <table:table-cell office:value-type="float" office:value="0.00227725">
                <text:p>0.00227725</text:p>
              </table:table-cell>
              <table:table-cell office:value-type="float" office:value="0.00160363">
                <text:p>0.001603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25">
                <text:p>2.225</text:p>
              </table:table-cell>
              <table:table-cell office:value-type="float" office:value="0.0108555">
                <text:p>0.0108555</text:p>
              </table:table-cell>
              <table:table-cell office:value-type="float" office:value="0.0103396">
                <text:p>0.0103396</text:p>
              </table:table-cell>
              <table:table-cell office:value-type="float" office:value="0.0635036">
                <text:p>0.0635036</text:p>
              </table:table-cell>
              <table:table-cell office:value-type="float" office:value="0.0831045">
                <text:p>0.0831045</text:p>
              </table:table-cell>
              <table:table-cell office:value-type="float" office:value="0.00225299">
                <text:p>0.00225299</text:p>
              </table:table-cell>
              <table:table-cell office:value-type="float" office:value="0.00158349">
                <text:p>0.00158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5">
                <text:p>2.25</text:p>
              </table:table-cell>
              <table:table-cell office:value-type="float" office:value="0.0107094">
                <text:p>0.0107094</text:p>
              </table:table-cell>
              <table:table-cell office:value-type="float" office:value="0.010216">
                <text:p>0.010216</text:p>
              </table:table-cell>
              <table:table-cell office:value-type="float" office:value="0.0627018">
                <text:p>0.0627018</text:p>
              </table:table-cell>
              <table:table-cell office:value-type="float" office:value="0.082072">
                <text:p>0.082072</text:p>
              </table:table-cell>
              <table:table-cell office:value-type="float" office:value="0.00222922">
                <text:p>0.00222922</text:p>
              </table:table-cell>
              <table:table-cell office:value-type="float" office:value="0.00156374">
                <text:p>0.00156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75">
                <text:p>2.275</text:p>
              </table:table-cell>
              <table:table-cell office:value-type="float" office:value="0.0105662">
                <text:p>0.0105662</text:p>
              </table:table-cell>
              <table:table-cell office:value-type="float" office:value="0.0100954">
                <text:p>0.0100954</text:p>
              </table:table-cell>
              <table:table-cell office:value-type="float" office:value="0.0619168">
                <text:p>0.0619168</text:p>
              </table:table-cell>
              <table:table-cell office:value-type="float" office:value="0.0810642">
                <text:p>0.0810642</text:p>
              </table:table-cell>
              <table:table-cell office:value-type="float" office:value="0.00220594">
                <text:p>0.00220594</text:p>
              </table:table-cell>
              <table:table-cell office:value-type="float" office:value="0.00154441">
                <text:p>0.00154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">
                <text:p>2.3</text:p>
              </table:table-cell>
              <table:table-cell office:value-type="float" office:value="0.0104261">
                <text:p>0.0104261</text:p>
              </table:table-cell>
              <table:table-cell office:value-type="float" office:value="0.00997781">
                <text:p>0.00997781</text:p>
              </table:table-cell>
              <table:table-cell office:value-type="float" office:value="0.0611481">
                <text:p>0.0611481</text:p>
              </table:table-cell>
              <table:table-cell office:value-type="float" office:value="0.0800801">
                <text:p>0.0800801</text:p>
              </table:table-cell>
              <table:table-cell office:value-type="float" office:value="0.00218312">
                <text:p>0.00218312</text:p>
              </table:table-cell>
              <table:table-cell office:value-type="float" office:value="0.00152547">
                <text:p>0.001525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25">
                <text:p>2.325</text:p>
              </table:table-cell>
              <table:table-cell office:value-type="float" office:value="0.0102889">
                <text:p>0.0102889</text:p>
              </table:table-cell>
              <table:table-cell office:value-type="float" office:value="0.00986315">
                <text:p>0.00986315</text:p>
              </table:table-cell>
              <table:table-cell office:value-type="float" office:value="0.0603953">
                <text:p>0.0603953</text:p>
              </table:table-cell>
              <table:table-cell office:value-type="float" office:value="0.0791193">
                <text:p>0.0791193</text:p>
              </table:table-cell>
              <table:table-cell office:value-type="float" office:value="0.00216076">
                <text:p>0.00216076</text:p>
              </table:table-cell>
              <table:table-cell office:value-type="float" office:value="0.00150691">
                <text:p>0.00150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">
                <text:p>2.35</text:p>
              </table:table-cell>
              <table:table-cell office:value-type="float" office:value="0.0101546">
                <text:p>0.0101546</text:p>
              </table:table-cell>
              <table:table-cell office:value-type="float" office:value="0.00975128">
                <text:p>0.00975128</text:p>
              </table:table-cell>
              <table:table-cell office:value-type="float" office:value="0.0596578">
                <text:p>0.0596578</text:p>
              </table:table-cell>
              <table:table-cell office:value-type="float" office:value="0.0781811">
                <text:p>0.0781811</text:p>
              </table:table-cell>
              <table:table-cell office:value-type="float" office:value="0.00213883">
                <text:p>0.00213883</text:p>
              </table:table-cell>
              <table:table-cell office:value-type="float" office:value="0.00148875">
                <text:p>0.00148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75">
                <text:p>2.375</text:p>
              </table:table-cell>
              <table:table-cell office:value-type="float" office:value="0.010023">
                <text:p>0.010023</text:p>
              </table:table-cell>
              <table:table-cell office:value-type="float" office:value="0.00964204">
                <text:p>0.00964204</text:p>
              </table:table-cell>
              <table:table-cell office:value-type="float" office:value="0.0589354">
                <text:p>0.0589354</text:p>
              </table:table-cell>
              <table:table-cell office:value-type="float" office:value="0.0772646">
                <text:p>0.0772646</text:p>
              </table:table-cell>
              <table:table-cell office:value-type="float" office:value="0.00211733">
                <text:p>0.00211733</text:p>
              </table:table-cell>
              <table:table-cell office:value-type="float" office:value="0.00147095">
                <text:p>0.001470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">
                <text:p>2.4</text:p>
              </table:table-cell>
              <table:table-cell office:value-type="float" office:value="0.00989405">
                <text:p>0.00989405</text:p>
              </table:table-cell>
              <table:table-cell office:value-type="float" office:value="0.00953544">
                <text:p>0.00953544</text:p>
              </table:table-cell>
              <table:table-cell office:value-type="float" office:value="0.0582275">
                <text:p>0.0582275</text:p>
              </table:table-cell>
              <table:table-cell office:value-type="float" office:value="0.0763696">
                <text:p>0.0763696</text:p>
              </table:table-cell>
              <table:table-cell office:value-type="float" office:value="0.00209625">
                <text:p>0.00209625</text:p>
              </table:table-cell>
              <table:table-cell office:value-type="float" office:value="0.00145352">
                <text:p>0.00145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25">
                <text:p>2.425</text:p>
              </table:table-cell>
              <table:table-cell office:value-type="float" office:value="0.00976772">
                <text:p>0.00976772</text:p>
              </table:table-cell>
              <table:table-cell office:value-type="float" office:value="0.00943129">
                <text:p>0.00943129</text:p>
              </table:table-cell>
              <table:table-cell office:value-type="float" office:value="0.0575338">
                <text:p>0.0575338</text:p>
              </table:table-cell>
              <table:table-cell office:value-type="float" office:value="0.0754953">
                <text:p>0.0754953</text:p>
              </table:table-cell>
              <table:table-cell office:value-type="float" office:value="0.00207557">
                <text:p>0.00207557</text:p>
              </table:table-cell>
              <table:table-cell office:value-type="float" office:value="0.00143645">
                <text:p>0.00143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5">
                <text:p>2.45</text:p>
              </table:table-cell>
              <table:table-cell office:value-type="float" office:value="0.00964401">
                <text:p>0.00964401</text:p>
              </table:table-cell>
              <table:table-cell office:value-type="float" office:value="0.00932962">
                <text:p>0.00932962</text:p>
              </table:table-cell>
              <table:table-cell office:value-type="float" office:value="0.056854">
                <text:p>0.056854</text:p>
              </table:table-cell>
              <table:table-cell office:value-type="float" office:value="0.0746409">
                <text:p>0.0746409</text:p>
              </table:table-cell>
              <table:table-cell office:value-type="float" office:value="0.00205528">
                <text:p>0.00205528</text:p>
              </table:table-cell>
              <table:table-cell office:value-type="float" office:value="0.00141972">
                <text:p>0.001419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75">
                <text:p>2.475</text:p>
              </table:table-cell>
              <table:table-cell office:value-type="float" office:value="0.00952269">
                <text:p>0.00952269</text:p>
              </table:table-cell>
              <table:table-cell office:value-type="float" office:value="0.00923033">
                <text:p>0.00923033</text:p>
              </table:table-cell>
              <table:table-cell office:value-type="float" office:value="0.0561875">
                <text:p>0.0561875</text:p>
              </table:table-cell>
              <table:table-cell office:value-type="float" office:value="0.0738063">
                <text:p>0.0738063</text:p>
              </table:table-cell>
              <table:table-cell office:value-type="float" office:value="0.00203536">
                <text:p>0.00203536</text:p>
              </table:table-cell>
              <table:table-cell office:value-type="float" office:value="0.00140335">
                <text:p>0.001403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0.00940384">
                <text:p>0.00940384</text:p>
              </table:table-cell>
              <table:table-cell office:value-type="float" office:value="0.00913334">
                <text:p>0.00913334</text:p>
              </table:table-cell>
              <table:table-cell office:value-type="float" office:value="0.0555341">
                <text:p>0.0555341</text:p>
              </table:table-cell>
              <table:table-cell office:value-type="float" office:value="0.0729906">
                <text:p>0.0729906</text:p>
              </table:table-cell>
              <table:table-cell office:value-type="float" office:value="0.00201582">
                <text:p>0.00201582</text:p>
              </table:table-cell>
              <table:table-cell office:value-type="float" office:value="0.0013873">
                <text:p>0.0013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25">
                <text:p>2.525</text:p>
              </table:table-cell>
              <table:table-cell office:value-type="float" office:value="0.00928737">
                <text:p>0.00928737</text:p>
              </table:table-cell>
              <table:table-cell office:value-type="float" office:value="0.00903848">
                <text:p>0.00903848</text:p>
              </table:table-cell>
              <table:table-cell office:value-type="float" office:value="0.0548934">
                <text:p>0.0548934</text:p>
              </table:table-cell>
              <table:table-cell office:value-type="float" office:value="0.0721932">
                <text:p>0.0721932</text:p>
              </table:table-cell>
              <table:table-cell office:value-type="float" office:value="0.00199664">
                <text:p>0.00199664</text:p>
              </table:table-cell>
              <table:table-cell office:value-type="float" office:value="0.00137159">
                <text:p>0.001371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5">
                <text:p>2.55</text:p>
              </table:table-cell>
              <table:table-cell office:value-type="float" office:value="0.0091732">
                <text:p>0.0091732</text:p>
              </table:table-cell>
              <table:table-cell office:value-type="float" office:value="0.00894577">
                <text:p>0.00894577</text:p>
              </table:table-cell>
              <table:table-cell office:value-type="float" office:value="0.0542651">
                <text:p>0.0542651</text:p>
              </table:table-cell>
              <table:table-cell office:value-type="float" office:value="0.0714139">
                <text:p>0.0714139</text:p>
              </table:table-cell>
              <table:table-cell office:value-type="float" office:value="0.0019778">
                <text:p>0.0019778</text:p>
              </table:table-cell>
              <table:table-cell office:value-type="float" office:value="0.0013562">
                <text:p>0.00135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75">
                <text:p>2.575</text:p>
              </table:table-cell>
              <table:table-cell office:value-type="float" office:value="0.00906117">
                <text:p>0.00906117</text:p>
              </table:table-cell>
              <table:table-cell office:value-type="float" office:value="0.00885511">
                <text:p>0.00885511</text:p>
              </table:table-cell>
              <table:table-cell office:value-type="float" office:value="0.0536489">
                <text:p>0.0536489</text:p>
              </table:table-cell>
              <table:table-cell office:value-type="float" office:value="0.0706518">
                <text:p>0.0706518</text:p>
              </table:table-cell>
              <table:table-cell office:value-type="float" office:value="0.00195937">
                <text:p>0.00195937</text:p>
              </table:table-cell>
              <table:table-cell office:value-type="float" office:value="0.00134112">
                <text:p>0.00134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00895144">
                <text:p>0.00895144</text:p>
              </table:table-cell>
              <table:table-cell office:value-type="float" office:value="0.00876642">
                <text:p>0.00876642</text:p>
              </table:table-cell>
              <table:table-cell office:value-type="float" office:value="0.0530444">
                <text:p>0.0530444</text:p>
              </table:table-cell>
              <table:table-cell office:value-type="float" office:value="0.0699066">
                <text:p>0.0699066</text:p>
              </table:table-cell>
              <table:table-cell office:value-type="float" office:value="0.00194127">
                <text:p>0.00194127</text:p>
              </table:table-cell>
              <table:table-cell office:value-type="float" office:value="0.00132635">
                <text:p>0.001326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2499999999999">
                <text:p>2.62499999999999</text:p>
              </table:table-cell>
              <table:table-cell office:value-type="float" office:value="0.00884376">
                <text:p>0.00884376</text:p>
              </table:table-cell>
              <table:table-cell office:value-type="float" office:value="0.0086797">
                <text:p>0.0086797</text:p>
              </table:table-cell>
              <table:table-cell office:value-type="float" office:value="0.0524513">
                <text:p>0.0524513</text:p>
              </table:table-cell>
              <table:table-cell office:value-type="float" office:value="0.0691777">
                <text:p>0.0691777</text:p>
              </table:table-cell>
              <table:table-cell office:value-type="float" office:value="0.00192353">
                <text:p>0.00192353</text:p>
              </table:table-cell>
              <table:table-cell office:value-type="float" office:value="0.00131188">
                <text:p>0.001311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0.00873814">
                <text:p>0.00873814</text:p>
              </table:table-cell>
              <table:table-cell office:value-type="float" office:value="0.00859488">
                <text:p>0.00859488</text:p>
              </table:table-cell>
              <table:table-cell office:value-type="float" office:value="0.0518693">
                <text:p>0.0518693</text:p>
              </table:table-cell>
              <table:table-cell office:value-type="float" office:value="0.0684647">
                <text:p>0.0684647</text:p>
              </table:table-cell>
              <table:table-cell office:value-type="float" office:value="0.00190607">
                <text:p>0.00190607</text:p>
              </table:table-cell>
              <table:table-cell office:value-type="float" office:value="0.0012977">
                <text:p>0.00129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7499999999999">
                <text:p>2.67499999999999</text:p>
              </table:table-cell>
              <table:table-cell office:value-type="float" office:value="0.00863458">
                <text:p>0.00863458</text:p>
              </table:table-cell>
              <table:table-cell office:value-type="float" office:value="0.00851178">
                <text:p>0.00851178</text:p>
              </table:table-cell>
              <table:table-cell office:value-type="float" office:value="0.0512981">
                <text:p>0.0512981</text:p>
              </table:table-cell>
              <table:table-cell office:value-type="float" office:value="0.067767">
                <text:p>0.067767</text:p>
              </table:table-cell>
              <table:table-cell office:value-type="float" office:value="0.00188888">
                <text:p>0.00188888</text:p>
              </table:table-cell>
              <table:table-cell office:value-type="float" office:value="0.00128381">
                <text:p>0.001283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00853298">
                <text:p>0.00853298</text:p>
              </table:table-cell>
              <table:table-cell office:value-type="float" office:value="0.00843049">
                <text:p>0.00843049</text:p>
              </table:table-cell>
              <table:table-cell office:value-type="float" office:value="0.0507375">
                <text:p>0.0507375</text:p>
              </table:table-cell>
              <table:table-cell office:value-type="float" office:value="0.0670844">
                <text:p>0.0670844</text:p>
              </table:table-cell>
              <table:table-cell office:value-type="float" office:value="0.00187204">
                <text:p>0.00187204</text:p>
              </table:table-cell>
              <table:table-cell office:value-type="float" office:value="0.00127019">
                <text:p>0.00127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2499999999999">
                <text:p>2.72499999999999</text:p>
              </table:table-cell>
              <table:table-cell office:value-type="float" office:value="0.00843328">
                <text:p>0.00843328</text:p>
              </table:table-cell>
              <table:table-cell office:value-type="float" office:value="0.00835092">
                <text:p>0.00835092</text:p>
              </table:table-cell>
              <table:table-cell office:value-type="float" office:value="0.0501872">
                <text:p>0.0501872</text:p>
              </table:table-cell>
              <table:table-cell office:value-type="float" office:value="0.0664162">
                <text:p>0.0664162</text:p>
              </table:table-cell>
              <table:table-cell office:value-type="float" office:value="0.00185553">
                <text:p>0.00185553</text:p>
              </table:table-cell>
              <table:table-cell office:value-type="float" office:value="0.00125686">
                <text:p>0.001256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0.00833547">
                <text:p>0.00833547</text:p>
              </table:table-cell>
              <table:table-cell office:value-type="float" office:value="0.008273">
                <text:p>0.008273</text:p>
              </table:table-cell>
              <table:table-cell office:value-type="float" office:value="0.0496469">
                <text:p>0.0496469</text:p>
              </table:table-cell>
              <table:table-cell office:value-type="float" office:value="0.0657621">
                <text:p>0.0657621</text:p>
              </table:table-cell>
              <table:table-cell office:value-type="float" office:value="0.00183921">
                <text:p>0.00183921</text:p>
              </table:table-cell>
              <table:table-cell office:value-type="float" office:value="0.00124378">
                <text:p>0.001243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7499999999999">
                <text:p>2.77499999999999</text:p>
              </table:table-cell>
              <table:table-cell office:value-type="float" office:value="0.00823955">
                <text:p>0.00823955</text:p>
              </table:table-cell>
              <table:table-cell office:value-type="float" office:value="0.00819664">
                <text:p>0.00819664</text:p>
              </table:table-cell>
              <table:table-cell office:value-type="float" office:value="0.0491163">
                <text:p>0.0491163</text:p>
              </table:table-cell>
              <table:table-cell office:value-type="float" office:value="0.0651217">
                <text:p>0.0651217</text:p>
              </table:table-cell>
              <table:table-cell office:value-type="float" office:value="0.00182323">
                <text:p>0.00182323</text:p>
              </table:table-cell>
              <table:table-cell office:value-type="float" office:value="0.00123097">
                <text:p>0.001230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00814531">
                <text:p>0.00814531</text:p>
              </table:table-cell>
              <table:table-cell office:value-type="float" office:value="0.00812185">
                <text:p>0.00812185</text:p>
              </table:table-cell>
              <table:table-cell office:value-type="float" office:value="0.0485953">
                <text:p>0.0485953</text:p>
              </table:table-cell>
              <table:table-cell office:value-type="float" office:value="0.0644946">
                <text:p>0.0644946</text:p>
              </table:table-cell>
              <table:table-cell office:value-type="float" office:value="0.00180743">
                <text:p>0.00180743</text:p>
              </table:table-cell>
              <table:table-cell office:value-type="float" office:value="0.00121841">
                <text:p>0.001218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2499999999999">
                <text:p>2.82499999999999</text:p>
              </table:table-cell>
              <table:table-cell office:value-type="float" office:value="0.00805284">
                <text:p>0.00805284</text:p>
              </table:table-cell>
              <table:table-cell office:value-type="float" office:value="0.00804857">
                <text:p>0.00804857</text:p>
              </table:table-cell>
              <table:table-cell office:value-type="float" office:value="0.0480835">
                <text:p>0.0480835</text:p>
              </table:table-cell>
              <table:table-cell office:value-type="float" office:value="0.0638803">
                <text:p>0.0638803</text:p>
              </table:table-cell>
              <table:table-cell office:value-type="float" office:value="0.00179196">
                <text:p>0.00179196</text:p>
              </table:table-cell>
              <table:table-cell office:value-type="float" office:value="0.0012061">
                <text:p>0.0012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4999999999999">
                <text:p>2.84999999999999</text:p>
              </table:table-cell>
              <table:table-cell office:value-type="float" office:value="0.00796208">
                <text:p>0.00796208</text:p>
              </table:table-cell>
              <table:table-cell office:value-type="float" office:value="0.00797675">
                <text:p>0.00797675</text:p>
              </table:table-cell>
              <table:table-cell office:value-type="float" office:value="0.0475809">
                <text:p>0.0475809</text:p>
              </table:table-cell>
              <table:table-cell office:value-type="float" office:value="0.0632786">
                <text:p>0.0632786</text:p>
              </table:table-cell>
              <table:table-cell office:value-type="float" office:value="0.00177666">
                <text:p>0.00177666</text:p>
              </table:table-cell>
              <table:table-cell office:value-type="float" office:value="0.00119402">
                <text:p>0.00119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7499999999999">
                <text:p>2.87499999999999</text:p>
              </table:table-cell>
              <table:table-cell office:value-type="float" office:value="0.00787297">
                <text:p>0.00787297</text:p>
              </table:table-cell>
              <table:table-cell office:value-type="float" office:value="0.00790635">
                <text:p>0.00790635</text:p>
              </table:table-cell>
              <table:table-cell office:value-type="float" office:value="0.047087">
                <text:p>0.047087</text:p>
              </table:table-cell>
              <table:table-cell office:value-type="float" office:value="0.062689">
                <text:p>0.062689</text:p>
              </table:table-cell>
              <table:table-cell office:value-type="float" office:value="0.00176168">
                <text:p>0.00176168</text:p>
              </table:table-cell>
              <table:table-cell office:value-type="float" office:value="0.00118219">
                <text:p>0.00118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00778548">
                <text:p>0.00778548</text:p>
              </table:table-cell>
              <table:table-cell office:value-type="float" office:value="0.00783732">
                <text:p>0.00783732</text:p>
              </table:table-cell>
              <table:table-cell office:value-type="float" office:value="0.0466017">
                <text:p>0.0466017</text:p>
              </table:table-cell>
              <table:table-cell office:value-type="float" office:value="0.0621112">
                <text:p>0.0621112</text:p>
              </table:table-cell>
              <table:table-cell office:value-type="float" office:value="0.0017469">
                <text:p>0.0017469</text:p>
              </table:table-cell>
              <table:table-cell office:value-type="float" office:value="0.00117058">
                <text:p>0.001170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2499999999999">
                <text:p>2.92499999999999</text:p>
              </table:table-cell>
              <table:table-cell office:value-type="float" office:value="0.00769956">
                <text:p>0.00769956</text:p>
              </table:table-cell>
              <table:table-cell office:value-type="float" office:value="0.00776964">
                <text:p>0.00776964</text:p>
              </table:table-cell>
              <table:table-cell office:value-type="float" office:value="0.0461249">
                <text:p>0.0461249</text:p>
              </table:table-cell>
              <table:table-cell office:value-type="float" office:value="0.0615449">
                <text:p>0.0615449</text:p>
              </table:table-cell>
              <table:table-cell office:value-type="float" office:value="0.00173239">
                <text:p>0.00173239</text:p>
              </table:table-cell>
              <table:table-cell office:value-type="float" office:value="0.0011592">
                <text:p>0.0011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4999999999999">
                <text:p>2.94999999999999</text:p>
              </table:table-cell>
              <table:table-cell office:value-type="float" office:value="0.00761519">
                <text:p>0.00761519</text:p>
              </table:table-cell>
              <table:table-cell office:value-type="float" office:value="0.00770326">
                <text:p>0.00770326</text:p>
              </table:table-cell>
              <table:table-cell office:value-type="float" office:value="0.0456562">
                <text:p>0.0456562</text:p>
              </table:table-cell>
              <table:table-cell office:value-type="float" office:value="0.0609898">
                <text:p>0.0609898</text:p>
              </table:table-cell>
              <table:table-cell office:value-type="float" office:value="0.00171815">
                <text:p>0.00171815</text:p>
              </table:table-cell>
              <table:table-cell office:value-type="float" office:value="0.00114803">
                <text:p>0.001148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7499999999999">
                <text:p>2.97499999999999</text:p>
              </table:table-cell>
              <table:table-cell office:value-type="float" office:value="0.00753232">
                <text:p>0.00753232</text:p>
              </table:table-cell>
              <table:table-cell office:value-type="float" office:value="0.00763812">
                <text:p>0.00763812</text:p>
              </table:table-cell>
              <table:table-cell office:value-type="float" office:value="0.0451956">
                <text:p>0.0451956</text:p>
              </table:table-cell>
              <table:table-cell office:value-type="float" office:value="0.0604454">
                <text:p>0.0604454</text:p>
              </table:table-cell>
              <table:table-cell office:value-type="float" office:value="0.00170405">
                <text:p>0.00170405</text:p>
              </table:table-cell>
              <table:table-cell office:value-type="float" office:value="0.00113709">
                <text:p>0.001137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00745092">
                <text:p>0.00745092</text:p>
              </table:table-cell>
              <table:table-cell office:value-type="float" office:value="0.00757423">
                <text:p>0.00757423</text:p>
              </table:table-cell>
              <table:table-cell office:value-type="float" office:value="0.0447427">
                <text:p>0.0447427</text:p>
              </table:table-cell>
              <table:table-cell office:value-type="float" office:value="0.0599116">
                <text:p>0.0599116</text:p>
              </table:table-cell>
              <table:table-cell office:value-type="float" office:value="0.00169022">
                <text:p>0.00169022</text:p>
              </table:table-cell>
              <table:table-cell office:value-type="float" office:value="0.00112634">
                <text:p>0.001126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2499999999999">
                <text:p>3.0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51155">
                <text:p>0.00751155</text:p>
              </table:table-cell>
              <table:table-cell office:value-type="float" office:value="NaN">
                <text:p>NaN</text:p>
              </table:table-cell>
              <table:table-cell office:value-type="float" office:value="0.0593883">
                <text:p>0.0593883</text:p>
              </table:table-cell>
              <table:table-cell office:value-type="float" office:value="NaN">
                <text:p>NaN</text:p>
              </table:table-cell>
              <table:table-cell office:value-type="float" office:value="0.00111581">
                <text:p>0.001115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4999999999999">
                <text:p>3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44995">
                <text:p>0.00744995</text:p>
              </table:table-cell>
              <table:table-cell office:value-type="float" office:value="NaN">
                <text:p>NaN</text:p>
              </table:table-cell>
              <table:table-cell office:value-type="float" office:value="0.0588742">
                <text:p>0.0588742</text:p>
              </table:table-cell>
              <table:table-cell office:value-type="float" office:value="NaN">
                <text:p>NaN</text:p>
              </table:table-cell>
              <table:table-cell office:value-type="float" office:value="0.00110546">
                <text:p>0.00110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7499999999999">
                <text:p>3.0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38957">
                <text:p>0.00738957</text:p>
              </table:table-cell>
              <table:table-cell office:value-type="float" office:value="NaN">
                <text:p>NaN</text:p>
              </table:table-cell>
              <table:table-cell office:value-type="float" office:value="0.0583706">
                <text:p>0.0583706</text:p>
              </table:table-cell>
              <table:table-cell office:value-type="float" office:value="NaN">
                <text:p>NaN</text:p>
              </table:table-cell>
              <table:table-cell office:value-type="float" office:value="0.00109532">
                <text:p>0.001095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33027">
                <text:p>0.00733027</text:p>
              </table:table-cell>
              <table:table-cell office:value-type="float" office:value="NaN">
                <text:p>NaN</text:p>
              </table:table-cell>
              <table:table-cell office:value-type="float" office:value="0.0578763">
                <text:p>0.0578763</text:p>
              </table:table-cell>
              <table:table-cell office:value-type="float" office:value="NaN">
                <text:p>NaN</text:p>
              </table:table-cell>
              <table:table-cell office:value-type="float" office:value="0.00108537">
                <text:p>0.00108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27197">
                <text:p>0.00727197</text:p>
              </table:table-cell>
              <table:table-cell office:value-type="float" office:value="NaN">
                <text:p>NaN</text:p>
              </table:table-cell>
              <table:table-cell office:value-type="float" office:value="0.0573905">
                <text:p>0.0573905</text:p>
              </table:table-cell>
              <table:table-cell office:value-type="float" office:value="NaN">
                <text:p>NaN</text:p>
              </table:table-cell>
              <table:table-cell office:value-type="float" office:value="0.00107559">
                <text:p>0.001075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999999999999">
                <text:p>3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21479">
                <text:p>0.00721479</text:p>
              </table:table-cell>
              <table:table-cell office:value-type="float" office:value="NaN">
                <text:p>NaN</text:p>
              </table:table-cell>
              <table:table-cell office:value-type="float" office:value="0.0569143">
                <text:p>0.0569143</text:p>
              </table:table-cell>
              <table:table-cell office:value-type="float" office:value="NaN">
                <text:p>NaN</text:p>
              </table:table-cell>
              <table:table-cell office:value-type="float" office:value="0.00106599">
                <text:p>0.001065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7499999999999">
                <text:p>3.1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15861">
                <text:p>0.00715861</text:p>
              </table:table-cell>
              <table:table-cell office:value-type="float" office:value="NaN">
                <text:p>NaN</text:p>
              </table:table-cell>
              <table:table-cell office:value-type="float" office:value="0.0564468">
                <text:p>0.0564468</text:p>
              </table:table-cell>
              <table:table-cell office:value-type="float" office:value="NaN">
                <text:p>NaN</text:p>
              </table:table-cell>
              <table:table-cell office:value-type="float" office:value="0.00105658">
                <text:p>0.001056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10335">
                <text:p>0.00710335</text:p>
              </table:table-cell>
              <table:table-cell office:value-type="float" office:value="NaN">
                <text:p>NaN</text:p>
              </table:table-cell>
              <table:table-cell office:value-type="float" office:value="0.055987">
                <text:p>0.055987</text:p>
              </table:table-cell>
              <table:table-cell office:value-type="float" office:value="NaN">
                <text:p>NaN</text:p>
              </table:table-cell>
              <table:table-cell office:value-type="float" office:value="0.00104734">
                <text:p>0.00104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2499999999999">
                <text:p>3.2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04911">
                <text:p>0.00704911</text:p>
              </table:table-cell>
              <table:table-cell office:value-type="float" office:value="NaN">
                <text:p>NaN</text:p>
              </table:table-cell>
              <table:table-cell office:value-type="float" office:value="0.0555361">
                <text:p>0.0555361</text:p>
              </table:table-cell>
              <table:table-cell office:value-type="float" office:value="NaN">
                <text:p>NaN</text:p>
              </table:table-cell>
              <table:table-cell office:value-type="float" office:value="0.00103825">
                <text:p>0.00103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4999999999999">
                <text:p>3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99582">
                <text:p>0.00699582</text:p>
              </table:table-cell>
              <table:table-cell office:value-type="float" office:value="NaN">
                <text:p>NaN</text:p>
              </table:table-cell>
              <table:table-cell office:value-type="float" office:value="0.0550932">
                <text:p>0.0550932</text:p>
              </table:table-cell>
              <table:table-cell office:value-type="float" office:value="NaN">
                <text:p>NaN</text:p>
              </table:table-cell>
              <table:table-cell office:value-type="float" office:value="0.00102934">
                <text:p>0.001029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7499999999999">
                <text:p>3.2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94335">
                <text:p>0.00694335</text:p>
              </table:table-cell>
              <table:table-cell office:value-type="float" office:value="NaN">
                <text:p>NaN</text:p>
              </table:table-cell>
              <table:table-cell office:value-type="float" office:value="0.0546575">
                <text:p>0.0546575</text:p>
              </table:table-cell>
              <table:table-cell office:value-type="float" office:value="NaN">
                <text:p>NaN</text:p>
              </table:table-cell>
              <table:table-cell office:value-type="float" office:value="0.00102058">
                <text:p>0.001020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89186">
                <text:p>0.00689186</text:p>
              </table:table-cell>
              <table:table-cell office:value-type="float" office:value="NaN">
                <text:p>NaN</text:p>
              </table:table-cell>
              <table:table-cell office:value-type="float" office:value="0.05423">
                <text:p>0.05423</text:p>
              </table:table-cell>
              <table:table-cell office:value-type="float" office:value="NaN">
                <text:p>NaN</text:p>
              </table:table-cell>
              <table:table-cell office:value-type="float" office:value="0.00101198">
                <text:p>0.001011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2499999999999">
                <text:p>3.3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84122">
                <text:p>0.00684122</text:p>
              </table:table-cell>
              <table:table-cell office:value-type="float" office:value="NaN">
                <text:p>NaN</text:p>
              </table:table-cell>
              <table:table-cell office:value-type="float" office:value="0.0538099">
                <text:p>0.0538099</text:p>
              </table:table-cell>
              <table:table-cell office:value-type="float" office:value="NaN">
                <text:p>NaN</text:p>
              </table:table-cell>
              <table:table-cell office:value-type="float" office:value="0.00100354">
                <text:p>0.001003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4999999999999">
                <text:p>3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79136">
                <text:p>0.00679136</text:p>
              </table:table-cell>
              <table:table-cell office:value-type="float" office:value="NaN">
                <text:p>NaN</text:p>
              </table:table-cell>
              <table:table-cell office:value-type="float" office:value="0.0533963">
                <text:p>0.0533963</text:p>
              </table:table-cell>
              <table:table-cell office:value-type="float" office:value="NaN">
                <text:p>NaN</text:p>
              </table:table-cell>
              <table:table-cell office:value-type="float" office:value="0.000995233">
                <text:p>0.0009952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7499999999999">
                <text:p>3.3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74239">
                <text:p>0.00674239</text:p>
              </table:table-cell>
              <table:table-cell office:value-type="float" office:value="NaN">
                <text:p>NaN</text:p>
              </table:table-cell>
              <table:table-cell office:value-type="float" office:value="0.0529905">
                <text:p>0.0529905</text:p>
              </table:table-cell>
              <table:table-cell office:value-type="float" office:value="NaN">
                <text:p>NaN</text:p>
              </table:table-cell>
              <table:table-cell office:value-type="float" office:value="0.000987079">
                <text:p>0.000987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69421">
                <text:p>0.00669421</text:p>
              </table:table-cell>
              <table:table-cell office:value-type="float" office:value="NaN">
                <text:p>NaN</text:p>
              </table:table-cell>
              <table:table-cell office:value-type="float" office:value="0.0525915">
                <text:p>0.0525915</text:p>
              </table:table-cell>
              <table:table-cell office:value-type="float" office:value="NaN">
                <text:p>NaN</text:p>
              </table:table-cell>
              <table:table-cell office:value-type="float" office:value="0.000979065">
                <text:p>0.000979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2499999999999">
                <text:p>3.4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64675">
                <text:p>0.00664675</text:p>
              </table:table-cell>
              <table:table-cell office:value-type="float" office:value="NaN">
                <text:p>NaN</text:p>
              </table:table-cell>
              <table:table-cell office:value-type="float" office:value="0.0521985">
                <text:p>0.0521985</text:p>
              </table:table-cell>
              <table:table-cell office:value-type="float" office:value="NaN">
                <text:p>NaN</text:p>
              </table:table-cell>
              <table:table-cell office:value-type="float" office:value="0.000971183">
                <text:p>0.000971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4999999999999">
                <text:p>3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60012">
                <text:p>0.00660012</text:p>
              </table:table-cell>
              <table:table-cell office:value-type="float" office:value="NaN">
                <text:p>NaN</text:p>
              </table:table-cell>
              <table:table-cell office:value-type="float" office:value="0.0518127">
                <text:p>0.0518127</text:p>
              </table:table-cell>
              <table:table-cell office:value-type="float" office:value="NaN">
                <text:p>NaN</text:p>
              </table:table-cell>
              <table:table-cell office:value-type="float" office:value="0.000963448">
                <text:p>0.0009634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7499999999999">
                <text:p>3.4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55423">
                <text:p>0.00655423</text:p>
              </table:table-cell>
              <table:table-cell office:value-type="float" office:value="NaN">
                <text:p>NaN</text:p>
              </table:table-cell>
              <table:table-cell office:value-type="float" office:value="0.0514332">
                <text:p>0.0514332</text:p>
              </table:table-cell>
              <table:table-cell office:value-type="float" office:value="NaN">
                <text:p>NaN</text:p>
              </table:table-cell>
              <table:table-cell office:value-type="float" office:value="0.000955837">
                <text:p>0.000955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50901">
                <text:p>0.00650901</text:p>
              </table:table-cell>
              <table:table-cell office:value-type="float" office:value="NaN">
                <text:p>NaN</text:p>
              </table:table-cell>
              <table:table-cell office:value-type="float" office:value="0.0510593">
                <text:p>0.0510593</text:p>
              </table:table-cell>
              <table:table-cell office:value-type="float" office:value="NaN">
                <text:p>NaN</text:p>
              </table:table-cell>
              <table:table-cell office:value-type="float" office:value="0.000948349">
                <text:p>0.0009483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2499999999999">
                <text:p>3.5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46456">
                <text:p>0.00646456</text:p>
              </table:table-cell>
              <table:table-cell office:value-type="float" office:value="NaN">
                <text:p>NaN</text:p>
              </table:table-cell>
              <table:table-cell office:value-type="float" office:value="0.050692">
                <text:p>0.050692</text:p>
              </table:table-cell>
              <table:table-cell office:value-type="float" office:value="NaN">
                <text:p>NaN</text:p>
              </table:table-cell>
              <table:table-cell office:value-type="float" office:value="0.000940992">
                <text:p>0.0009409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4208">
                <text:p>0.0064208</text:p>
              </table:table-cell>
              <table:table-cell office:value-type="float" office:value="NaN">
                <text:p>NaN</text:p>
              </table:table-cell>
              <table:table-cell office:value-type="float" office:value="0.0503306">
                <text:p>0.0503306</text:p>
              </table:table-cell>
              <table:table-cell office:value-type="float" office:value="NaN">
                <text:p>NaN</text:p>
              </table:table-cell>
              <table:table-cell office:value-type="float" office:value="0.000933767">
                <text:p>0.0009337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7499999999999">
                <text:p>3.5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37765">
                <text:p>0.00637765</text:p>
              </table:table-cell>
              <table:table-cell office:value-type="float" office:value="NaN">
                <text:p>NaN</text:p>
              </table:table-cell>
              <table:table-cell office:value-type="float" office:value="0.0499744">
                <text:p>0.0499744</text:p>
              </table:table-cell>
              <table:table-cell office:value-type="float" office:value="NaN">
                <text:p>NaN</text:p>
              </table:table-cell>
              <table:table-cell office:value-type="float" office:value="0.000926649">
                <text:p>0.0009266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33522">
                <text:p>0.00633522</text:p>
              </table:table-cell>
              <table:table-cell office:value-type="float" office:value="NaN">
                <text:p>NaN</text:p>
              </table:table-cell>
              <table:table-cell office:value-type="float" office:value="0.0496245">
                <text:p>0.0496245</text:p>
              </table:table-cell>
              <table:table-cell office:value-type="float" office:value="NaN">
                <text:p>NaN</text:p>
              </table:table-cell>
              <table:table-cell office:value-type="float" office:value="0.000919654">
                <text:p>0.000919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2499999999999">
                <text:p>3.6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29344">
                <text:p>0.00629344</text:p>
              </table:table-cell>
              <table:table-cell office:value-type="float" office:value="NaN">
                <text:p>NaN</text:p>
              </table:table-cell>
              <table:table-cell office:value-type="float" office:value="0.0492798">
                <text:p>0.0492798</text:p>
              </table:table-cell>
              <table:table-cell office:value-type="float" office:value="NaN">
                <text:p>NaN</text:p>
              </table:table-cell>
              <table:table-cell office:value-type="float" office:value="0.000912775">
                <text:p>0.000912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25223">
                <text:p>0.00625223</text:p>
              </table:table-cell>
              <table:table-cell office:value-type="float" office:value="NaN">
                <text:p>NaN</text:p>
              </table:table-cell>
              <table:table-cell office:value-type="float" office:value="0.0489401">
                <text:p>0.0489401</text:p>
              </table:table-cell>
              <table:table-cell office:value-type="float" office:value="NaN">
                <text:p>NaN</text:p>
              </table:table-cell>
              <table:table-cell office:value-type="float" office:value="0.000905994">
                <text:p>0.0009059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7499999999999">
                <text:p>3.6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2117">
                <text:p>0.0062117</text:p>
              </table:table-cell>
              <table:table-cell office:value-type="float" office:value="NaN">
                <text:p>NaN</text:p>
              </table:table-cell>
              <table:table-cell office:value-type="float" office:value="0.0486063">
                <text:p>0.0486063</text:p>
              </table:table-cell>
              <table:table-cell office:value-type="float" office:value="NaN">
                <text:p>NaN</text:p>
              </table:table-cell>
              <table:table-cell office:value-type="float" office:value="0.000899336">
                <text:p>0.0008993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17176">
                <text:p>0.00617176</text:p>
              </table:table-cell>
              <table:table-cell office:value-type="float" office:value="NaN">
                <text:p>NaN</text:p>
              </table:table-cell>
              <table:table-cell office:value-type="float" office:value="0.0482774">
                <text:p>0.0482774</text:p>
              </table:table-cell>
              <table:table-cell office:value-type="float" office:value="NaN">
                <text:p>NaN</text:p>
              </table:table-cell>
              <table:table-cell office:value-type="float" office:value="0.000892785">
                <text:p>0.0008927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2499999999999">
                <text:p>3.7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13236">
                <text:p>0.00613236</text:p>
              </table:table-cell>
              <table:table-cell office:value-type="float" office:value="NaN">
                <text:p>NaN</text:p>
              </table:table-cell>
              <table:table-cell office:value-type="float" office:value="0.047953">
                <text:p>0.047953</text:p>
              </table:table-cell>
              <table:table-cell office:value-type="float" office:value="NaN">
                <text:p>NaN</text:p>
              </table:table-cell>
              <table:table-cell office:value-type="float" office:value="0.000886332">
                <text:p>0.0008863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09359">
                <text:p>0.00609359</text:p>
              </table:table-cell>
              <table:table-cell office:value-type="float" office:value="NaN">
                <text:p>NaN</text:p>
              </table:table-cell>
              <table:table-cell office:value-type="float" office:value="0.0476341">
                <text:p>0.0476341</text:p>
              </table:table-cell>
              <table:table-cell office:value-type="float" office:value="NaN">
                <text:p>NaN</text:p>
              </table:table-cell>
              <table:table-cell office:value-type="float" office:value="0.000879987">
                <text:p>0.0008799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7499999999999">
                <text:p>3.7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05537">
                <text:p>0.00605537</text:p>
              </table:table-cell>
              <table:table-cell office:value-type="float" office:value="NaN">
                <text:p>NaN</text:p>
              </table:table-cell>
              <table:table-cell office:value-type="float" office:value="0.0473198">
                <text:p>0.0473198</text:p>
              </table:table-cell>
              <table:table-cell office:value-type="float" office:value="NaN">
                <text:p>NaN</text:p>
              </table:table-cell>
              <table:table-cell office:value-type="float" office:value="0.00087374">
                <text:p>0.000873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01765">
                <text:p>0.00601765</text:p>
              </table:table-cell>
              <table:table-cell office:value-type="float" office:value="NaN">
                <text:p>NaN</text:p>
              </table:table-cell>
              <table:table-cell office:value-type="float" office:value="0.0470098">
                <text:p>0.0470098</text:p>
              </table:table-cell>
              <table:table-cell office:value-type="float" office:value="NaN">
                <text:p>NaN</text:p>
              </table:table-cell>
              <table:table-cell office:value-type="float" office:value="0.000867584">
                <text:p>0.000867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2499999999999">
                <text:p>3.8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98053">
                <text:p>0.00598053</text:p>
              </table:table-cell>
              <table:table-cell office:value-type="float" office:value="NaN">
                <text:p>NaN</text:p>
              </table:table-cell>
              <table:table-cell office:value-type="float" office:value="0.0467048">
                <text:p>0.0467048</text:p>
              </table:table-cell>
              <table:table-cell office:value-type="float" office:value="NaN">
                <text:p>NaN</text:p>
              </table:table-cell>
              <table:table-cell office:value-type="float" office:value="0.000861534">
                <text:p>0.0008615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94393">
                <text:p>0.00594393</text:p>
              </table:table-cell>
              <table:table-cell office:value-type="float" office:value="NaN">
                <text:p>NaN</text:p>
              </table:table-cell>
              <table:table-cell office:value-type="float" office:value="0.0464042">
                <text:p>0.0464042</text:p>
              </table:table-cell>
              <table:table-cell office:value-type="float" office:value="NaN">
                <text:p>NaN</text:p>
              </table:table-cell>
              <table:table-cell office:value-type="float" office:value="0.000855575">
                <text:p>0.000855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7499999999999">
                <text:p>3.8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9078">
                <text:p>0.0059078</text:p>
              </table:table-cell>
              <table:table-cell office:value-type="float" office:value="NaN">
                <text:p>NaN</text:p>
              </table:table-cell>
              <table:table-cell office:value-type="float" office:value="0.0461075">
                <text:p>0.0461075</text:p>
              </table:table-cell>
              <table:table-cell office:value-type="float" office:value="NaN">
                <text:p>NaN</text:p>
              </table:table-cell>
              <table:table-cell office:value-type="float" office:value="0.000849698">
                <text:p>0.0008496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87222">
                <text:p>0.00587222</text:p>
              </table:table-cell>
              <table:table-cell office:value-type="float" office:value="NaN">
                <text:p>NaN</text:p>
              </table:table-cell>
              <table:table-cell office:value-type="float" office:value="0.0458156">
                <text:p>0.0458156</text:p>
              </table:table-cell>
              <table:table-cell office:value-type="float" office:value="NaN">
                <text:p>NaN</text:p>
              </table:table-cell>
              <table:table-cell office:value-type="float" office:value="0.00084392">
                <text:p>0.000843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2499999999999">
                <text:p>3.9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83713">
                <text:p>0.00583713</text:p>
              </table:table-cell>
              <table:table-cell office:value-type="float" office:value="NaN">
                <text:p>NaN</text:p>
              </table:table-cell>
              <table:table-cell office:value-type="float" office:value="0.0455278">
                <text:p>0.0455278</text:p>
              </table:table-cell>
              <table:table-cell office:value-type="float" office:value="NaN">
                <text:p>NaN</text:p>
              </table:table-cell>
              <table:table-cell office:value-type="float" office:value="0.000838224">
                <text:p>0.000838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80248">
                <text:p>0.00580248</text:p>
              </table:table-cell>
              <table:table-cell office:value-type="float" office:value="NaN">
                <text:p>NaN</text:p>
              </table:table-cell>
              <table:table-cell office:value-type="float" office:value="0.0452437">
                <text:p>0.0452437</text:p>
              </table:table-cell>
              <table:table-cell office:value-type="float" office:value="NaN">
                <text:p>NaN</text:p>
              </table:table-cell>
              <table:table-cell office:value-type="float" office:value="0.00083261">
                <text:p>0.000832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7499999999999">
                <text:p>3.9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76834">
                <text:p>0.00576834</text:p>
              </table:table-cell>
              <table:table-cell office:value-type="float" office:value="NaN">
                <text:p>NaN</text:p>
              </table:table-cell>
              <table:table-cell office:value-type="float" office:value="0.0449639">
                <text:p>0.0449639</text:p>
              </table:table-cell>
              <table:table-cell office:value-type="float" office:value="NaN">
                <text:p>NaN</text:p>
              </table:table-cell>
              <table:table-cell office:value-type="float" office:value="0.000827094">
                <text:p>0.0008270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73466">
                <text:p>0.00573466</text:p>
              </table:table-cell>
              <table:table-cell office:value-type="float" office:value="NaN">
                <text:p>NaN</text:p>
              </table:table-cell>
              <table:table-cell office:value-type="float" office:value="0.0446881">
                <text:p>0.0446881</text:p>
              </table:table-cell>
              <table:table-cell office:value-type="float" office:value="NaN">
                <text:p>NaN</text:p>
              </table:table-cell>
              <table:table-cell office:value-type="float" office:value="0.000821651">
                <text:p>0.0008216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2499999999999">
                <text:p>4.0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7014">
                <text:p>0.0057014</text:p>
              </table:table-cell>
              <table:table-cell office:value-type="float" office:value="NaN">
                <text:p>NaN</text:p>
              </table:table-cell>
              <table:table-cell office:value-type="float" office:value="0.0444156">
                <text:p>0.0444156</text:p>
              </table:table-cell>
              <table:table-cell office:value-type="float" office:value="NaN">
                <text:p>NaN</text:p>
              </table:table-cell>
              <table:table-cell office:value-type="float" office:value="0.000816285">
                <text:p>0.0008162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66863">
                <text:p>0.00566863</text:p>
              </table:table-cell>
              <table:table-cell office:value-type="float" office:value="NaN">
                <text:p>NaN</text:p>
              </table:table-cell>
              <table:table-cell office:value-type="float" office:value="0.0441474">
                <text:p>0.0441474</text:p>
              </table:table-cell>
              <table:table-cell office:value-type="float" office:value="NaN">
                <text:p>NaN</text:p>
              </table:table-cell>
              <table:table-cell office:value-type="float" office:value="0.000811003">
                <text:p>0.0008110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7499999999999">
                <text:p>4.0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63628">
                <text:p>0.00563628</text:p>
              </table:table-cell>
              <table:table-cell office:value-type="float" office:value="NaN">
                <text:p>NaN</text:p>
              </table:table-cell>
              <table:table-cell office:value-type="float" office:value="0.0438827">
                <text:p>0.0438827</text:p>
              </table:table-cell>
              <table:table-cell office:value-type="float" office:value="NaN">
                <text:p>NaN</text:p>
              </table:table-cell>
              <table:table-cell office:value-type="float" office:value="0.000805798">
                <text:p>0.0008057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60433">
                <text:p>0.00560433</text:p>
              </table:table-cell>
              <table:table-cell office:value-type="float" office:value="NaN">
                <text:p>NaN</text:p>
              </table:table-cell>
              <table:table-cell office:value-type="float" office:value="0.0436214">
                <text:p>0.0436214</text:p>
              </table:table-cell>
              <table:table-cell office:value-type="float" office:value="NaN">
                <text:p>NaN</text:p>
              </table:table-cell>
              <table:table-cell office:value-type="float" office:value="0.000800663">
                <text:p>0.0008006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2499999999999">
                <text:p>4.1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57283">
                <text:p>0.00557283</text:p>
              </table:table-cell>
              <table:table-cell office:value-type="float" office:value="NaN">
                <text:p>NaN</text:p>
              </table:table-cell>
              <table:table-cell office:value-type="float" office:value="0.0433638">
                <text:p>0.0433638</text:p>
              </table:table-cell>
              <table:table-cell office:value-type="float" office:value="NaN">
                <text:p>NaN</text:p>
              </table:table-cell>
              <table:table-cell office:value-type="float" office:value="0.000795606">
                <text:p>0.0007956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54174">
                <text:p>0.00554174</text:p>
              </table:table-cell>
              <table:table-cell office:value-type="float" office:value="NaN">
                <text:p>NaN</text:p>
              </table:table-cell>
              <table:table-cell office:value-type="float" office:value="0.0431098">
                <text:p>0.0431098</text:p>
              </table:table-cell>
              <table:table-cell office:value-type="float" office:value="NaN">
                <text:p>NaN</text:p>
              </table:table-cell>
              <table:table-cell office:value-type="float" office:value="0.000790623">
                <text:p>0.0007906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7499999999999">
                <text:p>4.1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511">
                <text:p>0.005511</text:p>
              </table:table-cell>
              <table:table-cell office:value-type="float" office:value="NaN">
                <text:p>NaN</text:p>
              </table:table-cell>
              <table:table-cell office:value-type="float" office:value="0.0428587">
                <text:p>0.0428587</text:p>
              </table:table-cell>
              <table:table-cell office:value-type="float" office:value="NaN">
                <text:p>NaN</text:p>
              </table:table-cell>
              <table:table-cell office:value-type="float" office:value="0.000785703">
                <text:p>0.0007857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48071">
                <text:p>0.00548071</text:p>
              </table:table-cell>
              <table:table-cell office:value-type="float" office:value="NaN">
                <text:p>NaN</text:p>
              </table:table-cell>
              <table:table-cell office:value-type="float" office:value="0.0426113">
                <text:p>0.0426113</text:p>
              </table:table-cell>
              <table:table-cell office:value-type="float" office:value="NaN">
                <text:p>NaN</text:p>
              </table:table-cell>
              <table:table-cell office:value-type="float" office:value="0.000780859">
                <text:p>0.0007808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2499999999999">
                <text:p>4.2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4508">
                <text:p>0.0054508</text:p>
              </table:table-cell>
              <table:table-cell office:value-type="float" office:value="NaN">
                <text:p>NaN</text:p>
              </table:table-cell>
              <table:table-cell office:value-type="float" office:value="0.0423671">
                <text:p>0.0423671</text:p>
              </table:table-cell>
              <table:table-cell office:value-type="float" office:value="NaN">
                <text:p>NaN</text:p>
              </table:table-cell>
              <table:table-cell office:value-type="float" office:value="0.000776083">
                <text:p>0.0007760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42122">
                <text:p>0.00542122</text:p>
              </table:table-cell>
              <table:table-cell office:value-type="float" office:value="NaN">
                <text:p>NaN</text:p>
              </table:table-cell>
              <table:table-cell office:value-type="float" office:value="0.0421257">
                <text:p>0.0421257</text:p>
              </table:table-cell>
              <table:table-cell office:value-type="float" office:value="NaN">
                <text:p>NaN</text:p>
              </table:table-cell>
              <table:table-cell office:value-type="float" office:value="0.000771368">
                <text:p>0.0007713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7499999999999">
                <text:p>4.27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39207">
                <text:p>0.00539207</text:p>
              </table:table-cell>
              <table:table-cell office:value-type="float" office:value="NaN">
                <text:p>NaN</text:p>
              </table:table-cell>
              <table:table-cell office:value-type="float" office:value="0.0418879">
                <text:p>0.0418879</text:p>
              </table:table-cell>
              <table:table-cell office:value-type="float" office:value="NaN">
                <text:p>NaN</text:p>
              </table:table-cell>
              <table:table-cell office:value-type="float" office:value="0.000766722">
                <text:p>0.0007667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36327">
                <text:p>0.00536327</text:p>
              </table:table-cell>
              <table:table-cell office:value-type="float" office:value="NaN">
                <text:p>NaN</text:p>
              </table:table-cell>
              <table:table-cell office:value-type="float" office:value="0.041653">
                <text:p>0.041653</text:p>
              </table:table-cell>
              <table:table-cell office:value-type="float" office:value="NaN">
                <text:p>NaN</text:p>
              </table:table-cell>
              <table:table-cell office:value-type="float" office:value="0.000762141">
                <text:p>0.0007621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2499999999999">
                <text:p>4.324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33478">
                <text:p>0.00533478</text:p>
              </table:table-cell>
              <table:table-cell office:value-type="float" office:value="NaN">
                <text:p>NaN</text:p>
              </table:table-cell>
              <table:table-cell office:value-type="float" office:value="0.0414208">
                <text:p>0.0414208</text:p>
              </table:table-cell>
              <table:table-cell office:value-type="float" office:value="NaN">
                <text:p>NaN</text:p>
              </table:table-cell>
              <table:table-cell office:value-type="float" office:value="0.000757617">
                <text:p>0.0007576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530668">
                <text:p>0.00530668</text:p>
              </table:table-cell>
              <table:table-cell office:value-type="float" office:value="NaN">
                <text:p>NaN</text:p>
              </table:table-cell>
              <table:table-cell office:value-type="float" office:value="0.0411918">
                <text:p>0.0411918</text:p>
              </table:table-cell>
              <table:table-cell office:value-type="float" office:value="NaN">
                <text:p>NaN</text:p>
              </table:table-cell>
              <table:table-cell office:value-type="float" office:value="0.00075316">
                <text:p>0.000753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75">
                <text:p>4.375</text:p>
              </table:table-cell>
              <table:table-cell office:value-type="float" office:value="NaN">
                <text:p>NaN</text:p>
              </table:table-cell>
              <table:table-cell office:value-type="float" office:value="0.00527893">
                <text:p>0.00527893</text:p>
              </table:table-cell>
              <table:table-cell office:value-type="float" office:value="NaN">
                <text:p>NaN</text:p>
              </table:table-cell>
              <table:table-cell office:value-type="float" office:value="0.0409658">
                <text:p>0.0409658</text:p>
              </table:table-cell>
              <table:table-cell office:value-type="float" office:value="NaN">
                <text:p>NaN</text:p>
              </table:table-cell>
              <table:table-cell office:value-type="float" office:value="0.000748762">
                <text:p>0.0007487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0.00525148">
                <text:p>0.00525148</text:p>
              </table:table-cell>
              <table:table-cell office:value-type="float" office:value="NaN">
                <text:p>NaN</text:p>
              </table:table-cell>
              <table:table-cell office:value-type="float" office:value="0.0407421">
                <text:p>0.0407421</text:p>
              </table:table-cell>
              <table:table-cell office:value-type="float" office:value="NaN">
                <text:p>NaN</text:p>
              </table:table-cell>
              <table:table-cell office:value-type="float" office:value="0.000744419">
                <text:p>0.0007444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25">
                <text:p>4.425</text:p>
              </table:table-cell>
              <table:table-cell office:value-type="float" office:value="NaN">
                <text:p>NaN</text:p>
              </table:table-cell>
              <table:table-cell office:value-type="float" office:value="0.0052244">
                <text:p>0.0052244</text:p>
              </table:table-cell>
              <table:table-cell office:value-type="float" office:value="NaN">
                <text:p>NaN</text:p>
              </table:table-cell>
              <table:table-cell office:value-type="float" office:value="0.0405217">
                <text:p>0.0405217</text:p>
              </table:table-cell>
              <table:table-cell office:value-type="float" office:value="NaN">
                <text:p>NaN</text:p>
              </table:table-cell>
              <table:table-cell office:value-type="float" office:value="0.000740138">
                <text:p>0.0007401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5">
                <text:p>4.45</text:p>
              </table:table-cell>
              <table:table-cell office:value-type="float" office:value="NaN">
                <text:p>NaN</text:p>
              </table:table-cell>
              <table:table-cell office:value-type="float" office:value="0.00519763">
                <text:p>0.00519763</text:p>
              </table:table-cell>
              <table:table-cell office:value-type="float" office:value="NaN">
                <text:p>NaN</text:p>
              </table:table-cell>
              <table:table-cell office:value-type="float" office:value="0.040304">
                <text:p>0.040304</text:p>
              </table:table-cell>
              <table:table-cell office:value-type="float" office:value="NaN">
                <text:p>NaN</text:p>
              </table:table-cell>
              <table:table-cell office:value-type="float" office:value="0.000735913">
                <text:p>0.0007359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75">
                <text:p>4.475</text:p>
              </table:table-cell>
              <table:table-cell office:value-type="float" office:value="NaN">
                <text:p>NaN</text:p>
              </table:table-cell>
              <table:table-cell office:value-type="float" office:value="0.00517115">
                <text:p>0.00517115</text:p>
              </table:table-cell>
              <table:table-cell office:value-type="float" office:value="NaN">
                <text:p>NaN</text:p>
              </table:table-cell>
              <table:table-cell office:value-type="float" office:value="0.0400885">
                <text:p>0.0400885</text:p>
              </table:table-cell>
              <table:table-cell office:value-type="float" office:value="NaN">
                <text:p>NaN</text:p>
              </table:table-cell>
              <table:table-cell office:value-type="float" office:value="0.00073174">
                <text:p>0.00073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0.00514502">
                <text:p>0.00514502</text:p>
              </table:table-cell>
              <table:table-cell office:value-type="float" office:value="NaN">
                <text:p>NaN</text:p>
              </table:table-cell>
              <table:table-cell office:value-type="float" office:value="0.039876">
                <text:p>0.039876</text:p>
              </table:table-cell>
              <table:table-cell office:value-type="float" office:value="NaN">
                <text:p>NaN</text:p>
              </table:table-cell>
              <table:table-cell office:value-type="float" office:value="0.000727625">
                <text:p>0.000727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25">
                <text:p>4.525</text:p>
              </table:table-cell>
              <table:table-cell office:value-type="float" office:value="NaN">
                <text:p>NaN</text:p>
              </table:table-cell>
              <table:table-cell office:value-type="float" office:value="0.0051192">
                <text:p>0.0051192</text:p>
              </table:table-cell>
              <table:table-cell office:value-type="float" office:value="NaN">
                <text:p>NaN</text:p>
              </table:table-cell>
              <table:table-cell office:value-type="float" office:value="0.0396661">
                <text:p>0.0396661</text:p>
              </table:table-cell>
              <table:table-cell office:value-type="float" office:value="NaN">
                <text:p>NaN</text:p>
              </table:table-cell>
              <table:table-cell office:value-type="float" office:value="0.000723564">
                <text:p>0.000723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  <table:table-cell office:value-type="float" office:value="0.00509364">
                <text:p>0.00509364</text:p>
              </table:table-cell>
              <table:table-cell office:value-type="float" office:value="NaN">
                <text:p>NaN</text:p>
              </table:table-cell>
              <table:table-cell office:value-type="float" office:value="0.0394583">
                <text:p>0.0394583</text:p>
              </table:table-cell>
              <table:table-cell office:value-type="float" office:value="NaN">
                <text:p>NaN</text:p>
              </table:table-cell>
              <table:table-cell office:value-type="float" office:value="0.00071955">
                <text:p>0.000719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75">
                <text:p>4.575</text:p>
              </table:table-cell>
              <table:table-cell office:value-type="float" office:value="NaN">
                <text:p>NaN</text:p>
              </table:table-cell>
              <table:table-cell office:value-type="float" office:value="0.00506841">
                <text:p>0.00506841</text:p>
              </table:table-cell>
              <table:table-cell office:value-type="float" office:value="NaN">
                <text:p>NaN</text:p>
              </table:table-cell>
              <table:table-cell office:value-type="float" office:value="0.0392533">
                <text:p>0.0392533</text:p>
              </table:table-cell>
              <table:table-cell office:value-type="float" office:value="NaN">
                <text:p>NaN</text:p>
              </table:table-cell>
              <table:table-cell office:value-type="float" office:value="0.000715593">
                <text:p>0.000715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0.00504348">
                <text:p>0.00504348</text:p>
              </table:table-cell>
              <table:table-cell office:value-type="float" office:value="NaN">
                <text:p>NaN</text:p>
              </table:table-cell>
              <table:table-cell office:value-type="float" office:value="0.0390507">
                <text:p>0.0390507</text:p>
              </table:table-cell>
              <table:table-cell office:value-type="float" office:value="NaN">
                <text:p>NaN</text:p>
              </table:table-cell>
              <table:table-cell office:value-type="float" office:value="0.000711685">
                <text:p>0.0007116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25">
                <text:p>4.625</text:p>
              </table:table-cell>
              <table:table-cell office:value-type="float" office:value="NaN">
                <text:p>NaN</text:p>
              </table:table-cell>
              <table:table-cell office:value-type="float" office:value="0.00501879">
                <text:p>0.00501879</text:p>
              </table:table-cell>
              <table:table-cell office:value-type="float" office:value="NaN">
                <text:p>NaN</text:p>
              </table:table-cell>
              <table:table-cell office:value-type="float" office:value="0.0388503">
                <text:p>0.0388503</text:p>
              </table:table-cell>
              <table:table-cell office:value-type="float" office:value="NaN">
                <text:p>NaN</text:p>
              </table:table-cell>
              <table:table-cell office:value-type="float" office:value="0.000707823">
                <text:p>0.0007078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0.00499442">
                <text:p>0.00499442</text:p>
              </table:table-cell>
              <table:table-cell office:value-type="float" office:value="NaN">
                <text:p>NaN</text:p>
              </table:table-cell>
              <table:table-cell office:value-type="float" office:value="0.0386525">
                <text:p>0.0386525</text:p>
              </table:table-cell>
              <table:table-cell office:value-type="float" office:value="NaN">
                <text:p>NaN</text:p>
              </table:table-cell>
              <table:table-cell office:value-type="float" office:value="0.000704013">
                <text:p>0.0007040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75">
                <text:p>4.675</text:p>
              </table:table-cell>
              <table:table-cell office:value-type="float" office:value="NaN">
                <text:p>NaN</text:p>
              </table:table-cell>
              <table:table-cell office:value-type="float" office:value="0.00497032">
                <text:p>0.00497032</text:p>
              </table:table-cell>
              <table:table-cell office:value-type="float" office:value="NaN">
                <text:p>NaN</text:p>
              </table:table-cell>
              <table:table-cell office:value-type="float" office:value="0.038457">
                <text:p>0.038457</text:p>
              </table:table-cell>
              <table:table-cell office:value-type="float" office:value="NaN">
                <text:p>NaN</text:p>
              </table:table-cell>
              <table:table-cell office:value-type="float" office:value="0.000700252">
                <text:p>0.000700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0.00494646">
                <text:p>0.00494646</text:p>
              </table:table-cell>
              <table:table-cell office:value-type="float" office:value="NaN">
                <text:p>NaN</text:p>
              </table:table-cell>
              <table:table-cell office:value-type="float" office:value="0.0382634">
                <text:p>0.0382634</text:p>
              </table:table-cell>
              <table:table-cell office:value-type="float" office:value="NaN">
                <text:p>NaN</text:p>
              </table:table-cell>
              <table:table-cell office:value-type="float" office:value="0.000696532">
                <text:p>0.000696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25">
                <text:p>4.725</text:p>
              </table:table-cell>
              <table:table-cell office:value-type="float" office:value="NaN">
                <text:p>NaN</text:p>
              </table:table-cell>
              <table:table-cell office:value-type="float" office:value="0.0049229">
                <text:p>0.0049229</text:p>
              </table:table-cell>
              <table:table-cell office:value-type="float" office:value="NaN">
                <text:p>NaN</text:p>
              </table:table-cell>
              <table:table-cell office:value-type="float" office:value="0.0380723">
                <text:p>0.0380723</text:p>
              </table:table-cell>
              <table:table-cell office:value-type="float" office:value="NaN">
                <text:p>NaN</text:p>
              </table:table-cell>
              <table:table-cell office:value-type="float" office:value="0.000692862">
                <text:p>0.0006928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  <table:table-cell office:value-type="float" office:value="0.00489961">
                <text:p>0.00489961</text:p>
              </table:table-cell>
              <table:table-cell office:value-type="float" office:value="NaN">
                <text:p>NaN</text:p>
              </table:table-cell>
              <table:table-cell office:value-type="float" office:value="0.0378834">
                <text:p>0.0378834</text:p>
              </table:table-cell>
              <table:table-cell office:value-type="float" office:value="NaN">
                <text:p>NaN</text:p>
              </table:table-cell>
              <table:table-cell office:value-type="float" office:value="0.000689238">
                <text:p>0.0006892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75">
                <text:p>4.775</text:p>
              </table:table-cell>
              <table:table-cell office:value-type="float" office:value="NaN">
                <text:p>NaN</text:p>
              </table:table-cell>
              <table:table-cell office:value-type="float" office:value="0.00487654">
                <text:p>0.00487654</text:p>
              </table:table-cell>
              <table:table-cell office:value-type="float" office:value="NaN">
                <text:p>NaN</text:p>
              </table:table-cell>
              <table:table-cell office:value-type="float" office:value="0.0376963">
                <text:p>0.0376963</text:p>
              </table:table-cell>
              <table:table-cell office:value-type="float" office:value="NaN">
                <text:p>NaN</text:p>
              </table:table-cell>
              <table:table-cell office:value-type="float" office:value="0.000685655">
                <text:p>0.0006856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0.00485375">
                <text:p>0.00485375</text:p>
              </table:table-cell>
              <table:table-cell office:value-type="float" office:value="NaN">
                <text:p>NaN</text:p>
              </table:table-cell>
              <table:table-cell office:value-type="float" office:value="0.0375117">
                <text:p>0.0375117</text:p>
              </table:table-cell>
              <table:table-cell office:value-type="float" office:value="NaN">
                <text:p>NaN</text:p>
              </table:table-cell>
              <table:table-cell office:value-type="float" office:value="0.000682118">
                <text:p>0.0006821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825">
                <text:p>4.825</text:p>
              </table:table-cell>
              <table:table-cell office:value-type="float" office:value="NaN">
                <text:p>NaN</text:p>
              </table:table-cell>
              <table:table-cell office:value-type="float" office:value="0.00483121">
                <text:p>0.00483121</text:p>
              </table:table-cell>
              <table:table-cell office:value-type="float" office:value="NaN">
                <text:p>NaN</text:p>
              </table:table-cell>
              <table:table-cell office:value-type="float" office:value="0.0373291">
                <text:p>0.0373291</text:p>
              </table:table-cell>
              <table:table-cell office:value-type="float" office:value="NaN">
                <text:p>NaN</text:p>
              </table:table-cell>
              <table:table-cell office:value-type="float" office:value="0.000678624">
                <text:p>0.000678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5">
                <text:p>4.85</text:p>
              </table:table-cell>
              <table:table-cell office:value-type="float" office:value="NaN">
                <text:p>NaN</text:p>
              </table:table-cell>
              <table:table-cell office:value-type="float" office:value="0.00480888">
                <text:p>0.00480888</text:p>
              </table:table-cell>
              <table:table-cell office:value-type="float" office:value="NaN">
                <text:p>NaN</text:p>
              </table:table-cell>
              <table:table-cell office:value-type="float" office:value="0.0371482">
                <text:p>0.0371482</text:p>
              </table:table-cell>
              <table:table-cell office:value-type="float" office:value="NaN">
                <text:p>NaN</text:p>
              </table:table-cell>
              <table:table-cell office:value-type="float" office:value="0.000675167">
                <text:p>0.0006751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75">
                <text:p>4.875</text:p>
              </table:table-cell>
              <table:table-cell office:value-type="float" office:value="NaN">
                <text:p>NaN</text:p>
              </table:table-cell>
              <table:table-cell office:value-type="float" office:value="0.00478682">
                <text:p>0.00478682</text:p>
              </table:table-cell>
              <table:table-cell office:value-type="float" office:value="NaN">
                <text:p>NaN</text:p>
              </table:table-cell>
              <table:table-cell office:value-type="float" office:value="0.0369696">
                <text:p>0.0369696</text:p>
              </table:table-cell>
              <table:table-cell office:value-type="float" office:value="NaN">
                <text:p>NaN</text:p>
              </table:table-cell>
              <table:table-cell office:value-type="float" office:value="0.000671755">
                <text:p>0.0006717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0.004765">
                <text:p>0.004765</text:p>
              </table:table-cell>
              <table:table-cell office:value-type="float" office:value="NaN">
                <text:p>NaN</text:p>
              </table:table-cell>
              <table:table-cell office:value-type="float" office:value="0.036793">
                <text:p>0.036793</text:p>
              </table:table-cell>
              <table:table-cell office:value-type="float" office:value="NaN">
                <text:p>NaN</text:p>
              </table:table-cell>
              <table:table-cell office:value-type="float" office:value="0.000668385">
                <text:p>0.0006683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25">
                <text:p>4.925</text:p>
              </table:table-cell>
              <table:table-cell office:value-type="float" office:value="NaN">
                <text:p>NaN</text:p>
              </table:table-cell>
              <table:table-cell office:value-type="float" office:value="0.00474338">
                <text:p>0.00474338</text:p>
              </table:table-cell>
              <table:table-cell office:value-type="float" office:value="NaN">
                <text:p>NaN</text:p>
              </table:table-cell>
              <table:table-cell office:value-type="float" office:value="0.0366181">
                <text:p>0.0366181</text:p>
              </table:table-cell>
              <table:table-cell office:value-type="float" office:value="NaN">
                <text:p>NaN</text:p>
              </table:table-cell>
              <table:table-cell office:value-type="float" office:value="0.00066505">
                <text:p>0.00066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5">
                <text:p>4.95</text:p>
              </table:table-cell>
              <table:table-cell office:value-type="float" office:value="NaN">
                <text:p>NaN</text:p>
              </table:table-cell>
              <table:table-cell office:value-type="float" office:value="0.00472202">
                <text:p>0.00472202</text:p>
              </table:table-cell>
              <table:table-cell office:value-type="float" office:value="NaN">
                <text:p>NaN</text:p>
              </table:table-cell>
              <table:table-cell office:value-type="float" office:value="0.0364453">
                <text:p>0.0364453</text:p>
              </table:table-cell>
              <table:table-cell office:value-type="float" office:value="NaN">
                <text:p>NaN</text:p>
              </table:table-cell>
              <table:table-cell office:value-type="float" office:value="0.000661757">
                <text:p>0.0006617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75">
                <text:p>4.975</text:p>
              </table:table-cell>
              <table:table-cell office:value-type="float" office:value="NaN">
                <text:p>NaN</text:p>
              </table:table-cell>
              <table:table-cell office:value-type="float" office:value="0.00470089">
                <text:p>0.00470089</text:p>
              </table:table-cell>
              <table:table-cell office:value-type="float" office:value="NaN">
                <text:p>NaN</text:p>
              </table:table-cell>
              <table:table-cell office:value-type="float" office:value="0.0362743">
                <text:p>0.0362743</text:p>
              </table:table-cell>
              <table:table-cell office:value-type="float" office:value="NaN">
                <text:p>NaN</text:p>
              </table:table-cell>
              <table:table-cell office:value-type="float" office:value="0.000658503">
                <text:p>0.0006585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0467994">
                <text:p>0.00467994</text:p>
              </table:table-cell>
              <table:table-cell office:value-type="float" office:value="NaN">
                <text:p>NaN</text:p>
              </table:table-cell>
              <table:table-cell office:value-type="float" office:value="0.0361049">
                <text:p>0.0361049</text:p>
              </table:table-cell>
              <table:table-cell office:value-type="float" office:value="NaN">
                <text:p>NaN</text:p>
              </table:table-cell>
              <table:table-cell office:value-type="float" office:value="0.000655283">
                <text:p>0.0006552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025">
                <text:p>5.025</text:p>
              </table:table-cell>
              <table:table-cell office:value-type="float" office:value="NaN">
                <text:p>NaN</text:p>
              </table:table-cell>
              <table:table-cell office:value-type="float" office:value="0.00465925">
                <text:p>0.00465925</text:p>
              </table:table-cell>
              <table:table-cell office:value-type="float" office:value="NaN">
                <text:p>NaN</text:p>
              </table:table-cell>
              <table:table-cell office:value-type="float" office:value="0.0359377">
                <text:p>0.0359377</text:p>
              </table:table-cell>
              <table:table-cell office:value-type="float" office:value="NaN">
                <text:p>NaN</text:p>
              </table:table-cell>
              <table:table-cell office:value-type="float" office:value="0.000652102">
                <text:p>0.0006521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  <table:table-cell office:value-type="float" office:value="0.00463876">
                <text:p>0.00463876</text:p>
              </table:table-cell>
              <table:table-cell office:value-type="float" office:value="NaN">
                <text:p>NaN</text:p>
              </table:table-cell>
              <table:table-cell office:value-type="float" office:value="0.0357721">
                <text:p>0.0357721</text:p>
              </table:table-cell>
              <table:table-cell office:value-type="float" office:value="NaN">
                <text:p>NaN</text:p>
              </table:table-cell>
              <table:table-cell office:value-type="float" office:value="0.000648959">
                <text:p>0.0006489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7500000000001">
                <text:p>5.07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61846">
                <text:p>0.00461846</text:p>
              </table:table-cell>
              <table:table-cell office:value-type="float" office:value="NaN">
                <text:p>NaN</text:p>
              </table:table-cell>
              <table:table-cell office:value-type="float" office:value="0.035608">
                <text:p>0.035608</text:p>
              </table:table-cell>
              <table:table-cell office:value-type="float" office:value="NaN">
                <text:p>NaN</text:p>
              </table:table-cell>
              <table:table-cell office:value-type="float" office:value="0.000645848">
                <text:p>0.000645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10000000000001">
                <text:p>5.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59839">
                <text:p>0.00459839</text:p>
              </table:table-cell>
              <table:table-cell office:value-type="float" office:value="NaN">
                <text:p>NaN</text:p>
              </table:table-cell>
              <table:table-cell office:value-type="float" office:value="0.035446">
                <text:p>0.035446</text:p>
              </table:table-cell>
              <table:table-cell office:value-type="float" office:value="NaN">
                <text:p>NaN</text:p>
              </table:table-cell>
              <table:table-cell office:value-type="float" office:value="0.000642776">
                <text:p>0.0006427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2500000000001">
                <text:p>5.12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57853">
                <text:p>0.00457853</text:p>
              </table:table-cell>
              <table:table-cell office:value-type="float" office:value="NaN">
                <text:p>NaN</text:p>
              </table:table-cell>
              <table:table-cell office:value-type="float" office:value="0.0352855">
                <text:p>0.0352855</text:p>
              </table:table-cell>
              <table:table-cell office:value-type="float" office:value="NaN">
                <text:p>NaN</text:p>
              </table:table-cell>
              <table:table-cell office:value-type="float" office:value="0.000639737">
                <text:p>0.0006397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5000000000001">
                <text:p>5.1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55884">
                <text:p>0.00455884</text:p>
              </table:table-cell>
              <table:table-cell office:value-type="float" office:value="NaN">
                <text:p>NaN</text:p>
              </table:table-cell>
              <table:table-cell office:value-type="float" office:value="0.0351266">
                <text:p>0.0351266</text:p>
              </table:table-cell>
              <table:table-cell office:value-type="float" office:value="NaN">
                <text:p>NaN</text:p>
              </table:table-cell>
              <table:table-cell office:value-type="float" office:value="0.00063673">
                <text:p>0.000636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7500000000001">
                <text:p>5.17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53937">
                <text:p>0.00453937</text:p>
              </table:table-cell>
              <table:table-cell office:value-type="float" office:value="NaN">
                <text:p>NaN</text:p>
              </table:table-cell>
              <table:table-cell office:value-type="float" office:value="0.0349694">
                <text:p>0.0349694</text:p>
              </table:table-cell>
              <table:table-cell office:value-type="float" office:value="NaN">
                <text:p>NaN</text:p>
              </table:table-cell>
              <table:table-cell office:value-type="float" office:value="0.000633758">
                <text:p>0.0006337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20000000000001">
                <text:p>5.2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52011">
                <text:p>0.00452011</text:p>
              </table:table-cell>
              <table:table-cell office:value-type="float" office:value="NaN">
                <text:p>NaN</text:p>
              </table:table-cell>
              <table:table-cell office:value-type="float" office:value="0.0348139">
                <text:p>0.0348139</text:p>
              </table:table-cell>
              <table:table-cell office:value-type="float" office:value="NaN">
                <text:p>NaN</text:p>
              </table:table-cell>
              <table:table-cell office:value-type="float" office:value="0.000630821">
                <text:p>0.0006308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22500000000001">
                <text:p>5.22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50101">
                <text:p>0.00450101</text:p>
              </table:table-cell>
              <table:table-cell office:value-type="float" office:value="NaN">
                <text:p>NaN</text:p>
              </table:table-cell>
              <table:table-cell office:value-type="float" office:value="0.0346598">
                <text:p>0.0346598</text:p>
              </table:table-cell>
              <table:table-cell office:value-type="float" office:value="NaN">
                <text:p>NaN</text:p>
              </table:table-cell>
              <table:table-cell office:value-type="float" office:value="0.000627911">
                <text:p>0.0006279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5000000000001">
                <text:p>5.2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48212">
                <text:p>0.00448212</text:p>
              </table:table-cell>
              <table:table-cell office:value-type="float" office:value="NaN">
                <text:p>NaN</text:p>
              </table:table-cell>
              <table:table-cell office:value-type="float" office:value="0.0345074">
                <text:p>0.0345074</text:p>
              </table:table-cell>
              <table:table-cell office:value-type="float" office:value="NaN">
                <text:p>NaN</text:p>
              </table:table-cell>
              <table:table-cell office:value-type="float" office:value="0.000625036">
                <text:p>0.0006250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7500000000001">
                <text:p>5.27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46341">
                <text:p>0.00446341</text:p>
              </table:table-cell>
              <table:table-cell office:value-type="float" office:value="NaN">
                <text:p>NaN</text:p>
              </table:table-cell>
              <table:table-cell office:value-type="float" office:value="0.0343566">
                <text:p>0.0343566</text:p>
              </table:table-cell>
              <table:table-cell office:value-type="float" office:value="NaN">
                <text:p>NaN</text:p>
              </table:table-cell>
              <table:table-cell office:value-type="float" office:value="0.000622193">
                <text:p>0.0006221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0000000000001">
                <text:p>5.3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44486">
                <text:p>0.00444486</text:p>
              </table:table-cell>
              <table:table-cell office:value-type="float" office:value="NaN">
                <text:p>NaN</text:p>
              </table:table-cell>
              <table:table-cell office:value-type="float" office:value="0.034207">
                <text:p>0.034207</text:p>
              </table:table-cell>
              <table:table-cell office:value-type="float" office:value="NaN">
                <text:p>NaN</text:p>
              </table:table-cell>
              <table:table-cell office:value-type="float" office:value="0.000619377">
                <text:p>0.0006193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2500000000001">
                <text:p>5.32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42652">
                <text:p>0.00442652</text:p>
              </table:table-cell>
              <table:table-cell office:value-type="float" office:value="NaN">
                <text:p>NaN</text:p>
              </table:table-cell>
              <table:table-cell office:value-type="float" office:value="0.0340592">
                <text:p>0.0340592</text:p>
              </table:table-cell>
              <table:table-cell office:value-type="float" office:value="NaN">
                <text:p>NaN</text:p>
              </table:table-cell>
              <table:table-cell office:value-type="float" office:value="0.000616595">
                <text:p>0.0006165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5000000000001">
                <text:p>5.3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40835">
                <text:p>0.00440835</text:p>
              </table:table-cell>
              <table:table-cell office:value-type="float" office:value="NaN">
                <text:p>NaN</text:p>
              </table:table-cell>
              <table:table-cell office:value-type="float" office:value="0.0339128">
                <text:p>0.0339128</text:p>
              </table:table-cell>
              <table:table-cell office:value-type="float" office:value="NaN">
                <text:p>NaN</text:p>
              </table:table-cell>
              <table:table-cell office:value-type="float" office:value="0.000613842">
                <text:p>0.0006138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37500000000001">
                <text:p>5.37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39034">
                <text:p>0.00439034</text:p>
              </table:table-cell>
              <table:table-cell office:value-type="float" office:value="NaN">
                <text:p>NaN</text:p>
              </table:table-cell>
              <table:table-cell office:value-type="float" office:value="0.0337676">
                <text:p>0.0337676</text:p>
              </table:table-cell>
              <table:table-cell office:value-type="float" office:value="NaN">
                <text:p>NaN</text:p>
              </table:table-cell>
              <table:table-cell office:value-type="float" office:value="0.000611115">
                <text:p>0.0006111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40000000000001">
                <text:p>5.4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37252">
                <text:p>0.00437252</text:p>
              </table:table-cell>
              <table:table-cell office:value-type="float" office:value="NaN">
                <text:p>NaN</text:p>
              </table:table-cell>
              <table:table-cell office:value-type="float" office:value="0.0336241">
                <text:p>0.0336241</text:p>
              </table:table-cell>
              <table:table-cell office:value-type="float" office:value="NaN">
                <text:p>NaN</text:p>
              </table:table-cell>
              <table:table-cell office:value-type="float" office:value="0.000608421">
                <text:p>0.0006084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42500000000001">
                <text:p>5.42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35487">
                <text:p>0.00435487</text:p>
              </table:table-cell>
              <table:table-cell office:value-type="float" office:value="NaN">
                <text:p>NaN</text:p>
              </table:table-cell>
              <table:table-cell office:value-type="float" office:value="0.0334819">
                <text:p>0.0334819</text:p>
              </table:table-cell>
              <table:table-cell office:value-type="float" office:value="NaN">
                <text:p>NaN</text:p>
              </table:table-cell>
              <table:table-cell office:value-type="float" office:value="0.000605753">
                <text:p>0.0006057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45000000000001">
                <text:p>5.4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33736">
                <text:p>0.00433736</text:p>
              </table:table-cell>
              <table:table-cell office:value-type="float" office:value="NaN">
                <text:p>NaN</text:p>
              </table:table-cell>
              <table:table-cell office:value-type="float" office:value="0.033341">
                <text:p>0.033341</text:p>
              </table:table-cell>
              <table:table-cell office:value-type="float" office:value="NaN">
                <text:p>NaN</text:p>
              </table:table-cell>
              <table:table-cell office:value-type="float" office:value="0.000603112">
                <text:p>0.000603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7500000000001">
                <text:p>5.47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32005">
                <text:p>0.00432005</text:p>
              </table:table-cell>
              <table:table-cell office:value-type="float" office:value="NaN">
                <text:p>NaN</text:p>
              </table:table-cell>
              <table:table-cell office:value-type="float" office:value="0.0332016">
                <text:p>0.0332016</text:p>
              </table:table-cell>
              <table:table-cell office:value-type="float" office:value="NaN">
                <text:p>NaN</text:p>
              </table:table-cell>
              <table:table-cell office:value-type="float" office:value="0.0006005">
                <text:p>0.0006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50000000000001">
                <text:p>5.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30289">
                <text:p>0.00430289</text:p>
              </table:table-cell>
              <table:table-cell office:value-type="float" office:value="NaN">
                <text:p>NaN</text:p>
              </table:table-cell>
              <table:table-cell office:value-type="float" office:value="0.0330635">
                <text:p>0.0330635</text:p>
              </table:table-cell>
              <table:table-cell office:value-type="float" office:value="NaN">
                <text:p>NaN</text:p>
              </table:table-cell>
              <table:table-cell office:value-type="float" office:value="0.000597915">
                <text:p>0.0005979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52500000000001">
                <text:p>5.52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28588">
                <text:p>0.00428588</text:p>
              </table:table-cell>
              <table:table-cell office:value-type="float" office:value="NaN">
                <text:p>NaN</text:p>
              </table:table-cell>
              <table:table-cell office:value-type="float" office:value="0.0329265">
                <text:p>0.0329265</text:p>
              </table:table-cell>
              <table:table-cell office:value-type="float" office:value="NaN">
                <text:p>NaN</text:p>
              </table:table-cell>
              <table:table-cell office:value-type="float" office:value="0.000595354">
                <text:p>0.0005953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5000000000001">
                <text:p>5.5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26904">
                <text:p>0.00426904</text:p>
              </table:table-cell>
              <table:table-cell office:value-type="float" office:value="NaN">
                <text:p>NaN</text:p>
              </table:table-cell>
              <table:table-cell office:value-type="float" office:value="0.0327911">
                <text:p>0.0327911</text:p>
              </table:table-cell>
              <table:table-cell office:value-type="float" office:value="NaN">
                <text:p>NaN</text:p>
              </table:table-cell>
              <table:table-cell office:value-type="float" office:value="0.000592822">
                <text:p>0.0005928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57500000000001">
                <text:p>5.57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25236">
                <text:p>0.00425236</text:p>
              </table:table-cell>
              <table:table-cell office:value-type="float" office:value="NaN">
                <text:p>NaN</text:p>
              </table:table-cell>
              <table:table-cell office:value-type="float" office:value="0.0326569">
                <text:p>0.0326569</text:p>
              </table:table-cell>
              <table:table-cell office:value-type="float" office:value="NaN">
                <text:p>NaN</text:p>
              </table:table-cell>
              <table:table-cell office:value-type="float" office:value="0.000590316">
                <text:p>0.0005903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60000000000001">
                <text:p>5.6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2358">
                <text:p>0.0042358</text:p>
              </table:table-cell>
              <table:table-cell office:value-type="float" office:value="NaN">
                <text:p>NaN</text:p>
              </table:table-cell>
              <table:table-cell office:value-type="float" office:value="0.0325238">
                <text:p>0.0325238</text:p>
              </table:table-cell>
              <table:table-cell office:value-type="float" office:value="NaN">
                <text:p>NaN</text:p>
              </table:table-cell>
              <table:table-cell office:value-type="float" office:value="0.000587832">
                <text:p>0.0005878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62500000000001">
                <text:p>5.62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21942">
                <text:p>0.00421942</text:p>
              </table:table-cell>
              <table:table-cell office:value-type="float" office:value="NaN">
                <text:p>NaN</text:p>
              </table:table-cell>
              <table:table-cell office:value-type="float" office:value="0.0323921">
                <text:p>0.0323921</text:p>
              </table:table-cell>
              <table:table-cell office:value-type="float" office:value="NaN">
                <text:p>NaN</text:p>
              </table:table-cell>
              <table:table-cell office:value-type="float" office:value="0.000585375">
                <text:p>0.000585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5000000000001">
                <text:p>5.6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2032">
                <text:p>0.0042032</text:p>
              </table:table-cell>
              <table:table-cell office:value-type="float" office:value="NaN">
                <text:p>NaN</text:p>
              </table:table-cell>
              <table:table-cell office:value-type="float" office:value="0.0322616">
                <text:p>0.0322616</text:p>
              </table:table-cell>
              <table:table-cell office:value-type="float" office:value="NaN">
                <text:p>NaN</text:p>
              </table:table-cell>
              <table:table-cell office:value-type="float" office:value="0.000582943">
                <text:p>0.0005829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7500000000001">
                <text:p>5.67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18709">
                <text:p>0.00418709</text:p>
              </table:table-cell>
              <table:table-cell office:value-type="float" office:value="NaN">
                <text:p>NaN</text:p>
              </table:table-cell>
              <table:table-cell office:value-type="float" office:value="0.0321321">
                <text:p>0.0321321</text:p>
              </table:table-cell>
              <table:table-cell office:value-type="float" office:value="NaN">
                <text:p>NaN</text:p>
              </table:table-cell>
              <table:table-cell office:value-type="float" office:value="0.000580533">
                <text:p>0.000580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70000000000001">
                <text:p>5.7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17115">
                <text:p>0.00417115</text:p>
              </table:table-cell>
              <table:table-cell office:value-type="float" office:value="NaN">
                <text:p>NaN</text:p>
              </table:table-cell>
              <table:table-cell office:value-type="float" office:value="0.0320041">
                <text:p>0.0320041</text:p>
              </table:table-cell>
              <table:table-cell office:value-type="float" office:value="NaN">
                <text:p>NaN</text:p>
              </table:table-cell>
              <table:table-cell office:value-type="float" office:value="0.000578149">
                <text:p>0.000578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72500000000001">
                <text:p>5.725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15535">
                <text:p>0.00415535</text:p>
              </table:table-cell>
              <table:table-cell office:value-type="float" office:value="NaN">
                <text:p>NaN</text:p>
              </table:table-cell>
              <table:table-cell office:value-type="float" office:value="0.0318772">
                <text:p>0.0318772</text:p>
              </table:table-cell>
              <table:table-cell office:value-type="float" office:value="NaN">
                <text:p>NaN</text:p>
              </table:table-cell>
              <table:table-cell office:value-type="float" office:value="0.000575788">
                <text:p>0.0005757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75000000000001">
                <text:p>5.7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00413968">
                <text:p>0.00413968</text:p>
              </table:table-cell>
              <table:table-cell office:value-type="float" office:value="NaN">
                <text:p>NaN</text:p>
              </table:table-cell>
              <table:table-cell office:value-type="float" office:value="0.0317512">
                <text:p>0.0317512</text:p>
              </table:table-cell>
              <table:table-cell office:value-type="float" office:value="NaN">
                <text:p>NaN</text:p>
              </table:table-cell>
              <table:table-cell office:value-type="float" office:value="0.000573448">
                <text:p>0.0005734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77500000000002">
                <text:p>5.77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12416">
                <text:p>0.00412416</text:p>
              </table:table-cell>
              <table:table-cell office:value-type="float" office:value="NaN">
                <text:p>NaN</text:p>
              </table:table-cell>
              <table:table-cell office:value-type="float" office:value="0.0316266">
                <text:p>0.0316266</text:p>
              </table:table-cell>
              <table:table-cell office:value-type="float" office:value="NaN">
                <text:p>NaN</text:p>
              </table:table-cell>
              <table:table-cell office:value-type="float" office:value="0.000571134">
                <text:p>0.0005711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80000000000002">
                <text:p>5.8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10878">
                <text:p>0.00410878</text:p>
              </table:table-cell>
              <table:table-cell office:value-type="float" office:value="NaN">
                <text:p>NaN</text:p>
              </table:table-cell>
              <table:table-cell office:value-type="float" office:value="0.0315032">
                <text:p>0.0315032</text:p>
              </table:table-cell>
              <table:table-cell office:value-type="float" office:value="NaN">
                <text:p>NaN</text:p>
              </table:table-cell>
              <table:table-cell office:value-type="float" office:value="0.000568841">
                <text:p>0.000568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82500000000002">
                <text:p>5.82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09351">
                <text:p>0.00409351</text:p>
              </table:table-cell>
              <table:table-cell office:value-type="float" office:value="NaN">
                <text:p>NaN</text:p>
              </table:table-cell>
              <table:table-cell office:value-type="float" office:value="0.0313805">
                <text:p>0.0313805</text:p>
              </table:table-cell>
              <table:table-cell office:value-type="float" office:value="NaN">
                <text:p>NaN</text:p>
              </table:table-cell>
              <table:table-cell office:value-type="float" office:value="0.000566569">
                <text:p>0.0005665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85000000000002">
                <text:p>5.8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0784">
                <text:p>0.0040784</text:p>
              </table:table-cell>
              <table:table-cell office:value-type="float" office:value="NaN">
                <text:p>NaN</text:p>
              </table:table-cell>
              <table:table-cell office:value-type="float" office:value="0.0312593">
                <text:p>0.0312593</text:p>
              </table:table-cell>
              <table:table-cell office:value-type="float" office:value="NaN">
                <text:p>NaN</text:p>
              </table:table-cell>
              <table:table-cell office:value-type="float" office:value="0.00056432">
                <text:p>0.000564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87500000000002">
                <text:p>5.87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06341">
                <text:p>0.00406341</text:p>
              </table:table-cell>
              <table:table-cell office:value-type="float" office:value="NaN">
                <text:p>NaN</text:p>
              </table:table-cell>
              <table:table-cell office:value-type="float" office:value="0.031139">
                <text:p>0.031139</text:p>
              </table:table-cell>
              <table:table-cell office:value-type="float" office:value="NaN">
                <text:p>NaN</text:p>
              </table:table-cell>
              <table:table-cell office:value-type="float" office:value="0.000562092">
                <text:p>0.0005620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90000000000002">
                <text:p>5.9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04855">
                <text:p>0.00404855</text:p>
              </table:table-cell>
              <table:table-cell office:value-type="float" office:value="NaN">
                <text:p>NaN</text:p>
              </table:table-cell>
              <table:table-cell office:value-type="float" office:value="0.0310197">
                <text:p>0.0310197</text:p>
              </table:table-cell>
              <table:table-cell office:value-type="float" office:value="NaN">
                <text:p>NaN</text:p>
              </table:table-cell>
              <table:table-cell office:value-type="float" office:value="0.000559884">
                <text:p>0.0005598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92500000000002">
                <text:p>5.92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03382">
                <text:p>0.00403382</text:p>
              </table:table-cell>
              <table:table-cell office:value-type="float" office:value="NaN">
                <text:p>NaN</text:p>
              </table:table-cell>
              <table:table-cell office:value-type="float" office:value="0.0309016">
                <text:p>0.0309016</text:p>
              </table:table-cell>
              <table:table-cell office:value-type="float" office:value="NaN">
                <text:p>NaN</text:p>
              </table:table-cell>
              <table:table-cell office:value-type="float" office:value="0.000557698">
                <text:p>0.0005576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5000000000002">
                <text:p>5.9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01922">
                <text:p>0.00401922</text:p>
              </table:table-cell>
              <table:table-cell office:value-type="float" office:value="NaN">
                <text:p>NaN</text:p>
              </table:table-cell>
              <table:table-cell office:value-type="float" office:value="0.0307845">
                <text:p>0.0307845</text:p>
              </table:table-cell>
              <table:table-cell office:value-type="float" office:value="NaN">
                <text:p>NaN</text:p>
              </table:table-cell>
              <table:table-cell office:value-type="float" office:value="0.000555533">
                <text:p>0.0005555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7500000000002">
                <text:p>5.97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400473">
                <text:p>0.00400473</text:p>
              </table:table-cell>
              <table:table-cell office:value-type="float" office:value="NaN">
                <text:p>NaN</text:p>
              </table:table-cell>
              <table:table-cell office:value-type="float" office:value="0.0306682">
                <text:p>0.0306682</text:p>
              </table:table-cell>
              <table:table-cell office:value-type="float" office:value="NaN">
                <text:p>NaN</text:p>
              </table:table-cell>
              <table:table-cell office:value-type="float" office:value="0.000553386">
                <text:p>0.0005533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00000000000002">
                <text:p>6.0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99038">
                <text:p>0.00399038</text:p>
              </table:table-cell>
              <table:table-cell office:value-type="float" office:value="NaN">
                <text:p>NaN</text:p>
              </table:table-cell>
              <table:table-cell office:value-type="float" office:value="0.0305532">
                <text:p>0.0305532</text:p>
              </table:table-cell>
              <table:table-cell office:value-type="float" office:value="NaN">
                <text:p>NaN</text:p>
              </table:table-cell>
              <table:table-cell office:value-type="float" office:value="0.000551261">
                <text:p>0.0005512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02500000000002">
                <text:p>6.02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97614">
                <text:p>0.00397614</text:p>
              </table:table-cell>
              <table:table-cell office:value-type="float" office:value="NaN">
                <text:p>NaN</text:p>
              </table:table-cell>
              <table:table-cell office:value-type="float" office:value="0.0304391">
                <text:p>0.0304391</text:p>
              </table:table-cell>
              <table:table-cell office:value-type="float" office:value="NaN">
                <text:p>NaN</text:p>
              </table:table-cell>
              <table:table-cell office:value-type="float" office:value="0.000549155">
                <text:p>0.0005491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05000000000002">
                <text:p>6.0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96201">
                <text:p>0.00396201</text:p>
              </table:table-cell>
              <table:table-cell office:value-type="float" office:value="NaN">
                <text:p>NaN</text:p>
              </table:table-cell>
              <table:table-cell office:value-type="float" office:value="0.0303258">
                <text:p>0.0303258</text:p>
              </table:table-cell>
              <table:table-cell office:value-type="float" office:value="NaN">
                <text:p>NaN</text:p>
              </table:table-cell>
              <table:table-cell office:value-type="float" office:value="0.000547068">
                <text:p>0.0005470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07500000000002">
                <text:p>6.07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94802">
                <text:p>0.00394802</text:p>
              </table:table-cell>
              <table:table-cell office:value-type="float" office:value="NaN">
                <text:p>NaN</text:p>
              </table:table-cell>
              <table:table-cell office:value-type="float" office:value="0.0302137">
                <text:p>0.0302137</text:p>
              </table:table-cell>
              <table:table-cell office:value-type="float" office:value="NaN">
                <text:p>NaN</text:p>
              </table:table-cell>
              <table:table-cell office:value-type="float" office:value="0.000545001">
                <text:p>0.000545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0000000000002">
                <text:p>6.1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93414">
                <text:p>0.00393414</text:p>
              </table:table-cell>
              <table:table-cell office:value-type="float" office:value="NaN">
                <text:p>NaN</text:p>
              </table:table-cell>
              <table:table-cell office:value-type="float" office:value="0.0301025">
                <text:p>0.0301025</text:p>
              </table:table-cell>
              <table:table-cell office:value-type="float" office:value="NaN">
                <text:p>NaN</text:p>
              </table:table-cell>
              <table:table-cell office:value-type="float" office:value="0.000542952">
                <text:p>0.0005429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2500000000002">
                <text:p>6.12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92035">
                <text:p>0.00392035</text:p>
              </table:table-cell>
              <table:table-cell office:value-type="float" office:value="NaN">
                <text:p>NaN</text:p>
              </table:table-cell>
              <table:table-cell office:value-type="float" office:value="0.0299921">
                <text:p>0.0299921</text:p>
              </table:table-cell>
              <table:table-cell office:value-type="float" office:value="NaN">
                <text:p>NaN</text:p>
              </table:table-cell>
              <table:table-cell office:value-type="float" office:value="0.00054092">
                <text:p>0.000540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5000000000002">
                <text:p>6.1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90671">
                <text:p>0.00390671</text:p>
              </table:table-cell>
              <table:table-cell office:value-type="float" office:value="NaN">
                <text:p>NaN</text:p>
              </table:table-cell>
              <table:table-cell office:value-type="float" office:value="0.0298828">
                <text:p>0.0298828</text:p>
              </table:table-cell>
              <table:table-cell office:value-type="float" office:value="NaN">
                <text:p>NaN</text:p>
              </table:table-cell>
              <table:table-cell office:value-type="float" office:value="0.000538909">
                <text:p>0.0005389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7500000000002">
                <text:p>6.17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89317">
                <text:p>0.00389317</text:p>
              </table:table-cell>
              <table:table-cell office:value-type="float" office:value="NaN">
                <text:p>NaN</text:p>
              </table:table-cell>
              <table:table-cell office:value-type="float" office:value="0.0297744">
                <text:p>0.0297744</text:p>
              </table:table-cell>
              <table:table-cell office:value-type="float" office:value="NaN">
                <text:p>NaN</text:p>
              </table:table-cell>
              <table:table-cell office:value-type="float" office:value="0.000536916">
                <text:p>0.0005369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0000000000002">
                <text:p>6.2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87972">
                <text:p>0.00387972</text:p>
              </table:table-cell>
              <table:table-cell office:value-type="float" office:value="NaN">
                <text:p>NaN</text:p>
              </table:table-cell>
              <table:table-cell office:value-type="float" office:value="0.0296667">
                <text:p>0.0296667</text:p>
              </table:table-cell>
              <table:table-cell office:value-type="float" office:value="NaN">
                <text:p>NaN</text:p>
              </table:table-cell>
              <table:table-cell office:value-type="float" office:value="0.000534938">
                <text:p>0.0005349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2500000000002">
                <text:p>6.22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86641">
                <text:p>0.00386641</text:p>
              </table:table-cell>
              <table:table-cell office:value-type="float" office:value="NaN">
                <text:p>NaN</text:p>
              </table:table-cell>
              <table:table-cell office:value-type="float" office:value="0.0295602">
                <text:p>0.0295602</text:p>
              </table:table-cell>
              <table:table-cell office:value-type="float" office:value="NaN">
                <text:p>NaN</text:p>
              </table:table-cell>
              <table:table-cell office:value-type="float" office:value="0.000532979">
                <text:p>0.0005329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25000000000002">
                <text:p>6.2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8532">
                <text:p>0.0038532</text:p>
              </table:table-cell>
              <table:table-cell office:value-type="float" office:value="NaN">
                <text:p>NaN</text:p>
              </table:table-cell>
              <table:table-cell office:value-type="float" office:value="0.0294544">
                <text:p>0.0294544</text:p>
              </table:table-cell>
              <table:table-cell office:value-type="float" office:value="NaN">
                <text:p>NaN</text:p>
              </table:table-cell>
              <table:table-cell office:value-type="float" office:value="0.000531039">
                <text:p>0.0005310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27500000000002">
                <text:p>6.27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84007">
                <text:p>0.00384007</text:p>
              </table:table-cell>
              <table:table-cell office:value-type="float" office:value="NaN">
                <text:p>NaN</text:p>
              </table:table-cell>
              <table:table-cell office:value-type="float" office:value="0.0293493">
                <text:p>0.0293493</text:p>
              </table:table-cell>
              <table:table-cell office:value-type="float" office:value="NaN">
                <text:p>NaN</text:p>
              </table:table-cell>
              <table:table-cell office:value-type="float" office:value="0.000529113">
                <text:p>0.0005291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30000000000002">
                <text:p>6.3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82708">
                <text:p>0.00382708</text:p>
              </table:table-cell>
              <table:table-cell office:value-type="float" office:value="NaN">
                <text:p>NaN</text:p>
              </table:table-cell>
              <table:table-cell office:value-type="float" office:value="0.0292453">
                <text:p>0.0292453</text:p>
              </table:table-cell>
              <table:table-cell office:value-type="float" office:value="NaN">
                <text:p>NaN</text:p>
              </table:table-cell>
              <table:table-cell office:value-type="float" office:value="0.000527206">
                <text:p>0.0005272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2500000000002">
                <text:p>6.32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81418">
                <text:p>0.00381418</text:p>
              </table:table-cell>
              <table:table-cell office:value-type="float" office:value="NaN">
                <text:p>NaN</text:p>
              </table:table-cell>
              <table:table-cell office:value-type="float" office:value="0.0291422">
                <text:p>0.0291422</text:p>
              </table:table-cell>
              <table:table-cell office:value-type="float" office:value="NaN">
                <text:p>NaN</text:p>
              </table:table-cell>
              <table:table-cell office:value-type="float" office:value="0.000525316">
                <text:p>0.0005253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35000000000002">
                <text:p>6.3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80138">
                <text:p>0.00380138</text:p>
              </table:table-cell>
              <table:table-cell office:value-type="float" office:value="NaN">
                <text:p>NaN</text:p>
              </table:table-cell>
              <table:table-cell office:value-type="float" office:value="0.0290397">
                <text:p>0.0290397</text:p>
              </table:table-cell>
              <table:table-cell office:value-type="float" office:value="NaN">
                <text:p>NaN</text:p>
              </table:table-cell>
              <table:table-cell office:value-type="float" office:value="0.00052344">
                <text:p>0.000523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37500000000002">
                <text:p>6.37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78869">
                <text:p>0.00378869</text:p>
              </table:table-cell>
              <table:table-cell office:value-type="float" office:value="NaN">
                <text:p>NaN</text:p>
              </table:table-cell>
              <table:table-cell office:value-type="float" office:value="0.0289383">
                <text:p>0.0289383</text:p>
              </table:table-cell>
              <table:table-cell office:value-type="float" office:value="NaN">
                <text:p>NaN</text:p>
              </table:table-cell>
              <table:table-cell office:value-type="float" office:value="0.000521581">
                <text:p>0.0005215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40000000000002">
                <text:p>6.4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77609">
                <text:p>0.00377609</text:p>
              </table:table-cell>
              <table:table-cell office:value-type="float" office:value="NaN">
                <text:p>NaN</text:p>
              </table:table-cell>
              <table:table-cell office:value-type="float" office:value="0.0288375">
                <text:p>0.0288375</text:p>
              </table:table-cell>
              <table:table-cell office:value-type="float" office:value="NaN">
                <text:p>NaN</text:p>
              </table:table-cell>
              <table:table-cell office:value-type="float" office:value="0.000519739">
                <text:p>0.0005197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42500000000002">
                <text:p>6.42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76358">
                <text:p>0.00376358</text:p>
              </table:table-cell>
              <table:table-cell office:value-type="float" office:value="NaN">
                <text:p>NaN</text:p>
              </table:table-cell>
              <table:table-cell office:value-type="float" office:value="0.0287375">
                <text:p>0.0287375</text:p>
              </table:table-cell>
              <table:table-cell office:value-type="float" office:value="NaN">
                <text:p>NaN</text:p>
              </table:table-cell>
              <table:table-cell office:value-type="float" office:value="0.000517911">
                <text:p>0.0005179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45000000000002">
                <text:p>6.4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75119">
                <text:p>0.00375119</text:p>
              </table:table-cell>
              <table:table-cell office:value-type="float" office:value="NaN">
                <text:p>NaN</text:p>
              </table:table-cell>
              <table:table-cell office:value-type="float" office:value="0.0286384">
                <text:p>0.0286384</text:p>
              </table:table-cell>
              <table:table-cell office:value-type="float" office:value="NaN">
                <text:p>NaN</text:p>
              </table:table-cell>
              <table:table-cell office:value-type="float" office:value="0.000516101">
                <text:p>0.0005161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47500000000002">
                <text:p>6.47500000000002</text:p>
              </table:table-cell>
              <table:table-cell office:value-type="float" office:value="NaN">
                <text:p>NaN</text:p>
              </table:table-cell>
              <table:table-cell office:value-type="float" office:value="0.00373888">
                <text:p>0.00373888</text:p>
              </table:table-cell>
              <table:table-cell office:value-type="float" office:value="NaN">
                <text:p>NaN</text:p>
              </table:table-cell>
              <table:table-cell office:value-type="float" office:value="0.0285401">
                <text:p>0.0285401</text:p>
              </table:table-cell>
              <table:table-cell office:value-type="float" office:value="NaN">
                <text:p>NaN</text:p>
              </table:table-cell>
              <table:table-cell office:value-type="float" office:value="0.000514305">
                <text:p>0.000514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50000000000003">
                <text:p>6.5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72667">
                <text:p>0.00372667</text:p>
              </table:table-cell>
              <table:table-cell office:value-type="float" office:value="NaN">
                <text:p>NaN</text:p>
              </table:table-cell>
              <table:table-cell office:value-type="float" office:value="0.0284425">
                <text:p>0.0284425</text:p>
              </table:table-cell>
              <table:table-cell office:value-type="float" office:value="NaN">
                <text:p>NaN</text:p>
              </table:table-cell>
              <table:table-cell office:value-type="float" office:value="0.000512523">
                <text:p>0.0005125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2500000000003">
                <text:p>6.52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71455">
                <text:p>0.00371455</text:p>
              </table:table-cell>
              <table:table-cell office:value-type="float" office:value="NaN">
                <text:p>NaN</text:p>
              </table:table-cell>
              <table:table-cell office:value-type="float" office:value="0.0283457">
                <text:p>0.0283457</text:p>
              </table:table-cell>
              <table:table-cell office:value-type="float" office:value="NaN">
                <text:p>NaN</text:p>
              </table:table-cell>
              <table:table-cell office:value-type="float" office:value="0.000510757">
                <text:p>0.0005107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55000000000003">
                <text:p>6.5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70254">
                <text:p>0.00370254</text:p>
              </table:table-cell>
              <table:table-cell office:value-type="float" office:value="NaN">
                <text:p>NaN</text:p>
              </table:table-cell>
              <table:table-cell office:value-type="float" office:value="0.0282496">
                <text:p>0.0282496</text:p>
              </table:table-cell>
              <table:table-cell office:value-type="float" office:value="NaN">
                <text:p>NaN</text:p>
              </table:table-cell>
              <table:table-cell office:value-type="float" office:value="0.000509006">
                <text:p>0.0005090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57500000000003">
                <text:p>6.57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69059">
                <text:p>0.00369059</text:p>
              </table:table-cell>
              <table:table-cell office:value-type="float" office:value="NaN">
                <text:p>NaN</text:p>
              </table:table-cell>
              <table:table-cell office:value-type="float" office:value="0.0281543">
                <text:p>0.0281543</text:p>
              </table:table-cell>
              <table:table-cell office:value-type="float" office:value="NaN">
                <text:p>NaN</text:p>
              </table:table-cell>
              <table:table-cell office:value-type="float" office:value="0.000507268">
                <text:p>0.000507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60000000000003">
                <text:p>6.6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67877">
                <text:p>0.00367877</text:p>
              </table:table-cell>
              <table:table-cell office:value-type="float" office:value="NaN">
                <text:p>NaN</text:p>
              </table:table-cell>
              <table:table-cell office:value-type="float" office:value="0.0280598">
                <text:p>0.0280598</text:p>
              </table:table-cell>
              <table:table-cell office:value-type="float" office:value="NaN">
                <text:p>NaN</text:p>
              </table:table-cell>
              <table:table-cell office:value-type="float" office:value="0.000505546">
                <text:p>0.0005055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62500000000003">
                <text:p>6.62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66702">
                <text:p>0.00366702</text:p>
              </table:table-cell>
              <table:table-cell office:value-type="float" office:value="NaN">
                <text:p>NaN</text:p>
              </table:table-cell>
              <table:table-cell office:value-type="float" office:value="0.027966">
                <text:p>0.027966</text:p>
              </table:table-cell>
              <table:table-cell office:value-type="float" office:value="NaN">
                <text:p>NaN</text:p>
              </table:table-cell>
              <table:table-cell office:value-type="float" office:value="0.000503839">
                <text:p>0.0005038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5000000000003">
                <text:p>6.6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65535">
                <text:p>0.00365535</text:p>
              </table:table-cell>
              <table:table-cell office:value-type="float" office:value="NaN">
                <text:p>NaN</text:p>
              </table:table-cell>
              <table:table-cell office:value-type="float" office:value="0.0278728">
                <text:p>0.0278728</text:p>
              </table:table-cell>
              <table:table-cell office:value-type="float" office:value="NaN">
                <text:p>NaN</text:p>
              </table:table-cell>
              <table:table-cell office:value-type="float" office:value="0.000502143">
                <text:p>0.0005021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67500000000003">
                <text:p>6.67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64378">
                <text:p>0.00364378</text:p>
              </table:table-cell>
              <table:table-cell office:value-type="float" office:value="NaN">
                <text:p>NaN</text:p>
              </table:table-cell>
              <table:table-cell office:value-type="float" office:value="0.0277804">
                <text:p>0.0277804</text:p>
              </table:table-cell>
              <table:table-cell office:value-type="float" office:value="NaN">
                <text:p>NaN</text:p>
              </table:table-cell>
              <table:table-cell office:value-type="float" office:value="0.000500463">
                <text:p>0.0005004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70000000000003">
                <text:p>6.7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63229">
                <text:p>0.00363229</text:p>
              </table:table-cell>
              <table:table-cell office:value-type="float" office:value="NaN">
                <text:p>NaN</text:p>
              </table:table-cell>
              <table:table-cell office:value-type="float" office:value="0.0276887">
                <text:p>0.0276887</text:p>
              </table:table-cell>
              <table:table-cell office:value-type="float" office:value="NaN">
                <text:p>NaN</text:p>
              </table:table-cell>
              <table:table-cell office:value-type="float" office:value="0.000498796">
                <text:p>0.0004987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2500000000003">
                <text:p>6.72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62088">
                <text:p>0.00362088</text:p>
              </table:table-cell>
              <table:table-cell office:value-type="float" office:value="NaN">
                <text:p>NaN</text:p>
              </table:table-cell>
              <table:table-cell office:value-type="float" office:value="0.0275977">
                <text:p>0.0275977</text:p>
              </table:table-cell>
              <table:table-cell office:value-type="float" office:value="NaN">
                <text:p>NaN</text:p>
              </table:table-cell>
              <table:table-cell office:value-type="float" office:value="0.000497142">
                <text:p>0.0004971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5000000000003">
                <text:p>6.7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60957">
                <text:p>0.00360957</text:p>
              </table:table-cell>
              <table:table-cell office:value-type="float" office:value="NaN">
                <text:p>NaN</text:p>
              </table:table-cell>
              <table:table-cell office:value-type="float" office:value="0.0275074">
                <text:p>0.0275074</text:p>
              </table:table-cell>
              <table:table-cell office:value-type="float" office:value="NaN">
                <text:p>NaN</text:p>
              </table:table-cell>
              <table:table-cell office:value-type="float" office:value="0.000495502">
                <text:p>0.0004955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77500000000003">
                <text:p>6.77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9834">
                <text:p>0.00359834</text:p>
              </table:table-cell>
              <table:table-cell office:value-type="float" office:value="NaN">
                <text:p>NaN</text:p>
              </table:table-cell>
              <table:table-cell office:value-type="float" office:value="0.0274177">
                <text:p>0.0274177</text:p>
              </table:table-cell>
              <table:table-cell office:value-type="float" office:value="NaN">
                <text:p>NaN</text:p>
              </table:table-cell>
              <table:table-cell office:value-type="float" office:value="0.000493875">
                <text:p>0.000493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80000000000003">
                <text:p>6.8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8718">
                <text:p>0.00358718</text:p>
              </table:table-cell>
              <table:table-cell office:value-type="float" office:value="NaN">
                <text:p>NaN</text:p>
              </table:table-cell>
              <table:table-cell office:value-type="float" office:value="0.0273287">
                <text:p>0.0273287</text:p>
              </table:table-cell>
              <table:table-cell office:value-type="float" office:value="NaN">
                <text:p>NaN</text:p>
              </table:table-cell>
              <table:table-cell office:value-type="float" office:value="0.00049226">
                <text:p>0.000492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82500000000003">
                <text:p>6.82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7611">
                <text:p>0.00357611</text:p>
              </table:table-cell>
              <table:table-cell office:value-type="float" office:value="NaN">
                <text:p>NaN</text:p>
              </table:table-cell>
              <table:table-cell office:value-type="float" office:value="0.0272404">
                <text:p>0.0272404</text:p>
              </table:table-cell>
              <table:table-cell office:value-type="float" office:value="NaN">
                <text:p>NaN</text:p>
              </table:table-cell>
              <table:table-cell office:value-type="float" office:value="0.000490659">
                <text:p>0.0004906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85000000000003">
                <text:p>6.8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6512">
                <text:p>0.00356512</text:p>
              </table:table-cell>
              <table:table-cell office:value-type="float" office:value="NaN">
                <text:p>NaN</text:p>
              </table:table-cell>
              <table:table-cell office:value-type="float" office:value="0.0271528">
                <text:p>0.0271528</text:p>
              </table:table-cell>
              <table:table-cell office:value-type="float" office:value="NaN">
                <text:p>NaN</text:p>
              </table:table-cell>
              <table:table-cell office:value-type="float" office:value="0.000489071">
                <text:p>0.0004890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87500000000003">
                <text:p>6.87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5421">
                <text:p>0.00355421</text:p>
              </table:table-cell>
              <table:table-cell office:value-type="float" office:value="NaN">
                <text:p>NaN</text:p>
              </table:table-cell>
              <table:table-cell office:value-type="float" office:value="0.0270658">
                <text:p>0.0270658</text:p>
              </table:table-cell>
              <table:table-cell office:value-type="float" office:value="NaN">
                <text:p>NaN</text:p>
              </table:table-cell>
              <table:table-cell office:value-type="float" office:value="0.000487493">
                <text:p>0.0004874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90000000000003">
                <text:p>6.9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4338">
                <text:p>0.00354338</text:p>
              </table:table-cell>
              <table:table-cell office:value-type="float" office:value="NaN">
                <text:p>NaN</text:p>
              </table:table-cell>
              <table:table-cell office:value-type="float" office:value="0.0269795">
                <text:p>0.0269795</text:p>
              </table:table-cell>
              <table:table-cell office:value-type="float" office:value="NaN">
                <text:p>NaN</text:p>
              </table:table-cell>
              <table:table-cell office:value-type="float" office:value="0.000485929">
                <text:p>0.0004859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2500000000003">
                <text:p>6.92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3263">
                <text:p>0.00353263</text:p>
              </table:table-cell>
              <table:table-cell office:value-type="float" office:value="NaN">
                <text:p>NaN</text:p>
              </table:table-cell>
              <table:table-cell office:value-type="float" office:value="0.0268937">
                <text:p>0.0268937</text:p>
              </table:table-cell>
              <table:table-cell office:value-type="float" office:value="NaN">
                <text:p>NaN</text:p>
              </table:table-cell>
              <table:table-cell office:value-type="float" office:value="0.000484378">
                <text:p>0.0004843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5000000000003">
                <text:p>6.9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2195">
                <text:p>0.00352195</text:p>
              </table:table-cell>
              <table:table-cell office:value-type="float" office:value="NaN">
                <text:p>NaN</text:p>
              </table:table-cell>
              <table:table-cell office:value-type="float" office:value="0.0268085">
                <text:p>0.0268085</text:p>
              </table:table-cell>
              <table:table-cell office:value-type="float" office:value="NaN">
                <text:p>NaN</text:p>
              </table:table-cell>
              <table:table-cell office:value-type="float" office:value="0.000482837">
                <text:p>0.0004828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7500000000003">
                <text:p>6.97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1135">
                <text:p>0.00351135</text:p>
              </table:table-cell>
              <table:table-cell office:value-type="float" office:value="NaN">
                <text:p>NaN</text:p>
              </table:table-cell>
              <table:table-cell office:value-type="float" office:value="0.0267241">
                <text:p>0.0267241</text:p>
              </table:table-cell>
              <table:table-cell office:value-type="float" office:value="NaN">
                <text:p>NaN</text:p>
              </table:table-cell>
              <table:table-cell office:value-type="float" office:value="0.00048131">
                <text:p>0.000481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00000000000003">
                <text:p>7.0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50083">
                <text:p>0.00350083</text:p>
              </table:table-cell>
              <table:table-cell office:value-type="float" office:value="NaN">
                <text:p>NaN</text:p>
              </table:table-cell>
              <table:table-cell office:value-type="float" office:value="0.0266403">
                <text:p>0.0266403</text:p>
              </table:table-cell>
              <table:table-cell office:value-type="float" office:value="NaN">
                <text:p>NaN</text:p>
              </table:table-cell>
              <table:table-cell office:value-type="float" office:value="0.000479794">
                <text:p>0.0004797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02500000000003">
                <text:p>7.02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49037">
                <text:p>0.00349037</text:p>
              </table:table-cell>
              <table:table-cell office:value-type="float" office:value="NaN">
                <text:p>NaN</text:p>
              </table:table-cell>
              <table:table-cell office:value-type="float" office:value="0.0265569">
                <text:p>0.0265569</text:p>
              </table:table-cell>
              <table:table-cell office:value-type="float" office:value="NaN">
                <text:p>NaN</text:p>
              </table:table-cell>
              <table:table-cell office:value-type="float" office:value="0.000478288">
                <text:p>0.0004782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05000000000003">
                <text:p>7.0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48">
                <text:p>0.00348</text:p>
              </table:table-cell>
              <table:table-cell office:value-type="float" office:value="NaN">
                <text:p>NaN</text:p>
              </table:table-cell>
              <table:table-cell office:value-type="float" office:value="0.0264743">
                <text:p>0.0264743</text:p>
              </table:table-cell>
              <table:table-cell office:value-type="float" office:value="NaN">
                <text:p>NaN</text:p>
              </table:table-cell>
              <table:table-cell office:value-type="float" office:value="0.000476796">
                <text:p>0.0004767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07500000000003">
                <text:p>7.07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4697">
                <text:p>0.0034697</text:p>
              </table:table-cell>
              <table:table-cell office:value-type="float" office:value="NaN">
                <text:p>NaN</text:p>
              </table:table-cell>
              <table:table-cell office:value-type="float" office:value="0.0263923">
                <text:p>0.0263923</text:p>
              </table:table-cell>
              <table:table-cell office:value-type="float" office:value="NaN">
                <text:p>NaN</text:p>
              </table:table-cell>
              <table:table-cell office:value-type="float" office:value="0.000475315">
                <text:p>0.0004753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0000000000003">
                <text:p>7.1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45946">
                <text:p>0.00345946</text:p>
              </table:table-cell>
              <table:table-cell office:value-type="float" office:value="NaN">
                <text:p>NaN</text:p>
              </table:table-cell>
              <table:table-cell office:value-type="float" office:value="0.0263106">
                <text:p>0.0263106</text:p>
              </table:table-cell>
              <table:table-cell office:value-type="float" office:value="NaN">
                <text:p>NaN</text:p>
              </table:table-cell>
              <table:table-cell office:value-type="float" office:value="0.000473843">
                <text:p>0.0004738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2500000000003">
                <text:p>7.12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4493">
                <text:p>0.0034493</text:p>
              </table:table-cell>
              <table:table-cell office:value-type="float" office:value="NaN">
                <text:p>NaN</text:p>
              </table:table-cell>
              <table:table-cell office:value-type="float" office:value="0.0262298">
                <text:p>0.0262298</text:p>
              </table:table-cell>
              <table:table-cell office:value-type="float" office:value="NaN">
                <text:p>NaN</text:p>
              </table:table-cell>
              <table:table-cell office:value-type="float" office:value="0.000472384">
                <text:p>0.0004723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5000000000003">
                <text:p>7.1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43922">
                <text:p>0.00343922</text:p>
              </table:table-cell>
              <table:table-cell office:value-type="float" office:value="NaN">
                <text:p>NaN</text:p>
              </table:table-cell>
              <table:table-cell office:value-type="float" office:value="0.0261495">
                <text:p>0.0261495</text:p>
              </table:table-cell>
              <table:table-cell office:value-type="float" office:value="NaN">
                <text:p>NaN</text:p>
              </table:table-cell>
              <table:table-cell office:value-type="float" office:value="0.000470935">
                <text:p>0.0004709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7500000000003">
                <text:p>7.17500000000003</text:p>
              </table:table-cell>
              <table:table-cell office:value-type="float" office:value="NaN">
                <text:p>NaN</text:p>
              </table:table-cell>
              <table:table-cell office:value-type="float" office:value="0.00342919">
                <text:p>0.00342919</text:p>
              </table:table-cell>
              <table:table-cell office:value-type="float" office:value="NaN">
                <text:p>NaN</text:p>
              </table:table-cell>
              <table:table-cell office:value-type="float" office:value="0.0260697">
                <text:p>0.0260697</text:p>
              </table:table-cell>
              <table:table-cell office:value-type="float" office:value="NaN">
                <text:p>NaN</text:p>
              </table:table-cell>
              <table:table-cell office:value-type="float" office:value="0.000469496">
                <text:p>0.0004694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20000000000004">
                <text:p>7.2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41924">
                <text:p>0.00341924</text:p>
              </table:table-cell>
              <table:table-cell office:value-type="float" office:value="NaN">
                <text:p>NaN</text:p>
              </table:table-cell>
              <table:table-cell office:value-type="float" office:value="0.0259905">
                <text:p>0.0259905</text:p>
              </table:table-cell>
              <table:table-cell office:value-type="float" office:value="NaN">
                <text:p>NaN</text:p>
              </table:table-cell>
              <table:table-cell office:value-type="float" office:value="0.00046807">
                <text:p>0.000468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2500000000004">
                <text:p>7.22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40937">
                <text:p>0.00340937</text:p>
              </table:table-cell>
              <table:table-cell office:value-type="float" office:value="NaN">
                <text:p>NaN</text:p>
              </table:table-cell>
              <table:table-cell office:value-type="float" office:value="0.0259118">
                <text:p>0.0259118</text:p>
              </table:table-cell>
              <table:table-cell office:value-type="float" office:value="NaN">
                <text:p>NaN</text:p>
              </table:table-cell>
              <table:table-cell office:value-type="float" office:value="0.000466654">
                <text:p>0.0004666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25000000000004">
                <text:p>7.2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9954">
                <text:p>0.00339954</text:p>
              </table:table-cell>
              <table:table-cell office:value-type="float" office:value="NaN">
                <text:p>NaN</text:p>
              </table:table-cell>
              <table:table-cell office:value-type="float" office:value="0.0258336">
                <text:p>0.0258336</text:p>
              </table:table-cell>
              <table:table-cell office:value-type="float" office:value="NaN">
                <text:p>NaN</text:p>
              </table:table-cell>
              <table:table-cell office:value-type="float" office:value="0.000465247">
                <text:p>0.0004652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27500000000004">
                <text:p>7.27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898">
                <text:p>0.0033898</text:p>
              </table:table-cell>
              <table:table-cell office:value-type="float" office:value="NaN">
                <text:p>NaN</text:p>
              </table:table-cell>
              <table:table-cell office:value-type="float" office:value="0.0257561">
                <text:p>0.0257561</text:p>
              </table:table-cell>
              <table:table-cell office:value-type="float" office:value="NaN">
                <text:p>NaN</text:p>
              </table:table-cell>
              <table:table-cell office:value-type="float" office:value="0.000463851">
                <text:p>0.0004638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30000000000004">
                <text:p>7.3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8013">
                <text:p>0.00338013</text:p>
              </table:table-cell>
              <table:table-cell office:value-type="float" office:value="NaN">
                <text:p>NaN</text:p>
              </table:table-cell>
              <table:table-cell office:value-type="float" office:value="0.0256791">
                <text:p>0.0256791</text:p>
              </table:table-cell>
              <table:table-cell office:value-type="float" office:value="NaN">
                <text:p>NaN</text:p>
              </table:table-cell>
              <table:table-cell office:value-type="float" office:value="0.000462466">
                <text:p>0.0004624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32500000000004">
                <text:p>7.32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705">
                <text:p>0.0033705</text:p>
              </table:table-cell>
              <table:table-cell office:value-type="float" office:value="NaN">
                <text:p>NaN</text:p>
              </table:table-cell>
              <table:table-cell office:value-type="float" office:value="0.0256025">
                <text:p>0.0256025</text:p>
              </table:table-cell>
              <table:table-cell office:value-type="float" office:value="NaN">
                <text:p>NaN</text:p>
              </table:table-cell>
              <table:table-cell office:value-type="float" office:value="0.000461089">
                <text:p>0.0004610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35000000000004">
                <text:p>7.3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6095">
                <text:p>0.00336095</text:p>
              </table:table-cell>
              <table:table-cell office:value-type="float" office:value="NaN">
                <text:p>NaN</text:p>
              </table:table-cell>
              <table:table-cell office:value-type="float" office:value="0.0255266">
                <text:p>0.0255266</text:p>
              </table:table-cell>
              <table:table-cell office:value-type="float" office:value="NaN">
                <text:p>NaN</text:p>
              </table:table-cell>
              <table:table-cell office:value-type="float" office:value="0.000459724">
                <text:p>0.0004597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37500000000004">
                <text:p>7.37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5146">
                <text:p>0.00335146</text:p>
              </table:table-cell>
              <table:table-cell office:value-type="float" office:value="NaN">
                <text:p>NaN</text:p>
              </table:table-cell>
              <table:table-cell office:value-type="float" office:value="0.0254511">
                <text:p>0.0254511</text:p>
              </table:table-cell>
              <table:table-cell office:value-type="float" office:value="NaN">
                <text:p>NaN</text:p>
              </table:table-cell>
              <table:table-cell office:value-type="float" office:value="0.000458368">
                <text:p>0.0004583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0000000000004">
                <text:p>7.4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4204">
                <text:p>0.00334204</text:p>
              </table:table-cell>
              <table:table-cell office:value-type="float" office:value="NaN">
                <text:p>NaN</text:p>
              </table:table-cell>
              <table:table-cell office:value-type="float" office:value="0.0253761">
                <text:p>0.0253761</text:p>
              </table:table-cell>
              <table:table-cell office:value-type="float" office:value="NaN">
                <text:p>NaN</text:p>
              </table:table-cell>
              <table:table-cell office:value-type="float" office:value="0.000457021">
                <text:p>0.000457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2500000000004">
                <text:p>7.42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3267">
                <text:p>0.00333267</text:p>
              </table:table-cell>
              <table:table-cell office:value-type="float" office:value="NaN">
                <text:p>NaN</text:p>
              </table:table-cell>
              <table:table-cell office:value-type="float" office:value="0.0253017">
                <text:p>0.0253017</text:p>
              </table:table-cell>
              <table:table-cell office:value-type="float" office:value="NaN">
                <text:p>NaN</text:p>
              </table:table-cell>
              <table:table-cell office:value-type="float" office:value="0.000455685">
                <text:p>0.0004556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45000000000004">
                <text:p>7.4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2338">
                <text:p>0.00332338</text:p>
              </table:table-cell>
              <table:table-cell office:value-type="float" office:value="NaN">
                <text:p>NaN</text:p>
              </table:table-cell>
              <table:table-cell office:value-type="float" office:value="0.0252278">
                <text:p>0.0252278</text:p>
              </table:table-cell>
              <table:table-cell office:value-type="float" office:value="NaN">
                <text:p>NaN</text:p>
              </table:table-cell>
              <table:table-cell office:value-type="float" office:value="0.000454358">
                <text:p>0.0004543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47500000000004">
                <text:p>7.47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1413">
                <text:p>0.00331413</text:p>
              </table:table-cell>
              <table:table-cell office:value-type="float" office:value="NaN">
                <text:p>NaN</text:p>
              </table:table-cell>
              <table:table-cell office:value-type="float" office:value="0.0251542">
                <text:p>0.0251542</text:p>
              </table:table-cell>
              <table:table-cell office:value-type="float" office:value="NaN">
                <text:p>NaN</text:p>
              </table:table-cell>
              <table:table-cell office:value-type="float" office:value="0.00045304">
                <text:p>0.000453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50000000000004">
                <text:p>7.5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30497">
                <text:p>0.00330497</text:p>
              </table:table-cell>
              <table:table-cell office:value-type="float" office:value="NaN">
                <text:p>NaN</text:p>
              </table:table-cell>
              <table:table-cell office:value-type="float" office:value="0.0250813">
                <text:p>0.0250813</text:p>
              </table:table-cell>
              <table:table-cell office:value-type="float" office:value="NaN">
                <text:p>NaN</text:p>
              </table:table-cell>
              <table:table-cell office:value-type="float" office:value="0.000451732">
                <text:p>0.0004517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2500000000004">
                <text:p>7.52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9585">
                <text:p>0.00329585</text:p>
              </table:table-cell>
              <table:table-cell office:value-type="float" office:value="NaN">
                <text:p>NaN</text:p>
              </table:table-cell>
              <table:table-cell office:value-type="float" office:value="0.0250089">
                <text:p>0.0250089</text:p>
              </table:table-cell>
              <table:table-cell office:value-type="float" office:value="NaN">
                <text:p>NaN</text:p>
              </table:table-cell>
              <table:table-cell office:value-type="float" office:value="0.000450433">
                <text:p>0.0004504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5000000000004">
                <text:p>7.5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8679">
                <text:p>0.00328679</text:p>
              </table:table-cell>
              <table:table-cell office:value-type="float" office:value="NaN">
                <text:p>NaN</text:p>
              </table:table-cell>
              <table:table-cell office:value-type="float" office:value="0.0249368">
                <text:p>0.0249368</text:p>
              </table:table-cell>
              <table:table-cell office:value-type="float" office:value="NaN">
                <text:p>NaN</text:p>
              </table:table-cell>
              <table:table-cell office:value-type="float" office:value="0.000449142">
                <text:p>0.0004491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7500000000004">
                <text:p>7.57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7779">
                <text:p>0.00327779</text:p>
              </table:table-cell>
              <table:table-cell office:value-type="float" office:value="NaN">
                <text:p>NaN</text:p>
              </table:table-cell>
              <table:table-cell office:value-type="float" office:value="0.0248653">
                <text:p>0.0248653</text:p>
              </table:table-cell>
              <table:table-cell office:value-type="float" office:value="NaN">
                <text:p>NaN</text:p>
              </table:table-cell>
              <table:table-cell office:value-type="float" office:value="0.000447861">
                <text:p>0.0004478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60000000000004">
                <text:p>7.6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6885">
                <text:p>0.00326885</text:p>
              </table:table-cell>
              <table:table-cell office:value-type="float" office:value="NaN">
                <text:p>NaN</text:p>
              </table:table-cell>
              <table:table-cell office:value-type="float" office:value="0.0247943">
                <text:p>0.0247943</text:p>
              </table:table-cell>
              <table:table-cell office:value-type="float" office:value="NaN">
                <text:p>NaN</text:p>
              </table:table-cell>
              <table:table-cell office:value-type="float" office:value="0.00044659">
                <text:p>0.000446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62500000000004">
                <text:p>7.62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5996">
                <text:p>0.00325996</text:p>
              </table:table-cell>
              <table:table-cell office:value-type="float" office:value="NaN">
                <text:p>NaN</text:p>
              </table:table-cell>
              <table:table-cell office:value-type="float" office:value="0.0247237">
                <text:p>0.0247237</text:p>
              </table:table-cell>
              <table:table-cell office:value-type="float" office:value="NaN">
                <text:p>NaN</text:p>
              </table:table-cell>
              <table:table-cell office:value-type="float" office:value="0.000445326">
                <text:p>0.0004453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65000000000004">
                <text:p>7.6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5114">
                <text:p>0.00325114</text:p>
              </table:table-cell>
              <table:table-cell office:value-type="float" office:value="NaN">
                <text:p>NaN</text:p>
              </table:table-cell>
              <table:table-cell office:value-type="float" office:value="0.0246536">
                <text:p>0.0246536</text:p>
              </table:table-cell>
              <table:table-cell office:value-type="float" office:value="NaN">
                <text:p>NaN</text:p>
              </table:table-cell>
              <table:table-cell office:value-type="float" office:value="0.000444071">
                <text:p>0.0004440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67500000000004">
                <text:p>7.67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4238">
                <text:p>0.00324238</text:p>
              </table:table-cell>
              <table:table-cell office:value-type="float" office:value="NaN">
                <text:p>NaN</text:p>
              </table:table-cell>
              <table:table-cell office:value-type="float" office:value="0.024584">
                <text:p>0.024584</text:p>
              </table:table-cell>
              <table:table-cell office:value-type="float" office:value="NaN">
                <text:p>NaN</text:p>
              </table:table-cell>
              <table:table-cell office:value-type="float" office:value="0.000442826">
                <text:p>0.0004428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70000000000004">
                <text:p>7.7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3365">
                <text:p>0.00323365</text:p>
              </table:table-cell>
              <table:table-cell office:value-type="float" office:value="NaN">
                <text:p>NaN</text:p>
              </table:table-cell>
              <table:table-cell office:value-type="float" office:value="0.0245147">
                <text:p>0.0245147</text:p>
              </table:table-cell>
              <table:table-cell office:value-type="float" office:value="NaN">
                <text:p>NaN</text:p>
              </table:table-cell>
              <table:table-cell office:value-type="float" office:value="0.000441587">
                <text:p>0.0004415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72500000000004">
                <text:p>7.72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25">
                <text:p>0.003225</text:p>
              </table:table-cell>
              <table:table-cell office:value-type="float" office:value="NaN">
                <text:p>NaN</text:p>
              </table:table-cell>
              <table:table-cell office:value-type="float" office:value="0.0244461">
                <text:p>0.0244461</text:p>
              </table:table-cell>
              <table:table-cell office:value-type="float" office:value="NaN">
                <text:p>NaN</text:p>
              </table:table-cell>
              <table:table-cell office:value-type="float" office:value="0.000440359">
                <text:p>0.0004403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5000000000004">
                <text:p>7.7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164">
                <text:p>0.0032164</text:p>
              </table:table-cell>
              <table:table-cell office:value-type="float" office:value="NaN">
                <text:p>NaN</text:p>
              </table:table-cell>
              <table:table-cell office:value-type="float" office:value="0.0243777">
                <text:p>0.0243777</text:p>
              </table:table-cell>
              <table:table-cell office:value-type="float" office:value="NaN">
                <text:p>NaN</text:p>
              </table:table-cell>
              <table:table-cell office:value-type="float" office:value="0.000439139">
                <text:p>0.0004391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7500000000004">
                <text:p>7.77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20784">
                <text:p>0.00320784</text:p>
              </table:table-cell>
              <table:table-cell office:value-type="float" office:value="NaN">
                <text:p>NaN</text:p>
              </table:table-cell>
              <table:table-cell office:value-type="float" office:value="0.0243098">
                <text:p>0.0243098</text:p>
              </table:table-cell>
              <table:table-cell office:value-type="float" office:value="NaN">
                <text:p>NaN</text:p>
              </table:table-cell>
              <table:table-cell office:value-type="float" office:value="0.000437926">
                <text:p>0.0004379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80000000000004">
                <text:p>7.8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19935">
                <text:p>0.00319935</text:p>
              </table:table-cell>
              <table:table-cell office:value-type="float" office:value="NaN">
                <text:p>NaN</text:p>
              </table:table-cell>
              <table:table-cell office:value-type="float" office:value="0.0242424">
                <text:p>0.0242424</text:p>
              </table:table-cell>
              <table:table-cell office:value-type="float" office:value="NaN">
                <text:p>NaN</text:p>
              </table:table-cell>
              <table:table-cell office:value-type="float" office:value="0.000436722">
                <text:p>0.0004367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82500000000004">
                <text:p>7.82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19092">
                <text:p>0.00319092</text:p>
              </table:table-cell>
              <table:table-cell office:value-type="float" office:value="NaN">
                <text:p>NaN</text:p>
              </table:table-cell>
              <table:table-cell office:value-type="float" office:value="0.0241754">
                <text:p>0.0241754</text:p>
              </table:table-cell>
              <table:table-cell office:value-type="float" office:value="NaN">
                <text:p>NaN</text:p>
              </table:table-cell>
              <table:table-cell office:value-type="float" office:value="0.000435526">
                <text:p>0.0004355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5000000000004">
                <text:p>7.8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18252">
                <text:p>0.00318252</text:p>
              </table:table-cell>
              <table:table-cell office:value-type="float" office:value="NaN">
                <text:p>NaN</text:p>
              </table:table-cell>
              <table:table-cell office:value-type="float" office:value="0.0241087">
                <text:p>0.0241087</text:p>
              </table:table-cell>
              <table:table-cell office:value-type="float" office:value="NaN">
                <text:p>NaN</text:p>
              </table:table-cell>
              <table:table-cell office:value-type="float" office:value="0.000434337">
                <text:p>0.0004343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87500000000004">
                <text:p>7.87500000000004</text:p>
              </table:table-cell>
              <table:table-cell office:value-type="float" office:value="NaN">
                <text:p>NaN</text:p>
              </table:table-cell>
              <table:table-cell office:value-type="float" office:value="0.00317419">
                <text:p>0.00317419</text:p>
              </table:table-cell>
              <table:table-cell office:value-type="float" office:value="NaN">
                <text:p>NaN</text:p>
              </table:table-cell>
              <table:table-cell office:value-type="float" office:value="0.0240426">
                <text:p>0.0240426</text:p>
              </table:table-cell>
              <table:table-cell office:value-type="float" office:value="NaN">
                <text:p>NaN</text:p>
              </table:table-cell>
              <table:table-cell office:value-type="float" office:value="0.000433158">
                <text:p>0.0004331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0000000000005">
                <text:p>7.9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6591">
                <text:p>0.00316591</text:p>
              </table:table-cell>
              <table:table-cell office:value-type="float" office:value="NaN">
                <text:p>NaN</text:p>
              </table:table-cell>
              <table:table-cell office:value-type="float" office:value="0.023977">
                <text:p>0.023977</text:p>
              </table:table-cell>
              <table:table-cell office:value-type="float" office:value="NaN">
                <text:p>NaN</text:p>
              </table:table-cell>
              <table:table-cell office:value-type="float" office:value="0.000431985">
                <text:p>0.0004319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92500000000005">
                <text:p>7.92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5767">
                <text:p>0.00315767</text:p>
              </table:table-cell>
              <table:table-cell office:value-type="float" office:value="NaN">
                <text:p>NaN</text:p>
              </table:table-cell>
              <table:table-cell office:value-type="float" office:value="0.0239115">
                <text:p>0.0239115</text:p>
              </table:table-cell>
              <table:table-cell office:value-type="float" office:value="NaN">
                <text:p>NaN</text:p>
              </table:table-cell>
              <table:table-cell office:value-type="float" office:value="0.00043082">
                <text:p>0.000430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95000000000005">
                <text:p>7.9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4949">
                <text:p>0.00314949</text:p>
              </table:table-cell>
              <table:table-cell office:value-type="float" office:value="NaN">
                <text:p>NaN</text:p>
              </table:table-cell>
              <table:table-cell office:value-type="float" office:value="0.0238467">
                <text:p>0.0238467</text:p>
              </table:table-cell>
              <table:table-cell office:value-type="float" office:value="NaN">
                <text:p>NaN</text:p>
              </table:table-cell>
              <table:table-cell office:value-type="float" office:value="0.000429663">
                <text:p>0.0004296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97500000000005">
                <text:p>7.97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4137">
                <text:p>0.00314137</text:p>
              </table:table-cell>
              <table:table-cell office:value-type="float" office:value="NaN">
                <text:p>NaN</text:p>
              </table:table-cell>
              <table:table-cell office:value-type="float" office:value="0.0237822">
                <text:p>0.0237822</text:p>
              </table:table-cell>
              <table:table-cell office:value-type="float" office:value="NaN">
                <text:p>NaN</text:p>
              </table:table-cell>
              <table:table-cell office:value-type="float" office:value="0.000428514">
                <text:p>0.0004285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00000000000005">
                <text:p>8.0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3328">
                <text:p>0.00313328</text:p>
              </table:table-cell>
              <table:table-cell office:value-type="float" office:value="NaN">
                <text:p>NaN</text:p>
              </table:table-cell>
              <table:table-cell office:value-type="float" office:value="0.023718">
                <text:p>0.023718</text:p>
              </table:table-cell>
              <table:table-cell office:value-type="float" office:value="NaN">
                <text:p>NaN</text:p>
              </table:table-cell>
              <table:table-cell office:value-type="float" office:value="0.000427371">
                <text:p>0.0004273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02500000000005">
                <text:p>8.02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2525">
                <text:p>0.00312525</text:p>
              </table:table-cell>
              <table:table-cell office:value-type="float" office:value="NaN">
                <text:p>NaN</text:p>
              </table:table-cell>
              <table:table-cell office:value-type="float" office:value="0.0236543">
                <text:p>0.0236543</text:p>
              </table:table-cell>
              <table:table-cell office:value-type="float" office:value="NaN">
                <text:p>NaN</text:p>
              </table:table-cell>
              <table:table-cell office:value-type="float" office:value="0.000426237">
                <text:p>0.0004262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05000000000005">
                <text:p>8.0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1727">
                <text:p>0.00311727</text:p>
              </table:table-cell>
              <table:table-cell office:value-type="float" office:value="NaN">
                <text:p>NaN</text:p>
              </table:table-cell>
              <table:table-cell office:value-type="float" office:value="0.0235911">
                <text:p>0.0235911</text:p>
              </table:table-cell>
              <table:table-cell office:value-type="float" office:value="NaN">
                <text:p>NaN</text:p>
              </table:table-cell>
              <table:table-cell office:value-type="float" office:value="0.00042511">
                <text:p>0.000425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07500000000005">
                <text:p>8.07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0932">
                <text:p>0.00310932</text:p>
              </table:table-cell>
              <table:table-cell office:value-type="float" office:value="NaN">
                <text:p>NaN</text:p>
              </table:table-cell>
              <table:table-cell office:value-type="float" office:value="0.023528">
                <text:p>0.023528</text:p>
              </table:table-cell>
              <table:table-cell office:value-type="float" office:value="NaN">
                <text:p>NaN</text:p>
              </table:table-cell>
              <table:table-cell office:value-type="float" office:value="0.000423989">
                <text:p>0.0004239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10000000000005">
                <text:p>8.1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10143">
                <text:p>0.00310143</text:p>
              </table:table-cell>
              <table:table-cell office:value-type="float" office:value="NaN">
                <text:p>NaN</text:p>
              </table:table-cell>
              <table:table-cell office:value-type="float" office:value="0.0234655">
                <text:p>0.0234655</text:p>
              </table:table-cell>
              <table:table-cell office:value-type="float" office:value="NaN">
                <text:p>NaN</text:p>
              </table:table-cell>
              <table:table-cell office:value-type="float" office:value="0.000422877">
                <text:p>0.0004228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12500000000005">
                <text:p>8.12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936">
                <text:p>0.0030936</text:p>
              </table:table-cell>
              <table:table-cell office:value-type="float" office:value="NaN">
                <text:p>NaN</text:p>
              </table:table-cell>
              <table:table-cell office:value-type="float" office:value="0.0234034">
                <text:p>0.0234034</text:p>
              </table:table-cell>
              <table:table-cell office:value-type="float" office:value="NaN">
                <text:p>NaN</text:p>
              </table:table-cell>
              <table:table-cell office:value-type="float" office:value="0.000421772">
                <text:p>0.000421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15000000000005">
                <text:p>8.1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858">
                <text:p>0.0030858</text:p>
              </table:table-cell>
              <table:table-cell office:value-type="float" office:value="NaN">
                <text:p>NaN</text:p>
              </table:table-cell>
              <table:table-cell office:value-type="float" office:value="0.0233415">
                <text:p>0.0233415</text:p>
              </table:table-cell>
              <table:table-cell office:value-type="float" office:value="NaN">
                <text:p>NaN</text:p>
              </table:table-cell>
              <table:table-cell office:value-type="float" office:value="0.000420673">
                <text:p>0.0004206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17500000000005">
                <text:p>8.17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7806">
                <text:p>0.00307806</text:p>
              </table:table-cell>
              <table:table-cell office:value-type="float" office:value="NaN">
                <text:p>NaN</text:p>
              </table:table-cell>
              <table:table-cell office:value-type="float" office:value="0.0232802">
                <text:p>0.0232802</text:p>
              </table:table-cell>
              <table:table-cell office:value-type="float" office:value="NaN">
                <text:p>NaN</text:p>
              </table:table-cell>
              <table:table-cell office:value-type="float" office:value="0.000419581">
                <text:p>0.0004195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20000000000005">
                <text:p>8.2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7036">
                <text:p>0.00307036</text:p>
              </table:table-cell>
              <table:table-cell office:value-type="float" office:value="NaN">
                <text:p>NaN</text:p>
              </table:table-cell>
              <table:table-cell office:value-type="float" office:value="0.0232191">
                <text:p>0.0232191</text:p>
              </table:table-cell>
              <table:table-cell office:value-type="float" office:value="NaN">
                <text:p>NaN</text:p>
              </table:table-cell>
              <table:table-cell office:value-type="float" office:value="0.000418497">
                <text:p>0.0004184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22500000000005">
                <text:p>8.22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627">
                <text:p>0.0030627</text:p>
              </table:table-cell>
              <table:table-cell office:value-type="float" office:value="NaN">
                <text:p>NaN</text:p>
              </table:table-cell>
              <table:table-cell office:value-type="float" office:value="0.0231585">
                <text:p>0.0231585</text:p>
              </table:table-cell>
              <table:table-cell office:value-type="float" office:value="NaN">
                <text:p>NaN</text:p>
              </table:table-cell>
              <table:table-cell office:value-type="float" office:value="0.000417419">
                <text:p>0.0004174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25000000000005">
                <text:p>8.2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5509">
                <text:p>0.00305509</text:p>
              </table:table-cell>
              <table:table-cell office:value-type="float" office:value="NaN">
                <text:p>NaN</text:p>
              </table:table-cell>
              <table:table-cell office:value-type="float" office:value="0.0230981">
                <text:p>0.0230981</text:p>
              </table:table-cell>
              <table:table-cell office:value-type="float" office:value="NaN">
                <text:p>NaN</text:p>
              </table:table-cell>
              <table:table-cell office:value-type="float" office:value="0.000416348">
                <text:p>0.0004163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27500000000005">
                <text:p>8.27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4753">
                <text:p>0.00304753</text:p>
              </table:table-cell>
              <table:table-cell office:value-type="float" office:value="NaN">
                <text:p>NaN</text:p>
              </table:table-cell>
              <table:table-cell office:value-type="float" office:value="0.0230382">
                <text:p>0.0230382</text:p>
              </table:table-cell>
              <table:table-cell office:value-type="float" office:value="NaN">
                <text:p>NaN</text:p>
              </table:table-cell>
              <table:table-cell office:value-type="float" office:value="0.000415284">
                <text:p>0.0004152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30000000000005">
                <text:p>8.3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4">
                <text:p>0.00304</text:p>
              </table:table-cell>
              <table:table-cell office:value-type="float" office:value="NaN">
                <text:p>NaN</text:p>
              </table:table-cell>
              <table:table-cell office:value-type="float" office:value="0.0229786">
                <text:p>0.0229786</text:p>
              </table:table-cell>
              <table:table-cell office:value-type="float" office:value="NaN">
                <text:p>NaN</text:p>
              </table:table-cell>
              <table:table-cell office:value-type="float" office:value="0.000414226">
                <text:p>0.0004142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32500000000005">
                <text:p>8.32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3253">
                <text:p>0.00303253</text:p>
              </table:table-cell>
              <table:table-cell office:value-type="float" office:value="NaN">
                <text:p>NaN</text:p>
              </table:table-cell>
              <table:table-cell office:value-type="float" office:value="0.0229194">
                <text:p>0.0229194</text:p>
              </table:table-cell>
              <table:table-cell office:value-type="float" office:value="NaN">
                <text:p>NaN</text:p>
              </table:table-cell>
              <table:table-cell office:value-type="float" office:value="0.000413175">
                <text:p>0.0004131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35000000000005">
                <text:p>8.3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251">
                <text:p>0.0030251</text:p>
              </table:table-cell>
              <table:table-cell office:value-type="float" office:value="NaN">
                <text:p>NaN</text:p>
              </table:table-cell>
              <table:table-cell office:value-type="float" office:value="0.0228606">
                <text:p>0.0228606</text:p>
              </table:table-cell>
              <table:table-cell office:value-type="float" office:value="NaN">
                <text:p>NaN</text:p>
              </table:table-cell>
              <table:table-cell office:value-type="float" office:value="0.000412131">
                <text:p>0.0004121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37500000000005">
                <text:p>8.37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177">
                <text:p>0.0030177</text:p>
              </table:table-cell>
              <table:table-cell office:value-type="float" office:value="NaN">
                <text:p>NaN</text:p>
              </table:table-cell>
              <table:table-cell office:value-type="float" office:value="0.022802">
                <text:p>0.022802</text:p>
              </table:table-cell>
              <table:table-cell office:value-type="float" office:value="NaN">
                <text:p>NaN</text:p>
              </table:table-cell>
              <table:table-cell office:value-type="float" office:value="0.000411092">
                <text:p>0.0004110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40000000000005">
                <text:p>8.4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1036">
                <text:p>0.00301036</text:p>
              </table:table-cell>
              <table:table-cell office:value-type="float" office:value="NaN">
                <text:p>NaN</text:p>
              </table:table-cell>
              <table:table-cell office:value-type="float" office:value="0.0227438">
                <text:p>0.0227438</text:p>
              </table:table-cell>
              <table:table-cell office:value-type="float" office:value="NaN">
                <text:p>NaN</text:p>
              </table:table-cell>
              <table:table-cell office:value-type="float" office:value="0.000410061">
                <text:p>0.0004100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42500000000005">
                <text:p>8.42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300306">
                <text:p>0.00300306</text:p>
              </table:table-cell>
              <table:table-cell office:value-type="float" office:value="NaN">
                <text:p>NaN</text:p>
              </table:table-cell>
              <table:table-cell office:value-type="float" office:value="0.022686">
                <text:p>0.022686</text:p>
              </table:table-cell>
              <table:table-cell office:value-type="float" office:value="NaN">
                <text:p>NaN</text:p>
              </table:table-cell>
              <table:table-cell office:value-type="float" office:value="0.000409037">
                <text:p>0.0004090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45000000000005">
                <text:p>8.4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299579">
                <text:p>0.00299579</text:p>
              </table:table-cell>
              <table:table-cell office:value-type="float" office:value="NaN">
                <text:p>NaN</text:p>
              </table:table-cell>
              <table:table-cell office:value-type="float" office:value="0.0226285">
                <text:p>0.0226285</text:p>
              </table:table-cell>
              <table:table-cell office:value-type="float" office:value="NaN">
                <text:p>NaN</text:p>
              </table:table-cell>
              <table:table-cell office:value-type="float" office:value="0.000408017">
                <text:p>0.0004080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47500000000005">
                <text:p>8.47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298857">
                <text:p>0.00298857</text:p>
              </table:table-cell>
              <table:table-cell office:value-type="float" office:value="NaN">
                <text:p>NaN</text:p>
              </table:table-cell>
              <table:table-cell office:value-type="float" office:value="0.0225713">
                <text:p>0.0225713</text:p>
              </table:table-cell>
              <table:table-cell office:value-type="float" office:value="NaN">
                <text:p>NaN</text:p>
              </table:table-cell>
              <table:table-cell office:value-type="float" office:value="0.000407004">
                <text:p>0.0004070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50000000000005">
                <text:p>8.5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29814">
                <text:p>0.0029814</text:p>
              </table:table-cell>
              <table:table-cell office:value-type="float" office:value="NaN">
                <text:p>NaN</text:p>
              </table:table-cell>
              <table:table-cell office:value-type="float" office:value="0.0225145">
                <text:p>0.0225145</text:p>
              </table:table-cell>
              <table:table-cell office:value-type="float" office:value="NaN">
                <text:p>NaN</text:p>
              </table:table-cell>
              <table:table-cell office:value-type="float" office:value="0.000405998">
                <text:p>0.0004059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52500000000005">
                <text:p>8.52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297425">
                <text:p>0.00297425</text:p>
              </table:table-cell>
              <table:table-cell office:value-type="float" office:value="NaN">
                <text:p>NaN</text:p>
              </table:table-cell>
              <table:table-cell office:value-type="float" office:value="0.0224579">
                <text:p>0.0224579</text:p>
              </table:table-cell>
              <table:table-cell office:value-type="float" office:value="NaN">
                <text:p>NaN</text:p>
              </table:table-cell>
              <table:table-cell office:value-type="float" office:value="0.000404996">
                <text:p>0.0004049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55000000000005">
                <text:p>8.5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296716">
                <text:p>0.00296716</text:p>
              </table:table-cell>
              <table:table-cell office:value-type="float" office:value="NaN">
                <text:p>NaN</text:p>
              </table:table-cell>
              <table:table-cell office:value-type="float" office:value="0.0224018">
                <text:p>0.0224018</text:p>
              </table:table-cell>
              <table:table-cell office:value-type="float" office:value="NaN">
                <text:p>NaN</text:p>
              </table:table-cell>
              <table:table-cell office:value-type="float" office:value="0.000404002">
                <text:p>0.0004040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57500000000005">
                <text:p>8.57500000000005</text:p>
              </table:table-cell>
              <table:table-cell office:value-type="float" office:value="NaN">
                <text:p>NaN</text:p>
              </table:table-cell>
              <table:table-cell office:value-type="float" office:value="0.00296011">
                <text:p>0.00296011</text:p>
              </table:table-cell>
              <table:table-cell office:value-type="float" office:value="NaN">
                <text:p>NaN</text:p>
              </table:table-cell>
              <table:table-cell office:value-type="float" office:value="0.022346">
                <text:p>0.022346</text:p>
              </table:table-cell>
              <table:table-cell office:value-type="float" office:value="NaN">
                <text:p>NaN</text:p>
              </table:table-cell>
              <table:table-cell office:value-type="float" office:value="0.000403014">
                <text:p>0.0004030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60000000000006">
                <text:p>8.6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95308">
                <text:p>0.00295308</text:p>
              </table:table-cell>
              <table:table-cell office:value-type="float" office:value="NaN">
                <text:p>NaN</text:p>
              </table:table-cell>
              <table:table-cell office:value-type="float" office:value="0.0222903">
                <text:p>0.0222903</text:p>
              </table:table-cell>
              <table:table-cell office:value-type="float" office:value="NaN">
                <text:p>NaN</text:p>
              </table:table-cell>
              <table:table-cell office:value-type="float" office:value="0.00040203">
                <text:p>0.000402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62500000000006">
                <text:p>8.62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9461">
                <text:p>0.0029461</text:p>
              </table:table-cell>
              <table:table-cell office:value-type="float" office:value="NaN">
                <text:p>NaN</text:p>
              </table:table-cell>
              <table:table-cell office:value-type="float" office:value="0.0222352">
                <text:p>0.0222352</text:p>
              </table:table-cell>
              <table:table-cell office:value-type="float" office:value="NaN">
                <text:p>NaN</text:p>
              </table:table-cell>
              <table:table-cell office:value-type="float" office:value="0.000401054">
                <text:p>0.0004010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65000000000006">
                <text:p>8.6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93917">
                <text:p>0.00293917</text:p>
              </table:table-cell>
              <table:table-cell office:value-type="float" office:value="NaN">
                <text:p>NaN</text:p>
              </table:table-cell>
              <table:table-cell office:value-type="float" office:value="0.0221803">
                <text:p>0.0221803</text:p>
              </table:table-cell>
              <table:table-cell office:value-type="float" office:value="NaN">
                <text:p>NaN</text:p>
              </table:table-cell>
              <table:table-cell office:value-type="float" office:value="0.000400083">
                <text:p>0.0004000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67500000000006">
                <text:p>8.67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93226">
                <text:p>0.00293226</text:p>
              </table:table-cell>
              <table:table-cell office:value-type="float" office:value="NaN">
                <text:p>NaN</text:p>
              </table:table-cell>
              <table:table-cell office:value-type="float" office:value="0.0221257">
                <text:p>0.0221257</text:p>
              </table:table-cell>
              <table:table-cell office:value-type="float" office:value="NaN">
                <text:p>NaN</text:p>
              </table:table-cell>
              <table:table-cell office:value-type="float" office:value="0.000399117">
                <text:p>0.0003991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70000000000006">
                <text:p>8.7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92541">
                <text:p>0.00292541</text:p>
              </table:table-cell>
              <table:table-cell office:value-type="float" office:value="NaN">
                <text:p>NaN</text:p>
              </table:table-cell>
              <table:table-cell office:value-type="float" office:value="0.0220714">
                <text:p>0.0220714</text:p>
              </table:table-cell>
              <table:table-cell office:value-type="float" office:value="NaN">
                <text:p>NaN</text:p>
              </table:table-cell>
              <table:table-cell office:value-type="float" office:value="0.000398158">
                <text:p>0.0003981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72500000000006">
                <text:p>8.72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91858">
                <text:p>0.00291858</text:p>
              </table:table-cell>
              <table:table-cell office:value-type="float" office:value="NaN">
                <text:p>NaN</text:p>
              </table:table-cell>
              <table:table-cell office:value-type="float" office:value="0.0220174">
                <text:p>0.0220174</text:p>
              </table:table-cell>
              <table:table-cell office:value-type="float" office:value="NaN">
                <text:p>NaN</text:p>
              </table:table-cell>
              <table:table-cell office:value-type="float" office:value="0.000397205">
                <text:p>0.0003972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75000000000006">
                <text:p>8.7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91179">
                <text:p>0.00291179</text:p>
              </table:table-cell>
              <table:table-cell office:value-type="float" office:value="NaN">
                <text:p>NaN</text:p>
              </table:table-cell>
              <table:table-cell office:value-type="float" office:value="0.0219637">
                <text:p>0.0219637</text:p>
              </table:table-cell>
              <table:table-cell office:value-type="float" office:value="NaN">
                <text:p>NaN</text:p>
              </table:table-cell>
              <table:table-cell office:value-type="float" office:value="0.000396255">
                <text:p>0.0003962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77500000000006">
                <text:p>8.77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90505">
                <text:p>0.00290505</text:p>
              </table:table-cell>
              <table:table-cell office:value-type="float" office:value="NaN">
                <text:p>NaN</text:p>
              </table:table-cell>
              <table:table-cell office:value-type="float" office:value="0.0219104">
                <text:p>0.0219104</text:p>
              </table:table-cell>
              <table:table-cell office:value-type="float" office:value="NaN">
                <text:p>NaN</text:p>
              </table:table-cell>
              <table:table-cell office:value-type="float" office:value="0.000395313">
                <text:p>0.0003953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80000000000006">
                <text:p>8.8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9834">
                <text:p>0.00289834</text:p>
              </table:table-cell>
              <table:table-cell office:value-type="float" office:value="NaN">
                <text:p>NaN</text:p>
              </table:table-cell>
              <table:table-cell office:value-type="float" office:value="0.0218573">
                <text:p>0.0218573</text:p>
              </table:table-cell>
              <table:table-cell office:value-type="float" office:value="NaN">
                <text:p>NaN</text:p>
              </table:table-cell>
              <table:table-cell office:value-type="float" office:value="0.000394376">
                <text:p>0.000394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82500000000006">
                <text:p>8.82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9166">
                <text:p>0.00289166</text:p>
              </table:table-cell>
              <table:table-cell office:value-type="float" office:value="NaN">
                <text:p>NaN</text:p>
              </table:table-cell>
              <table:table-cell office:value-type="float" office:value="0.0218045">
                <text:p>0.0218045</text:p>
              </table:table-cell>
              <table:table-cell office:value-type="float" office:value="NaN">
                <text:p>NaN</text:p>
              </table:table-cell>
              <table:table-cell office:value-type="float" office:value="0.000393443">
                <text:p>0.0003934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85000000000006">
                <text:p>8.8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8502">
                <text:p>0.00288502</text:p>
              </table:table-cell>
              <table:table-cell office:value-type="float" office:value="NaN">
                <text:p>NaN</text:p>
              </table:table-cell>
              <table:table-cell office:value-type="float" office:value="0.021752">
                <text:p>0.021752</text:p>
              </table:table-cell>
              <table:table-cell office:value-type="float" office:value="NaN">
                <text:p>NaN</text:p>
              </table:table-cell>
              <table:table-cell office:value-type="float" office:value="0.000392518">
                <text:p>0.0003925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87500000000006">
                <text:p>8.87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7842">
                <text:p>0.00287842</text:p>
              </table:table-cell>
              <table:table-cell office:value-type="float" office:value="NaN">
                <text:p>NaN</text:p>
              </table:table-cell>
              <table:table-cell office:value-type="float" office:value="0.0216999">
                <text:p>0.0216999</text:p>
              </table:table-cell>
              <table:table-cell office:value-type="float" office:value="NaN">
                <text:p>NaN</text:p>
              </table:table-cell>
              <table:table-cell office:value-type="float" office:value="0.000391596">
                <text:p>0.0003915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90000000000006">
                <text:p>8.9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7186">
                <text:p>0.00287186</text:p>
              </table:table-cell>
              <table:table-cell office:value-type="float" office:value="NaN">
                <text:p>NaN</text:p>
              </table:table-cell>
              <table:table-cell office:value-type="float" office:value="0.0216479">
                <text:p>0.0216479</text:p>
              </table:table-cell>
              <table:table-cell office:value-type="float" office:value="NaN">
                <text:p>NaN</text:p>
              </table:table-cell>
              <table:table-cell office:value-type="float" office:value="0.00039068">
                <text:p>0.000390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92500000000006">
                <text:p>8.92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6533">
                <text:p>0.00286533</text:p>
              </table:table-cell>
              <table:table-cell office:value-type="float" office:value="NaN">
                <text:p>NaN</text:p>
              </table:table-cell>
              <table:table-cell office:value-type="float" office:value="0.0215963">
                <text:p>0.0215963</text:p>
              </table:table-cell>
              <table:table-cell office:value-type="float" office:value="NaN">
                <text:p>NaN</text:p>
              </table:table-cell>
              <table:table-cell office:value-type="float" office:value="0.00038977">
                <text:p>0.000389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95000000000006">
                <text:p>8.9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5884">
                <text:p>0.00285884</text:p>
              </table:table-cell>
              <table:table-cell office:value-type="float" office:value="NaN">
                <text:p>NaN</text:p>
              </table:table-cell>
              <table:table-cell office:value-type="float" office:value="0.0215451">
                <text:p>0.0215451</text:p>
              </table:table-cell>
              <table:table-cell office:value-type="float" office:value="NaN">
                <text:p>NaN</text:p>
              </table:table-cell>
              <table:table-cell office:value-type="float" office:value="0.000388865">
                <text:p>0.0003888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97500000000006">
                <text:p>8.97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5237">
                <text:p>0.00285237</text:p>
              </table:table-cell>
              <table:table-cell office:value-type="float" office:value="NaN">
                <text:p>NaN</text:p>
              </table:table-cell>
              <table:table-cell office:value-type="float" office:value="0.0214939">
                <text:p>0.0214939</text:p>
              </table:table-cell>
              <table:table-cell office:value-type="float" office:value="NaN">
                <text:p>NaN</text:p>
              </table:table-cell>
              <table:table-cell office:value-type="float" office:value="0.000387964">
                <text:p>0.0003879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00000000000006">
                <text:p>9.0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4595">
                <text:p>0.00284595</text:p>
              </table:table-cell>
              <table:table-cell office:value-type="float" office:value="NaN">
                <text:p>NaN</text:p>
              </table:table-cell>
              <table:table-cell office:value-type="float" office:value="0.0214432">
                <text:p>0.0214432</text:p>
              </table:table-cell>
              <table:table-cell office:value-type="float" office:value="NaN">
                <text:p>NaN</text:p>
              </table:table-cell>
              <table:table-cell office:value-type="float" office:value="0.000387069">
                <text:p>0.0003870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02500000000006">
                <text:p>9.02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3956">
                <text:p>0.00283956</text:p>
              </table:table-cell>
              <table:table-cell office:value-type="float" office:value="NaN">
                <text:p>NaN</text:p>
              </table:table-cell>
              <table:table-cell office:value-type="float" office:value="0.0213927">
                <text:p>0.0213927</text:p>
              </table:table-cell>
              <table:table-cell office:value-type="float" office:value="NaN">
                <text:p>NaN</text:p>
              </table:table-cell>
              <table:table-cell office:value-type="float" office:value="0.00038618">
                <text:p>0.000386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05000000000006">
                <text:p>9.0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332">
                <text:p>0.0028332</text:p>
              </table:table-cell>
              <table:table-cell office:value-type="float" office:value="NaN">
                <text:p>NaN</text:p>
              </table:table-cell>
              <table:table-cell office:value-type="float" office:value="0.0213424">
                <text:p>0.0213424</text:p>
              </table:table-cell>
              <table:table-cell office:value-type="float" office:value="NaN">
                <text:p>NaN</text:p>
              </table:table-cell>
              <table:table-cell office:value-type="float" office:value="0.000385294">
                <text:p>0.0003852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07500000000006">
                <text:p>9.07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2688">
                <text:p>0.00282688</text:p>
              </table:table-cell>
              <table:table-cell office:value-type="float" office:value="NaN">
                <text:p>NaN</text:p>
              </table:table-cell>
              <table:table-cell office:value-type="float" office:value="0.0212925">
                <text:p>0.0212925</text:p>
              </table:table-cell>
              <table:table-cell office:value-type="float" office:value="NaN">
                <text:p>NaN</text:p>
              </table:table-cell>
              <table:table-cell office:value-type="float" office:value="0.000384414">
                <text:p>0.0003844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10000000000006">
                <text:p>9.1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2059">
                <text:p>0.00282059</text:p>
              </table:table-cell>
              <table:table-cell office:value-type="float" office:value="NaN">
                <text:p>NaN</text:p>
              </table:table-cell>
              <table:table-cell office:value-type="float" office:value="0.0212428">
                <text:p>0.0212428</text:p>
              </table:table-cell>
              <table:table-cell office:value-type="float" office:value="NaN">
                <text:p>NaN</text:p>
              </table:table-cell>
              <table:table-cell office:value-type="float" office:value="0.00038354">
                <text:p>0.000383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12500000000006">
                <text:p>9.12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1433">
                <text:p>0.00281433</text:p>
              </table:table-cell>
              <table:table-cell office:value-type="float" office:value="NaN">
                <text:p>NaN</text:p>
              </table:table-cell>
              <table:table-cell office:value-type="float" office:value="0.0211933">
                <text:p>0.0211933</text:p>
              </table:table-cell>
              <table:table-cell office:value-type="float" office:value="NaN">
                <text:p>NaN</text:p>
              </table:table-cell>
              <table:table-cell office:value-type="float" office:value="0.000382668">
                <text:p>0.0003826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15000000000006">
                <text:p>9.1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0811">
                <text:p>0.00280811</text:p>
              </table:table-cell>
              <table:table-cell office:value-type="float" office:value="NaN">
                <text:p>NaN</text:p>
              </table:table-cell>
              <table:table-cell office:value-type="float" office:value="0.0211443">
                <text:p>0.0211443</text:p>
              </table:table-cell>
              <table:table-cell office:value-type="float" office:value="NaN">
                <text:p>NaN</text:p>
              </table:table-cell>
              <table:table-cell office:value-type="float" office:value="0.000381804">
                <text:p>0.0003818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17500000000006">
                <text:p>9.17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80192">
                <text:p>0.00280192</text:p>
              </table:table-cell>
              <table:table-cell office:value-type="float" office:value="NaN">
                <text:p>NaN</text:p>
              </table:table-cell>
              <table:table-cell office:value-type="float" office:value="0.0210954">
                <text:p>0.0210954</text:p>
              </table:table-cell>
              <table:table-cell office:value-type="float" office:value="NaN">
                <text:p>NaN</text:p>
              </table:table-cell>
              <table:table-cell office:value-type="float" office:value="0.000380943">
                <text:p>0.0003809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.20000000000006">
                <text:p>9.2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79576">
                <text:p>0.00279576</text:p>
              </table:table-cell>
              <table:table-cell office:value-type="float" office:value="NaN">
                <text:p>NaN</text:p>
              </table:table-cell>
              <table:table-cell office:value-type="float" office:value="0.0210467">
                <text:p>0.0210467</text:p>
              </table:table-cell>
              <table:table-cell office:value-type="float" office:value="NaN">
                <text:p>NaN</text:p>
              </table:table-cell>
              <table:table-cell office:value-type="float" office:value="0.000380087">
                <text:p>0.0003800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22500000000006">
                <text:p>9.22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78964">
                <text:p>0.00278964</text:p>
              </table:table-cell>
              <table:table-cell office:value-type="float" office:value="NaN">
                <text:p>NaN</text:p>
              </table:table-cell>
              <table:table-cell office:value-type="float" office:value="0.0209984">
                <text:p>0.0209984</text:p>
              </table:table-cell>
              <table:table-cell office:value-type="float" office:value="NaN">
                <text:p>NaN</text:p>
              </table:table-cell>
              <table:table-cell office:value-type="float" office:value="0.000379236">
                <text:p>0.0003792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25000000000006">
                <text:p>9.2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78355">
                <text:p>0.00278355</text:p>
              </table:table-cell>
              <table:table-cell office:value-type="float" office:value="NaN">
                <text:p>NaN</text:p>
              </table:table-cell>
              <table:table-cell office:value-type="float" office:value="0.0209503">
                <text:p>0.0209503</text:p>
              </table:table-cell>
              <table:table-cell office:value-type="float" office:value="NaN">
                <text:p>NaN</text:p>
              </table:table-cell>
              <table:table-cell office:value-type="float" office:value="0.000378389">
                <text:p>0.0003783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27500000000006">
                <text:p>9.27500000000006</text:p>
              </table:table-cell>
              <table:table-cell office:value-type="float" office:value="NaN">
                <text:p>NaN</text:p>
              </table:table-cell>
              <table:table-cell office:value-type="float" office:value="0.00277748">
                <text:p>0.00277748</text:p>
              </table:table-cell>
              <table:table-cell office:value-type="float" office:value="NaN">
                <text:p>NaN</text:p>
              </table:table-cell>
              <table:table-cell office:value-type="float" office:value="0.0209024">
                <text:p>0.0209024</text:p>
              </table:table-cell>
              <table:table-cell office:value-type="float" office:value="NaN">
                <text:p>NaN</text:p>
              </table:table-cell>
              <table:table-cell office:value-type="float" office:value="0.000377547">
                <text:p>0.0003775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30000000000007">
                <text:p>9.30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7145">
                <text:p>0.00277145</text:p>
              </table:table-cell>
              <table:table-cell office:value-type="float" office:value="NaN">
                <text:p>NaN</text:p>
              </table:table-cell>
              <table:table-cell office:value-type="float" office:value="0.0208548">
                <text:p>0.0208548</text:p>
              </table:table-cell>
              <table:table-cell office:value-type="float" office:value="NaN">
                <text:p>NaN</text:p>
              </table:table-cell>
              <table:table-cell office:value-type="float" office:value="0.00037671">
                <text:p>0.000376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32500000000007">
                <text:p>9.32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6545">
                <text:p>0.00276545</text:p>
              </table:table-cell>
              <table:table-cell office:value-type="float" office:value="NaN">
                <text:p>NaN</text:p>
              </table:table-cell>
              <table:table-cell office:value-type="float" office:value="0.0208074">
                <text:p>0.0208074</text:p>
              </table:table-cell>
              <table:table-cell office:value-type="float" office:value="NaN">
                <text:p>NaN</text:p>
              </table:table-cell>
              <table:table-cell office:value-type="float" office:value="0.000375877">
                <text:p>0.0003758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35000000000007">
                <text:p>9.35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5948">
                <text:p>0.00275948</text:p>
              </table:table-cell>
              <table:table-cell office:value-type="float" office:value="NaN">
                <text:p>NaN</text:p>
              </table:table-cell>
              <table:table-cell office:value-type="float" office:value="0.0207603">
                <text:p>0.0207603</text:p>
              </table:table-cell>
              <table:table-cell office:value-type="float" office:value="NaN">
                <text:p>NaN</text:p>
              </table:table-cell>
              <table:table-cell office:value-type="float" office:value="0.000375049">
                <text:p>0.0003750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37500000000007">
                <text:p>9.37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5354">
                <text:p>0.00275354</text:p>
              </table:table-cell>
              <table:table-cell office:value-type="float" office:value="NaN">
                <text:p>NaN</text:p>
              </table:table-cell>
              <table:table-cell office:value-type="float" office:value="0.0207134">
                <text:p>0.0207134</text:p>
              </table:table-cell>
              <table:table-cell office:value-type="float" office:value="NaN">
                <text:p>NaN</text:p>
              </table:table-cell>
              <table:table-cell office:value-type="float" office:value="0.000374225">
                <text:p>0.0003742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40000000000007">
                <text:p>9.40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4763">
                <text:p>0.00274763</text:p>
              </table:table-cell>
              <table:table-cell office:value-type="float" office:value="NaN">
                <text:p>NaN</text:p>
              </table:table-cell>
              <table:table-cell office:value-type="float" office:value="0.0206668">
                <text:p>0.0206668</text:p>
              </table:table-cell>
              <table:table-cell office:value-type="float" office:value="NaN">
                <text:p>NaN</text:p>
              </table:table-cell>
              <table:table-cell office:value-type="float" office:value="0.000373407">
                <text:p>0.0003734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42500000000007">
                <text:p>9.42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4176">
                <text:p>0.00274176</text:p>
              </table:table-cell>
              <table:table-cell office:value-type="float" office:value="NaN">
                <text:p>NaN</text:p>
              </table:table-cell>
              <table:table-cell office:value-type="float" office:value="0.0206204">
                <text:p>0.0206204</text:p>
              </table:table-cell>
              <table:table-cell office:value-type="float" office:value="NaN">
                <text:p>NaN</text:p>
              </table:table-cell>
              <table:table-cell office:value-type="float" office:value="0.000372591">
                <text:p>0.0003725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.45000000000007">
                <text:p>9.45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359">
                <text:p>0.0027359</text:p>
              </table:table-cell>
              <table:table-cell office:value-type="float" office:value="NaN">
                <text:p>NaN</text:p>
              </table:table-cell>
              <table:table-cell office:value-type="float" office:value="0.0205742">
                <text:p>0.0205742</text:p>
              </table:table-cell>
              <table:table-cell office:value-type="float" office:value="NaN">
                <text:p>NaN</text:p>
              </table:table-cell>
              <table:table-cell office:value-type="float" office:value="0.000371781">
                <text:p>0.0003717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47500000000007">
                <text:p>9.47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3009">
                <text:p>0.00273009</text:p>
              </table:table-cell>
              <table:table-cell office:value-type="float" office:value="NaN">
                <text:p>NaN</text:p>
              </table:table-cell>
              <table:table-cell office:value-type="float" office:value="0.0205284">
                <text:p>0.0205284</text:p>
              </table:table-cell>
              <table:table-cell office:value-type="float" office:value="NaN">
                <text:p>NaN</text:p>
              </table:table-cell>
              <table:table-cell office:value-type="float" office:value="0.000370974">
                <text:p>0.0003709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.50000000000007">
                <text:p>9.50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243">
                <text:p>0.0027243</text:p>
              </table:table-cell>
              <table:table-cell office:value-type="float" office:value="NaN">
                <text:p>NaN</text:p>
              </table:table-cell>
              <table:table-cell office:value-type="float" office:value="0.0204827">
                <text:p>0.0204827</text:p>
              </table:table-cell>
              <table:table-cell office:value-type="float" office:value="NaN">
                <text:p>NaN</text:p>
              </table:table-cell>
              <table:table-cell office:value-type="float" office:value="0.000370172">
                <text:p>0.0003701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52500000000007">
                <text:p>9.52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1855">
                <text:p>0.00271855</text:p>
              </table:table-cell>
              <table:table-cell office:value-type="float" office:value="NaN">
                <text:p>NaN</text:p>
              </table:table-cell>
              <table:table-cell office:value-type="float" office:value="0.0204373">
                <text:p>0.0204373</text:p>
              </table:table-cell>
              <table:table-cell office:value-type="float" office:value="NaN">
                <text:p>NaN</text:p>
              </table:table-cell>
              <table:table-cell office:value-type="float" office:value="0.000369375">
                <text:p>0.0003693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55000000000007">
                <text:p>9.55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1282">
                <text:p>0.00271282</text:p>
              </table:table-cell>
              <table:table-cell office:value-type="float" office:value="NaN">
                <text:p>NaN</text:p>
              </table:table-cell>
              <table:table-cell office:value-type="float" office:value="0.0203921">
                <text:p>0.0203921</text:p>
              </table:table-cell>
              <table:table-cell office:value-type="float" office:value="NaN">
                <text:p>NaN</text:p>
              </table:table-cell>
              <table:table-cell office:value-type="float" office:value="0.000368582">
                <text:p>0.0003685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57500000000007">
                <text:p>9.57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071">
                <text:p>0.0027071</text:p>
              </table:table-cell>
              <table:table-cell office:value-type="float" office:value="NaN">
                <text:p>NaN</text:p>
              </table:table-cell>
              <table:table-cell office:value-type="float" office:value="0.0203471">
                <text:p>0.0203471</text:p>
              </table:table-cell>
              <table:table-cell office:value-type="float" office:value="NaN">
                <text:p>NaN</text:p>
              </table:table-cell>
              <table:table-cell office:value-type="float" office:value="0.000367792">
                <text:p>0.0003677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60000000000007">
                <text:p>9.60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70144">
                <text:p>0.00270144</text:p>
              </table:table-cell>
              <table:table-cell office:value-type="float" office:value="NaN">
                <text:p>NaN</text:p>
              </table:table-cell>
              <table:table-cell office:value-type="float" office:value="0.0203023">
                <text:p>0.0203023</text:p>
              </table:table-cell>
              <table:table-cell office:value-type="float" office:value="NaN">
                <text:p>NaN</text:p>
              </table:table-cell>
              <table:table-cell office:value-type="float" office:value="0.000367007">
                <text:p>0.0003670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62500000000007">
                <text:p>9.62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9579">
                <text:p>0.00269579</text:p>
              </table:table-cell>
              <table:table-cell office:value-type="float" office:value="NaN">
                <text:p>NaN</text:p>
              </table:table-cell>
              <table:table-cell office:value-type="float" office:value="0.0202579">
                <text:p>0.0202579</text:p>
              </table:table-cell>
              <table:table-cell office:value-type="float" office:value="NaN">
                <text:p>NaN</text:p>
              </table:table-cell>
              <table:table-cell office:value-type="float" office:value="0.000366226">
                <text:p>0.000366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.65000000000007">
                <text:p>9.65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9017">
                <text:p>0.00269017</text:p>
              </table:table-cell>
              <table:table-cell office:value-type="float" office:value="NaN">
                <text:p>NaN</text:p>
              </table:table-cell>
              <table:table-cell office:value-type="float" office:value="0.0202135">
                <text:p>0.0202135</text:p>
              </table:table-cell>
              <table:table-cell office:value-type="float" office:value="NaN">
                <text:p>NaN</text:p>
              </table:table-cell>
              <table:table-cell office:value-type="float" office:value="0.000365448">
                <text:p>0.0003654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.67500000000007">
                <text:p>9.67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8459">
                <text:p>0.00268459</text:p>
              </table:table-cell>
              <table:table-cell office:value-type="float" office:value="NaN">
                <text:p>NaN</text:p>
              </table:table-cell>
              <table:table-cell office:value-type="float" office:value="0.0201695">
                <text:p>0.0201695</text:p>
              </table:table-cell>
              <table:table-cell office:value-type="float" office:value="NaN">
                <text:p>NaN</text:p>
              </table:table-cell>
              <table:table-cell office:value-type="float" office:value="0.000364676">
                <text:p>0.0003646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70000000000007">
                <text:p>9.70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7903">
                <text:p>0.00267903</text:p>
              </table:table-cell>
              <table:table-cell office:value-type="float" office:value="NaN">
                <text:p>NaN</text:p>
              </table:table-cell>
              <table:table-cell office:value-type="float" office:value="0.0201256">
                <text:p>0.0201256</text:p>
              </table:table-cell>
              <table:table-cell office:value-type="float" office:value="NaN">
                <text:p>NaN</text:p>
              </table:table-cell>
              <table:table-cell office:value-type="float" office:value="0.000363907">
                <text:p>0.0003639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.72500000000007">
                <text:p>9.72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7349">
                <text:p>0.00267349</text:p>
              </table:table-cell>
              <table:table-cell office:value-type="float" office:value="NaN">
                <text:p>NaN</text:p>
              </table:table-cell>
              <table:table-cell office:value-type="float" office:value="0.020082">
                <text:p>0.020082</text:p>
              </table:table-cell>
              <table:table-cell office:value-type="float" office:value="NaN">
                <text:p>NaN</text:p>
              </table:table-cell>
              <table:table-cell office:value-type="float" office:value="0.000363142">
                <text:p>0.0003631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75000000000007">
                <text:p>9.75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6799">
                <text:p>0.00266799</text:p>
              </table:table-cell>
              <table:table-cell office:value-type="float" office:value="NaN">
                <text:p>NaN</text:p>
              </table:table-cell>
              <table:table-cell office:value-type="float" office:value="0.0200386">
                <text:p>0.0200386</text:p>
              </table:table-cell>
              <table:table-cell office:value-type="float" office:value="NaN">
                <text:p>NaN</text:p>
              </table:table-cell>
              <table:table-cell office:value-type="float" office:value="0.000362381">
                <text:p>0.0003623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77500000000007">
                <text:p>9.77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625">
                <text:p>0.0026625</text:p>
              </table:table-cell>
              <table:table-cell office:value-type="float" office:value="NaN">
                <text:p>NaN</text:p>
              </table:table-cell>
              <table:table-cell office:value-type="float" office:value="0.0199954">
                <text:p>0.0199954</text:p>
              </table:table-cell>
              <table:table-cell office:value-type="float" office:value="NaN">
                <text:p>NaN</text:p>
              </table:table-cell>
              <table:table-cell office:value-type="float" office:value="0.000361625">
                <text:p>0.000361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80000000000007">
                <text:p>9.80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5705">
                <text:p>0.00265705</text:p>
              </table:table-cell>
              <table:table-cell office:value-type="float" office:value="NaN">
                <text:p>NaN</text:p>
              </table:table-cell>
              <table:table-cell office:value-type="float" office:value="0.0199524">
                <text:p>0.0199524</text:p>
              </table:table-cell>
              <table:table-cell office:value-type="float" office:value="NaN">
                <text:p>NaN</text:p>
              </table:table-cell>
              <table:table-cell office:value-type="float" office:value="0.000360871">
                <text:p>0.0003608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82500000000007">
                <text:p>9.82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5162">
                <text:p>0.00265162</text:p>
              </table:table-cell>
              <table:table-cell office:value-type="float" office:value="NaN">
                <text:p>NaN</text:p>
              </table:table-cell>
              <table:table-cell office:value-type="float" office:value="0.0199097">
                <text:p>0.0199097</text:p>
              </table:table-cell>
              <table:table-cell office:value-type="float" office:value="NaN">
                <text:p>NaN</text:p>
              </table:table-cell>
              <table:table-cell office:value-type="float" office:value="0.000360121">
                <text:p>0.0003601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85000000000007">
                <text:p>9.85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4623">
                <text:p>0.00264623</text:p>
              </table:table-cell>
              <table:table-cell office:value-type="float" office:value="NaN">
                <text:p>NaN</text:p>
              </table:table-cell>
              <table:table-cell office:value-type="float" office:value="0.0198671">
                <text:p>0.0198671</text:p>
              </table:table-cell>
              <table:table-cell office:value-type="float" office:value="NaN">
                <text:p>NaN</text:p>
              </table:table-cell>
              <table:table-cell office:value-type="float" office:value="0.000359377">
                <text:p>0.0003593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87500000000007">
                <text:p>9.87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4085">
                <text:p>0.00264085</text:p>
              </table:table-cell>
              <table:table-cell office:value-type="float" office:value="NaN">
                <text:p>NaN</text:p>
              </table:table-cell>
              <table:table-cell office:value-type="float" office:value="0.0198247">
                <text:p>0.0198247</text:p>
              </table:table-cell>
              <table:table-cell office:value-type="float" office:value="NaN">
                <text:p>NaN</text:p>
              </table:table-cell>
              <table:table-cell office:value-type="float" office:value="0.000358634">
                <text:p>0.0003586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90000000000007">
                <text:p>9.90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355">
                <text:p>0.0026355</text:p>
              </table:table-cell>
              <table:table-cell office:value-type="float" office:value="NaN">
                <text:p>NaN</text:p>
              </table:table-cell>
              <table:table-cell office:value-type="float" office:value="0.0197826">
                <text:p>0.0197826</text:p>
              </table:table-cell>
              <table:table-cell office:value-type="float" office:value="NaN">
                <text:p>NaN</text:p>
              </table:table-cell>
              <table:table-cell office:value-type="float" office:value="0.000357896">
                <text:p>0.0003578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92500000000007">
                <text:p>9.92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3019">
                <text:p>0.00263019</text:p>
              </table:table-cell>
              <table:table-cell office:value-type="float" office:value="NaN">
                <text:p>NaN</text:p>
              </table:table-cell>
              <table:table-cell office:value-type="float" office:value="0.0197407">
                <text:p>0.0197407</text:p>
              </table:table-cell>
              <table:table-cell office:value-type="float" office:value="NaN">
                <text:p>NaN</text:p>
              </table:table-cell>
              <table:table-cell office:value-type="float" office:value="0.000357162">
                <text:p>0.0003571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95000000000007">
                <text:p>9.950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2488">
                <text:p>0.00262488</text:p>
              </table:table-cell>
              <table:table-cell office:value-type="float" office:value="NaN">
                <text:p>NaN</text:p>
              </table:table-cell>
              <table:table-cell office:value-type="float" office:value="0.019699">
                <text:p>0.019699</text:p>
              </table:table-cell>
              <table:table-cell office:value-type="float" office:value="NaN">
                <text:p>NaN</text:p>
              </table:table-cell>
              <table:table-cell office:value-type="float" office:value="0.000356432">
                <text:p>0.0003564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97500000000007">
                <text:p>9.97500000000007</text:p>
              </table:table-cell>
              <table:table-cell office:value-type="float" office:value="NaN">
                <text:p>NaN</text:p>
              </table:table-cell>
              <table:table-cell office:value-type="float" office:value="0.00261962">
                <text:p>0.00261962</text:p>
              </table:table-cell>
              <table:table-cell office:value-type="float" office:value="NaN">
                <text:p>NaN</text:p>
              </table:table-cell>
              <table:table-cell office:value-type="float" office:value="0.0196574">
                <text:p>0.0196574</text:p>
              </table:table-cell>
              <table:table-cell office:value-type="float" office:value="NaN">
                <text:p>NaN</text:p>
              </table:table-cell>
              <table:table-cell office:value-type="float" office:value="0.000355705">
                <text:p>0.000355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