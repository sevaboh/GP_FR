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5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81">
      <style:text-properties fo:font-weight="normal" style:font-weight-asian="normal" style:font-weight-complex="normal"/>
    </style:style>
    <style:style style:name="ce2" style:family="table-cell" style:parent-style-name="Default" style:data-style-name="N8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1" table:default-cell-style-name="ce5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R2 testing part</text:p>
          </table:table-cell>
          <table:table-cell/>
          <table:table-cell office:value-type="string" calcext:value-type="string">
            <text:p>run0</text:p>
          </table:table-cell>
          <table:table-cell/>
          <table:table-cell office:value-type="string" calcext:value-type="string">
            <text:p>run1</text:p>
          </table:table-cell>
          <table:table-cell/>
          <table:table-cell office:value-type="string" calcext:value-type="string">
            <text:p>run2</text:p>
          </table:table-cell>
          <table:table-cell/>
          <table:table-cell office:value-type="string" calcext:value-type="string">
            <text:p>run3</text:p>
          </table:table-cell>
          <table:table-cell/>
          <table:table-cell office:value-type="string" calcext:value-type="string">
            <text:p>run4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Max (5runs,train on large dataset)</text:p>
          </table:table-cell>
          <table:table-cell/>
          <table:table-cell table:style-name="ce3" table:formula="of:=SUM([.S3:.S76])/COUNT([.S3:.S76])" office:value-type="percentage" office:value="0.216216216216216" calcext:value-type="percentage">
            <text:p>21,62%</text:p>
          </table:table-cell>
          <table:table-cell table:style-name="ce3" table:formula="of:=SUM([.T3:.T76])/COUNT([.T3:.T76])" office:value-type="percentage" office:value="0.027027027027027" calcext:value-type="percentage">
            <text:p>2,70%</text:p>
          </table:table-cell>
          <table:table-cell table:style-name="ce3"/>
          <table:table-cell office:value-type="string" calcext:value-type="string">
            <text:p>GP through NN (10000)</text:p>
          </table:table-cell>
          <table:table-cell table:style-name="ce3" table:formula="of:=SUM([.W3:.W76])/COUNT([.W3:.W76])" office:value-type="percentage" office:value="0.0461538461538462" calcext:value-type="percentage">
            <text:p>4,62%</text:p>
          </table:table-cell>
          <table:table-cell office:value-type="string" calcext:value-type="string">
            <text:p>-</text:p>
          </table:table-cell>
          <table:table-cell table:style-name="ce3" table:formula="of:=SUM([.Y3:.Y76])/COUNT([.Y3:.Y76])" office:value-type="percentage" office:value="0.0405405405405405" calcext:value-type="percentage">
            <text:p>4,05%</text:p>
          </table:table-cell>
          <table:table-cell table:style-name="ce3"/>
          <table:table-cell office:value-type="string" calcext:value-type="string">
            <text:p>imp run1</text:p>
          </table:table-cell>
          <table:table-cell/>
          <table:table-cell office:value-type="string" calcext:value-type="string">
            <text:p>imp run2</text:p>
          </table:table-cell>
          <table:table-cell/>
          <table:table-cell office:value-type="string" calcext:value-type="string">
            <text:p>imp run 3</text:p>
          </table:table-cell>
          <table:table-cell/>
          <table:table-cell office:value-type="string" calcext:value-type="string">
            <text:p>imp run 4</text:p>
          </table:table-cell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2&gt;0.9</text:p>
          </table:table-cell>
          <table:table-cell/>
          <table:table-cell office:value-type="string" calcext:value-type="string">
            <text:p>R2&gt;0.8</text:p>
          </table:table-cell>
          <table:table-cell/>
          <table:table-cell office:value-type="string" calcext:value-type="string">
            <text:p>R2&gt;0.7</text:p>
          </table:table-cell>
          <table:table-cell/>
        </table:table-row>
        <table:table-row table:style-name="ro1">
          <table:table-cell office:value-type="string" calcext:value-type="string">
            <text:p>0 -inv / 1 — direct</text:p>
          </table:table-cell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GP</text:p>
          </table:table-cell>
          <table:table-cell office:value-type="string" calcext:value-type="string">
            <text:p>GP total max</text:p>
          </table:table-cell>
          <table:table-cell office:value-type="string" calcext:value-type="string">
            <text:p>GP better NN</text:p>
          </table:table-cell>
          <table:table-cell/>
          <table:table-cell table:style-name="ce3" table:formula="of:=SUM([.AA3:.AA76])/COUNT([.AA3:.AA76])" office:value-type="percentage" office:value="0.45945945945946" calcext:value-type="percentage">
            <text:p>45,95%</text:p>
          </table:table-cell>
          <table:table-cell table:style-name="ce3" table:formula="of:=SUM([.AB3:.AB76])/COUNT([.AB3:.AB76])" office:value-type="percentage" office:value="0.513513513513514" calcext:value-type="percentage">
            <text:p>51,35%</text:p>
          </table:table-cell>
          <table:table-cell table:style-name="ce3" table:formula="of:=SUM([.AC3:.AC76])/COUNT([.AC3:.AC76])" office:value-type="percentage" office:value="0.364864864864865" calcext:value-type="percentage">
            <text:p>36,49%</text:p>
          </table:table-cell>
          <table:table-cell table:style-name="ce3" table:formula="of:=SUM([.AD3:.AD76])/COUNT([.AD3:.AD76])" office:value-type="percentage" office:value="0.310810810810811" calcext:value-type="percentage">
            <text:p>31,08%</text:p>
          </table:table-cell>
          <table:table-cell table:style-name="ce3" table:formula="of:=SUM([.AE3:.AE76])/COUNT([.AE3:.AE76])" office:value-type="percentage" office:value="0.243243243243243" calcext:value-type="percentage">
            <text:p>24,32%</text:p>
          </table:table-cell>
          <table:table-cell table:style-name="ce3" table:formula="of:=SUM([.AF3:.AF76])/COUNT([.AF3:.AF76])" office:value-type="percentage" office:value="0.297297297297297" calcext:value-type="percentage">
            <text:p>29,73%</text:p>
          </table:table-cell>
          <table:table-cell table:style-name="ce3" table:formula="of:=SUM([.AG3:.AG76])/COUNT([.AG3:.AG76])" office:value-type="percentage" office:value="0.175675675675676" calcext:value-type="percentage">
            <text:p>17,57%</text:p>
          </table:table-cell>
          <table:table-cell table:style-name="ce3" table:formula="of:=SUM([.AH3:.AH76])/COUNT([.AH3:.AH76])" office:value-type="percentage" office:value="0.22972972972973" calcext:value-type="percentage">
            <text:p>22,97%</text:p>
          </table:table-cell>
          <table:table-cell table:style-name="ce3"/>
          <table:table-cell table:style-name="ce3" table:formula="of:=SUM([.AJ3:.AJ76])/COUNT([.AJ3:.AJ76])" office:value-type="percentage" office:value="0.121621621621622" calcext:value-type="percentage">
            <text:p>12,16%</text:p>
          </table:table-cell>
          <table:table-cell table:style-name="ce3" table:formula="of:=SUM([.AK3:.AK76])/COUNT([.AK3:.AK76])" office:value-type="percentage" office:value="0.72972972972973" calcext:value-type="percentage">
            <text:p>72,97%</text:p>
          </table:table-cell>
          <table:table-cell table:style-name="ce3" table:formula="of:=SUM([.AL3:.AL76])/COUNT([.AL3:.AL76])" office:value-type="percentage" office:value="0.472972972972973" calcext:value-type="percentage">
            <text:p>47,30%</text:p>
          </table:table-cell>
          <table:table-cell table:style-name="ce3" table:formula="of:=SUM([.AM3:.AM76])/COUNT([.AM3:.AM76])" office:value-type="percentage" office:value="0.972972972972973" calcext:value-type="percentage">
            <text:p>97,30%</text:p>
          </table:table-cell>
          <table:table-cell table:style-name="ce3" table:formula="of:=SUM([.AN3:.AN76])/COUNT([.AN3:.AN76])" office:value-type="percentage" office:value="0.918918918918919" calcext:value-type="percentage">
            <text:p>91,89%</text:p>
          </table:table-cell>
          <table:table-cell table:style-name="ce3" table:formula="of:=SUM([.AO3:.AO76])/COUNT([.AO3:.AO76])" office:value-type="percentage" office:value="0.972972972972973" calcext:value-type="percentage">
            <text:p>97,30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9999848" calcext:value-type="float">
            <text:p>1,00E+00</text:p>
          </table:table-cell>
          <table:table-cell table:style-name="ce1" office:value-type="float" office:value="0.9983993" calcext:value-type="float">
            <text:p>9,98E-01</text:p>
          </table:table-cell>
          <table:table-cell table:style-name="ce1" office:value-type="float" office:value="0.9999848" calcext:value-type="float">
            <text:p>1,00E+00</text:p>
          </table:table-cell>
          <table:table-cell table:style-name="ce1" office:value-type="float" office:value="0.9983993" calcext:value-type="float">
            <text:p>9,98E-01</text:p>
          </table:table-cell>
          <table:table-cell table:style-name="ce1" office:value-type="float" office:value="0.9999848" calcext:value-type="float">
            <text:p>1,00E+00</text:p>
          </table:table-cell>
          <table:table-cell table:style-name="ce1" office:value-type="float" office:value="0.9985216" calcext:value-type="float">
            <text:p>9,99E-01</text:p>
          </table:table-cell>
          <table:table-cell table:style-name="ce1" office:value-type="float" office:value="0.9999848" calcext:value-type="float">
            <text:p>1,00E+00</text:p>
          </table:table-cell>
          <table:table-cell table:style-name="ce1" office:value-type="float" office:value="0.9985216" calcext:value-type="float">
            <text:p>9,99E-01</text:p>
          </table:table-cell>
          <table:table-cell table:style-name="ce1" office:value-type="float" office:value="0.9999848" calcext:value-type="float">
            <text:p>1,00E+00</text:p>
          </table:table-cell>
          <table:table-cell table:style-name="ce1" office:value-type="float" office:value="0.9985216" calcext:value-type="float">
            <text:p>9,99E-01</text:p>
          </table:table-cell>
          <table:table-cell/>
          <table:table-cell table:style-name="ce1" table:formula="of:=MAX([.C3];[.E3];[.G3];[.I3];[.K3])" office:value-type="float" office:value="0.9999848" calcext:value-type="float">
            <text:p>1,00E+00</text:p>
          </table:table-cell>
          <table:table-cell table:style-name="ce8" table:formula="of:=MAX([.D3];[.F3];[.H3];[.J3];[.L3])" office:value-type="float" office:value="0.9985216" calcext:value-type="float">
            <text:p>9,99E-01</text:p>
          </table:table-cell>
          <table:table-cell table:style-name="ce1"/>
          <table:table-cell table:style-name="ce1" office:value-type="float" office:value="0.9999848" calcext:value-type="float">
            <text:p>1,00E+00</text:p>
          </table:table-cell>
          <table:table-cell table:style-name="ce1" office:value-type="float" office:value="0.9985216" calcext:value-type="float">
            <text:p>9,99E-01</text:p>
          </table:table-cell>
          <table:table-cell table:style-name="ce4" table:formula="of:=[.Q3]&gt;[.N3]" office:value-type="boolean" office:boolean-value="false" calcext:value-type="boolean">
            <text:p>БРЕХНЯ</text:p>
          </table:table-cell>
          <table:table-cell table:style-name="ce4" table:formula="of:=[.R3]&gt;[.O3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3]" office:value-type="float" office:value="0.9999848" calcext:value-type="float">
            <text:p>1,00E+00</text:p>
          </table:table-cell>
          <table:table-cell table:style-name="ce4" table:formula="of:=[.X3]&gt;[.R3]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E3]&gt;[.C3]" office:value-type="boolean" office:boolean-value="false" calcext:value-type="boolean">
            <text:p>БРЕХНЯ</text:p>
          </table:table-cell>
          <table:table-cell table:style-name="ce4" table:formula="of:=[.F3]&gt;[.D3]" office:value-type="boolean" office:boolean-value="false" calcext:value-type="boolean">
            <text:p>БРЕХНЯ</text:p>
          </table:table-cell>
          <table:table-cell table:style-name="ce4" table:formula="of:=[.G3]&gt;MAX([.C3];[.E3])" office:value-type="boolean" office:boolean-value="false" calcext:value-type="boolean">
            <text:p>БРЕХНЯ</text:p>
          </table:table-cell>
          <table:table-cell table:style-name="ce4" table:formula="of:=[.H3]&gt;MAX([.D3];[.F3])" office:value-type="boolean" office:boolean-value="true" calcext:value-type="boolean">
            <text:p>ІСТИНА</text:p>
          </table:table-cell>
          <table:table-cell table:style-name="ce4" table:formula="of:=[.I3]&gt;MAX([.C3];[.E3];[.G3])" office:value-type="boolean" office:boolean-value="false" calcext:value-type="boolean">
            <text:p>БРЕХНЯ</text:p>
          </table:table-cell>
          <table:table-cell table:style-name="ce4" table:formula="of:=[.J3]&gt;MAX([.D3];[.F3];[.H3])" office:value-type="boolean" office:boolean-value="false" calcext:value-type="boolean">
            <text:p>БРЕХНЯ</text:p>
          </table:table-cell>
          <table:table-cell table:style-name="ce4" table:formula="of:=[.K3]&gt;MAX([.C3];[.E3];[.G3];[.I3])" office:value-type="boolean" office:boolean-value="false" calcext:value-type="boolean">
            <text:p>БРЕХНЯ</text:p>
          </table:table-cell>
          <table:table-cell table:style-name="ce4" table:formula="of:=[.L3]&gt;MAX([.D3];[.F3];[.H3];[.J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]&gt;0.9" office:value-type="boolean" office:boolean-value="true" calcext:value-type="boolean">
            <text:p>ІСТИНА</text:p>
          </table:table-cell>
          <table:table-cell table:style-name="ce4" table:formula="of:=[.R3]&gt;0.9" office:value-type="boolean" office:boolean-value="true" calcext:value-type="boolean">
            <text:p>ІСТИНА</text:p>
          </table:table-cell>
          <table:table-cell table:style-name="ce4" table:formula="of:=[.X3]&gt;0.8" office:value-type="boolean" office:boolean-value="true" calcext:value-type="boolean">
            <text:p>ІСТИНА</text:p>
          </table:table-cell>
          <table:table-cell table:style-name="ce4" table:formula="of:=[.R3]&gt;0.8" office:value-type="boolean" office:boolean-value="true" calcext:value-type="boolean">
            <text:p>ІСТИНА</text:p>
          </table:table-cell>
          <table:table-cell table:style-name="ce4" table:formula="of:=[.X3]&gt;0.7" office:value-type="boolean" office:boolean-value="true" calcext:value-type="boolean">
            <text:p>ІСТИНА</text:p>
          </table:table-cell>
          <table:table-cell table:style-name="ce4" table:formula="of:=[.R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755728" calcext:value-type="float">
            <text:p>8,76E-01</text:p>
          </table:table-cell>
          <table:table-cell table:style-name="ce1" office:value-type="float" office:value="0.9519857" calcext:value-type="float">
            <text:p>9,52E-01</text:p>
          </table:table-cell>
          <table:table-cell table:style-name="ce1" office:value-type="float" office:value="0.8755728" calcext:value-type="float">
            <text:p>8,76E-01</text:p>
          </table:table-cell>
          <table:table-cell table:style-name="ce1" office:value-type="float" office:value="0.9519857" calcext:value-type="float">
            <text:p>9,52E-01</text:p>
          </table:table-cell>
          <table:table-cell table:style-name="ce1" office:value-type="float" office:value="0.8755728" calcext:value-type="float">
            <text:p>8,76E-01</text:p>
          </table:table-cell>
          <table:table-cell table:style-name="ce1" office:value-type="float" office:value="0.9519857" calcext:value-type="float">
            <text:p>9,52E-01</text:p>
          </table:table-cell>
          <table:table-cell table:style-name="ce1" office:value-type="float" office:value="0.8904293" calcext:value-type="float">
            <text:p>8,90E-01</text:p>
          </table:table-cell>
          <table:table-cell table:style-name="ce1" office:value-type="float" office:value="0.9519857" calcext:value-type="float">
            <text:p>9,52E-01</text:p>
          </table:table-cell>
          <table:table-cell table:style-name="ce1" office:value-type="float" office:value="0.8904293" calcext:value-type="float">
            <text:p>8,90E-01</text:p>
          </table:table-cell>
          <table:table-cell table:style-name="ce1" office:value-type="float" office:value="0.9550444" calcext:value-type="float">
            <text:p>9,55E-01</text:p>
          </table:table-cell>
          <table:table-cell/>
          <table:table-cell table:style-name="ce1" table:formula="of:=MAX([.C4];[.E4];[.G4];[.I4];[.K4])" office:value-type="float" office:value="0.8904293" calcext:value-type="float">
            <text:p>8,90E-01</text:p>
          </table:table-cell>
          <table:table-cell table:style-name="ce8" table:formula="of:=MAX([.D4];[.F4];[.H4];[.J4];[.L4])" office:value-type="float" office:value="0.9550444" calcext:value-type="float">
            <text:p>9,55E-01</text:p>
          </table:table-cell>
          <table:table-cell table:style-name="ce1"/>
          <table:table-cell table:style-name="ce1" office:value-type="float" office:value="0.8904293" calcext:value-type="float">
            <text:p>8,90E-01</text:p>
          </table:table-cell>
          <table:table-cell table:style-name="ce1" office:value-type="float" office:value="0.9550444" calcext:value-type="float">
            <text:p>9,55E-01</text:p>
          </table:table-cell>
          <table:table-cell table:style-name="ce4" table:formula="of:=[.Q4]&gt;[.N4]" office:value-type="boolean" office:boolean-value="false" calcext:value-type="boolean">
            <text:p>БРЕХНЯ</text:p>
          </table:table-cell>
          <table:table-cell table:style-name="ce4" table:formula="of:=[.R4]&gt;[.O4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4]" office:value-type="float" office:value="0.8904293" calcext:value-type="float">
            <text:p>8,90E-01</text:p>
          </table:table-cell>
          <table:table-cell table:style-name="ce4" table:formula="of:=[.X4]&gt;[.R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]&gt;[.C4]" office:value-type="boolean" office:boolean-value="false" calcext:value-type="boolean">
            <text:p>БРЕХНЯ</text:p>
          </table:table-cell>
          <table:table-cell table:style-name="ce4" table:formula="of:=[.F4]&gt;[.D4]" office:value-type="boolean" office:boolean-value="false" calcext:value-type="boolean">
            <text:p>БРЕХНЯ</text:p>
          </table:table-cell>
          <table:table-cell table:style-name="ce4" table:formula="of:=[.G4]&gt;MAX([.C4];[.E4])" office:value-type="boolean" office:boolean-value="false" calcext:value-type="boolean">
            <text:p>БРЕХНЯ</text:p>
          </table:table-cell>
          <table:table-cell table:style-name="ce4" table:formula="of:=[.H4]&gt;MAX([.D4];[.F4])" office:value-type="boolean" office:boolean-value="false" calcext:value-type="boolean">
            <text:p>БРЕХНЯ</text:p>
          </table:table-cell>
          <table:table-cell table:style-name="ce4" table:formula="of:=[.I4]&gt;MAX([.C4];[.E4];[.G4])" office:value-type="boolean" office:boolean-value="true" calcext:value-type="boolean">
            <text:p>ІСТИНА</text:p>
          </table:table-cell>
          <table:table-cell table:style-name="ce4" table:formula="of:=[.J4]&gt;MAX([.D4];[.F4];[.H4])" office:value-type="boolean" office:boolean-value="false" calcext:value-type="boolean">
            <text:p>БРЕХНЯ</text:p>
          </table:table-cell>
          <table:table-cell table:style-name="ce4" table:formula="of:=[.K4]&gt;MAX([.C4];[.E4];[.G4];[.I4])" office:value-type="boolean" office:boolean-value="false" calcext:value-type="boolean">
            <text:p>БРЕХНЯ</text:p>
          </table:table-cell>
          <table:table-cell table:style-name="ce4" table:formula="of:=[.L4]&gt;MAX([.D4];[.F4];[.H4];[.J4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]&gt;0.9" office:value-type="boolean" office:boolean-value="false" calcext:value-type="boolean">
            <text:p>БРЕХНЯ</text:p>
          </table:table-cell>
          <table:table-cell table:style-name="ce4" table:formula="of:=[.R4]&gt;0.9" office:value-type="boolean" office:boolean-value="true" calcext:value-type="boolean">
            <text:p>ІСТИНА</text:p>
          </table:table-cell>
          <table:table-cell table:style-name="ce4" table:formula="of:=[.X4]&gt;0.8" office:value-type="boolean" office:boolean-value="true" calcext:value-type="boolean">
            <text:p>ІСТИНА</text:p>
          </table:table-cell>
          <table:table-cell table:style-name="ce4" table:formula="of:=[.R4]&gt;0.8" office:value-type="boolean" office:boolean-value="true" calcext:value-type="boolean">
            <text:p>ІСТИНА</text:p>
          </table:table-cell>
          <table:table-cell table:style-name="ce4" table:formula="of:=[.X4]&gt;0.7" office:value-type="boolean" office:boolean-value="true" calcext:value-type="boolean">
            <text:p>ІСТИНА</text:p>
          </table:table-cell>
          <table:table-cell table:style-name="ce4" table:formula="of:=[.R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5177035" calcext:value-type="float">
            <text:p>5,18E-01</text:p>
          </table:table-cell>
          <table:table-cell table:style-name="ce1" office:value-type="float" office:value="0.8039355" calcext:value-type="float">
            <text:p>8,04E-01</text:p>
          </table:table-cell>
          <table:table-cell table:style-name="ce1" office:value-type="float" office:value="0.5326067" calcext:value-type="float">
            <text:p>5,33E-01</text:p>
          </table:table-cell>
          <table:table-cell table:style-name="ce1" office:value-type="float" office:value="0.8039355" calcext:value-type="float">
            <text:p>8,04E-01</text:p>
          </table:table-cell>
          <table:table-cell table:style-name="ce1" office:value-type="float" office:value="0.5326067" calcext:value-type="float">
            <text:p>5,33E-01</text:p>
          </table:table-cell>
          <table:table-cell table:style-name="ce1" office:value-type="float" office:value="0.8039355" calcext:value-type="float">
            <text:p>8,04E-01</text:p>
          </table:table-cell>
          <table:table-cell table:style-name="ce1" office:value-type="float" office:value="0.6192622" calcext:value-type="float">
            <text:p>6,19E-01</text:p>
          </table:table-cell>
          <table:table-cell table:style-name="ce1" office:value-type="float" office:value="0.8132843" calcext:value-type="float">
            <text:p>8,13E-01</text:p>
          </table:table-cell>
          <table:table-cell table:style-name="ce1" office:value-type="float" office:value="0.6192622" calcext:value-type="float">
            <text:p>6,19E-01</text:p>
          </table:table-cell>
          <table:table-cell table:style-name="ce1" office:value-type="float" office:value="0.8132843" calcext:value-type="float">
            <text:p>8,13E-01</text:p>
          </table:table-cell>
          <table:table-cell/>
          <table:table-cell table:style-name="ce1" table:formula="of:=MAX([.C5];[.E5];[.G5];[.I5];[.K5])" office:value-type="float" office:value="0.6192622" calcext:value-type="float">
            <text:p>6,19E-01</text:p>
          </table:table-cell>
          <table:table-cell table:style-name="ce8" table:formula="of:=MAX([.D5];[.F5];[.H5];[.J5];[.L5])" office:value-type="float" office:value="0.8132843" calcext:value-type="float">
            <text:p>8,13E-01</text:p>
          </table:table-cell>
          <table:table-cell table:style-name="ce2"/>
          <table:table-cell table:style-name="ce1" office:value-type="float" office:value="0.6192622" calcext:value-type="float">
            <text:p>6,19E-01</text:p>
          </table:table-cell>
          <table:table-cell table:style-name="ce1" office:value-type="float" office:value="0.8132843" calcext:value-type="float">
            <text:p>8,13E-01</text:p>
          </table:table-cell>
          <table:table-cell table:style-name="ce4" table:formula="of:=[.Q5]&gt;[.N5]" office:value-type="boolean" office:boolean-value="false" calcext:value-type="boolean">
            <text:p>БРЕХНЯ</text:p>
          </table:table-cell>
          <table:table-cell table:style-name="ce4" table:formula="of:=[.R5]&gt;[.O5]" office:value-type="boolean" office:boolean-value="false" calcext:value-type="boolean">
            <text:p>БРЕХНЯ</text:p>
          </table:table-cell>
          <table:table-cell table:style-name="ce1"/>
          <table:table-cell table:style-name="ce2" table:number-columns-repeated="2"/>
          <table:table-cell table:style-name="ce1" table:formula="of:=[.Q5]" office:value-type="float" office:value="0.6192622" calcext:value-type="float">
            <text:p>6,19E-01</text:p>
          </table:table-cell>
          <table:table-cell table:style-name="ce4" table:formula="of:=[.X5]&gt;[.R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]&gt;[.C5]" office:value-type="boolean" office:boolean-value="true" calcext:value-type="boolean">
            <text:p>ІСТИНА</text:p>
          </table:table-cell>
          <table:table-cell table:style-name="ce4" table:formula="of:=[.F5]&gt;[.D5]" office:value-type="boolean" office:boolean-value="false" calcext:value-type="boolean">
            <text:p>БРЕХНЯ</text:p>
          </table:table-cell>
          <table:table-cell table:style-name="ce4" table:formula="of:=[.G5]&gt;MAX([.C5];[.E5])" office:value-type="boolean" office:boolean-value="false" calcext:value-type="boolean">
            <text:p>БРЕХНЯ</text:p>
          </table:table-cell>
          <table:table-cell table:style-name="ce4" table:formula="of:=[.H5]&gt;MAX([.D5];[.F5])" office:value-type="boolean" office:boolean-value="false" calcext:value-type="boolean">
            <text:p>БРЕХНЯ</text:p>
          </table:table-cell>
          <table:table-cell table:style-name="ce4" table:formula="of:=[.I5]&gt;MAX([.C5];[.E5];[.G5])" office:value-type="boolean" office:boolean-value="true" calcext:value-type="boolean">
            <text:p>ІСТИНА</text:p>
          </table:table-cell>
          <table:table-cell table:style-name="ce4" table:formula="of:=[.J5]&gt;MAX([.D5];[.F5];[.H5])" office:value-type="boolean" office:boolean-value="true" calcext:value-type="boolean">
            <text:p>ІСТИНА</text:p>
          </table:table-cell>
          <table:table-cell table:style-name="ce4" table:formula="of:=[.K5]&gt;MAX([.C5];[.E5];[.G5];[.I5])" office:value-type="boolean" office:boolean-value="false" calcext:value-type="boolean">
            <text:p>БРЕХНЯ</text:p>
          </table:table-cell>
          <table:table-cell table:style-name="ce4" table:formula="of:=[.L5]&gt;MAX([.D5];[.F5];[.H5];[.J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]&gt;0.9" office:value-type="boolean" office:boolean-value="false" calcext:value-type="boolean">
            <text:p>БРЕХНЯ</text:p>
          </table:table-cell>
          <table:table-cell table:style-name="ce4" table:formula="of:=[.R5]&gt;0.9" office:value-type="boolean" office:boolean-value="false" calcext:value-type="boolean">
            <text:p>БРЕХНЯ</text:p>
          </table:table-cell>
          <table:table-cell table:style-name="ce4" table:formula="of:=[.X5]&gt;0.8" office:value-type="boolean" office:boolean-value="false" calcext:value-type="boolean">
            <text:p>БРЕХНЯ</text:p>
          </table:table-cell>
          <table:table-cell table:style-name="ce4" table:formula="of:=[.R5]&gt;0.8" office:value-type="boolean" office:boolean-value="true" calcext:value-type="boolean">
            <text:p>ІСТИНА</text:p>
          </table:table-cell>
          <table:table-cell table:style-name="ce4" table:formula="of:=[.X5]&gt;0.7" office:value-type="boolean" office:boolean-value="false" calcext:value-type="boolean">
            <text:p>БРЕХНЯ</text:p>
          </table:table-cell>
          <table:table-cell table:style-name="ce4" table:formula="of:=[.R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7066518" calcext:value-type="float">
            <text:p>7,07E-01</text:p>
          </table:table-cell>
          <table:table-cell table:style-name="ce1" office:value-type="float" office:value="0.84841" calcext:value-type="float">
            <text:p>8,48E-01</text:p>
          </table:table-cell>
          <table:table-cell table:style-name="ce1" office:value-type="float" office:value="0.7066518" calcext:value-type="float">
            <text:p>7,07E-01</text:p>
          </table:table-cell>
          <table:table-cell table:style-name="ce1" office:value-type="float" office:value="0.9190094" calcext:value-type="float">
            <text:p>9,19E-01</text:p>
          </table:table-cell>
          <table:table-cell table:style-name="ce1" office:value-type="float" office:value="0.7094589" calcext:value-type="float">
            <text:p>7,09E-01</text:p>
          </table:table-cell>
          <table:table-cell table:style-name="ce1" office:value-type="float" office:value="0.9190094" calcext:value-type="float">
            <text:p>9,19E-01</text:p>
          </table:table-cell>
          <table:table-cell table:style-name="ce1" office:value-type="float" office:value="0.7094589" calcext:value-type="float">
            <text:p>7,09E-01</text:p>
          </table:table-cell>
          <table:table-cell table:style-name="ce1" office:value-type="float" office:value="0.9190094" calcext:value-type="float">
            <text:p>9,19E-01</text:p>
          </table:table-cell>
          <table:table-cell table:style-name="ce1" office:value-type="float" office:value="0.7094589" calcext:value-type="float">
            <text:p>7,09E-01</text:p>
          </table:table-cell>
          <table:table-cell table:style-name="ce1" office:value-type="float" office:value="0.9190094" calcext:value-type="float">
            <text:p>9,19E-01</text:p>
          </table:table-cell>
          <table:table-cell/>
          <table:table-cell table:style-name="ce1" table:formula="of:=MAX([.C6];[.E6];[.G6];[.I6];[.K6])" office:value-type="float" office:value="0.7094589" calcext:value-type="float">
            <text:p>7,09E-01</text:p>
          </table:table-cell>
          <table:table-cell table:style-name="ce8" table:formula="of:=MAX([.D6];[.F6];[.H6];[.J6];[.L6])" office:value-type="float" office:value="0.9190094" calcext:value-type="float">
            <text:p>9,19E-01</text:p>
          </table:table-cell>
          <table:table-cell table:style-name="ce1"/>
          <table:table-cell table:style-name="ce1" office:value-type="float" office:value="0.7643344" calcext:value-type="float">
            <text:p>7,64E-01</text:p>
          </table:table-cell>
          <table:table-cell table:style-name="ce1" office:value-type="float" office:value="0.9190094" calcext:value-type="float">
            <text:p>9,19E-01</text:p>
          </table:table-cell>
          <table:table-cell table:style-name="ce4" table:formula="of:=[.Q6]&gt;[.N6]" office:value-type="boolean" office:boolean-value="true" calcext:value-type="boolean">
            <text:p>ІСТИНА</text:p>
          </table:table-cell>
          <table:table-cell table:style-name="ce4" table:formula="of:=[.R6]&gt;[.O6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6]" office:value-type="float" office:value="0.7643344" calcext:value-type="float">
            <text:p>7,64E-01</text:p>
          </table:table-cell>
          <table:table-cell table:style-name="ce4" table:formula="of:=[.X6]&gt;[.R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]&gt;[.C6]" office:value-type="boolean" office:boolean-value="false" calcext:value-type="boolean">
            <text:p>БРЕХНЯ</text:p>
          </table:table-cell>
          <table:table-cell table:style-name="ce4" table:formula="of:=[.F6]&gt;[.D6]" office:value-type="boolean" office:boolean-value="true" calcext:value-type="boolean">
            <text:p>ІСТИНА</text:p>
          </table:table-cell>
          <table:table-cell table:style-name="ce4" table:formula="of:=[.G6]&gt;MAX([.C6];[.E6])" office:value-type="boolean" office:boolean-value="true" calcext:value-type="boolean">
            <text:p>ІСТИНА</text:p>
          </table:table-cell>
          <table:table-cell table:style-name="ce4" table:formula="of:=[.H6]&gt;MAX([.D6];[.F6])" office:value-type="boolean" office:boolean-value="false" calcext:value-type="boolean">
            <text:p>БРЕХНЯ</text:p>
          </table:table-cell>
          <table:table-cell table:style-name="ce4" table:formula="of:=[.I6]&gt;MAX([.C6];[.E6];[.G6])" office:value-type="boolean" office:boolean-value="false" calcext:value-type="boolean">
            <text:p>БРЕХНЯ</text:p>
          </table:table-cell>
          <table:table-cell table:style-name="ce4" table:formula="of:=[.J6]&gt;MAX([.D6];[.F6];[.H6])" office:value-type="boolean" office:boolean-value="false" calcext:value-type="boolean">
            <text:p>БРЕХНЯ</text:p>
          </table:table-cell>
          <table:table-cell table:style-name="ce4" table:formula="of:=[.K6]&gt;MAX([.C6];[.E6];[.G6];[.I6])" office:value-type="boolean" office:boolean-value="false" calcext:value-type="boolean">
            <text:p>БРЕХНЯ</text:p>
          </table:table-cell>
          <table:table-cell table:style-name="ce4" table:formula="of:=[.L6]&gt;MAX([.D6];[.F6];[.H6];[.J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]&gt;0.9" office:value-type="boolean" office:boolean-value="false" calcext:value-type="boolean">
            <text:p>БРЕХНЯ</text:p>
          </table:table-cell>
          <table:table-cell table:style-name="ce4" table:formula="of:=[.R6]&gt;0.9" office:value-type="boolean" office:boolean-value="true" calcext:value-type="boolean">
            <text:p>ІСТИНА</text:p>
          </table:table-cell>
          <table:table-cell table:style-name="ce4" table:formula="of:=[.X6]&gt;0.8" office:value-type="boolean" office:boolean-value="false" calcext:value-type="boolean">
            <text:p>БРЕХНЯ</text:p>
          </table:table-cell>
          <table:table-cell table:style-name="ce4" table:formula="of:=[.R6]&gt;0.8" office:value-type="boolean" office:boolean-value="true" calcext:value-type="boolean">
            <text:p>ІСТИНА</text:p>
          </table:table-cell>
          <table:table-cell table:style-name="ce4" table:formula="of:=[.X6]&gt;0.7" office:value-type="boolean" office:boolean-value="true" calcext:value-type="boolean">
            <text:p>ІСТИНА</text:p>
          </table:table-cell>
          <table:table-cell table:style-name="ce4" table:formula="of:=[.R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6694114" calcext:value-type="float">
            <text:p>6,69E-02</text:p>
          </table:table-cell>
          <table:table-cell table:style-name="ce1" office:value-type="float" office:value="-0.4147112" calcext:value-type="float">
            <text:p>-4,15E-01</text:p>
          </table:table-cell>
          <table:table-cell/>
          <table:table-cell table:style-name="ce1" office:value-type="float" office:value="-0.3922154" calcext:value-type="float">
            <text:p>-3,92E-01</text:p>
          </table:table-cell>
          <table:table-cell/>
          <table:table-cell table:style-name="ce1" office:value-type="float" office:value="-0.3922154" calcext:value-type="float">
            <text:p>-3,92E-01</text:p>
          </table:table-cell>
          <table:table-cell/>
          <table:table-cell table:style-name="ce1" office:value-type="float" office:value="-0.3245134" calcext:value-type="float">
            <text:p>-3,25E-01</text:p>
          </table:table-cell>
          <table:table-cell/>
          <table:table-cell table:style-name="ce1" office:value-type="float" office:value="-0.2848967" calcext:value-type="float">
            <text:p>-2,85E-01</text:p>
          </table:table-cell>
          <table:table-cell/>
          <table:table-cell table:style-name="ce1" table:formula="of:=MAX([.C7];[.E7];[.G7];[.I7];[.K7])" office:value-type="float" office:value="0.06694114" calcext:value-type="float">
            <text:p>6,69E-02</text:p>
          </table:table-cell>
          <table:table-cell table:style-name="ce8" table:formula="of:=MAX([.D7];[.F7];[.H7];[.J7];[.L7])" office:value-type="float" office:value="-0.2848967" calcext:value-type="float">
            <text:p>-2,85E-01</text:p>
          </table:table-cell>
          <table:table-cell table:style-name="ce2"/>
          <table:table-cell table:style-name="ce1" office:value-type="float" office:value="0.1862068" calcext:value-type="float">
            <text:p>1,86E-01</text:p>
          </table:table-cell>
          <table:table-cell table:style-name="ce1" office:value-type="float" office:value="0.3969547" calcext:value-type="float">
            <text:p>3,97E-01</text:p>
          </table:table-cell>
          <table:table-cell table:style-name="ce4" table:formula="of:=[.Q7]&gt;[.N7]" office:value-type="boolean" office:boolean-value="true" calcext:value-type="boolean">
            <text:p>ІСТИНА</text:p>
          </table:table-cell>
          <table:table-cell table:style-name="ce4" table:formula="of:=[.R7]&gt;[.O7]" office:value-type="boolean" office:boolean-value="true" calcext:value-type="boolean">
            <text:p>ІСТИНА</text:p>
          </table:table-cell>
          <table:table-cell table:style-name="ce1"/>
          <table:table-cell table:style-name="ce2" table:number-columns-repeated="2"/>
          <table:table-cell table:style-name="ce1" table:formula="of:=[.Q7]" office:value-type="float" office:value="0.1862068" calcext:value-type="float">
            <text:p>1,86E-01</text:p>
          </table:table-cell>
          <table:table-cell table:style-name="ce4" table:formula="of:=[.X7]&gt;[.R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]&gt;[.C7]" office:value-type="boolean" office:boolean-value="false" calcext:value-type="boolean">
            <text:p>БРЕХНЯ</text:p>
          </table:table-cell>
          <table:table-cell table:style-name="ce4" table:formula="of:=[.F7]&gt;[.D7]" office:value-type="boolean" office:boolean-value="true" calcext:value-type="boolean">
            <text:p>ІСТИНА</text:p>
          </table:table-cell>
          <table:table-cell table:style-name="ce4" table:formula="of:=[.G7]&gt;MAX([.C7];[.E7])" office:value-type="boolean" office:boolean-value="false" calcext:value-type="boolean">
            <text:p>БРЕХНЯ</text:p>
          </table:table-cell>
          <table:table-cell table:style-name="ce4" table:formula="of:=[.H7]&gt;MAX([.D7];[.F7])" office:value-type="boolean" office:boolean-value="false" calcext:value-type="boolean">
            <text:p>БРЕХНЯ</text:p>
          </table:table-cell>
          <table:table-cell table:style-name="ce4" table:formula="of:=[.I7]&gt;MAX([.C7];[.E7];[.G7])" office:value-type="boolean" office:boolean-value="false" calcext:value-type="boolean">
            <text:p>БРЕХНЯ</text:p>
          </table:table-cell>
          <table:table-cell table:style-name="ce4" table:formula="of:=[.J7]&gt;MAX([.D7];[.F7];[.H7])" office:value-type="boolean" office:boolean-value="true" calcext:value-type="boolean">
            <text:p>ІСТИНА</text:p>
          </table:table-cell>
          <table:table-cell table:style-name="ce4" table:formula="of:=[.K7]&gt;MAX([.C7];[.E7];[.G7];[.I7])" office:value-type="boolean" office:boolean-value="false" calcext:value-type="boolean">
            <text:p>БРЕХНЯ</text:p>
          </table:table-cell>
          <table:table-cell table:style-name="ce4" table:formula="of:=[.L7]&gt;MAX([.D7];[.F7];[.H7];[.J7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7]&gt;0.9" office:value-type="boolean" office:boolean-value="false" calcext:value-type="boolean">
            <text:p>БРЕХНЯ</text:p>
          </table:table-cell>
          <table:table-cell table:style-name="ce4" table:formula="of:=[.R7]&gt;0.9" office:value-type="boolean" office:boolean-value="false" calcext:value-type="boolean">
            <text:p>БРЕХНЯ</text:p>
          </table:table-cell>
          <table:table-cell table:style-name="ce4" table:formula="of:=[.X7]&gt;0.8" office:value-type="boolean" office:boolean-value="false" calcext:value-type="boolean">
            <text:p>БРЕХНЯ</text:p>
          </table:table-cell>
          <table:table-cell table:style-name="ce4" table:formula="of:=[.R7]&gt;0.8" office:value-type="boolean" office:boolean-value="false" calcext:value-type="boolean">
            <text:p>БРЕХНЯ</text:p>
          </table:table-cell>
          <table:table-cell table:style-name="ce4" table:formula="of:=[.X7]&gt;0.7" office:value-type="boolean" office:boolean-value="false" calcext:value-type="boolean">
            <text:p>БРЕХНЯ</text:p>
          </table:table-cell>
          <table:table-cell table:style-name="ce4" table:formula="of:=[.R7]&gt;0.7" office:value-type="boolean" office:boolean-value="false" calcext:value-type="boolean">
            <text:p>БРЕХНЯ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8072558" calcext:value-type="float">
            <text:p>8,07E-01</text:p>
          </table:table-cell>
          <table:table-cell table:style-name="ce1" office:value-type="float" office:value="0.9381725" calcext:value-type="float">
            <text:p>9,38E-01</text:p>
          </table:table-cell>
          <table:table-cell table:style-name="ce1" office:value-type="float" office:value="0.8269563" calcext:value-type="float">
            <text:p>8,27E-01</text:p>
          </table:table-cell>
          <table:table-cell table:style-name="ce1" office:value-type="float" office:value="0.948949" calcext:value-type="float">
            <text:p>9,49E-01</text:p>
          </table:table-cell>
          <table:table-cell table:style-name="ce1" office:value-type="float" office:value="0.8529284" calcext:value-type="float">
            <text:p>8,53E-01</text:p>
          </table:table-cell>
          <table:table-cell table:style-name="ce1" office:value-type="float" office:value="0.948949" calcext:value-type="float">
            <text:p>9,49E-01</text:p>
          </table:table-cell>
          <table:table-cell table:style-name="ce1" office:value-type="float" office:value="0.8529284" calcext:value-type="float">
            <text:p>8,53E-01</text:p>
          </table:table-cell>
          <table:table-cell table:style-name="ce1" office:value-type="float" office:value="0.9502846" calcext:value-type="float">
            <text:p>9,50E-01</text:p>
          </table:table-cell>
          <table:table-cell table:style-name="ce1" office:value-type="float" office:value="0.8842623" calcext:value-type="float">
            <text:p>8,84E-01</text:p>
          </table:table-cell>
          <table:table-cell table:style-name="ce1" office:value-type="float" office:value="0.9508564" calcext:value-type="float">
            <text:p>9,51E-01</text:p>
          </table:table-cell>
          <table:table-cell/>
          <table:table-cell table:style-name="ce1" table:formula="of:=MAX([.C8];[.E8];[.G8];[.I8];[.K8])" office:value-type="float" office:value="0.8842623" calcext:value-type="float">
            <text:p>8,84E-01</text:p>
          </table:table-cell>
          <table:table-cell table:style-name="ce8" table:formula="of:=MAX([.D8];[.F8];[.H8];[.J8];[.L8])" office:value-type="float" office:value="0.9508564" calcext:value-type="float">
            <text:p>9,51E-01</text:p>
          </table:table-cell>
          <table:table-cell table:style-name="ce1"/>
          <table:table-cell table:style-name="ce1" office:value-type="float" office:value="0.8842623" calcext:value-type="float">
            <text:p>8,84E-01</text:p>
          </table:table-cell>
          <table:table-cell table:style-name="ce1" office:value-type="float" office:value="0.9508564" calcext:value-type="float">
            <text:p>9,51E-01</text:p>
          </table:table-cell>
          <table:table-cell table:style-name="ce4" table:formula="of:=[.Q8]&gt;[.N8]" office:value-type="boolean" office:boolean-value="false" calcext:value-type="boolean">
            <text:p>БРЕХНЯ</text:p>
          </table:table-cell>
          <table:table-cell table:style-name="ce4" table:formula="of:=[.R8]&gt;[.O8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8]" office:value-type="float" office:value="0.8842623" calcext:value-type="float">
            <text:p>8,84E-01</text:p>
          </table:table-cell>
          <table:table-cell table:style-name="ce4" table:formula="of:=[.X8]&gt;[.R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8]&gt;[.C8]" office:value-type="boolean" office:boolean-value="true" calcext:value-type="boolean">
            <text:p>ІСТИНА</text:p>
          </table:table-cell>
          <table:table-cell table:style-name="ce4" table:formula="of:=[.F8]&gt;[.D8]" office:value-type="boolean" office:boolean-value="true" calcext:value-type="boolean">
            <text:p>ІСТИНА</text:p>
          </table:table-cell>
          <table:table-cell table:style-name="ce4" table:formula="of:=[.G8]&gt;MAX([.C8];[.E8])" office:value-type="boolean" office:boolean-value="true" calcext:value-type="boolean">
            <text:p>ІСТИНА</text:p>
          </table:table-cell>
          <table:table-cell table:style-name="ce4" table:formula="of:=[.H8]&gt;MAX([.D8];[.F8])" office:value-type="boolean" office:boolean-value="false" calcext:value-type="boolean">
            <text:p>БРЕХНЯ</text:p>
          </table:table-cell>
          <table:table-cell table:style-name="ce4" table:formula="of:=[.I8]&gt;MAX([.C8];[.E8];[.G8])" office:value-type="boolean" office:boolean-value="false" calcext:value-type="boolean">
            <text:p>БРЕХНЯ</text:p>
          </table:table-cell>
          <table:table-cell table:style-name="ce4" table:formula="of:=[.J8]&gt;MAX([.D8];[.F8];[.H8])" office:value-type="boolean" office:boolean-value="true" calcext:value-type="boolean">
            <text:p>ІСТИНА</text:p>
          </table:table-cell>
          <table:table-cell table:style-name="ce4" table:formula="of:=[.K8]&gt;MAX([.C8];[.E8];[.G8];[.I8])" office:value-type="boolean" office:boolean-value="true" calcext:value-type="boolean">
            <text:p>ІСТИНА</text:p>
          </table:table-cell>
          <table:table-cell table:style-name="ce4" table:formula="of:=[.L8]&gt;MAX([.D8];[.F8];[.H8];[.J8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8]&gt;0.9" office:value-type="boolean" office:boolean-value="false" calcext:value-type="boolean">
            <text:p>БРЕХНЯ</text:p>
          </table:table-cell>
          <table:table-cell table:style-name="ce4" table:formula="of:=[.R8]&gt;0.9" office:value-type="boolean" office:boolean-value="true" calcext:value-type="boolean">
            <text:p>ІСТИНА</text:p>
          </table:table-cell>
          <table:table-cell table:style-name="ce4" table:formula="of:=[.X8]&gt;0.8" office:value-type="boolean" office:boolean-value="true" calcext:value-type="boolean">
            <text:p>ІСТИНА</text:p>
          </table:table-cell>
          <table:table-cell table:style-name="ce4" table:formula="of:=[.R8]&gt;0.8" office:value-type="boolean" office:boolean-value="true" calcext:value-type="boolean">
            <text:p>ІСТИНА</text:p>
          </table:table-cell>
          <table:table-cell table:style-name="ce4" table:formula="of:=[.X8]&gt;0.7" office:value-type="boolean" office:boolean-value="true" calcext:value-type="boolean">
            <text:p>ІСТИНА</text:p>
          </table:table-cell>
          <table:table-cell table:style-name="ce4" table:formula="of:=[.R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7138426" calcext:value-type="float">
            <text:p>7,14E-01</text:p>
          </table:table-cell>
          <table:table-cell table:style-name="ce1" office:value-type="float" office:value="0.8774524" calcext:value-type="float">
            <text:p>8,77E-01</text:p>
          </table:table-cell>
          <table:table-cell table:style-name="ce1" office:value-type="float" office:value="0.7138426" calcext:value-type="float">
            <text:p>7,14E-01</text:p>
          </table:table-cell>
          <table:table-cell table:style-name="ce1" office:value-type="float" office:value="0.884931" calcext:value-type="float">
            <text:p>8,85E-01</text:p>
          </table:table-cell>
          <table:table-cell table:style-name="ce1" office:value-type="float" office:value="0.7506005" calcext:value-type="float">
            <text:p>7,51E-01</text:p>
          </table:table-cell>
          <table:table-cell table:style-name="ce1" office:value-type="float" office:value="0.8859217" calcext:value-type="float">
            <text:p>8,86E-01</text:p>
          </table:table-cell>
          <table:table-cell table:style-name="ce1" office:value-type="float" office:value="0.7506005" calcext:value-type="float">
            <text:p>7,51E-01</text:p>
          </table:table-cell>
          <table:table-cell table:style-name="ce1" office:value-type="float" office:value="0.8859217" calcext:value-type="float">
            <text:p>8,86E-01</text:p>
          </table:table-cell>
          <table:table-cell table:style-name="ce1" office:value-type="float" office:value="0.7506005" calcext:value-type="float">
            <text:p>7,51E-01</text:p>
          </table:table-cell>
          <table:table-cell table:style-name="ce1" office:value-type="float" office:value="0.8859217" calcext:value-type="float">
            <text:p>8,86E-01</text:p>
          </table:table-cell>
          <table:table-cell/>
          <table:table-cell table:style-name="ce1" table:formula="of:=MAX([.C9];[.E9];[.G9];[.I9];[.K9])" office:value-type="float" office:value="0.7506005" calcext:value-type="float">
            <text:p>7,51E-01</text:p>
          </table:table-cell>
          <table:table-cell table:style-name="ce8" table:formula="of:=MAX([.D9];[.F9];[.H9];[.J9];[.L9])" office:value-type="float" office:value="0.8859217" calcext:value-type="float">
            <text:p>8,86E-01</text:p>
          </table:table-cell>
          <table:table-cell table:style-name="ce1"/>
          <table:table-cell table:style-name="ce1" office:value-type="float" office:value="0.7506005" calcext:value-type="float">
            <text:p>7,51E-01</text:p>
          </table:table-cell>
          <table:table-cell table:style-name="ce1" office:value-type="float" office:value="0.8859217" calcext:value-type="float">
            <text:p>8,86E-01</text:p>
          </table:table-cell>
          <table:table-cell table:style-name="ce4" table:formula="of:=[.Q9]&gt;[.N9]" office:value-type="boolean" office:boolean-value="false" calcext:value-type="boolean">
            <text:p>БРЕХНЯ</text:p>
          </table:table-cell>
          <table:table-cell table:style-name="ce4" table:formula="of:=[.R9]&gt;[.O9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9]" office:value-type="float" office:value="0.7506005" calcext:value-type="float">
            <text:p>7,51E-01</text:p>
          </table:table-cell>
          <table:table-cell table:style-name="ce4" table:formula="of:=[.X9]&gt;[.R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9]&gt;[.C9]" office:value-type="boolean" office:boolean-value="false" calcext:value-type="boolean">
            <text:p>БРЕХНЯ</text:p>
          </table:table-cell>
          <table:table-cell table:style-name="ce4" table:formula="of:=[.F9]&gt;[.D9]" office:value-type="boolean" office:boolean-value="true" calcext:value-type="boolean">
            <text:p>ІСТИНА</text:p>
          </table:table-cell>
          <table:table-cell table:style-name="ce4" table:formula="of:=[.G9]&gt;MAX([.C9];[.E9])" office:value-type="boolean" office:boolean-value="true" calcext:value-type="boolean">
            <text:p>ІСТИНА</text:p>
          </table:table-cell>
          <table:table-cell table:style-name="ce4" table:formula="of:=[.H9]&gt;MAX([.D9];[.F9])" office:value-type="boolean" office:boolean-value="true" calcext:value-type="boolean">
            <text:p>ІСТИНА</text:p>
          </table:table-cell>
          <table:table-cell table:style-name="ce4" table:formula="of:=[.I9]&gt;MAX([.C9];[.E9];[.G9])" office:value-type="boolean" office:boolean-value="false" calcext:value-type="boolean">
            <text:p>БРЕХНЯ</text:p>
          </table:table-cell>
          <table:table-cell table:style-name="ce4" table:formula="of:=[.J9]&gt;MAX([.D9];[.F9];[.H9])" office:value-type="boolean" office:boolean-value="false" calcext:value-type="boolean">
            <text:p>БРЕХНЯ</text:p>
          </table:table-cell>
          <table:table-cell table:style-name="ce4" table:formula="of:=[.K9]&gt;MAX([.C9];[.E9];[.G9];[.I9])" office:value-type="boolean" office:boolean-value="false" calcext:value-type="boolean">
            <text:p>БРЕХНЯ</text:p>
          </table:table-cell>
          <table:table-cell table:style-name="ce4" table:formula="of:=[.L9]&gt;MAX([.D9];[.F9];[.H9];[.J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9]&gt;0.9" office:value-type="boolean" office:boolean-value="false" calcext:value-type="boolean">
            <text:p>БРЕХНЯ</text:p>
          </table:table-cell>
          <table:table-cell table:style-name="ce4" table:formula="of:=[.R9]&gt;0.9" office:value-type="boolean" office:boolean-value="false" calcext:value-type="boolean">
            <text:p>БРЕХНЯ</text:p>
          </table:table-cell>
          <table:table-cell table:style-name="ce4" table:formula="of:=[.X9]&gt;0.8" office:value-type="boolean" office:boolean-value="false" calcext:value-type="boolean">
            <text:p>БРЕХНЯ</text:p>
          </table:table-cell>
          <table:table-cell table:style-name="ce4" table:formula="of:=[.R9]&gt;0.8" office:value-type="boolean" office:boolean-value="true" calcext:value-type="boolean">
            <text:p>ІСТИНА</text:p>
          </table:table-cell>
          <table:table-cell table:style-name="ce4" table:formula="of:=[.X9]&gt;0.7" office:value-type="boolean" office:boolean-value="true" calcext:value-type="boolean">
            <text:p>ІСТИНА</text:p>
          </table:table-cell>
          <table:table-cell table:style-name="ce4" table:formula="of:=[.R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6346551" calcext:value-type="float">
            <text:p>6,35E-01</text:p>
          </table:table-cell>
          <table:table-cell table:style-name="ce1" office:value-type="float" office:value="0.8466297" calcext:value-type="float">
            <text:p>8,47E-01</text:p>
          </table:table-cell>
          <table:table-cell table:style-name="ce1" office:value-type="float" office:value="0.7917719" calcext:value-type="float">
            <text:p>7,92E-01</text:p>
          </table:table-cell>
          <table:table-cell table:style-name="ce1" office:value-type="float" office:value="0.8634483" calcext:value-type="float">
            <text:p>8,63E-01</text:p>
          </table:table-cell>
          <table:table-cell table:style-name="ce1" office:value-type="float" office:value="0.8063813" calcext:value-type="float">
            <text:p>8,06E-01</text:p>
          </table:table-cell>
          <table:table-cell table:style-name="ce1" office:value-type="float" office:value="0.8634483" calcext:value-type="float">
            <text:p>8,63E-01</text:p>
          </table:table-cell>
          <table:table-cell table:style-name="ce1" office:value-type="float" office:value="0.8063813" calcext:value-type="float">
            <text:p>8,06E-01</text:p>
          </table:table-cell>
          <table:table-cell table:style-name="ce1" office:value-type="float" office:value="0.8634483" calcext:value-type="float">
            <text:p>8,63E-01</text:p>
          </table:table-cell>
          <table:table-cell table:style-name="ce1" office:value-type="float" office:value="0.8063813" calcext:value-type="float">
            <text:p>8,06E-01</text:p>
          </table:table-cell>
          <table:table-cell table:style-name="ce1" office:value-type="float" office:value="0.8634483" calcext:value-type="float">
            <text:p>8,63E-01</text:p>
          </table:table-cell>
          <table:table-cell/>
          <table:table-cell table:style-name="ce1" table:formula="of:=MAX([.C10];[.E10];[.G10];[.I10];[.K10])" office:value-type="float" office:value="0.8063813" calcext:value-type="float">
            <text:p>8,06E-01</text:p>
          </table:table-cell>
          <table:table-cell table:style-name="ce8" table:formula="of:=MAX([.D10];[.F10];[.H10];[.J10];[.L10])" office:value-type="float" office:value="0.8634483" calcext:value-type="float">
            <text:p>8,63E-01</text:p>
          </table:table-cell>
          <table:table-cell table:style-name="ce1"/>
          <table:table-cell table:style-name="ce1" office:value-type="float" office:value="0.8063813" calcext:value-type="float">
            <text:p>8,06E-01</text:p>
          </table:table-cell>
          <table:table-cell table:style-name="ce1" office:value-type="float" office:value="0.8634483" calcext:value-type="float">
            <text:p>8,63E-01</text:p>
          </table:table-cell>
          <table:table-cell table:style-name="ce4" table:formula="of:=[.Q10]&gt;[.N10]" office:value-type="boolean" office:boolean-value="false" calcext:value-type="boolean">
            <text:p>БРЕХНЯ</text:p>
          </table:table-cell>
          <table:table-cell table:style-name="ce4" table:formula="of:=[.R10]&gt;[.O10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10]" office:value-type="float" office:value="0.8063813" calcext:value-type="float">
            <text:p>8,06E-01</text:p>
          </table:table-cell>
          <table:table-cell table:style-name="ce4" table:formula="of:=[.X10]&gt;[.R1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0]&gt;[.C10]" office:value-type="boolean" office:boolean-value="true" calcext:value-type="boolean">
            <text:p>ІСТИНА</text:p>
          </table:table-cell>
          <table:table-cell table:style-name="ce4" table:formula="of:=[.F10]&gt;[.D10]" office:value-type="boolean" office:boolean-value="true" calcext:value-type="boolean">
            <text:p>ІСТИНА</text:p>
          </table:table-cell>
          <table:table-cell table:style-name="ce4" table:formula="of:=[.G10]&gt;MAX([.C10];[.E10])" office:value-type="boolean" office:boolean-value="true" calcext:value-type="boolean">
            <text:p>ІСТИНА</text:p>
          </table:table-cell>
          <table:table-cell table:style-name="ce4" table:formula="of:=[.H10]&gt;MAX([.D10];[.F10])" office:value-type="boolean" office:boolean-value="false" calcext:value-type="boolean">
            <text:p>БРЕХНЯ</text:p>
          </table:table-cell>
          <table:table-cell table:style-name="ce4" table:formula="of:=[.I10]&gt;MAX([.C10];[.E10];[.G10])" office:value-type="boolean" office:boolean-value="false" calcext:value-type="boolean">
            <text:p>БРЕХНЯ</text:p>
          </table:table-cell>
          <table:table-cell table:style-name="ce4" table:formula="of:=[.J10]&gt;MAX([.D10];[.F10];[.H10])" office:value-type="boolean" office:boolean-value="false" calcext:value-type="boolean">
            <text:p>БРЕХНЯ</text:p>
          </table:table-cell>
          <table:table-cell table:style-name="ce4" table:formula="of:=[.K10]&gt;MAX([.C10];[.E10];[.G10];[.I10])" office:value-type="boolean" office:boolean-value="false" calcext:value-type="boolean">
            <text:p>БРЕХНЯ</text:p>
          </table:table-cell>
          <table:table-cell table:style-name="ce4" table:formula="of:=[.L10]&gt;MAX([.D10];[.F10];[.H10];[.J1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0]&gt;0.9" office:value-type="boolean" office:boolean-value="false" calcext:value-type="boolean">
            <text:p>БРЕХНЯ</text:p>
          </table:table-cell>
          <table:table-cell table:style-name="ce4" table:formula="of:=[.R10]&gt;0.9" office:value-type="boolean" office:boolean-value="false" calcext:value-type="boolean">
            <text:p>БРЕХНЯ</text:p>
          </table:table-cell>
          <table:table-cell table:style-name="ce4" table:formula="of:=[.X10]&gt;0.8" office:value-type="boolean" office:boolean-value="true" calcext:value-type="boolean">
            <text:p>ІСТИНА</text:p>
          </table:table-cell>
          <table:table-cell table:style-name="ce4" table:formula="of:=[.R10]&gt;0.8" office:value-type="boolean" office:boolean-value="true" calcext:value-type="boolean">
            <text:p>ІСТИНА</text:p>
          </table:table-cell>
          <table:table-cell table:style-name="ce4" table:formula="of:=[.X10]&gt;0.7" office:value-type="boolean" office:boolean-value="true" calcext:value-type="boolean">
            <text:p>ІСТИНА</text:p>
          </table:table-cell>
          <table:table-cell table:style-name="ce4" table:formula="of:=[.R1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3365399" calcext:value-type="float">
            <text:p>3,37E-01</text:p>
          </table:table-cell>
          <table:table-cell table:style-name="ce1" office:value-type="float" office:value="0.6286064" calcext:value-type="float">
            <text:p>6,29E-01</text:p>
          </table:table-cell>
          <table:table-cell table:style-name="ce1" office:value-type="float" office:value="0.3365399" calcext:value-type="float">
            <text:p>3,37E-01</text:p>
          </table:table-cell>
          <table:table-cell table:style-name="ce1" office:value-type="float" office:value="0.6286064" calcext:value-type="float">
            <text:p>6,29E-01</text:p>
          </table:table-cell>
          <table:table-cell table:style-name="ce1" office:value-type="float" office:value="0.4336255" calcext:value-type="float">
            <text:p>4,34E-01</text:p>
          </table:table-cell>
          <table:table-cell table:style-name="ce1" office:value-type="float" office:value="0.6286064" calcext:value-type="float">
            <text:p>6,29E-01</text:p>
          </table:table-cell>
          <table:table-cell table:style-name="ce1" office:value-type="float" office:value="0.4336255" calcext:value-type="float">
            <text:p>4,34E-01</text:p>
          </table:table-cell>
          <table:table-cell table:style-name="ce1" office:value-type="float" office:value="0.6286064" calcext:value-type="float">
            <text:p>6,29E-01</text:p>
          </table:table-cell>
          <table:table-cell table:style-name="ce1" office:value-type="float" office:value="0.5228592" calcext:value-type="float">
            <text:p>5,23E-01</text:p>
          </table:table-cell>
          <table:table-cell table:style-name="ce1" office:value-type="float" office:value="0.6286064" calcext:value-type="float">
            <text:p>6,29E-01</text:p>
          </table:table-cell>
          <table:table-cell/>
          <table:table-cell table:style-name="ce1" table:formula="of:=MAX([.C11];[.E11];[.G11];[.I11];[.K11])" office:value-type="float" office:value="0.5228592" calcext:value-type="float">
            <text:p>5,23E-01</text:p>
          </table:table-cell>
          <table:table-cell table:style-name="ce8" table:formula="of:=MAX([.D11];[.F11];[.H11];[.J11];[.L11])" office:value-type="float" office:value="0.6286064" calcext:value-type="float">
            <text:p>6,29E-01</text:p>
          </table:table-cell>
          <table:table-cell table:style-name="ce1"/>
          <table:table-cell table:style-name="ce1" office:value-type="float" office:value="0.5318678" calcext:value-type="float">
            <text:p>5,32E-01</text:p>
          </table:table-cell>
          <table:table-cell table:style-name="ce1" office:value-type="float" office:value="0.6523202" calcext:value-type="float">
            <text:p>6,52E-01</text:p>
          </table:table-cell>
          <table:table-cell table:style-name="ce4" table:formula="of:=[.Q11]&gt;[.N11]" office:value-type="boolean" office:boolean-value="true" calcext:value-type="boolean">
            <text:p>ІСТИНА</text:p>
          </table:table-cell>
          <table:table-cell table:style-name="ce4" table:formula="of:=[.R11]&gt;[.O11]" office:value-type="boolean" office:boolean-value="true" calcext:value-type="boolean">
            <text:p>ІСТИНА</text:p>
          </table:table-cell>
          <table:table-cell table:style-name="ce1" table:number-columns-repeated="3"/>
          <table:table-cell table:style-name="ce1" table:formula="of:=[.Q11]" office:value-type="float" office:value="0.5318678" calcext:value-type="float">
            <text:p>5,32E-01</text:p>
          </table:table-cell>
          <table:table-cell table:style-name="ce4" table:formula="of:=[.X11]&gt;[.R1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1]&gt;[.C11]" office:value-type="boolean" office:boolean-value="false" calcext:value-type="boolean">
            <text:p>БРЕХНЯ</text:p>
          </table:table-cell>
          <table:table-cell table:style-name="ce4" table:formula="of:=[.F11]&gt;[.D11]" office:value-type="boolean" office:boolean-value="false" calcext:value-type="boolean">
            <text:p>БРЕХНЯ</text:p>
          </table:table-cell>
          <table:table-cell table:style-name="ce4" table:formula="of:=[.G11]&gt;MAX([.C11];[.E11])" office:value-type="boolean" office:boolean-value="true" calcext:value-type="boolean">
            <text:p>ІСТИНА</text:p>
          </table:table-cell>
          <table:table-cell table:style-name="ce4" table:formula="of:=[.H11]&gt;MAX([.D11];[.F11])" office:value-type="boolean" office:boolean-value="false" calcext:value-type="boolean">
            <text:p>БРЕХНЯ</text:p>
          </table:table-cell>
          <table:table-cell table:style-name="ce4" table:formula="of:=[.I11]&gt;MAX([.C11];[.E11];[.G11])" office:value-type="boolean" office:boolean-value="false" calcext:value-type="boolean">
            <text:p>БРЕХНЯ</text:p>
          </table:table-cell>
          <table:table-cell table:style-name="ce4" table:formula="of:=[.J11]&gt;MAX([.D11];[.F11];[.H11])" office:value-type="boolean" office:boolean-value="false" calcext:value-type="boolean">
            <text:p>БРЕХНЯ</text:p>
          </table:table-cell>
          <table:table-cell table:style-name="ce4" table:formula="of:=[.K11]&gt;MAX([.C11];[.E11];[.G11];[.I11])" office:value-type="boolean" office:boolean-value="true" calcext:value-type="boolean">
            <text:p>ІСТИНА</text:p>
          </table:table-cell>
          <table:table-cell table:style-name="ce4" table:formula="of:=[.L11]&gt;MAX([.D11];[.F11];[.H11];[.J1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1]&gt;0.9" office:value-type="boolean" office:boolean-value="false" calcext:value-type="boolean">
            <text:p>БРЕХНЯ</text:p>
          </table:table-cell>
          <table:table-cell table:style-name="ce4" table:formula="of:=[.R11]&gt;0.9" office:value-type="boolean" office:boolean-value="false" calcext:value-type="boolean">
            <text:p>БРЕХНЯ</text:p>
          </table:table-cell>
          <table:table-cell table:style-name="ce4" table:formula="of:=[.X11]&gt;0.8" office:value-type="boolean" office:boolean-value="false" calcext:value-type="boolean">
            <text:p>БРЕХНЯ</text:p>
          </table:table-cell>
          <table:table-cell table:style-name="ce4" table:formula="of:=[.R11]&gt;0.8" office:value-type="boolean" office:boolean-value="false" calcext:value-type="boolean">
            <text:p>БРЕХНЯ</text:p>
          </table:table-cell>
          <table:table-cell table:style-name="ce4" table:formula="of:=[.X11]&gt;0.7" office:value-type="boolean" office:boolean-value="false" calcext:value-type="boolean">
            <text:p>БРЕХНЯ</text:p>
          </table:table-cell>
          <table:table-cell table:style-name="ce4" table:formula="of:=[.R11]&gt;0.7" office:value-type="boolean" office:boolean-value="false" calcext:value-type="boolean">
            <text:p>БРЕХН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8975178" calcext:value-type="float">
            <text:p>8,98E-01</text:p>
          </table:table-cell>
          <table:table-cell table:style-name="ce1" office:value-type="float" office:value="0.9445444" calcext:value-type="float">
            <text:p>9,45E-01</text:p>
          </table:table-cell>
          <table:table-cell table:style-name="ce1" office:value-type="float" office:value="0.8975178" calcext:value-type="float">
            <text:p>8,98E-01</text:p>
          </table:table-cell>
          <table:table-cell table:style-name="ce1" office:value-type="float" office:value="0.9499817" calcext:value-type="float">
            <text:p>9,50E-01</text:p>
          </table:table-cell>
          <table:table-cell table:style-name="ce1" office:value-type="float" office:value="0.9114376" calcext:value-type="float">
            <text:p>9,11E-01</text:p>
          </table:table-cell>
          <table:table-cell table:style-name="ce1" office:value-type="float" office:value="0.9499817" calcext:value-type="float">
            <text:p>9,50E-01</text:p>
          </table:table-cell>
          <table:table-cell table:style-name="ce1" office:value-type="float" office:value="0.9276587" calcext:value-type="float">
            <text:p>9,28E-01</text:p>
          </table:table-cell>
          <table:table-cell table:style-name="ce1" office:value-type="float" office:value="0.9577599" calcext:value-type="float">
            <text:p>9,58E-01</text:p>
          </table:table-cell>
          <table:table-cell table:style-name="ce1" office:value-type="float" office:value="0.9276587" calcext:value-type="float">
            <text:p>9,28E-01</text:p>
          </table:table-cell>
          <table:table-cell table:style-name="ce1" office:value-type="float" office:value="0.9632947" calcext:value-type="float">
            <text:p>9,63E-01</text:p>
          </table:table-cell>
          <table:table-cell/>
          <table:table-cell table:style-name="ce1" table:formula="of:=MAX([.C12];[.E12];[.G12];[.I12];[.K12])" office:value-type="float" office:value="0.9276587" calcext:value-type="float">
            <text:p>9,28E-01</text:p>
          </table:table-cell>
          <table:table-cell table:style-name="ce8" table:formula="of:=MAX([.D12];[.F12];[.H12];[.J12];[.L12])" office:value-type="float" office:value="0.9632947" calcext:value-type="float">
            <text:p>9,63E-01</text:p>
          </table:table-cell>
          <table:table-cell table:style-name="ce1"/>
          <table:table-cell table:style-name="ce1" office:value-type="float" office:value="0.9276587" calcext:value-type="float">
            <text:p>9,28E-01</text:p>
          </table:table-cell>
          <table:table-cell table:style-name="ce1" office:value-type="float" office:value="0.9632947" calcext:value-type="float">
            <text:p>9,63E-01</text:p>
          </table:table-cell>
          <table:table-cell table:style-name="ce4" table:formula="of:=[.Q12]&gt;[.N12]" office:value-type="boolean" office:boolean-value="false" calcext:value-type="boolean">
            <text:p>БРЕХНЯ</text:p>
          </table:table-cell>
          <table:table-cell table:style-name="ce4" table:formula="of:=[.R12]&gt;[.O1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276587" calcext:value-type="float">
            <text:p>9,28E-01</text:p>
          </table:table-cell>
          <table:table-cell table:style-name="ce4" table:formula="of:=[.V12]&gt;[.Q12]" office:value-type="boolean" office:boolean-value="false" calcext:value-type="boolean">
            <text:p>БРЕХНЯ</text:p>
          </table:table-cell>
          <table:table-cell table:style-name="ce1" table:formula="of:=MAX([.V12];[.Q12])" office:value-type="float" office:value="0.9276587" calcext:value-type="float">
            <text:p>9,28E-01</text:p>
          </table:table-cell>
          <table:table-cell table:style-name="ce4" table:formula="of:=[.X12]&gt;[.R1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2]&gt;[.C12]" office:value-type="boolean" office:boolean-value="false" calcext:value-type="boolean">
            <text:p>БРЕХНЯ</text:p>
          </table:table-cell>
          <table:table-cell table:style-name="ce4" table:formula="of:=[.F12]&gt;[.D12]" office:value-type="boolean" office:boolean-value="true" calcext:value-type="boolean">
            <text:p>ІСТИНА</text:p>
          </table:table-cell>
          <table:table-cell table:style-name="ce4" table:formula="of:=[.G12]&gt;MAX([.C12];[.E12])" office:value-type="boolean" office:boolean-value="true" calcext:value-type="boolean">
            <text:p>ІСТИНА</text:p>
          </table:table-cell>
          <table:table-cell table:style-name="ce4" table:formula="of:=[.H12]&gt;MAX([.D12];[.F12])" office:value-type="boolean" office:boolean-value="false" calcext:value-type="boolean">
            <text:p>БРЕХНЯ</text:p>
          </table:table-cell>
          <table:table-cell table:style-name="ce4" table:formula="of:=[.I12]&gt;MAX([.C12];[.E12];[.G12])" office:value-type="boolean" office:boolean-value="true" calcext:value-type="boolean">
            <text:p>ІСТИНА</text:p>
          </table:table-cell>
          <table:table-cell table:style-name="ce4" table:formula="of:=[.J12]&gt;MAX([.D12];[.F12];[.H12])" office:value-type="boolean" office:boolean-value="true" calcext:value-type="boolean">
            <text:p>ІСТИНА</text:p>
          </table:table-cell>
          <table:table-cell table:style-name="ce4" table:formula="of:=[.K12]&gt;MAX([.C12];[.E12];[.G12];[.I12])" office:value-type="boolean" office:boolean-value="false" calcext:value-type="boolean">
            <text:p>БРЕХНЯ</text:p>
          </table:table-cell>
          <table:table-cell table:style-name="ce4" table:formula="of:=[.L12]&gt;MAX([.D12];[.F12];[.H12];[.J12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12]&gt;0.9" office:value-type="boolean" office:boolean-value="true" calcext:value-type="boolean">
            <text:p>ІСТИНА</text:p>
          </table:table-cell>
          <table:table-cell table:style-name="ce4" table:formula="of:=[.R12]&gt;0.9" office:value-type="boolean" office:boolean-value="true" calcext:value-type="boolean">
            <text:p>ІСТИНА</text:p>
          </table:table-cell>
          <table:table-cell table:style-name="ce4" table:formula="of:=[.X12]&gt;0.8" office:value-type="boolean" office:boolean-value="true" calcext:value-type="boolean">
            <text:p>ІСТИНА</text:p>
          </table:table-cell>
          <table:table-cell table:style-name="ce4" table:formula="of:=[.R12]&gt;0.8" office:value-type="boolean" office:boolean-value="true" calcext:value-type="boolean">
            <text:p>ІСТИНА</text:p>
          </table:table-cell>
          <table:table-cell table:style-name="ce4" table:formula="of:=[.X12]&gt;0.7" office:value-type="boolean" office:boolean-value="true" calcext:value-type="boolean">
            <text:p>ІСТИНА</text:p>
          </table:table-cell>
          <table:table-cell table:style-name="ce4" table:formula="of:=[.R12]&gt;0.7" office:value-type="boolean" office:boolean-value="true" calcext:value-type="boolean">
            <text:p>ІСТИНА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8849149" calcext:value-type="float">
            <text:p>8,85E-01</text:p>
          </table:table-cell>
          <table:table-cell table:style-name="ce1" office:value-type="float" office:value="0.9356004" calcext:value-type="float">
            <text:p>9,36E-01</text:p>
          </table:table-cell>
          <table:table-cell table:style-name="ce1" office:value-type="float" office:value="0.8849149" calcext:value-type="float">
            <text:p>8,85E-01</text:p>
          </table:table-cell>
          <table:table-cell table:style-name="ce1" office:value-type="float" office:value="0.9367916" calcext:value-type="float">
            <text:p>9,37E-01</text:p>
          </table:table-cell>
          <table:table-cell table:style-name="ce1" office:value-type="float" office:value="0.8995935" calcext:value-type="float">
            <text:p>9,00E-01</text:p>
          </table:table-cell>
          <table:table-cell table:style-name="ce1" office:value-type="float" office:value="0.9367916" calcext:value-type="float">
            <text:p>9,37E-01</text:p>
          </table:table-cell>
          <table:table-cell table:style-name="ce1" office:value-type="float" office:value="0.9111636" calcext:value-type="float">
            <text:p>9,11E-01</text:p>
          </table:table-cell>
          <table:table-cell table:style-name="ce1" office:value-type="float" office:value="0.9367916" calcext:value-type="float">
            <text:p>9,37E-01</text:p>
          </table:table-cell>
          <table:table-cell table:style-name="ce1" office:value-type="float" office:value="0.9111636" calcext:value-type="float">
            <text:p>9,11E-01</text:p>
          </table:table-cell>
          <table:table-cell table:style-name="ce1" office:value-type="float" office:value="0.9367916" calcext:value-type="float">
            <text:p>9,37E-01</text:p>
          </table:table-cell>
          <table:table-cell/>
          <table:table-cell table:style-name="ce1" table:formula="of:=MAX([.C13];[.E13];[.G13];[.I13];[.K13])" office:value-type="float" office:value="0.9111636" calcext:value-type="float">
            <text:p>9,11E-01</text:p>
          </table:table-cell>
          <table:table-cell table:style-name="ce8" table:formula="of:=MAX([.D13];[.F13];[.H13];[.J13];[.L13])" office:value-type="float" office:value="0.9367916" calcext:value-type="float">
            <text:p>9,37E-01</text:p>
          </table:table-cell>
          <table:table-cell table:style-name="ce1"/>
          <table:table-cell table:style-name="ce1" office:value-type="float" office:value="0.9111636" calcext:value-type="float">
            <text:p>9,11E-01</text:p>
          </table:table-cell>
          <table:table-cell table:style-name="ce1" office:value-type="float" office:value="0.9367916" calcext:value-type="float">
            <text:p>9,37E-01</text:p>
          </table:table-cell>
          <table:table-cell table:style-name="ce4" table:formula="of:=[.Q13]&gt;[.N13]" office:value-type="boolean" office:boolean-value="false" calcext:value-type="boolean">
            <text:p>БРЕХНЯ</text:p>
          </table:table-cell>
          <table:table-cell table:style-name="ce4" table:formula="of:=[.R13]&gt;[.O1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111636" calcext:value-type="float">
            <text:p>9,11E-01</text:p>
          </table:table-cell>
          <table:table-cell table:style-name="ce4" table:formula="of:=[.V13]&gt;[.Q13]" office:value-type="boolean" office:boolean-value="false" calcext:value-type="boolean">
            <text:p>БРЕХНЯ</text:p>
          </table:table-cell>
          <table:table-cell table:style-name="ce1" table:formula="of:=MAX([.V13];[.Q13])" office:value-type="float" office:value="0.9111636" calcext:value-type="float">
            <text:p>9,11E-01</text:p>
          </table:table-cell>
          <table:table-cell table:style-name="ce4" table:formula="of:=[.X13]&gt;[.R1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3]&gt;[.C13]" office:value-type="boolean" office:boolean-value="false" calcext:value-type="boolean">
            <text:p>БРЕХНЯ</text:p>
          </table:table-cell>
          <table:table-cell table:style-name="ce4" table:formula="of:=[.F13]&gt;[.D13]" office:value-type="boolean" office:boolean-value="true" calcext:value-type="boolean">
            <text:p>ІСТИНА</text:p>
          </table:table-cell>
          <table:table-cell table:style-name="ce4" table:formula="of:=[.G13]&gt;MAX([.C13];[.E13])" office:value-type="boolean" office:boolean-value="true" calcext:value-type="boolean">
            <text:p>ІСТИНА</text:p>
          </table:table-cell>
          <table:table-cell table:style-name="ce4" table:formula="of:=[.H13]&gt;MAX([.D13];[.F13])" office:value-type="boolean" office:boolean-value="false" calcext:value-type="boolean">
            <text:p>БРЕХНЯ</text:p>
          </table:table-cell>
          <table:table-cell table:style-name="ce4" table:formula="of:=[.I13]&gt;MAX([.C13];[.E13];[.G13])" office:value-type="boolean" office:boolean-value="true" calcext:value-type="boolean">
            <text:p>ІСТИНА</text:p>
          </table:table-cell>
          <table:table-cell table:style-name="ce4" table:formula="of:=[.J13]&gt;MAX([.D13];[.F13];[.H13])" office:value-type="boolean" office:boolean-value="false" calcext:value-type="boolean">
            <text:p>БРЕХНЯ</text:p>
          </table:table-cell>
          <table:table-cell table:style-name="ce4" table:formula="of:=[.K13]&gt;MAX([.C13];[.E13];[.G13];[.I13])" office:value-type="boolean" office:boolean-value="false" calcext:value-type="boolean">
            <text:p>БРЕХНЯ</text:p>
          </table:table-cell>
          <table:table-cell table:style-name="ce4" table:formula="of:=[.L13]&gt;MAX([.D13];[.F13];[.H13];[.J1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3]&gt;0.9" office:value-type="boolean" office:boolean-value="true" calcext:value-type="boolean">
            <text:p>ІСТИНА</text:p>
          </table:table-cell>
          <table:table-cell table:style-name="ce4" table:formula="of:=[.R13]&gt;0.9" office:value-type="boolean" office:boolean-value="true" calcext:value-type="boolean">
            <text:p>ІСТИНА</text:p>
          </table:table-cell>
          <table:table-cell table:style-name="ce4" table:formula="of:=[.X13]&gt;0.8" office:value-type="boolean" office:boolean-value="true" calcext:value-type="boolean">
            <text:p>ІСТИНА</text:p>
          </table:table-cell>
          <table:table-cell table:style-name="ce4" table:formula="of:=[.R13]&gt;0.8" office:value-type="boolean" office:boolean-value="true" calcext:value-type="boolean">
            <text:p>ІСТИНА</text:p>
          </table:table-cell>
          <table:table-cell table:style-name="ce4" table:formula="of:=[.X13]&gt;0.7" office:value-type="boolean" office:boolean-value="true" calcext:value-type="boolean">
            <text:p>ІСТИНА</text:p>
          </table:table-cell>
          <table:table-cell table:style-name="ce4" table:formula="of:=[.R1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334853" calcext:value-type="float">
            <text:p>9,33E-01</text:p>
          </table:table-cell>
          <table:table-cell table:style-name="ce1" office:value-type="float" office:value="0.8747338" calcext:value-type="float">
            <text:p>8,75E-01</text:p>
          </table:table-cell>
          <table:table-cell table:style-name="ce1" office:value-type="float" office:value="0.9489234" calcext:value-type="float">
            <text:p>9,49E-01</text:p>
          </table:table-cell>
          <table:table-cell table:style-name="ce1" office:value-type="float" office:value="0.9190443" calcext:value-type="float">
            <text:p>9,19E-01</text:p>
          </table:table-cell>
          <table:table-cell table:style-name="ce1" office:value-type="float" office:value="0.9489234" calcext:value-type="float">
            <text:p>9,49E-01</text:p>
          </table:table-cell>
          <table:table-cell table:style-name="ce1" office:value-type="float" office:value="0.9358259" calcext:value-type="float">
            <text:p>9,36E-01</text:p>
          </table:table-cell>
          <table:table-cell table:style-name="ce1" office:value-type="float" office:value="0.9489234" calcext:value-type="float">
            <text:p>9,49E-01</text:p>
          </table:table-cell>
          <table:table-cell table:style-name="ce1" office:value-type="float" office:value="0.9358259" calcext:value-type="float">
            <text:p>9,36E-01</text:p>
          </table:table-cell>
          <table:table-cell table:style-name="ce1" office:value-type="float" office:value="0.9489234" calcext:value-type="float">
            <text:p>9,49E-01</text:p>
          </table:table-cell>
          <table:table-cell table:style-name="ce1" office:value-type="float" office:value="0.9437173" calcext:value-type="float">
            <text:p>9,44E-01</text:p>
          </table:table-cell>
          <table:table-cell/>
          <table:table-cell table:style-name="ce1" table:formula="of:=MAX([.C14];[.E14];[.G14];[.I14];[.K14])" office:value-type="float" office:value="0.9489234" calcext:value-type="float">
            <text:p>9,49E-01</text:p>
          </table:table-cell>
          <table:table-cell table:style-name="ce8" table:formula="of:=MAX([.D14];[.F14];[.H14];[.J14];[.L14])" office:value-type="float" office:value="0.9437173" calcext:value-type="float">
            <text:p>9,44E-01</text:p>
          </table:table-cell>
          <table:table-cell table:style-name="ce1"/>
          <table:table-cell table:style-name="ce1" office:value-type="float" office:value="0.9489234" calcext:value-type="float">
            <text:p>9,49E-01</text:p>
          </table:table-cell>
          <table:table-cell table:style-name="ce1" office:value-type="float" office:value="0.9437173" calcext:value-type="float">
            <text:p>9,44E-01</text:p>
          </table:table-cell>
          <table:table-cell table:style-name="ce4" table:formula="of:=[.Q14]&gt;[.N14]" office:value-type="boolean" office:boolean-value="false" calcext:value-type="boolean">
            <text:p>БРЕХНЯ</text:p>
          </table:table-cell>
          <table:table-cell table:style-name="ce4" table:formula="of:=[.R14]&gt;[.O14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489234" calcext:value-type="float">
            <text:p>9,49E-01</text:p>
          </table:table-cell>
          <table:table-cell table:style-name="ce4" table:formula="of:=[.V14]&gt;[.Q14]" office:value-type="boolean" office:boolean-value="false" calcext:value-type="boolean">
            <text:p>БРЕХНЯ</text:p>
          </table:table-cell>
          <table:table-cell table:style-name="ce1" table:formula="of:=MAX([.V14];[.Q14])" office:value-type="float" office:value="0.9489234" calcext:value-type="float">
            <text:p>9,49E-01</text:p>
          </table:table-cell>
          <table:table-cell table:style-name="ce4" table:formula="of:=[.X14]&gt;[.R14]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E14]&gt;[.C14]" office:value-type="boolean" office:boolean-value="true" calcext:value-type="boolean">
            <text:p>ІСТИНА</text:p>
          </table:table-cell>
          <table:table-cell table:style-name="ce4" table:formula="of:=[.F14]&gt;[.D14]" office:value-type="boolean" office:boolean-value="true" calcext:value-type="boolean">
            <text:p>ІСТИНА</text:p>
          </table:table-cell>
          <table:table-cell table:style-name="ce4" table:formula="of:=[.G14]&gt;MAX([.C14];[.E14])" office:value-type="boolean" office:boolean-value="false" calcext:value-type="boolean">
            <text:p>БРЕХНЯ</text:p>
          </table:table-cell>
          <table:table-cell table:style-name="ce4" table:formula="of:=[.H14]&gt;MAX([.D14];[.F14])" office:value-type="boolean" office:boolean-value="true" calcext:value-type="boolean">
            <text:p>ІСТИНА</text:p>
          </table:table-cell>
          <table:table-cell table:style-name="ce4" table:formula="of:=[.I14]&gt;MAX([.C14];[.E14];[.G14])" office:value-type="boolean" office:boolean-value="false" calcext:value-type="boolean">
            <text:p>БРЕХНЯ</text:p>
          </table:table-cell>
          <table:table-cell table:style-name="ce4" table:formula="of:=[.J14]&gt;MAX([.D14];[.F14];[.H14])" office:value-type="boolean" office:boolean-value="false" calcext:value-type="boolean">
            <text:p>БРЕХНЯ</text:p>
          </table:table-cell>
          <table:table-cell table:style-name="ce4" table:formula="of:=[.K14]&gt;MAX([.C14];[.E14];[.G14];[.I14])" office:value-type="boolean" office:boolean-value="false" calcext:value-type="boolean">
            <text:p>БРЕХНЯ</text:p>
          </table:table-cell>
          <table:table-cell table:style-name="ce4" table:formula="of:=[.L14]&gt;MAX([.D14];[.F14];[.H14];[.J14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14]&gt;0.9" office:value-type="boolean" office:boolean-value="true" calcext:value-type="boolean">
            <text:p>ІСТИНА</text:p>
          </table:table-cell>
          <table:table-cell table:style-name="ce4" table:formula="of:=[.R14]&gt;0.9" office:value-type="boolean" office:boolean-value="true" calcext:value-type="boolean">
            <text:p>ІСТИНА</text:p>
          </table:table-cell>
          <table:table-cell table:style-name="ce4" table:formula="of:=[.X14]&gt;0.8" office:value-type="boolean" office:boolean-value="true" calcext:value-type="boolean">
            <text:p>ІСТИНА</text:p>
          </table:table-cell>
          <table:table-cell table:style-name="ce4" table:formula="of:=[.R14]&gt;0.8" office:value-type="boolean" office:boolean-value="true" calcext:value-type="boolean">
            <text:p>ІСТИНА</text:p>
          </table:table-cell>
          <table:table-cell table:style-name="ce4" table:formula="of:=[.X14]&gt;0.7" office:value-type="boolean" office:boolean-value="true" calcext:value-type="boolean">
            <text:p>ІСТИНА</text:p>
          </table:table-cell>
          <table:table-cell table:style-name="ce4" table:formula="of:=[.R1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315616" calcext:value-type="float">
            <text:p>9,32E-01</text:p>
          </table:table-cell>
          <table:table-cell table:style-name="ce1" office:value-type="float" office:value="0.9216993" calcext:value-type="float">
            <text:p>9,22E-01</text:p>
          </table:table-cell>
          <table:table-cell table:style-name="ce1" office:value-type="float" office:value="0.9315616" calcext:value-type="float">
            <text:p>9,32E-01</text:p>
          </table:table-cell>
          <table:table-cell table:style-name="ce1" office:value-type="float" office:value="0.9226027" calcext:value-type="float">
            <text:p>9,23E-01</text:p>
          </table:table-cell>
          <table:table-cell table:style-name="ce1" office:value-type="float" office:value="0.9315616" calcext:value-type="float">
            <text:p>9,32E-01</text:p>
          </table:table-cell>
          <table:table-cell table:style-name="ce1" office:value-type="float" office:value="0.9307237" calcext:value-type="float">
            <text:p>9,31E-01</text:p>
          </table:table-cell>
          <table:table-cell table:style-name="ce1" office:value-type="float" office:value="0.9468896" calcext:value-type="float">
            <text:p>9,47E-01</text:p>
          </table:table-cell>
          <table:table-cell table:style-name="ce1" office:value-type="float" office:value="0.9307237" calcext:value-type="float">
            <text:p>9,31E-01</text:p>
          </table:table-cell>
          <table:table-cell table:style-name="ce1" office:value-type="float" office:value="0.9468896" calcext:value-type="float">
            <text:p>9,47E-01</text:p>
          </table:table-cell>
          <table:table-cell table:style-name="ce1" office:value-type="float" office:value="0.9307237" calcext:value-type="float">
            <text:p>9,31E-01</text:p>
          </table:table-cell>
          <table:table-cell/>
          <table:table-cell table:style-name="ce1" table:formula="of:=MAX([.C15];[.E15];[.G15];[.I15];[.K15])" office:value-type="float" office:value="0.9468896" calcext:value-type="float">
            <text:p>9,47E-01</text:p>
          </table:table-cell>
          <table:table-cell table:style-name="ce8" table:formula="of:=MAX([.D15];[.F15];[.H15];[.J15];[.L15])" office:value-type="float" office:value="0.9307237" calcext:value-type="float">
            <text:p>9,31E-01</text:p>
          </table:table-cell>
          <table:table-cell table:style-name="ce1"/>
          <table:table-cell table:style-name="ce1" office:value-type="float" office:value="0.9468896" calcext:value-type="float">
            <text:p>9,47E-01</text:p>
          </table:table-cell>
          <table:table-cell table:style-name="ce1" office:value-type="float" office:value="0.9307237" calcext:value-type="float">
            <text:p>9,31E-01</text:p>
          </table:table-cell>
          <table:table-cell table:style-name="ce4" table:formula="of:=[.Q15]&gt;[.N15]" office:value-type="boolean" office:boolean-value="false" calcext:value-type="boolean">
            <text:p>БРЕХНЯ</text:p>
          </table:table-cell>
          <table:table-cell table:style-name="ce4" table:formula="of:=[.R15]&gt;[.O1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468896" calcext:value-type="float">
            <text:p>9,47E-01</text:p>
          </table:table-cell>
          <table:table-cell table:style-name="ce4" table:formula="of:=[.V15]&gt;[.Q15]" office:value-type="boolean" office:boolean-value="false" calcext:value-type="boolean">
            <text:p>БРЕХНЯ</text:p>
          </table:table-cell>
          <table:table-cell table:style-name="ce1" table:formula="of:=MAX([.V15];[.Q15])" office:value-type="float" office:value="0.9468896" calcext:value-type="float">
            <text:p>9,47E-01</text:p>
          </table:table-cell>
          <table:table-cell table:style-name="ce4" table:formula="of:=[.X15]&gt;[.R15]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E15]&gt;[.C15]" office:value-type="boolean" office:boolean-value="false" calcext:value-type="boolean">
            <text:p>БРЕХНЯ</text:p>
          </table:table-cell>
          <table:table-cell table:style-name="ce4" table:formula="of:=[.F15]&gt;[.D15]" office:value-type="boolean" office:boolean-value="true" calcext:value-type="boolean">
            <text:p>ІСТИНА</text:p>
          </table:table-cell>
          <table:table-cell table:style-name="ce4" table:formula="of:=[.G15]&gt;MAX([.C15];[.E15])" office:value-type="boolean" office:boolean-value="false" calcext:value-type="boolean">
            <text:p>БРЕХНЯ</text:p>
          </table:table-cell>
          <table:table-cell table:style-name="ce4" table:formula="of:=[.H15]&gt;MAX([.D15];[.F15])" office:value-type="boolean" office:boolean-value="true" calcext:value-type="boolean">
            <text:p>ІСТИНА</text:p>
          </table:table-cell>
          <table:table-cell table:style-name="ce4" table:formula="of:=[.I15]&gt;MAX([.C15];[.E15];[.G15])" office:value-type="boolean" office:boolean-value="true" calcext:value-type="boolean">
            <text:p>ІСТИНА</text:p>
          </table:table-cell>
          <table:table-cell table:style-name="ce4" table:formula="of:=[.J15]&gt;MAX([.D15];[.F15];[.H15])" office:value-type="boolean" office:boolean-value="false" calcext:value-type="boolean">
            <text:p>БРЕХНЯ</text:p>
          </table:table-cell>
          <table:table-cell table:style-name="ce4" table:formula="of:=[.K15]&gt;MAX([.C15];[.E15];[.G15];[.I15])" office:value-type="boolean" office:boolean-value="false" calcext:value-type="boolean">
            <text:p>БРЕХНЯ</text:p>
          </table:table-cell>
          <table:table-cell table:style-name="ce4" table:formula="of:=[.L15]&gt;MAX([.D15];[.F15];[.H15];[.J1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5]&gt;0.9" office:value-type="boolean" office:boolean-value="true" calcext:value-type="boolean">
            <text:p>ІСТИНА</text:p>
          </table:table-cell>
          <table:table-cell table:style-name="ce4" table:formula="of:=[.R15]&gt;0.9" office:value-type="boolean" office:boolean-value="true" calcext:value-type="boolean">
            <text:p>ІСТИНА</text:p>
          </table:table-cell>
          <table:table-cell table:style-name="ce4" table:formula="of:=[.X15]&gt;0.8" office:value-type="boolean" office:boolean-value="true" calcext:value-type="boolean">
            <text:p>ІСТИНА</text:p>
          </table:table-cell>
          <table:table-cell table:style-name="ce4" table:formula="of:=[.R15]&gt;0.8" office:value-type="boolean" office:boolean-value="true" calcext:value-type="boolean">
            <text:p>ІСТИНА</text:p>
          </table:table-cell>
          <table:table-cell table:style-name="ce4" table:formula="of:=[.X15]&gt;0.7" office:value-type="boolean" office:boolean-value="true" calcext:value-type="boolean">
            <text:p>ІСТИНА</text:p>
          </table:table-cell>
          <table:table-cell table:style-name="ce4" table:formula="of:=[.R1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90144" calcext:value-type="float">
            <text:p>8,39E-01</text:p>
          </table:table-cell>
          <table:table-cell table:style-name="ce1" office:value-type="float" office:value="0.9327447" calcext:value-type="float">
            <text:p>9,33E-01</text:p>
          </table:table-cell>
          <table:table-cell table:style-name="ce1" office:value-type="float" office:value="0.873262" calcext:value-type="float">
            <text:p>8,73E-01</text:p>
          </table:table-cell>
          <table:table-cell table:style-name="ce1" office:value-type="float" office:value="0.9327447" calcext:value-type="float">
            <text:p>9,33E-01</text:p>
          </table:table-cell>
          <table:table-cell table:style-name="ce1" office:value-type="float" office:value="0.9131448" calcext:value-type="float">
            <text:p>9,13E-01</text:p>
          </table:table-cell>
          <table:table-cell table:style-name="ce1" office:value-type="float" office:value="0.9327447" calcext:value-type="float">
            <text:p>9,33E-01</text:p>
          </table:table-cell>
          <table:table-cell table:style-name="ce1" office:value-type="float" office:value="0.9131448" calcext:value-type="float">
            <text:p>9,13E-01</text:p>
          </table:table-cell>
          <table:table-cell table:style-name="ce1" office:value-type="float" office:value="0.9327447" calcext:value-type="float">
            <text:p>9,33E-01</text:p>
          </table:table-cell>
          <table:table-cell table:style-name="ce1" office:value-type="float" office:value="0.9131448" calcext:value-type="float">
            <text:p>9,13E-01</text:p>
          </table:table-cell>
          <table:table-cell table:style-name="ce1" office:value-type="float" office:value="0.9327447" calcext:value-type="float">
            <text:p>9,33E-01</text:p>
          </table:table-cell>
          <table:table-cell/>
          <table:table-cell table:style-name="ce1" table:formula="of:=MAX([.C16];[.E16];[.G16];[.I16];[.K16])" office:value-type="float" office:value="0.9131448" calcext:value-type="float">
            <text:p>9,13E-01</text:p>
          </table:table-cell>
          <table:table-cell table:style-name="ce8" table:formula="of:=MAX([.D16];[.F16];[.H16];[.J16];[.L16])" office:value-type="float" office:value="0.9327447" calcext:value-type="float">
            <text:p>9,33E-01</text:p>
          </table:table-cell>
          <table:table-cell table:style-name="ce1"/>
          <table:table-cell table:style-name="ce1" office:value-type="float" office:value="0.9131448" calcext:value-type="float">
            <text:p>9,13E-01</text:p>
          </table:table-cell>
          <table:table-cell table:style-name="ce1" office:value-type="float" office:value="0.9327447" calcext:value-type="float">
            <text:p>9,33E-01</text:p>
          </table:table-cell>
          <table:table-cell table:style-name="ce4" table:formula="of:=[.Q16]&gt;[.N16]" office:value-type="boolean" office:boolean-value="false" calcext:value-type="boolean">
            <text:p>БРЕХНЯ</text:p>
          </table:table-cell>
          <table:table-cell table:style-name="ce4" table:formula="of:=[.R16]&gt;[.O1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131448" calcext:value-type="float">
            <text:p>9,13E-01</text:p>
          </table:table-cell>
          <table:table-cell table:style-name="ce4" table:formula="of:=[.V16]&gt;[.Q16]" office:value-type="boolean" office:boolean-value="false" calcext:value-type="boolean">
            <text:p>БРЕХНЯ</text:p>
          </table:table-cell>
          <table:table-cell table:style-name="ce1" table:formula="of:=MAX([.V16];[.Q16])" office:value-type="float" office:value="0.9131448" calcext:value-type="float">
            <text:p>9,13E-01</text:p>
          </table:table-cell>
          <table:table-cell table:style-name="ce4" table:formula="of:=[.X16]&gt;[.R1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6]&gt;[.C16]" office:value-type="boolean" office:boolean-value="true" calcext:value-type="boolean">
            <text:p>ІСТИНА</text:p>
          </table:table-cell>
          <table:table-cell table:style-name="ce4" table:formula="of:=[.F16]&gt;[.D16]" office:value-type="boolean" office:boolean-value="false" calcext:value-type="boolean">
            <text:p>БРЕХНЯ</text:p>
          </table:table-cell>
          <table:table-cell table:style-name="ce4" table:formula="of:=[.G16]&gt;MAX([.C16];[.E16])" office:value-type="boolean" office:boolean-value="true" calcext:value-type="boolean">
            <text:p>ІСТИНА</text:p>
          </table:table-cell>
          <table:table-cell table:style-name="ce4" table:formula="of:=[.H16]&gt;MAX([.D16];[.F16])" office:value-type="boolean" office:boolean-value="false" calcext:value-type="boolean">
            <text:p>БРЕХНЯ</text:p>
          </table:table-cell>
          <table:table-cell table:style-name="ce4" table:formula="of:=[.I16]&gt;MAX([.C16];[.E16];[.G16])" office:value-type="boolean" office:boolean-value="false" calcext:value-type="boolean">
            <text:p>БРЕХНЯ</text:p>
          </table:table-cell>
          <table:table-cell table:style-name="ce4" table:formula="of:=[.J16]&gt;MAX([.D16];[.F16];[.H16])" office:value-type="boolean" office:boolean-value="false" calcext:value-type="boolean">
            <text:p>БРЕХНЯ</text:p>
          </table:table-cell>
          <table:table-cell table:style-name="ce4" table:formula="of:=[.K16]&gt;MAX([.C16];[.E16];[.G16];[.I16])" office:value-type="boolean" office:boolean-value="false" calcext:value-type="boolean">
            <text:p>БРЕХНЯ</text:p>
          </table:table-cell>
          <table:table-cell table:style-name="ce4" table:formula="of:=[.L16]&gt;MAX([.D16];[.F16];[.H16];[.J1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6]&gt;0.9" office:value-type="boolean" office:boolean-value="true" calcext:value-type="boolean">
            <text:p>ІСТИНА</text:p>
          </table:table-cell>
          <table:table-cell table:style-name="ce4" table:formula="of:=[.R16]&gt;0.9" office:value-type="boolean" office:boolean-value="true" calcext:value-type="boolean">
            <text:p>ІСТИНА</text:p>
          </table:table-cell>
          <table:table-cell table:style-name="ce4" table:formula="of:=[.X16]&gt;0.8" office:value-type="boolean" office:boolean-value="true" calcext:value-type="boolean">
            <text:p>ІСТИНА</text:p>
          </table:table-cell>
          <table:table-cell table:style-name="ce4" table:formula="of:=[.R16]&gt;0.8" office:value-type="boolean" office:boolean-value="true" calcext:value-type="boolean">
            <text:p>ІСТИНА</text:p>
          </table:table-cell>
          <table:table-cell table:style-name="ce4" table:formula="of:=[.X16]&gt;0.7" office:value-type="boolean" office:boolean-value="true" calcext:value-type="boolean">
            <text:p>ІСТИНА</text:p>
          </table:table-cell>
          <table:table-cell table:style-name="ce4" table:formula="of:=[.R1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8146517" calcext:value-type="float">
            <text:p>8,15E-01</text:p>
          </table:table-cell>
          <table:table-cell table:style-name="ce1" office:value-type="float" office:value="0.7508667" calcext:value-type="float">
            <text:p>7,51E-01</text:p>
          </table:table-cell>
          <table:table-cell table:style-name="ce1" office:value-type="float" office:value="0.8146517" calcext:value-type="float">
            <text:p>8,15E-01</text:p>
          </table:table-cell>
          <table:table-cell table:style-name="ce1" office:value-type="float" office:value="0.8412797" calcext:value-type="float">
            <text:p>8,41E-01</text:p>
          </table:table-cell>
          <table:table-cell table:style-name="ce1" office:value-type="float" office:value="0.8146517" calcext:value-type="float">
            <text:p>8,15E-01</text:p>
          </table:table-cell>
          <table:table-cell table:style-name="ce1" office:value-type="float" office:value="0.8432199" calcext:value-type="float">
            <text:p>8,43E-01</text:p>
          </table:table-cell>
          <table:table-cell table:style-name="ce1" office:value-type="float" office:value="0.8146517" calcext:value-type="float">
            <text:p>8,15E-01</text:p>
          </table:table-cell>
          <table:table-cell table:style-name="ce1" office:value-type="float" office:value="0.8586381" calcext:value-type="float">
            <text:p>8,59E-01</text:p>
          </table:table-cell>
          <table:table-cell table:style-name="ce1" office:value-type="float" office:value="0.8146517" calcext:value-type="float">
            <text:p>8,15E-01</text:p>
          </table:table-cell>
          <table:table-cell table:style-name="ce1" office:value-type="float" office:value="0.864908" calcext:value-type="float">
            <text:p>8,65E-01</text:p>
          </table:table-cell>
          <table:table-cell/>
          <table:table-cell table:style-name="ce1" table:formula="of:=MAX([.C17];[.E17];[.G17];[.I17];[.K17])" office:value-type="float" office:value="0.8146517" calcext:value-type="float">
            <text:p>8,15E-01</text:p>
          </table:table-cell>
          <table:table-cell table:style-name="ce8" table:formula="of:=MAX([.D17];[.F17];[.H17];[.J17];[.L17])" office:value-type="float" office:value="0.864908" calcext:value-type="float">
            <text:p>8,65E-01</text:p>
          </table:table-cell>
          <table:table-cell table:style-name="ce1"/>
          <table:table-cell table:style-name="ce1" office:value-type="float" office:value="0.8146517" calcext:value-type="float">
            <text:p>8,15E-01</text:p>
          </table:table-cell>
          <table:table-cell table:style-name="ce1" office:value-type="float" office:value="0.864908" calcext:value-type="float">
            <text:p>8,65E-01</text:p>
          </table:table-cell>
          <table:table-cell table:style-name="ce4" table:formula="of:=[.Q17]&gt;[.N17]" office:value-type="boolean" office:boolean-value="false" calcext:value-type="boolean">
            <text:p>БРЕХНЯ</text:p>
          </table:table-cell>
          <table:table-cell table:style-name="ce4" table:formula="of:=[.R17]&gt;[.O1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146517" calcext:value-type="float">
            <text:p>8,15E-01</text:p>
          </table:table-cell>
          <table:table-cell table:style-name="ce4" table:formula="of:=[.V17]&gt;[.Q17]" office:value-type="boolean" office:boolean-value="false" calcext:value-type="boolean">
            <text:p>БРЕХНЯ</text:p>
          </table:table-cell>
          <table:table-cell table:style-name="ce1" table:formula="of:=MAX([.V17];[.Q17])" office:value-type="float" office:value="0.8146517" calcext:value-type="float">
            <text:p>8,15E-01</text:p>
          </table:table-cell>
          <table:table-cell table:style-name="ce4" table:formula="of:=[.X17]&gt;[.R1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7]&gt;[.C17]" office:value-type="boolean" office:boolean-value="false" calcext:value-type="boolean">
            <text:p>БРЕХНЯ</text:p>
          </table:table-cell>
          <table:table-cell table:style-name="ce4" table:formula="of:=[.F17]&gt;[.D17]" office:value-type="boolean" office:boolean-value="true" calcext:value-type="boolean">
            <text:p>ІСТИНА</text:p>
          </table:table-cell>
          <table:table-cell table:style-name="ce4" table:formula="of:=[.G17]&gt;MAX([.C17];[.E17])" office:value-type="boolean" office:boolean-value="false" calcext:value-type="boolean">
            <text:p>БРЕХНЯ</text:p>
          </table:table-cell>
          <table:table-cell table:style-name="ce4" table:formula="of:=[.H17]&gt;MAX([.D17];[.F17])" office:value-type="boolean" office:boolean-value="true" calcext:value-type="boolean">
            <text:p>ІСТИНА</text:p>
          </table:table-cell>
          <table:table-cell table:style-name="ce4" table:formula="of:=[.I17]&gt;MAX([.C17];[.E17];[.G17])" office:value-type="boolean" office:boolean-value="false" calcext:value-type="boolean">
            <text:p>БРЕХНЯ</text:p>
          </table:table-cell>
          <table:table-cell table:style-name="ce4" table:formula="of:=[.J17]&gt;MAX([.D17];[.F17];[.H17])" office:value-type="boolean" office:boolean-value="true" calcext:value-type="boolean">
            <text:p>ІСТИНА</text:p>
          </table:table-cell>
          <table:table-cell table:style-name="ce4" table:formula="of:=[.K17]&gt;MAX([.C17];[.E17];[.G17];[.I17])" office:value-type="boolean" office:boolean-value="false" calcext:value-type="boolean">
            <text:p>БРЕХНЯ</text:p>
          </table:table-cell>
          <table:table-cell table:style-name="ce4" table:formula="of:=[.L17]&gt;MAX([.D17];[.F17];[.H17];[.J17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17]&gt;0.9" office:value-type="boolean" office:boolean-value="false" calcext:value-type="boolean">
            <text:p>БРЕХНЯ</text:p>
          </table:table-cell>
          <table:table-cell table:style-name="ce4" table:formula="of:=[.R17]&gt;0.9" office:value-type="boolean" office:boolean-value="false" calcext:value-type="boolean">
            <text:p>БРЕХНЯ</text:p>
          </table:table-cell>
          <table:table-cell table:style-name="ce4" table:formula="of:=[.X17]&gt;0.8" office:value-type="boolean" office:boolean-value="true" calcext:value-type="boolean">
            <text:p>ІСТИНА</text:p>
          </table:table-cell>
          <table:table-cell table:style-name="ce4" table:formula="of:=[.R17]&gt;0.8" office:value-type="boolean" office:boolean-value="true" calcext:value-type="boolean">
            <text:p>ІСТИНА</text:p>
          </table:table-cell>
          <table:table-cell table:style-name="ce4" table:formula="of:=[.X17]&gt;0.7" office:value-type="boolean" office:boolean-value="true" calcext:value-type="boolean">
            <text:p>ІСТИНА</text:p>
          </table:table-cell>
          <table:table-cell table:style-name="ce4" table:formula="of:=[.R1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7025907" calcext:value-type="float">
            <text:p>7,03E-01</text:p>
          </table:table-cell>
          <table:table-cell table:style-name="ce1" office:value-type="float" office:value="0.8803029" calcext:value-type="float">
            <text:p>8,80E-01</text:p>
          </table:table-cell>
          <table:table-cell table:style-name="ce1" office:value-type="float" office:value="0.7025907" calcext:value-type="float">
            <text:p>7,03E-01</text:p>
          </table:table-cell>
          <table:table-cell table:style-name="ce1" office:value-type="float" office:value="0.8924376" calcext:value-type="float">
            <text:p>8,92E-01</text:p>
          </table:table-cell>
          <table:table-cell table:style-name="ce1" office:value-type="float" office:value="0.7025907" calcext:value-type="float">
            <text:p>7,03E-01</text:p>
          </table:table-cell>
          <table:table-cell table:style-name="ce1" office:value-type="float" office:value="0.8924376" calcext:value-type="float">
            <text:p>8,92E-01</text:p>
          </table:table-cell>
          <table:table-cell table:style-name="ce1" office:value-type="float" office:value="0.7025907" calcext:value-type="float">
            <text:p>7,03E-01</text:p>
          </table:table-cell>
          <table:table-cell table:style-name="ce1" office:value-type="float" office:value="0.8924376" calcext:value-type="float">
            <text:p>8,92E-01</text:p>
          </table:table-cell>
          <table:table-cell table:style-name="ce1" office:value-type="float" office:value="0.7371706" calcext:value-type="float">
            <text:p>7,37E-01</text:p>
          </table:table-cell>
          <table:table-cell table:style-name="ce1" office:value-type="float" office:value="0.8924376" calcext:value-type="float">
            <text:p>8,92E-01</text:p>
          </table:table-cell>
          <table:table-cell/>
          <table:table-cell table:style-name="ce1" table:formula="of:=MAX([.C18];[.E18];[.G18];[.I18];[.K18])" office:value-type="float" office:value="0.7371706" calcext:value-type="float">
            <text:p>7,37E-01</text:p>
          </table:table-cell>
          <table:table-cell table:style-name="ce8" table:formula="of:=MAX([.D18];[.F18];[.H18];[.J18];[.L18])" office:value-type="float" office:value="0.8924376" calcext:value-type="float">
            <text:p>8,92E-01</text:p>
          </table:table-cell>
          <table:table-cell table:style-name="ce1"/>
          <table:table-cell table:style-name="ce1" office:value-type="float" office:value="0.7371706" calcext:value-type="float">
            <text:p>7,37E-01</text:p>
          </table:table-cell>
          <table:table-cell table:style-name="ce1" office:value-type="float" office:value="0.8924376" calcext:value-type="float">
            <text:p>8,92E-01</text:p>
          </table:table-cell>
          <table:table-cell table:style-name="ce4" table:formula="of:=[.Q18]&gt;[.N18]" office:value-type="boolean" office:boolean-value="false" calcext:value-type="boolean">
            <text:p>БРЕХНЯ</text:p>
          </table:table-cell>
          <table:table-cell table:style-name="ce4" table:formula="of:=[.R18]&gt;[.O1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618529" calcext:value-type="float">
            <text:p>7,62E-01</text:p>
          </table:table-cell>
          <table:table-cell table:style-name="ce4" table:formula="of:=[.V18]&gt;[.Q18]" office:value-type="boolean" office:boolean-value="true" calcext:value-type="boolean">
            <text:p>ІСТИНА</text:p>
          </table:table-cell>
          <table:table-cell table:style-name="ce1" table:formula="of:=MAX([.V18];[.Q18])" office:value-type="float" office:value="0.7618529" calcext:value-type="float">
            <text:p>7,62E-01</text:p>
          </table:table-cell>
          <table:table-cell table:style-name="ce4" table:formula="of:=[.X18]&gt;[.R1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8]&gt;[.C18]" office:value-type="boolean" office:boolean-value="false" calcext:value-type="boolean">
            <text:p>БРЕХНЯ</text:p>
          </table:table-cell>
          <table:table-cell table:style-name="ce4" table:formula="of:=[.F18]&gt;[.D18]" office:value-type="boolean" office:boolean-value="true" calcext:value-type="boolean">
            <text:p>ІСТИНА</text:p>
          </table:table-cell>
          <table:table-cell table:style-name="ce4" table:formula="of:=[.G18]&gt;MAX([.C18];[.E18])" office:value-type="boolean" office:boolean-value="false" calcext:value-type="boolean">
            <text:p>БРЕХНЯ</text:p>
          </table:table-cell>
          <table:table-cell table:style-name="ce4" table:formula="of:=[.H18]&gt;MAX([.D18];[.F18])" office:value-type="boolean" office:boolean-value="false" calcext:value-type="boolean">
            <text:p>БРЕХНЯ</text:p>
          </table:table-cell>
          <table:table-cell table:style-name="ce4" table:formula="of:=[.I18]&gt;MAX([.C18];[.E18];[.G18])" office:value-type="boolean" office:boolean-value="false" calcext:value-type="boolean">
            <text:p>БРЕХНЯ</text:p>
          </table:table-cell>
          <table:table-cell table:style-name="ce4" table:formula="of:=[.J18]&gt;MAX([.D18];[.F18];[.H18])" office:value-type="boolean" office:boolean-value="false" calcext:value-type="boolean">
            <text:p>БРЕХНЯ</text:p>
          </table:table-cell>
          <table:table-cell table:style-name="ce4" table:formula="of:=[.K18]&gt;MAX([.C18];[.E18];[.G18];[.I18])" office:value-type="boolean" office:boolean-value="true" calcext:value-type="boolean">
            <text:p>ІСТИНА</text:p>
          </table:table-cell>
          <table:table-cell table:style-name="ce4" table:formula="of:=[.L18]&gt;MAX([.D18];[.F18];[.H18];[.J1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8]&gt;0.9" office:value-type="boolean" office:boolean-value="false" calcext:value-type="boolean">
            <text:p>БРЕХНЯ</text:p>
          </table:table-cell>
          <table:table-cell table:style-name="ce4" table:formula="of:=[.R18]&gt;0.9" office:value-type="boolean" office:boolean-value="false" calcext:value-type="boolean">
            <text:p>БРЕХНЯ</text:p>
          </table:table-cell>
          <table:table-cell table:style-name="ce4" table:formula="of:=[.X18]&gt;0.8" office:value-type="boolean" office:boolean-value="false" calcext:value-type="boolean">
            <text:p>БРЕХНЯ</text:p>
          </table:table-cell>
          <table:table-cell table:style-name="ce4" table:formula="of:=[.R18]&gt;0.8" office:value-type="boolean" office:boolean-value="true" calcext:value-type="boolean">
            <text:p>ІСТИНА</text:p>
          </table:table-cell>
          <table:table-cell table:style-name="ce4" table:formula="of:=[.X18]&gt;0.7" office:value-type="boolean" office:boolean-value="true" calcext:value-type="boolean">
            <text:p>ІСТИНА</text:p>
          </table:table-cell>
          <table:table-cell table:style-name="ce4" table:formula="of:=[.R1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7457167" calcext:value-type="float">
            <text:p>7,46E-01</text:p>
          </table:table-cell>
          <table:table-cell table:style-name="ce1" office:value-type="float" office:value="0.8688292" calcext:value-type="float">
            <text:p>8,69E-01</text:p>
          </table:table-cell>
          <table:table-cell table:style-name="ce1" office:value-type="float" office:value="0.7457167" calcext:value-type="float">
            <text:p>7,46E-01</text:p>
          </table:table-cell>
          <table:table-cell table:style-name="ce1" office:value-type="float" office:value="0.897885" calcext:value-type="float">
            <text:p>8,98E-01</text:p>
          </table:table-cell>
          <table:table-cell table:style-name="ce1" office:value-type="float" office:value="0.7532542" calcext:value-type="float">
            <text:p>7,53E-01</text:p>
          </table:table-cell>
          <table:table-cell table:style-name="ce1" office:value-type="float" office:value="0.897885" calcext:value-type="float">
            <text:p>8,98E-01</text:p>
          </table:table-cell>
          <table:table-cell table:style-name="ce1" office:value-type="float" office:value="0.7532542" calcext:value-type="float">
            <text:p>7,53E-01</text:p>
          </table:table-cell>
          <table:table-cell table:style-name="ce1" office:value-type="float" office:value="0.897885" calcext:value-type="float">
            <text:p>8,98E-01</text:p>
          </table:table-cell>
          <table:table-cell table:style-name="ce1" office:value-type="float" office:value="0.762306" calcext:value-type="float">
            <text:p>7,62E-01</text:p>
          </table:table-cell>
          <table:table-cell table:style-name="ce1" office:value-type="float" office:value="0.897885" calcext:value-type="float">
            <text:p>8,98E-01</text:p>
          </table:table-cell>
          <table:table-cell/>
          <table:table-cell table:style-name="ce1" table:formula="of:=MAX([.C19];[.E19];[.G19];[.I19];[.K19])" office:value-type="float" office:value="0.762306" calcext:value-type="float">
            <text:p>7,62E-01</text:p>
          </table:table-cell>
          <table:table-cell table:style-name="ce8" table:formula="of:=MAX([.D19];[.F19];[.H19];[.J19];[.L19])" office:value-type="float" office:value="0.897885" calcext:value-type="float">
            <text:p>8,98E-01</text:p>
          </table:table-cell>
          <table:table-cell table:style-name="ce2"/>
          <table:table-cell table:style-name="ce1" office:value-type="float" office:value="0.7825234" calcext:value-type="float">
            <text:p>7,83E-01</text:p>
          </table:table-cell>
          <table:table-cell table:style-name="ce1" office:value-type="float" office:value="0.897885" calcext:value-type="float">
            <text:p>8,98E-01</text:p>
          </table:table-cell>
          <table:table-cell table:style-name="ce4" table:formula="of:=[.Q19]&gt;[.N19]" office:value-type="boolean" office:boolean-value="true" calcext:value-type="boolean">
            <text:p>ІСТИНА</text:p>
          </table:table-cell>
          <table:table-cell table:style-name="ce4" table:formula="of:=[.R19]&gt;[.O19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25234" calcext:value-type="float">
            <text:p>7,83E-01</text:p>
          </table:table-cell>
          <table:table-cell table:style-name="ce4" table:formula="of:=[.V19]&gt;[.Q19]" office:value-type="boolean" office:boolean-value="false" calcext:value-type="boolean">
            <text:p>БРЕХНЯ</text:p>
          </table:table-cell>
          <table:table-cell table:style-name="ce1" table:formula="of:=MAX([.V19];[.Q19])" office:value-type="float" office:value="0.7825234" calcext:value-type="float">
            <text:p>7,83E-01</text:p>
          </table:table-cell>
          <table:table-cell table:style-name="ce4" table:formula="of:=[.X19]&gt;[.R1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9]&gt;[.C19]" office:value-type="boolean" office:boolean-value="false" calcext:value-type="boolean">
            <text:p>БРЕХНЯ</text:p>
          </table:table-cell>
          <table:table-cell table:style-name="ce4" table:formula="of:=[.F19]&gt;[.D19]" office:value-type="boolean" office:boolean-value="true" calcext:value-type="boolean">
            <text:p>ІСТИНА</text:p>
          </table:table-cell>
          <table:table-cell table:style-name="ce4" table:formula="of:=[.G19]&gt;MAX([.C19];[.E19])" office:value-type="boolean" office:boolean-value="true" calcext:value-type="boolean">
            <text:p>ІСТИНА</text:p>
          </table:table-cell>
          <table:table-cell table:style-name="ce4" table:formula="of:=[.H19]&gt;MAX([.D19];[.F19])" office:value-type="boolean" office:boolean-value="false" calcext:value-type="boolean">
            <text:p>БРЕХНЯ</text:p>
          </table:table-cell>
          <table:table-cell table:style-name="ce4" table:formula="of:=[.I19]&gt;MAX([.C19];[.E19];[.G19])" office:value-type="boolean" office:boolean-value="false" calcext:value-type="boolean">
            <text:p>БРЕХНЯ</text:p>
          </table:table-cell>
          <table:table-cell table:style-name="ce4" table:formula="of:=[.J19]&gt;MAX([.D19];[.F19];[.H19])" office:value-type="boolean" office:boolean-value="false" calcext:value-type="boolean">
            <text:p>БРЕХНЯ</text:p>
          </table:table-cell>
          <table:table-cell table:style-name="ce4" table:formula="of:=[.K19]&gt;MAX([.C19];[.E19];[.G19];[.I19])" office:value-type="boolean" office:boolean-value="true" calcext:value-type="boolean">
            <text:p>ІСТИНА</text:p>
          </table:table-cell>
          <table:table-cell table:style-name="ce4" table:formula="of:=[.L19]&gt;MAX([.D19];[.F19];[.H19];[.J1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9]&gt;0.9" office:value-type="boolean" office:boolean-value="false" calcext:value-type="boolean">
            <text:p>БРЕХНЯ</text:p>
          </table:table-cell>
          <table:table-cell table:style-name="ce4" table:formula="of:=[.R19]&gt;0.9" office:value-type="boolean" office:boolean-value="false" calcext:value-type="boolean">
            <text:p>БРЕХНЯ</text:p>
          </table:table-cell>
          <table:table-cell table:style-name="ce4" table:formula="of:=[.X19]&gt;0.8" office:value-type="boolean" office:boolean-value="false" calcext:value-type="boolean">
            <text:p>БРЕХНЯ</text:p>
          </table:table-cell>
          <table:table-cell table:style-name="ce4" table:formula="of:=[.R19]&gt;0.8" office:value-type="boolean" office:boolean-value="true" calcext:value-type="boolean">
            <text:p>ІСТИНА</text:p>
          </table:table-cell>
          <table:table-cell table:style-name="ce4" table:formula="of:=[.X19]&gt;0.7" office:value-type="boolean" office:boolean-value="true" calcext:value-type="boolean">
            <text:p>ІСТИНА</text:p>
          </table:table-cell>
          <table:table-cell table:style-name="ce4" table:formula="of:=[.R1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6723527" calcext:value-type="float">
            <text:p>6,72E-01</text:p>
          </table:table-cell>
          <table:table-cell table:style-name="ce1" office:value-type="float" office:value="0.8890833" calcext:value-type="float">
            <text:p>8,89E-01</text:p>
          </table:table-cell>
          <table:table-cell table:style-name="ce1" office:value-type="float" office:value="0.7595004" calcext:value-type="float">
            <text:p>7,60E-01</text:p>
          </table:table-cell>
          <table:table-cell table:style-name="ce1" office:value-type="float" office:value="0.8890833" calcext:value-type="float">
            <text:p>8,89E-01</text:p>
          </table:table-cell>
          <table:table-cell table:style-name="ce1" office:value-type="float" office:value="0.7595004" calcext:value-type="float">
            <text:p>7,60E-01</text:p>
          </table:table-cell>
          <table:table-cell table:style-name="ce1" office:value-type="float" office:value="0.8890833" calcext:value-type="float">
            <text:p>8,89E-01</text:p>
          </table:table-cell>
          <table:table-cell table:style-name="ce1" office:value-type="float" office:value="0.7595004" calcext:value-type="float">
            <text:p>7,60E-01</text:p>
          </table:table-cell>
          <table:table-cell table:style-name="ce1" office:value-type="float" office:value="0.8890833" calcext:value-type="float">
            <text:p>8,89E-01</text:p>
          </table:table-cell>
          <table:table-cell table:style-name="ce1" office:value-type="float" office:value="0.7595004" calcext:value-type="float">
            <text:p>7,60E-01</text:p>
          </table:table-cell>
          <table:table-cell table:style-name="ce1" office:value-type="float" office:value="0.8890833" calcext:value-type="float">
            <text:p>8,89E-01</text:p>
          </table:table-cell>
          <table:table-cell/>
          <table:table-cell table:style-name="ce1" table:formula="of:=MAX([.C20];[.E20];[.G20];[.I20];[.K20])" office:value-type="float" office:value="0.7595004" calcext:value-type="float">
            <text:p>7,60E-01</text:p>
          </table:table-cell>
          <table:table-cell table:style-name="ce8" table:formula="of:=MAX([.D20];[.F20];[.H20];[.J20];[.L20])" office:value-type="float" office:value="0.8890833" calcext:value-type="float">
            <text:p>8,89E-01</text:p>
          </table:table-cell>
          <table:table-cell table:style-name="ce1"/>
          <table:table-cell table:style-name="ce1" office:value-type="float" office:value="0.7595004" calcext:value-type="float">
            <text:p>7,60E-01</text:p>
          </table:table-cell>
          <table:table-cell table:style-name="ce1" office:value-type="float" office:value="0.8890833" calcext:value-type="float">
            <text:p>8,89E-01</text:p>
          </table:table-cell>
          <table:table-cell table:style-name="ce4" table:formula="of:=[.Q20]&gt;[.N20]" office:value-type="boolean" office:boolean-value="false" calcext:value-type="boolean">
            <text:p>БРЕХНЯ</text:p>
          </table:table-cell>
          <table:table-cell table:style-name="ce4" table:formula="of:=[.R20]&gt;[.O2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95004" calcext:value-type="float">
            <text:p>7,60E-01</text:p>
          </table:table-cell>
          <table:table-cell table:style-name="ce4" table:formula="of:=[.V20]&gt;[.Q20]" office:value-type="boolean" office:boolean-value="false" calcext:value-type="boolean">
            <text:p>БРЕХНЯ</text:p>
          </table:table-cell>
          <table:table-cell table:style-name="ce1" table:formula="of:=MAX([.V20];[.Q20])" office:value-type="float" office:value="0.7595004" calcext:value-type="float">
            <text:p>7,60E-01</text:p>
          </table:table-cell>
          <table:table-cell table:style-name="ce4" table:formula="of:=[.X20]&gt;[.R2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0]&gt;[.C20]" office:value-type="boolean" office:boolean-value="true" calcext:value-type="boolean">
            <text:p>ІСТИНА</text:p>
          </table:table-cell>
          <table:table-cell table:style-name="ce4" table:formula="of:=[.F20]&gt;[.D20]" office:value-type="boolean" office:boolean-value="false" calcext:value-type="boolean">
            <text:p>БРЕХНЯ</text:p>
          </table:table-cell>
          <table:table-cell table:style-name="ce4" table:formula="of:=[.G20]&gt;MAX([.C20];[.E20])" office:value-type="boolean" office:boolean-value="false" calcext:value-type="boolean">
            <text:p>БРЕХНЯ</text:p>
          </table:table-cell>
          <table:table-cell table:style-name="ce4" table:formula="of:=[.H20]&gt;MAX([.D20];[.F20])" office:value-type="boolean" office:boolean-value="false" calcext:value-type="boolean">
            <text:p>БРЕХНЯ</text:p>
          </table:table-cell>
          <table:table-cell table:style-name="ce4" table:formula="of:=[.I20]&gt;MAX([.C20];[.E20];[.G20])" office:value-type="boolean" office:boolean-value="false" calcext:value-type="boolean">
            <text:p>БРЕХНЯ</text:p>
          </table:table-cell>
          <table:table-cell table:style-name="ce4" table:formula="of:=[.J20]&gt;MAX([.D20];[.F20];[.H20])" office:value-type="boolean" office:boolean-value="false" calcext:value-type="boolean">
            <text:p>БРЕХНЯ</text:p>
          </table:table-cell>
          <table:table-cell table:style-name="ce4" table:formula="of:=[.K20]&gt;MAX([.C20];[.E20];[.G20];[.I20])" office:value-type="boolean" office:boolean-value="false" calcext:value-type="boolean">
            <text:p>БРЕХНЯ</text:p>
          </table:table-cell>
          <table:table-cell table:style-name="ce4" table:formula="of:=[.L20]&gt;MAX([.D20];[.F20];[.H20];[.J2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0]&gt;0.9" office:value-type="boolean" office:boolean-value="false" calcext:value-type="boolean">
            <text:p>БРЕХНЯ</text:p>
          </table:table-cell>
          <table:table-cell table:style-name="ce4" table:formula="of:=[.R20]&gt;0.9" office:value-type="boolean" office:boolean-value="false" calcext:value-type="boolean">
            <text:p>БРЕХНЯ</text:p>
          </table:table-cell>
          <table:table-cell table:style-name="ce4" table:formula="of:=[.X20]&gt;0.8" office:value-type="boolean" office:boolean-value="false" calcext:value-type="boolean">
            <text:p>БРЕХНЯ</text:p>
          </table:table-cell>
          <table:table-cell table:style-name="ce4" table:formula="of:=[.R20]&gt;0.8" office:value-type="boolean" office:boolean-value="true" calcext:value-type="boolean">
            <text:p>ІСТИНА</text:p>
          </table:table-cell>
          <table:table-cell table:style-name="ce4" table:formula="of:=[.X20]&gt;0.7" office:value-type="boolean" office:boolean-value="true" calcext:value-type="boolean">
            <text:p>ІСТИНА</text:p>
          </table:table-cell>
          <table:table-cell table:style-name="ce4" table:formula="of:=[.R2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7867722" calcext:value-type="float">
            <text:p>7,87E-01</text:p>
          </table:table-cell>
          <table:table-cell table:style-name="ce1" office:value-type="float" office:value="0.8638458" calcext:value-type="float">
            <text:p>8,64E-01</text:p>
          </table:table-cell>
          <table:table-cell table:style-name="ce1" office:value-type="float" office:value="0.7867722" calcext:value-type="float">
            <text:p>7,87E-01</text:p>
          </table:table-cell>
          <table:table-cell table:style-name="ce1" office:value-type="float" office:value="0.8638458" calcext:value-type="float">
            <text:p>8,64E-01</text:p>
          </table:table-cell>
          <table:table-cell table:style-name="ce1" office:value-type="float" office:value="0.7867722" calcext:value-type="float">
            <text:p>7,87E-01</text:p>
          </table:table-cell>
          <table:table-cell table:style-name="ce1" office:value-type="float" office:value="0.8638458" calcext:value-type="float">
            <text:p>8,64E-01</text:p>
          </table:table-cell>
          <table:table-cell table:style-name="ce1" office:value-type="float" office:value="0.7867722" calcext:value-type="float">
            <text:p>7,87E-01</text:p>
          </table:table-cell>
          <table:table-cell table:style-name="ce1" office:value-type="float" office:value="0.8638458" calcext:value-type="float">
            <text:p>8,64E-01</text:p>
          </table:table-cell>
          <table:table-cell table:style-name="ce1" office:value-type="float" office:value="0.7867722" calcext:value-type="float">
            <text:p>7,87E-01</text:p>
          </table:table-cell>
          <table:table-cell table:style-name="ce1" office:value-type="float" office:value="0.8638458" calcext:value-type="float">
            <text:p>8,64E-01</text:p>
          </table:table-cell>
          <table:table-cell/>
          <table:table-cell table:style-name="ce1" table:formula="of:=MAX([.C21];[.E21];[.G21];[.I21];[.K21])" office:value-type="float" office:value="0.7867722" calcext:value-type="float">
            <text:p>7,87E-01</text:p>
          </table:table-cell>
          <table:table-cell table:style-name="ce8" table:formula="of:=MAX([.D21];[.F21];[.H21];[.J21];[.L21])" office:value-type="float" office:value="0.8638458" calcext:value-type="float">
            <text:p>8,64E-01</text:p>
          </table:table-cell>
          <table:table-cell table:style-name="ce1"/>
          <table:table-cell table:style-name="ce1" office:value-type="float" office:value="0.7947993" calcext:value-type="float">
            <text:p>7,95E-01</text:p>
          </table:table-cell>
          <table:table-cell table:style-name="ce1" office:value-type="float" office:value="0.8638458" calcext:value-type="float">
            <text:p>8,64E-01</text:p>
          </table:table-cell>
          <table:table-cell table:style-name="ce4" table:formula="of:=[.Q21]&gt;[.N21]" office:value-type="boolean" office:boolean-value="true" calcext:value-type="boolean">
            <text:p>ІСТИНА</text:p>
          </table:table-cell>
          <table:table-cell table:style-name="ce4" table:formula="of:=[.R21]&gt;[.O2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947993" calcext:value-type="float">
            <text:p>7,95E-01</text:p>
          </table:table-cell>
          <table:table-cell table:style-name="ce4" table:formula="of:=[.V21]&gt;[.Q21]" office:value-type="boolean" office:boolean-value="false" calcext:value-type="boolean">
            <text:p>БРЕХНЯ</text:p>
          </table:table-cell>
          <table:table-cell table:style-name="ce1" table:formula="of:=MAX([.V21];[.Q21])" office:value-type="float" office:value="0.7947993" calcext:value-type="float">
            <text:p>7,95E-01</text:p>
          </table:table-cell>
          <table:table-cell table:style-name="ce4" table:formula="of:=[.X21]&gt;[.R2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1]&gt;[.C21]" office:value-type="boolean" office:boolean-value="false" calcext:value-type="boolean">
            <text:p>БРЕХНЯ</text:p>
          </table:table-cell>
          <table:table-cell table:style-name="ce4" table:formula="of:=[.F21]&gt;[.D21]" office:value-type="boolean" office:boolean-value="false" calcext:value-type="boolean">
            <text:p>БРЕХНЯ</text:p>
          </table:table-cell>
          <table:table-cell table:style-name="ce4" table:formula="of:=[.G21]&gt;MAX([.C21];[.E21])" office:value-type="boolean" office:boolean-value="false" calcext:value-type="boolean">
            <text:p>БРЕХНЯ</text:p>
          </table:table-cell>
          <table:table-cell table:style-name="ce4" table:formula="of:=[.H21]&gt;MAX([.D21];[.F21])" office:value-type="boolean" office:boolean-value="false" calcext:value-type="boolean">
            <text:p>БРЕХНЯ</text:p>
          </table:table-cell>
          <table:table-cell table:style-name="ce4" table:formula="of:=[.I21]&gt;MAX([.C21];[.E21];[.G21])" office:value-type="boolean" office:boolean-value="false" calcext:value-type="boolean">
            <text:p>БРЕХНЯ</text:p>
          </table:table-cell>
          <table:table-cell table:style-name="ce4" table:formula="of:=[.J21]&gt;MAX([.D21];[.F21];[.H21])" office:value-type="boolean" office:boolean-value="false" calcext:value-type="boolean">
            <text:p>БРЕХНЯ</text:p>
          </table:table-cell>
          <table:table-cell table:style-name="ce4" table:formula="of:=[.K21]&gt;MAX([.C21];[.E21];[.G21];[.I21])" office:value-type="boolean" office:boolean-value="false" calcext:value-type="boolean">
            <text:p>БРЕХНЯ</text:p>
          </table:table-cell>
          <table:table-cell table:style-name="ce4" table:formula="of:=[.L21]&gt;MAX([.D21];[.F21];[.H21];[.J2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1]&gt;0.9" office:value-type="boolean" office:boolean-value="false" calcext:value-type="boolean">
            <text:p>БРЕХНЯ</text:p>
          </table:table-cell>
          <table:table-cell table:style-name="ce4" table:formula="of:=[.R21]&gt;0.9" office:value-type="boolean" office:boolean-value="false" calcext:value-type="boolean">
            <text:p>БРЕХНЯ</text:p>
          </table:table-cell>
          <table:table-cell table:style-name="ce4" table:formula="of:=[.X21]&gt;0.8" office:value-type="boolean" office:boolean-value="false" calcext:value-type="boolean">
            <text:p>БРЕХНЯ</text:p>
          </table:table-cell>
          <table:table-cell table:style-name="ce4" table:formula="of:=[.R21]&gt;0.8" office:value-type="boolean" office:boolean-value="true" calcext:value-type="boolean">
            <text:p>ІСТИНА</text:p>
          </table:table-cell>
          <table:table-cell table:style-name="ce4" table:formula="of:=[.X21]&gt;0.7" office:value-type="boolean" office:boolean-value="true" calcext:value-type="boolean">
            <text:p>ІСТИНА</text:p>
          </table:table-cell>
          <table:table-cell table:style-name="ce4" table:formula="of:=[.R2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208598" calcext:value-type="float">
            <text:p>8,21E-01</text:p>
          </table:table-cell>
          <table:table-cell table:style-name="ce1" office:value-type="float" office:value="0.8994004" calcext:value-type="float">
            <text:p>8,99E-01</text:p>
          </table:table-cell>
          <table:table-cell table:style-name="ce1" office:value-type="float" office:value="0.8526307" calcext:value-type="float">
            <text:p>8,53E-01</text:p>
          </table:table-cell>
          <table:table-cell table:style-name="ce1" office:value-type="float" office:value="0.9296515" calcext:value-type="float">
            <text:p>9,30E-01</text:p>
          </table:table-cell>
          <table:table-cell table:style-name="ce1" office:value-type="float" office:value="0.8526307" calcext:value-type="float">
            <text:p>8,53E-01</text:p>
          </table:table-cell>
          <table:table-cell table:style-name="ce1" office:value-type="float" office:value="0.9296515" calcext:value-type="float">
            <text:p>9,30E-01</text:p>
          </table:table-cell>
          <table:table-cell table:style-name="ce1" office:value-type="float" office:value="0.8526307" calcext:value-type="float">
            <text:p>8,53E-01</text:p>
          </table:table-cell>
          <table:table-cell table:style-name="ce1" office:value-type="float" office:value="0.9296515" calcext:value-type="float">
            <text:p>9,30E-01</text:p>
          </table:table-cell>
          <table:table-cell table:style-name="ce1" office:value-type="float" office:value="0.8526307" calcext:value-type="float">
            <text:p>8,53E-01</text:p>
          </table:table-cell>
          <table:table-cell table:style-name="ce1" office:value-type="float" office:value="0.9323507" calcext:value-type="float">
            <text:p>9,32E-01</text:p>
          </table:table-cell>
          <table:table-cell/>
          <table:table-cell table:style-name="ce1" table:formula="of:=MAX([.C22];[.E22];[.G22];[.I22];[.K22])" office:value-type="float" office:value="0.8526307" calcext:value-type="float">
            <text:p>8,53E-01</text:p>
          </table:table-cell>
          <table:table-cell table:style-name="ce8" table:formula="of:=MAX([.D22];[.F22];[.H22];[.J22];[.L22])" office:value-type="float" office:value="0.9323507" calcext:value-type="float">
            <text:p>9,32E-01</text:p>
          </table:table-cell>
          <table:table-cell table:style-name="ce1"/>
          <table:table-cell table:style-name="ce1" office:value-type="float" office:value="0.8526307" calcext:value-type="float">
            <text:p>8,53E-01</text:p>
          </table:table-cell>
          <table:table-cell table:style-name="ce1" office:value-type="float" office:value="0.9323507" calcext:value-type="float">
            <text:p>9,32E-01</text:p>
          </table:table-cell>
          <table:table-cell table:style-name="ce4" table:formula="of:=[.Q22]&gt;[.N22]" office:value-type="boolean" office:boolean-value="false" calcext:value-type="boolean">
            <text:p>БРЕХНЯ</text:p>
          </table:table-cell>
          <table:table-cell table:style-name="ce4" table:formula="of:=[.R22]&gt;[.O2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526307" calcext:value-type="float">
            <text:p>8,53E-01</text:p>
          </table:table-cell>
          <table:table-cell table:style-name="ce4" table:formula="of:=[.V22]&gt;[.Q22]" office:value-type="boolean" office:boolean-value="false" calcext:value-type="boolean">
            <text:p>БРЕХНЯ</text:p>
          </table:table-cell>
          <table:table-cell table:style-name="ce1" table:formula="of:=MAX([.V22];[.Q22])" office:value-type="float" office:value="0.8526307" calcext:value-type="float">
            <text:p>8,53E-01</text:p>
          </table:table-cell>
          <table:table-cell table:style-name="ce4" table:formula="of:=[.X22]&gt;[.R2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2]&gt;[.C22]" office:value-type="boolean" office:boolean-value="true" calcext:value-type="boolean">
            <text:p>ІСТИНА</text:p>
          </table:table-cell>
          <table:table-cell table:style-name="ce4" table:formula="of:=[.F22]&gt;[.D22]" office:value-type="boolean" office:boolean-value="true" calcext:value-type="boolean">
            <text:p>ІСТИНА</text:p>
          </table:table-cell>
          <table:table-cell table:style-name="ce4" table:formula="of:=[.G22]&gt;MAX([.C22];[.E22])" office:value-type="boolean" office:boolean-value="false" calcext:value-type="boolean">
            <text:p>БРЕХНЯ</text:p>
          </table:table-cell>
          <table:table-cell table:style-name="ce4" table:formula="of:=[.H22]&gt;MAX([.D22];[.F22])" office:value-type="boolean" office:boolean-value="false" calcext:value-type="boolean">
            <text:p>БРЕХНЯ</text:p>
          </table:table-cell>
          <table:table-cell table:style-name="ce4" table:formula="of:=[.I22]&gt;MAX([.C22];[.E22];[.G22])" office:value-type="boolean" office:boolean-value="false" calcext:value-type="boolean">
            <text:p>БРЕХНЯ</text:p>
          </table:table-cell>
          <table:table-cell table:style-name="ce4" table:formula="of:=[.J22]&gt;MAX([.D22];[.F22];[.H22])" office:value-type="boolean" office:boolean-value="false" calcext:value-type="boolean">
            <text:p>БРЕХНЯ</text:p>
          </table:table-cell>
          <table:table-cell table:style-name="ce4" table:formula="of:=[.K22]&gt;MAX([.C22];[.E22];[.G22];[.I22])" office:value-type="boolean" office:boolean-value="false" calcext:value-type="boolean">
            <text:p>БРЕХНЯ</text:p>
          </table:table-cell>
          <table:table-cell table:style-name="ce4" table:formula="of:=[.L22]&gt;MAX([.D22];[.F22];[.H22];[.J22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22]&gt;0.9" office:value-type="boolean" office:boolean-value="false" calcext:value-type="boolean">
            <text:p>БРЕХНЯ</text:p>
          </table:table-cell>
          <table:table-cell table:style-name="ce4" table:formula="of:=[.R22]&gt;0.9" office:value-type="boolean" office:boolean-value="true" calcext:value-type="boolean">
            <text:p>ІСТИНА</text:p>
          </table:table-cell>
          <table:table-cell table:style-name="ce4" table:formula="of:=[.X22]&gt;0.8" office:value-type="boolean" office:boolean-value="true" calcext:value-type="boolean">
            <text:p>ІСТИНА</text:p>
          </table:table-cell>
          <table:table-cell table:style-name="ce4" table:formula="of:=[.R22]&gt;0.8" office:value-type="boolean" office:boolean-value="true" calcext:value-type="boolean">
            <text:p>ІСТИНА</text:p>
          </table:table-cell>
          <table:table-cell table:style-name="ce4" table:formula="of:=[.X22]&gt;0.7" office:value-type="boolean" office:boolean-value="true" calcext:value-type="boolean">
            <text:p>ІСТИНА</text:p>
          </table:table-cell>
          <table:table-cell table:style-name="ce4" table:formula="of:=[.R2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6838336" calcext:value-type="float">
            <text:p>6,84E-01</text:p>
          </table:table-cell>
          <table:table-cell table:style-name="ce1" office:value-type="float" office:value="0.9080825" calcext:value-type="float">
            <text:p>9,08E-01</text:p>
          </table:table-cell>
          <table:table-cell table:style-name="ce1" office:value-type="float" office:value="0.6986951" calcext:value-type="float">
            <text:p>6,99E-01</text:p>
          </table:table-cell>
          <table:table-cell table:style-name="ce1" office:value-type="float" office:value="0.9080825" calcext:value-type="float">
            <text:p>9,08E-01</text:p>
          </table:table-cell>
          <table:table-cell table:style-name="ce1" office:value-type="float" office:value="0.7149714" calcext:value-type="float">
            <text:p>7,15E-01</text:p>
          </table:table-cell>
          <table:table-cell table:style-name="ce1" office:value-type="float" office:value="0.9080825" calcext:value-type="float">
            <text:p>9,08E-01</text:p>
          </table:table-cell>
          <table:table-cell table:style-name="ce1" office:value-type="float" office:value="0.7149714" calcext:value-type="float">
            <text:p>7,15E-01</text:p>
          </table:table-cell>
          <table:table-cell table:style-name="ce1" office:value-type="float" office:value="0.9080825" calcext:value-type="float">
            <text:p>9,08E-01</text:p>
          </table:table-cell>
          <table:table-cell table:style-name="ce1" office:value-type="float" office:value="0.7149714" calcext:value-type="float">
            <text:p>7,15E-01</text:p>
          </table:table-cell>
          <table:table-cell table:style-name="ce1" office:value-type="float" office:value="0.9080825" calcext:value-type="float">
            <text:p>9,08E-01</text:p>
          </table:table-cell>
          <table:table-cell/>
          <table:table-cell table:style-name="ce1" table:formula="of:=MAX([.C23];[.E23];[.G23];[.I23];[.K23])" office:value-type="float" office:value="0.7149714" calcext:value-type="float">
            <text:p>7,15E-01</text:p>
          </table:table-cell>
          <table:table-cell table:style-name="ce8" table:formula="of:=MAX([.D23];[.F23];[.H23];[.J23];[.L23])" office:value-type="float" office:value="0.9080825" calcext:value-type="float">
            <text:p>9,08E-01</text:p>
          </table:table-cell>
          <table:table-cell table:style-name="ce1"/>
          <table:table-cell table:style-name="ce1" office:value-type="float" office:value="0.7689725" calcext:value-type="float">
            <text:p>7,69E-01</text:p>
          </table:table-cell>
          <table:table-cell table:style-name="ce1" office:value-type="float" office:value="0.9080825" calcext:value-type="float">
            <text:p>9,08E-01</text:p>
          </table:table-cell>
          <table:table-cell table:style-name="ce4" table:formula="of:=[.Q23]&gt;[.N23]" office:value-type="boolean" office:boolean-value="true" calcext:value-type="boolean">
            <text:p>ІСТИНА</text:p>
          </table:table-cell>
          <table:table-cell table:style-name="ce4" table:formula="of:=[.R23]&gt;[.O2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689725" calcext:value-type="float">
            <text:p>7,69E-01</text:p>
          </table:table-cell>
          <table:table-cell table:style-name="ce4" table:formula="of:=[.V23]&gt;[.Q23]" office:value-type="boolean" office:boolean-value="false" calcext:value-type="boolean">
            <text:p>БРЕХНЯ</text:p>
          </table:table-cell>
          <table:table-cell table:style-name="ce1" table:formula="of:=MAX([.V23];[.Q23])" office:value-type="float" office:value="0.7689725" calcext:value-type="float">
            <text:p>7,69E-01</text:p>
          </table:table-cell>
          <table:table-cell table:style-name="ce4" table:formula="of:=[.X23]&gt;[.R2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3]&gt;[.C23]" office:value-type="boolean" office:boolean-value="true" calcext:value-type="boolean">
            <text:p>ІСТИНА</text:p>
          </table:table-cell>
          <table:table-cell table:style-name="ce4" table:formula="of:=[.F23]&gt;[.D23]" office:value-type="boolean" office:boolean-value="false" calcext:value-type="boolean">
            <text:p>БРЕХНЯ</text:p>
          </table:table-cell>
          <table:table-cell table:style-name="ce4" table:formula="of:=[.G23]&gt;MAX([.C23];[.E23])" office:value-type="boolean" office:boolean-value="true" calcext:value-type="boolean">
            <text:p>ІСТИНА</text:p>
          </table:table-cell>
          <table:table-cell table:style-name="ce4" table:formula="of:=[.H23]&gt;MAX([.D23];[.F23])" office:value-type="boolean" office:boolean-value="false" calcext:value-type="boolean">
            <text:p>БРЕХНЯ</text:p>
          </table:table-cell>
          <table:table-cell table:style-name="ce4" table:formula="of:=[.I23]&gt;MAX([.C23];[.E23];[.G23])" office:value-type="boolean" office:boolean-value="false" calcext:value-type="boolean">
            <text:p>БРЕХНЯ</text:p>
          </table:table-cell>
          <table:table-cell table:style-name="ce4" table:formula="of:=[.J23]&gt;MAX([.D23];[.F23];[.H23])" office:value-type="boolean" office:boolean-value="false" calcext:value-type="boolean">
            <text:p>БРЕХНЯ</text:p>
          </table:table-cell>
          <table:table-cell table:style-name="ce4" table:formula="of:=[.K23]&gt;MAX([.C23];[.E23];[.G23];[.I23])" office:value-type="boolean" office:boolean-value="false" calcext:value-type="boolean">
            <text:p>БРЕХНЯ</text:p>
          </table:table-cell>
          <table:table-cell table:style-name="ce4" table:formula="of:=[.L23]&gt;MAX([.D23];[.F23];[.H23];[.J2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3]&gt;0.9" office:value-type="boolean" office:boolean-value="false" calcext:value-type="boolean">
            <text:p>БРЕХНЯ</text:p>
          </table:table-cell>
          <table:table-cell table:style-name="ce4" table:formula="of:=[.R23]&gt;0.9" office:value-type="boolean" office:boolean-value="true" calcext:value-type="boolean">
            <text:p>ІСТИНА</text:p>
          </table:table-cell>
          <table:table-cell table:style-name="ce4" table:formula="of:=[.X23]&gt;0.8" office:value-type="boolean" office:boolean-value="false" calcext:value-type="boolean">
            <text:p>БРЕХНЯ</text:p>
          </table:table-cell>
          <table:table-cell table:style-name="ce4" table:formula="of:=[.R23]&gt;0.8" office:value-type="boolean" office:boolean-value="true" calcext:value-type="boolean">
            <text:p>ІСТИНА</text:p>
          </table:table-cell>
          <table:table-cell table:style-name="ce4" table:formula="of:=[.X23]&gt;0.7" office:value-type="boolean" office:boolean-value="true" calcext:value-type="boolean">
            <text:p>ІСТИНА</text:p>
          </table:table-cell>
          <table:table-cell table:style-name="ce4" table:formula="of:=[.R2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6973726" calcext:value-type="float">
            <text:p>6,97E-01</text:p>
          </table:table-cell>
          <table:table-cell table:style-name="ce1" office:value-type="float" office:value="0.809082" calcext:value-type="float">
            <text:p>8,09E-01</text:p>
          </table:table-cell>
          <table:table-cell table:style-name="ce1" office:value-type="float" office:value="0.6973726" calcext:value-type="float">
            <text:p>6,97E-01</text:p>
          </table:table-cell>
          <table:table-cell table:style-name="ce1" office:value-type="float" office:value="0.8726869" calcext:value-type="float">
            <text:p>8,73E-01</text:p>
          </table:table-cell>
          <table:table-cell table:style-name="ce1" office:value-type="float" office:value="0.6973726" calcext:value-type="float">
            <text:p>6,97E-01</text:p>
          </table:table-cell>
          <table:table-cell table:style-name="ce1" office:value-type="float" office:value="0.8949345" calcext:value-type="float">
            <text:p>8,95E-01</text:p>
          </table:table-cell>
          <table:table-cell table:style-name="ce1" office:value-type="float" office:value="0.6973726" calcext:value-type="float">
            <text:p>6,97E-01</text:p>
          </table:table-cell>
          <table:table-cell table:style-name="ce1" office:value-type="float" office:value="0.8949345" calcext:value-type="float">
            <text:p>8,95E-01</text:p>
          </table:table-cell>
          <table:table-cell table:style-name="ce1" office:value-type="float" office:value="0.6973726" calcext:value-type="float">
            <text:p>6,97E-01</text:p>
          </table:table-cell>
          <table:table-cell table:style-name="ce1" office:value-type="float" office:value="0.8949345" calcext:value-type="float">
            <text:p>8,95E-01</text:p>
          </table:table-cell>
          <table:table-cell/>
          <table:table-cell table:style-name="ce1" table:formula="of:=MAX([.C24];[.E24];[.G24];[.I24];[.K24])" office:value-type="float" office:value="0.6973726" calcext:value-type="float">
            <text:p>6,97E-01</text:p>
          </table:table-cell>
          <table:table-cell table:style-name="ce8" table:formula="of:=MAX([.D24];[.F24];[.H24];[.J24];[.L24])" office:value-type="float" office:value="0.8949345" calcext:value-type="float">
            <text:p>8,95E-01</text:p>
          </table:table-cell>
          <table:table-cell table:style-name="ce2"/>
          <table:table-cell table:style-name="ce1" office:value-type="float" office:value="0.6973726" calcext:value-type="float">
            <text:p>6,97E-01</text:p>
          </table:table-cell>
          <table:table-cell table:style-name="ce1" office:value-type="float" office:value="0.8949345" calcext:value-type="float">
            <text:p>8,95E-01</text:p>
          </table:table-cell>
          <table:table-cell table:style-name="ce4" table:formula="of:=[.Q24]&gt;[.N24]" office:value-type="boolean" office:boolean-value="false" calcext:value-type="boolean">
            <text:p>БРЕХНЯ</text:p>
          </table:table-cell>
          <table:table-cell table:style-name="ce4" table:formula="of:=[.R24]&gt;[.O24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6973726" calcext:value-type="float">
            <text:p>6,97E-01</text:p>
          </table:table-cell>
          <table:table-cell table:style-name="ce4" table:formula="of:=[.V24]&gt;[.Q24]" office:value-type="boolean" office:boolean-value="false" calcext:value-type="boolean">
            <text:p>БРЕХНЯ</text:p>
          </table:table-cell>
          <table:table-cell table:style-name="ce1" table:formula="of:=MAX([.V24];[.Q24])" office:value-type="float" office:value="0.6973726" calcext:value-type="float">
            <text:p>6,97E-01</text:p>
          </table:table-cell>
          <table:table-cell table:style-name="ce4" table:formula="of:=[.X24]&gt;[.R2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4]&gt;[.C24]" office:value-type="boolean" office:boolean-value="false" calcext:value-type="boolean">
            <text:p>БРЕХНЯ</text:p>
          </table:table-cell>
          <table:table-cell table:style-name="ce4" table:formula="of:=[.F24]&gt;[.D24]" office:value-type="boolean" office:boolean-value="true" calcext:value-type="boolean">
            <text:p>ІСТИНА</text:p>
          </table:table-cell>
          <table:table-cell table:style-name="ce4" table:formula="of:=[.G24]&gt;MAX([.C24];[.E24])" office:value-type="boolean" office:boolean-value="false" calcext:value-type="boolean">
            <text:p>БРЕХНЯ</text:p>
          </table:table-cell>
          <table:table-cell table:style-name="ce4" table:formula="of:=[.H24]&gt;MAX([.D24];[.F24])" office:value-type="boolean" office:boolean-value="true" calcext:value-type="boolean">
            <text:p>ІСТИНА</text:p>
          </table:table-cell>
          <table:table-cell table:style-name="ce4" table:formula="of:=[.I24]&gt;MAX([.C24];[.E24];[.G24])" office:value-type="boolean" office:boolean-value="false" calcext:value-type="boolean">
            <text:p>БРЕХНЯ</text:p>
          </table:table-cell>
          <table:table-cell table:style-name="ce4" table:formula="of:=[.J24]&gt;MAX([.D24];[.F24];[.H24])" office:value-type="boolean" office:boolean-value="false" calcext:value-type="boolean">
            <text:p>БРЕХНЯ</text:p>
          </table:table-cell>
          <table:table-cell table:style-name="ce4" table:formula="of:=[.K24]&gt;MAX([.C24];[.E24];[.G24];[.I24])" office:value-type="boolean" office:boolean-value="false" calcext:value-type="boolean">
            <text:p>БРЕХНЯ</text:p>
          </table:table-cell>
          <table:table-cell table:style-name="ce4" table:formula="of:=[.L24]&gt;MAX([.D24];[.F24];[.H24];[.J2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4]&gt;0.9" office:value-type="boolean" office:boolean-value="false" calcext:value-type="boolean">
            <text:p>БРЕХНЯ</text:p>
          </table:table-cell>
          <table:table-cell table:style-name="ce4" table:formula="of:=[.R24]&gt;0.9" office:value-type="boolean" office:boolean-value="false" calcext:value-type="boolean">
            <text:p>БРЕХНЯ</text:p>
          </table:table-cell>
          <table:table-cell table:style-name="ce4" table:formula="of:=[.X24]&gt;0.8" office:value-type="boolean" office:boolean-value="false" calcext:value-type="boolean">
            <text:p>БРЕХНЯ</text:p>
          </table:table-cell>
          <table:table-cell table:style-name="ce4" table:formula="of:=[.R24]&gt;0.8" office:value-type="boolean" office:boolean-value="true" calcext:value-type="boolean">
            <text:p>ІСТИНА</text:p>
          </table:table-cell>
          <table:table-cell table:style-name="ce4" table:formula="of:=[.X24]&gt;0.7" office:value-type="boolean" office:boolean-value="false" calcext:value-type="boolean">
            <text:p>БРЕХНЯ</text:p>
          </table:table-cell>
          <table:table-cell table:style-name="ce4" table:formula="of:=[.R2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6954398" calcext:value-type="float">
            <text:p>6,95E-01</text:p>
          </table:table-cell>
          <table:table-cell table:style-name="ce1" office:value-type="float" office:value="0.8066355" calcext:value-type="float">
            <text:p>8,07E-01</text:p>
          </table:table-cell>
          <table:table-cell table:style-name="ce1" office:value-type="float" office:value="0.6954398" calcext:value-type="float">
            <text:p>6,95E-01</text:p>
          </table:table-cell>
          <table:table-cell table:style-name="ce1" office:value-type="float" office:value="0.827598" calcext:value-type="float">
            <text:p>8,28E-01</text:p>
          </table:table-cell>
          <table:table-cell table:style-name="ce1" office:value-type="float" office:value="0.6954398" calcext:value-type="float">
            <text:p>6,95E-01</text:p>
          </table:table-cell>
          <table:table-cell table:style-name="ce1" office:value-type="float" office:value="0.8611058" calcext:value-type="float">
            <text:p>8,61E-01</text:p>
          </table:table-cell>
          <table:table-cell table:style-name="ce1" office:value-type="float" office:value="0.7183043" calcext:value-type="float">
            <text:p>7,18E-01</text:p>
          </table:table-cell>
          <table:table-cell table:style-name="ce1" office:value-type="float" office:value="0.8611058" calcext:value-type="float">
            <text:p>8,61E-01</text:p>
          </table:table-cell>
          <table:table-cell table:style-name="ce1" office:value-type="float" office:value="0.7183043" calcext:value-type="float">
            <text:p>7,18E-01</text:p>
          </table:table-cell>
          <table:table-cell table:style-name="ce1" office:value-type="float" office:value="0.8611058" calcext:value-type="float">
            <text:p>8,61E-01</text:p>
          </table:table-cell>
          <table:table-cell/>
          <table:table-cell table:style-name="ce1" table:formula="of:=MAX([.C25];[.E25];[.G25];[.I25];[.K25])" office:value-type="float" office:value="0.7183043" calcext:value-type="float">
            <text:p>7,18E-01</text:p>
          </table:table-cell>
          <table:table-cell table:style-name="ce8" table:formula="of:=MAX([.D25];[.F25];[.H25];[.J25];[.L25])" office:value-type="float" office:value="0.8611058" calcext:value-type="float">
            <text:p>8,61E-01</text:p>
          </table:table-cell>
          <table:table-cell table:style-name="ce1"/>
          <table:table-cell table:style-name="ce1" office:value-type="float" office:value="0.7183043" calcext:value-type="float">
            <text:p>7,18E-01</text:p>
          </table:table-cell>
          <table:table-cell table:style-name="ce1" office:value-type="float" office:value="0.8611058" calcext:value-type="float">
            <text:p>8,61E-01</text:p>
          </table:table-cell>
          <table:table-cell table:style-name="ce4" table:formula="of:=[.Q25]&gt;[.N25]" office:value-type="boolean" office:boolean-value="false" calcext:value-type="boolean">
            <text:p>БРЕХНЯ</text:p>
          </table:table-cell>
          <table:table-cell table:style-name="ce4" table:formula="of:=[.R25]&gt;[.O2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183043" calcext:value-type="float">
            <text:p>7,18E-01</text:p>
          </table:table-cell>
          <table:table-cell table:style-name="ce4" table:formula="of:=[.V25]&gt;[.Q25]" office:value-type="boolean" office:boolean-value="false" calcext:value-type="boolean">
            <text:p>БРЕХНЯ</text:p>
          </table:table-cell>
          <table:table-cell table:style-name="ce1" table:formula="of:=MAX([.V25];[.Q25])" office:value-type="float" office:value="0.7183043" calcext:value-type="float">
            <text:p>7,18E-01</text:p>
          </table:table-cell>
          <table:table-cell table:style-name="ce4" table:formula="of:=[.X25]&gt;[.R2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5]&gt;[.C25]" office:value-type="boolean" office:boolean-value="false" calcext:value-type="boolean">
            <text:p>БРЕХНЯ</text:p>
          </table:table-cell>
          <table:table-cell table:style-name="ce4" table:formula="of:=[.F25]&gt;[.D25]" office:value-type="boolean" office:boolean-value="true" calcext:value-type="boolean">
            <text:p>ІСТИНА</text:p>
          </table:table-cell>
          <table:table-cell table:style-name="ce4" table:formula="of:=[.G25]&gt;MAX([.C25];[.E25])" office:value-type="boolean" office:boolean-value="false" calcext:value-type="boolean">
            <text:p>БРЕХНЯ</text:p>
          </table:table-cell>
          <table:table-cell table:style-name="ce4" table:formula="of:=[.H25]&gt;MAX([.D25];[.F25])" office:value-type="boolean" office:boolean-value="true" calcext:value-type="boolean">
            <text:p>ІСТИНА</text:p>
          </table:table-cell>
          <table:table-cell table:style-name="ce4" table:formula="of:=[.I25]&gt;MAX([.C25];[.E25];[.G25])" office:value-type="boolean" office:boolean-value="true" calcext:value-type="boolean">
            <text:p>ІСТИНА</text:p>
          </table:table-cell>
          <table:table-cell table:style-name="ce4" table:formula="of:=[.J25]&gt;MAX([.D25];[.F25];[.H25])" office:value-type="boolean" office:boolean-value="false" calcext:value-type="boolean">
            <text:p>БРЕХНЯ</text:p>
          </table:table-cell>
          <table:table-cell table:style-name="ce4" table:formula="of:=[.K25]&gt;MAX([.C25];[.E25];[.G25];[.I25])" office:value-type="boolean" office:boolean-value="false" calcext:value-type="boolean">
            <text:p>БРЕХНЯ</text:p>
          </table:table-cell>
          <table:table-cell table:style-name="ce4" table:formula="of:=[.L25]&gt;MAX([.D25];[.F25];[.H25];[.J2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5]&gt;0.9" office:value-type="boolean" office:boolean-value="false" calcext:value-type="boolean">
            <text:p>БРЕХНЯ</text:p>
          </table:table-cell>
          <table:table-cell table:style-name="ce4" table:formula="of:=[.R25]&gt;0.9" office:value-type="boolean" office:boolean-value="false" calcext:value-type="boolean">
            <text:p>БРЕХНЯ</text:p>
          </table:table-cell>
          <table:table-cell table:style-name="ce4" table:formula="of:=[.X25]&gt;0.8" office:value-type="boolean" office:boolean-value="false" calcext:value-type="boolean">
            <text:p>БРЕХНЯ</text:p>
          </table:table-cell>
          <table:table-cell table:style-name="ce4" table:formula="of:=[.R25]&gt;0.8" office:value-type="boolean" office:boolean-value="true" calcext:value-type="boolean">
            <text:p>ІСТИНА</text:p>
          </table:table-cell>
          <table:table-cell table:style-name="ce4" table:formula="of:=[.X25]&gt;0.7" office:value-type="boolean" office:boolean-value="true" calcext:value-type="boolean">
            <text:p>ІСТИНА</text:p>
          </table:table-cell>
          <table:table-cell table:style-name="ce4" table:formula="of:=[.R2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5991233" calcext:value-type="float">
            <text:p>5,99E-01</text:p>
          </table:table-cell>
          <table:table-cell table:style-name="ce1" office:value-type="float" office:value="0.7624802" calcext:value-type="float">
            <text:p>7,62E-01</text:p>
          </table:table-cell>
          <table:table-cell table:style-name="ce1" office:value-type="float" office:value="0.6143376" calcext:value-type="float">
            <text:p>6,14E-01</text:p>
          </table:table-cell>
          <table:table-cell table:style-name="ce1" office:value-type="float" office:value="0.8226606" calcext:value-type="float">
            <text:p>8,23E-01</text:p>
          </table:table-cell>
          <table:table-cell table:style-name="ce1" office:value-type="float" office:value="0.6143376" calcext:value-type="float">
            <text:p>6,14E-01</text:p>
          </table:table-cell>
          <table:table-cell table:style-name="ce1" office:value-type="float" office:value="0.880924" calcext:value-type="float">
            <text:p>8,81E-01</text:p>
          </table:table-cell>
          <table:table-cell table:style-name="ce1" office:value-type="float" office:value="0.6489109" calcext:value-type="float">
            <text:p>6,49E-01</text:p>
          </table:table-cell>
          <table:table-cell table:style-name="ce1" office:value-type="float" office:value="0.880924" calcext:value-type="float">
            <text:p>8,81E-01</text:p>
          </table:table-cell>
          <table:table-cell table:style-name="ce1" office:value-type="float" office:value="0.6489109" calcext:value-type="float">
            <text:p>6,49E-01</text:p>
          </table:table-cell>
          <table:table-cell table:style-name="ce1" office:value-type="float" office:value="0.880924" calcext:value-type="float">
            <text:p>8,81E-01</text:p>
          </table:table-cell>
          <table:table-cell/>
          <table:table-cell table:style-name="ce1" table:formula="of:=MAX([.C26];[.E26];[.G26];[.I26];[.K26])" office:value-type="float" office:value="0.6489109" calcext:value-type="float">
            <text:p>6,49E-01</text:p>
          </table:table-cell>
          <table:table-cell table:style-name="ce8" table:formula="of:=MAX([.D26];[.F26];[.H26];[.J26];[.L26])" office:value-type="float" office:value="0.880924" calcext:value-type="float">
            <text:p>8,81E-01</text:p>
          </table:table-cell>
          <table:table-cell table:style-name="ce1"/>
          <table:table-cell table:style-name="ce1" office:value-type="float" office:value="0.6589876" calcext:value-type="float">
            <text:p>6,59E-01</text:p>
          </table:table-cell>
          <table:table-cell table:style-name="ce1" office:value-type="float" office:value="0.880924" calcext:value-type="float">
            <text:p>8,81E-01</text:p>
          </table:table-cell>
          <table:table-cell table:style-name="ce4" table:formula="of:=[.Q26]&gt;[.N26]" office:value-type="boolean" office:boolean-value="true" calcext:value-type="boolean">
            <text:p>ІСТИНА</text:p>
          </table:table-cell>
          <table:table-cell table:style-name="ce4" table:formula="of:=[.R26]&gt;[.O2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6589876" calcext:value-type="float">
            <text:p>6,59E-01</text:p>
          </table:table-cell>
          <table:table-cell table:style-name="ce4" table:formula="of:=[.V26]&gt;[.Q26]" office:value-type="boolean" office:boolean-value="false" calcext:value-type="boolean">
            <text:p>БРЕХНЯ</text:p>
          </table:table-cell>
          <table:table-cell table:style-name="ce1" table:formula="of:=MAX([.V26];[.Q26])" office:value-type="float" office:value="0.6589876" calcext:value-type="float">
            <text:p>6,59E-01</text:p>
          </table:table-cell>
          <table:table-cell table:style-name="ce4" table:formula="of:=[.X26]&gt;[.R2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6]&gt;[.C26]" office:value-type="boolean" office:boolean-value="true" calcext:value-type="boolean">
            <text:p>ІСТИНА</text:p>
          </table:table-cell>
          <table:table-cell table:style-name="ce4" table:formula="of:=[.F26]&gt;[.D26]" office:value-type="boolean" office:boolean-value="true" calcext:value-type="boolean">
            <text:p>ІСТИНА</text:p>
          </table:table-cell>
          <table:table-cell table:style-name="ce4" table:formula="of:=[.G26]&gt;MAX([.C26];[.E26])" office:value-type="boolean" office:boolean-value="false" calcext:value-type="boolean">
            <text:p>БРЕХНЯ</text:p>
          </table:table-cell>
          <table:table-cell table:style-name="ce4" table:formula="of:=[.H26]&gt;MAX([.D26];[.F26])" office:value-type="boolean" office:boolean-value="true" calcext:value-type="boolean">
            <text:p>ІСТИНА</text:p>
          </table:table-cell>
          <table:table-cell table:style-name="ce4" table:formula="of:=[.I26]&gt;MAX([.C26];[.E26];[.G26])" office:value-type="boolean" office:boolean-value="true" calcext:value-type="boolean">
            <text:p>ІСТИНА</text:p>
          </table:table-cell>
          <table:table-cell table:style-name="ce4" table:formula="of:=[.J26]&gt;MAX([.D26];[.F26];[.H26])" office:value-type="boolean" office:boolean-value="false" calcext:value-type="boolean">
            <text:p>БРЕХНЯ</text:p>
          </table:table-cell>
          <table:table-cell table:style-name="ce4" table:formula="of:=[.K26]&gt;MAX([.C26];[.E26];[.G26];[.I26])" office:value-type="boolean" office:boolean-value="false" calcext:value-type="boolean">
            <text:p>БРЕХНЯ</text:p>
          </table:table-cell>
          <table:table-cell table:style-name="ce4" table:formula="of:=[.L26]&gt;MAX([.D26];[.F26];[.H26];[.J2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6]&gt;0.9" office:value-type="boolean" office:boolean-value="false" calcext:value-type="boolean">
            <text:p>БРЕХНЯ</text:p>
          </table:table-cell>
          <table:table-cell table:style-name="ce4" table:formula="of:=[.R26]&gt;0.9" office:value-type="boolean" office:boolean-value="false" calcext:value-type="boolean">
            <text:p>БРЕХНЯ</text:p>
          </table:table-cell>
          <table:table-cell table:style-name="ce4" table:formula="of:=[.X26]&gt;0.8" office:value-type="boolean" office:boolean-value="false" calcext:value-type="boolean">
            <text:p>БРЕХНЯ</text:p>
          </table:table-cell>
          <table:table-cell table:style-name="ce4" table:formula="of:=[.R26]&gt;0.8" office:value-type="boolean" office:boolean-value="true" calcext:value-type="boolean">
            <text:p>ІСТИНА</text:p>
          </table:table-cell>
          <table:table-cell table:style-name="ce4" table:formula="of:=[.X26]&gt;0.7" office:value-type="boolean" office:boolean-value="false" calcext:value-type="boolean">
            <text:p>БРЕХНЯ</text:p>
          </table:table-cell>
          <table:table-cell table:style-name="ce4" table:formula="of:=[.R2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884201" calcext:value-type="float">
            <text:p>8,84E-01</text:p>
          </table:table-cell>
          <table:table-cell table:style-name="ce1" office:value-type="float" office:value="0.952616" calcext:value-type="float">
            <text:p>9,53E-01</text:p>
          </table:table-cell>
          <table:table-cell table:style-name="ce1" office:value-type="float" office:value="0.884201" calcext:value-type="float">
            <text:p>8,84E-01</text:p>
          </table:table-cell>
          <table:table-cell table:style-name="ce1" office:value-type="float" office:value="0.952616" calcext:value-type="float">
            <text:p>9,53E-01</text:p>
          </table:table-cell>
          <table:table-cell table:style-name="ce1" office:value-type="float" office:value="0.8999289" calcext:value-type="float">
            <text:p>9,00E-01</text:p>
          </table:table-cell>
          <table:table-cell table:style-name="ce1" office:value-type="float" office:value="0.952616" calcext:value-type="float">
            <text:p>9,53E-01</text:p>
          </table:table-cell>
          <table:table-cell table:style-name="ce1" office:value-type="float" office:value="0.8999289" calcext:value-type="float">
            <text:p>9,00E-01</text:p>
          </table:table-cell>
          <table:table-cell table:style-name="ce1" office:value-type="float" office:value="0.952616" calcext:value-type="float">
            <text:p>9,53E-01</text:p>
          </table:table-cell>
          <table:table-cell table:style-name="ce1" office:value-type="float" office:value="0.8999289" calcext:value-type="float">
            <text:p>9,00E-01</text:p>
          </table:table-cell>
          <table:table-cell table:style-name="ce1" office:value-type="float" office:value="0.952616" calcext:value-type="float">
            <text:p>9,53E-01</text:p>
          </table:table-cell>
          <table:table-cell/>
          <table:table-cell table:style-name="ce1" table:formula="of:=MAX([.C27];[.E27];[.G27];[.I27];[.K27])" office:value-type="float" office:value="0.8999289" calcext:value-type="float">
            <text:p>9,00E-01</text:p>
          </table:table-cell>
          <table:table-cell table:style-name="ce8" table:formula="of:=MAX([.D27];[.F27];[.H27];[.J27];[.L27])" office:value-type="float" office:value="0.952616" calcext:value-type="float">
            <text:p>9,53E-01</text:p>
          </table:table-cell>
          <table:table-cell table:style-name="ce1"/>
          <table:table-cell table:style-name="ce1" office:value-type="float" office:value="0.8999289" calcext:value-type="float">
            <text:p>9,00E-01</text:p>
          </table:table-cell>
          <table:table-cell table:style-name="ce1" office:value-type="float" office:value="0.952616" calcext:value-type="float">
            <text:p>9,53E-01</text:p>
          </table:table-cell>
          <table:table-cell table:style-name="ce4" table:formula="of:=[.Q27]&gt;[.N27]" office:value-type="boolean" office:boolean-value="false" calcext:value-type="boolean">
            <text:p>БРЕХНЯ</text:p>
          </table:table-cell>
          <table:table-cell table:style-name="ce4" table:formula="of:=[.R27]&gt;[.O2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999289" calcext:value-type="float">
            <text:p>9,00E-01</text:p>
          </table:table-cell>
          <table:table-cell table:style-name="ce4" table:formula="of:=[.V27]&gt;[.Q27]" office:value-type="boolean" office:boolean-value="false" calcext:value-type="boolean">
            <text:p>БРЕХНЯ</text:p>
          </table:table-cell>
          <table:table-cell table:style-name="ce1" table:formula="of:=MAX([.V27];[.Q27])" office:value-type="float" office:value="0.8999289" calcext:value-type="float">
            <text:p>9,00E-01</text:p>
          </table:table-cell>
          <table:table-cell table:style-name="ce4" table:formula="of:=[.X27]&gt;[.R2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7]&gt;[.C27]" office:value-type="boolean" office:boolean-value="false" calcext:value-type="boolean">
            <text:p>БРЕХНЯ</text:p>
          </table:table-cell>
          <table:table-cell table:style-name="ce4" table:formula="of:=[.F27]&gt;[.D27]" office:value-type="boolean" office:boolean-value="false" calcext:value-type="boolean">
            <text:p>БРЕХНЯ</text:p>
          </table:table-cell>
          <table:table-cell table:style-name="ce4" table:formula="of:=[.G27]&gt;MAX([.C27];[.E27])" office:value-type="boolean" office:boolean-value="true" calcext:value-type="boolean">
            <text:p>ІСТИНА</text:p>
          </table:table-cell>
          <table:table-cell table:style-name="ce4" table:formula="of:=[.H27]&gt;MAX([.D27];[.F27])" office:value-type="boolean" office:boolean-value="false" calcext:value-type="boolean">
            <text:p>БРЕХНЯ</text:p>
          </table:table-cell>
          <table:table-cell table:style-name="ce4" table:formula="of:=[.I27]&gt;MAX([.C27];[.E27];[.G27])" office:value-type="boolean" office:boolean-value="false" calcext:value-type="boolean">
            <text:p>БРЕХНЯ</text:p>
          </table:table-cell>
          <table:table-cell table:style-name="ce4" table:formula="of:=[.J27]&gt;MAX([.D27];[.F27];[.H27])" office:value-type="boolean" office:boolean-value="false" calcext:value-type="boolean">
            <text:p>БРЕХНЯ</text:p>
          </table:table-cell>
          <table:table-cell table:style-name="ce4" table:formula="of:=[.K27]&gt;MAX([.C27];[.E27];[.G27];[.I27])" office:value-type="boolean" office:boolean-value="false" calcext:value-type="boolean">
            <text:p>БРЕХНЯ</text:p>
          </table:table-cell>
          <table:table-cell table:style-name="ce4" table:formula="of:=[.L27]&gt;MAX([.D27];[.F27];[.H27];[.J27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7]&gt;0.9" office:value-type="boolean" office:boolean-value="false" calcext:value-type="boolean">
            <text:p>БРЕХНЯ</text:p>
          </table:table-cell>
          <table:table-cell table:style-name="ce4" table:formula="of:=[.R27]&gt;0.9" office:value-type="boolean" office:boolean-value="true" calcext:value-type="boolean">
            <text:p>ІСТИНА</text:p>
          </table:table-cell>
          <table:table-cell table:style-name="ce4" table:formula="of:=[.X27]&gt;0.8" office:value-type="boolean" office:boolean-value="true" calcext:value-type="boolean">
            <text:p>ІСТИНА</text:p>
          </table:table-cell>
          <table:table-cell table:style-name="ce4" table:formula="of:=[.R27]&gt;0.8" office:value-type="boolean" office:boolean-value="true" calcext:value-type="boolean">
            <text:p>ІСТИНА</text:p>
          </table:table-cell>
          <table:table-cell table:style-name="ce4" table:formula="of:=[.X27]&gt;0.7" office:value-type="boolean" office:boolean-value="true" calcext:value-type="boolean">
            <text:p>ІСТИНА</text:p>
          </table:table-cell>
          <table:table-cell table:style-name="ce4" table:formula="of:=[.R2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7406419" calcext:value-type="float">
            <text:p>7,41E-01</text:p>
          </table:table-cell>
          <table:table-cell table:style-name="ce1" office:value-type="float" office:value="0.8913725" calcext:value-type="float">
            <text:p>8,91E-01</text:p>
          </table:table-cell>
          <table:table-cell table:style-name="ce1" office:value-type="float" office:value="0.8101484" calcext:value-type="float">
            <text:p>8,10E-01</text:p>
          </table:table-cell>
          <table:table-cell table:style-name="ce1" office:value-type="float" office:value="0.8913725" calcext:value-type="float">
            <text:p>8,91E-01</text:p>
          </table:table-cell>
          <table:table-cell table:style-name="ce1" office:value-type="float" office:value="0.8101484" calcext:value-type="float">
            <text:p>8,10E-01</text:p>
          </table:table-cell>
          <table:table-cell table:style-name="ce1" office:value-type="float" office:value="0.9089264" calcext:value-type="float">
            <text:p>9,09E-01</text:p>
          </table:table-cell>
          <table:table-cell table:style-name="ce1" office:value-type="float" office:value="0.8249768" calcext:value-type="float">
            <text:p>8,25E-01</text:p>
          </table:table-cell>
          <table:table-cell table:style-name="ce1" office:value-type="float" office:value="0.9089264" calcext:value-type="float">
            <text:p>9,09E-01</text:p>
          </table:table-cell>
          <table:table-cell table:style-name="ce1" office:value-type="float" office:value="0.8249768" calcext:value-type="float">
            <text:p>8,25E-01</text:p>
          </table:table-cell>
          <table:table-cell table:style-name="ce1" office:value-type="float" office:value="0.9239788" calcext:value-type="float">
            <text:p>9,24E-01</text:p>
          </table:table-cell>
          <table:table-cell/>
          <table:table-cell table:style-name="ce1" table:formula="of:=MAX([.C28];[.E28];[.G28];[.I28];[.K28])" office:value-type="float" office:value="0.8249768" calcext:value-type="float">
            <text:p>8,25E-01</text:p>
          </table:table-cell>
          <table:table-cell table:style-name="ce8" table:formula="of:=MAX([.D28];[.F28];[.H28];[.J28];[.L28])" office:value-type="float" office:value="0.9239788" calcext:value-type="float">
            <text:p>9,24E-01</text:p>
          </table:table-cell>
          <table:table-cell table:style-name="ce1"/>
          <table:table-cell table:style-name="ce1" office:value-type="float" office:value="0.8249768" calcext:value-type="float">
            <text:p>8,25E-01</text:p>
          </table:table-cell>
          <table:table-cell table:style-name="ce1" office:value-type="float" office:value="0.9239788" calcext:value-type="float">
            <text:p>9,24E-01</text:p>
          </table:table-cell>
          <table:table-cell table:style-name="ce4" table:formula="of:=[.Q28]&gt;[.N28]" office:value-type="boolean" office:boolean-value="false" calcext:value-type="boolean">
            <text:p>БРЕХНЯ</text:p>
          </table:table-cell>
          <table:table-cell table:style-name="ce4" table:formula="of:=[.R28]&gt;[.O2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249768" calcext:value-type="float">
            <text:p>8,25E-01</text:p>
          </table:table-cell>
          <table:table-cell table:style-name="ce4" table:formula="of:=[.V28]&gt;[.Q28]" office:value-type="boolean" office:boolean-value="false" calcext:value-type="boolean">
            <text:p>БРЕХНЯ</text:p>
          </table:table-cell>
          <table:table-cell table:style-name="ce1" table:formula="of:=MAX([.V28];[.Q28])" office:value-type="float" office:value="0.8249768" calcext:value-type="float">
            <text:p>8,25E-01</text:p>
          </table:table-cell>
          <table:table-cell table:style-name="ce4" table:formula="of:=[.X28]&gt;[.R2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8]&gt;[.C28]" office:value-type="boolean" office:boolean-value="true" calcext:value-type="boolean">
            <text:p>ІСТИНА</text:p>
          </table:table-cell>
          <table:table-cell table:style-name="ce4" table:formula="of:=[.F28]&gt;[.D28]" office:value-type="boolean" office:boolean-value="false" calcext:value-type="boolean">
            <text:p>БРЕХНЯ</text:p>
          </table:table-cell>
          <table:table-cell table:style-name="ce4" table:formula="of:=[.G28]&gt;MAX([.C28];[.E28])" office:value-type="boolean" office:boolean-value="false" calcext:value-type="boolean">
            <text:p>БРЕХНЯ</text:p>
          </table:table-cell>
          <table:table-cell table:style-name="ce4" table:formula="of:=[.H28]&gt;MAX([.D28];[.F28])" office:value-type="boolean" office:boolean-value="true" calcext:value-type="boolean">
            <text:p>ІСТИНА</text:p>
          </table:table-cell>
          <table:table-cell table:style-name="ce4" table:formula="of:=[.I28]&gt;MAX([.C28];[.E28];[.G28])" office:value-type="boolean" office:boolean-value="true" calcext:value-type="boolean">
            <text:p>ІСТИНА</text:p>
          </table:table-cell>
          <table:table-cell table:style-name="ce4" table:formula="of:=[.J28]&gt;MAX([.D28];[.F28];[.H28])" office:value-type="boolean" office:boolean-value="false" calcext:value-type="boolean">
            <text:p>БРЕХНЯ</text:p>
          </table:table-cell>
          <table:table-cell table:style-name="ce4" table:formula="of:=[.K28]&gt;MAX([.C28];[.E28];[.G28];[.I28])" office:value-type="boolean" office:boolean-value="false" calcext:value-type="boolean">
            <text:p>БРЕХНЯ</text:p>
          </table:table-cell>
          <table:table-cell table:style-name="ce4" table:formula="of:=[.L28]&gt;MAX([.D28];[.F28];[.H28];[.J28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28]&gt;0.9" office:value-type="boolean" office:boolean-value="false" calcext:value-type="boolean">
            <text:p>БРЕХНЯ</text:p>
          </table:table-cell>
          <table:table-cell table:style-name="ce4" table:formula="of:=[.R28]&gt;0.9" office:value-type="boolean" office:boolean-value="true" calcext:value-type="boolean">
            <text:p>ІСТИНА</text:p>
          </table:table-cell>
          <table:table-cell table:style-name="ce4" table:formula="of:=[.X28]&gt;0.8" office:value-type="boolean" office:boolean-value="true" calcext:value-type="boolean">
            <text:p>ІСТИНА</text:p>
          </table:table-cell>
          <table:table-cell table:style-name="ce4" table:formula="of:=[.R28]&gt;0.8" office:value-type="boolean" office:boolean-value="true" calcext:value-type="boolean">
            <text:p>ІСТИНА</text:p>
          </table:table-cell>
          <table:table-cell table:style-name="ce4" table:formula="of:=[.X28]&gt;0.7" office:value-type="boolean" office:boolean-value="true" calcext:value-type="boolean">
            <text:p>ІСТИНА</text:p>
          </table:table-cell>
          <table:table-cell table:style-name="ce4" table:formula="of:=[.R2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7442766" calcext:value-type="float">
            <text:p>7,44E-01</text:p>
          </table:table-cell>
          <table:table-cell table:style-name="ce1" office:value-type="float" office:value="0.7928874" calcext:value-type="float">
            <text:p>7,93E-01</text:p>
          </table:table-cell>
          <table:table-cell table:style-name="ce1" office:value-type="float" office:value="0.7633669" calcext:value-type="float">
            <text:p>7,63E-01</text:p>
          </table:table-cell>
          <table:table-cell table:style-name="ce1" office:value-type="float" office:value="0.8572967" calcext:value-type="float">
            <text:p>8,57E-01</text:p>
          </table:table-cell>
          <table:table-cell table:style-name="ce1" office:value-type="float" office:value="0.7633669" calcext:value-type="float">
            <text:p>7,63E-01</text:p>
          </table:table-cell>
          <table:table-cell table:style-name="ce1" office:value-type="float" office:value="0.8760658" calcext:value-type="float">
            <text:p>8,76E-01</text:p>
          </table:table-cell>
          <table:table-cell table:style-name="ce1" office:value-type="float" office:value="0.7633669" calcext:value-type="float">
            <text:p>7,63E-01</text:p>
          </table:table-cell>
          <table:table-cell table:style-name="ce1" office:value-type="float" office:value="0.9069292" calcext:value-type="float">
            <text:p>9,07E-01</text:p>
          </table:table-cell>
          <table:table-cell table:style-name="ce1" office:value-type="float" office:value="0.7633669" calcext:value-type="float">
            <text:p>7,63E-01</text:p>
          </table:table-cell>
          <table:table-cell table:style-name="ce1" office:value-type="float" office:value="0.9069292" calcext:value-type="float">
            <text:p>9,07E-01</text:p>
          </table:table-cell>
          <table:table-cell/>
          <table:table-cell table:style-name="ce1" table:formula="of:=MAX([.C29];[.E29];[.G29];[.I29];[.K29])" office:value-type="float" office:value="0.7633669" calcext:value-type="float">
            <text:p>7,63E-01</text:p>
          </table:table-cell>
          <table:table-cell table:style-name="ce8" table:formula="of:=MAX([.D29];[.F29];[.H29];[.J29];[.L29])" office:value-type="float" office:value="0.9069292" calcext:value-type="float">
            <text:p>9,07E-01</text:p>
          </table:table-cell>
          <table:table-cell table:style-name="ce2"/>
          <table:table-cell table:style-name="ce1" office:value-type="float" office:value="0.7633669" calcext:value-type="float">
            <text:p>7,63E-01</text:p>
          </table:table-cell>
          <table:table-cell table:style-name="ce1" office:value-type="float" office:value="0.9069292" calcext:value-type="float">
            <text:p>9,07E-01</text:p>
          </table:table-cell>
          <table:table-cell table:style-name="ce4" table:formula="of:=[.Q29]&gt;[.N29]" office:value-type="boolean" office:boolean-value="false" calcext:value-type="boolean">
            <text:p>БРЕХНЯ</text:p>
          </table:table-cell>
          <table:table-cell table:style-name="ce4" table:formula="of:=[.R29]&gt;[.O29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633669" calcext:value-type="float">
            <text:p>7,63E-01</text:p>
          </table:table-cell>
          <table:table-cell table:style-name="ce4" table:formula="of:=[.V29]&gt;[.Q29]" office:value-type="boolean" office:boolean-value="false" calcext:value-type="boolean">
            <text:p>БРЕХНЯ</text:p>
          </table:table-cell>
          <table:table-cell table:style-name="ce1" table:formula="of:=MAX([.V29];[.Q29])" office:value-type="float" office:value="0.7633669" calcext:value-type="float">
            <text:p>7,63E-01</text:p>
          </table:table-cell>
          <table:table-cell table:style-name="ce4" table:formula="of:=[.X29]&gt;[.R2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9]&gt;[.C29]" office:value-type="boolean" office:boolean-value="true" calcext:value-type="boolean">
            <text:p>ІСТИНА</text:p>
          </table:table-cell>
          <table:table-cell table:style-name="ce4" table:formula="of:=[.F29]&gt;[.D29]" office:value-type="boolean" office:boolean-value="true" calcext:value-type="boolean">
            <text:p>ІСТИНА</text:p>
          </table:table-cell>
          <table:table-cell table:style-name="ce4" table:formula="of:=[.G29]&gt;MAX([.C29];[.E29])" office:value-type="boolean" office:boolean-value="false" calcext:value-type="boolean">
            <text:p>БРЕХНЯ</text:p>
          </table:table-cell>
          <table:table-cell table:style-name="ce4" table:formula="of:=[.H29]&gt;MAX([.D29];[.F29])" office:value-type="boolean" office:boolean-value="true" calcext:value-type="boolean">
            <text:p>ІСТИНА</text:p>
          </table:table-cell>
          <table:table-cell table:style-name="ce4" table:formula="of:=[.I29]&gt;MAX([.C29];[.E29];[.G29])" office:value-type="boolean" office:boolean-value="false" calcext:value-type="boolean">
            <text:p>БРЕХНЯ</text:p>
          </table:table-cell>
          <table:table-cell table:style-name="ce4" table:formula="of:=[.J29]&gt;MAX([.D29];[.F29];[.H29])" office:value-type="boolean" office:boolean-value="true" calcext:value-type="boolean">
            <text:p>ІСТИНА</text:p>
          </table:table-cell>
          <table:table-cell table:style-name="ce4" table:formula="of:=[.K29]&gt;MAX([.C29];[.E29];[.G29];[.I29])" office:value-type="boolean" office:boolean-value="false" calcext:value-type="boolean">
            <text:p>БРЕХНЯ</text:p>
          </table:table-cell>
          <table:table-cell table:style-name="ce4" table:formula="of:=[.L29]&gt;MAX([.D29];[.F29];[.H29];[.J2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9]&gt;0.9" office:value-type="boolean" office:boolean-value="false" calcext:value-type="boolean">
            <text:p>БРЕХНЯ</text:p>
          </table:table-cell>
          <table:table-cell table:style-name="ce4" table:formula="of:=[.R29]&gt;0.9" office:value-type="boolean" office:boolean-value="true" calcext:value-type="boolean">
            <text:p>ІСТИНА</text:p>
          </table:table-cell>
          <table:table-cell table:style-name="ce4" table:formula="of:=[.X29]&gt;0.8" office:value-type="boolean" office:boolean-value="false" calcext:value-type="boolean">
            <text:p>БРЕХНЯ</text:p>
          </table:table-cell>
          <table:table-cell table:style-name="ce4" table:formula="of:=[.R29]&gt;0.8" office:value-type="boolean" office:boolean-value="true" calcext:value-type="boolean">
            <text:p>ІСТИНА</text:p>
          </table:table-cell>
          <table:table-cell table:style-name="ce4" table:formula="of:=[.X29]&gt;0.7" office:value-type="boolean" office:boolean-value="true" calcext:value-type="boolean">
            <text:p>ІСТИНА</text:p>
          </table:table-cell>
          <table:table-cell table:style-name="ce4" table:formula="of:=[.R2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.5911416" calcext:value-type="float">
            <text:p>5,91E-01</text:p>
          </table:table-cell>
          <table:table-cell table:style-name="ce1" office:value-type="float" office:value="0.8782272" calcext:value-type="float">
            <text:p>8,78E-01</text:p>
          </table:table-cell>
          <table:table-cell table:style-name="ce1" office:value-type="float" office:value="0.7312137" calcext:value-type="float">
            <text:p>7,31E-01</text:p>
          </table:table-cell>
          <table:table-cell table:style-name="ce1" office:value-type="float" office:value="0.8782272" calcext:value-type="float">
            <text:p>8,78E-01</text:p>
          </table:table-cell>
          <table:table-cell table:style-name="ce1" office:value-type="float" office:value="0.7312137" calcext:value-type="float">
            <text:p>7,31E-01</text:p>
          </table:table-cell>
          <table:table-cell table:style-name="ce1" office:value-type="float" office:value="0.8782272" calcext:value-type="float">
            <text:p>8,78E-01</text:p>
          </table:table-cell>
          <table:table-cell table:style-name="ce1" office:value-type="float" office:value="0.7312137" calcext:value-type="float">
            <text:p>7,31E-01</text:p>
          </table:table-cell>
          <table:table-cell table:style-name="ce1" office:value-type="float" office:value="0.8782272" calcext:value-type="float">
            <text:p>8,78E-01</text:p>
          </table:table-cell>
          <table:table-cell table:style-name="ce1" office:value-type="float" office:value="0.7312137" calcext:value-type="float">
            <text:p>7,31E-01</text:p>
          </table:table-cell>
          <table:table-cell table:style-name="ce1" office:value-type="float" office:value="0.8782272" calcext:value-type="float">
            <text:p>8,78E-01</text:p>
          </table:table-cell>
          <table:table-cell/>
          <table:table-cell table:style-name="ce1" table:formula="of:=MAX([.C30];[.E30];[.G30];[.I30];[.K30])" office:value-type="float" office:value="0.7312137" calcext:value-type="float">
            <text:p>7,31E-01</text:p>
          </table:table-cell>
          <table:table-cell table:style-name="ce8" table:formula="of:=MAX([.D30];[.F30];[.H30];[.J30];[.L30])" office:value-type="float" office:value="0.8782272" calcext:value-type="float">
            <text:p>8,78E-01</text:p>
          </table:table-cell>
          <table:table-cell table:style-name="ce1"/>
          <table:table-cell table:style-name="ce1" office:value-type="float" office:value="0.7312137" calcext:value-type="float">
            <text:p>7,31E-01</text:p>
          </table:table-cell>
          <table:table-cell table:style-name="ce1" office:value-type="float" office:value="0.8782272" calcext:value-type="float">
            <text:p>8,78E-01</text:p>
          </table:table-cell>
          <table:table-cell table:style-name="ce4" table:formula="of:=[.Q30]&gt;[.N30]" office:value-type="boolean" office:boolean-value="false" calcext:value-type="boolean">
            <text:p>БРЕХНЯ</text:p>
          </table:table-cell>
          <table:table-cell table:style-name="ce4" table:formula="of:=[.R30]&gt;[.O3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312137" calcext:value-type="float">
            <text:p>7,31E-01</text:p>
          </table:table-cell>
          <table:table-cell table:style-name="ce4" table:formula="of:=[.V30]&gt;[.Q30]" office:value-type="boolean" office:boolean-value="false" calcext:value-type="boolean">
            <text:p>БРЕХНЯ</text:p>
          </table:table-cell>
          <table:table-cell table:style-name="ce1" table:formula="of:=MAX([.V30];[.Q30])" office:value-type="float" office:value="0.7312137" calcext:value-type="float">
            <text:p>7,31E-01</text:p>
          </table:table-cell>
          <table:table-cell table:style-name="ce4" table:formula="of:=[.X30]&gt;[.R3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0]&gt;[.C30]" office:value-type="boolean" office:boolean-value="true" calcext:value-type="boolean">
            <text:p>ІСТИНА</text:p>
          </table:table-cell>
          <table:table-cell table:style-name="ce4" table:formula="of:=[.F30]&gt;[.D30]" office:value-type="boolean" office:boolean-value="false" calcext:value-type="boolean">
            <text:p>БРЕХНЯ</text:p>
          </table:table-cell>
          <table:table-cell table:style-name="ce4" table:formula="of:=[.G30]&gt;MAX([.C30];[.E30])" office:value-type="boolean" office:boolean-value="false" calcext:value-type="boolean">
            <text:p>БРЕХНЯ</text:p>
          </table:table-cell>
          <table:table-cell table:style-name="ce4" table:formula="of:=[.H30]&gt;MAX([.D30];[.F30])" office:value-type="boolean" office:boolean-value="false" calcext:value-type="boolean">
            <text:p>БРЕХНЯ</text:p>
          </table:table-cell>
          <table:table-cell table:style-name="ce4" table:formula="of:=[.I30]&gt;MAX([.C30];[.E30];[.G30])" office:value-type="boolean" office:boolean-value="false" calcext:value-type="boolean">
            <text:p>БРЕХНЯ</text:p>
          </table:table-cell>
          <table:table-cell table:style-name="ce4" table:formula="of:=[.J30]&gt;MAX([.D30];[.F30];[.H30])" office:value-type="boolean" office:boolean-value="false" calcext:value-type="boolean">
            <text:p>БРЕХНЯ</text:p>
          </table:table-cell>
          <table:table-cell table:style-name="ce4" table:formula="of:=[.K30]&gt;MAX([.C30];[.E30];[.G30];[.I30])" office:value-type="boolean" office:boolean-value="false" calcext:value-type="boolean">
            <text:p>БРЕХНЯ</text:p>
          </table:table-cell>
          <table:table-cell table:style-name="ce4" table:formula="of:=[.L30]&gt;MAX([.D30];[.F30];[.H30];[.J3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0]&gt;0.9" office:value-type="boolean" office:boolean-value="false" calcext:value-type="boolean">
            <text:p>БРЕХНЯ</text:p>
          </table:table-cell>
          <table:table-cell table:style-name="ce4" table:formula="of:=[.R30]&gt;0.9" office:value-type="boolean" office:boolean-value="false" calcext:value-type="boolean">
            <text:p>БРЕХНЯ</text:p>
          </table:table-cell>
          <table:table-cell table:style-name="ce4" table:formula="of:=[.X30]&gt;0.8" office:value-type="boolean" office:boolean-value="false" calcext:value-type="boolean">
            <text:p>БРЕХНЯ</text:p>
          </table:table-cell>
          <table:table-cell table:style-name="ce4" table:formula="of:=[.R30]&gt;0.8" office:value-type="boolean" office:boolean-value="true" calcext:value-type="boolean">
            <text:p>ІСТИНА</text:p>
          </table:table-cell>
          <table:table-cell table:style-name="ce4" table:formula="of:=[.X30]&gt;0.7" office:value-type="boolean" office:boolean-value="true" calcext:value-type="boolean">
            <text:p>ІСТИНА</text:p>
          </table:table-cell>
          <table:table-cell table:style-name="ce4" table:formula="of:=[.R3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.6188355" calcext:value-type="float">
            <text:p>6,19E-01</text:p>
          </table:table-cell>
          <table:table-cell table:style-name="ce1" office:value-type="float" office:value="0.8206727" calcext:value-type="float">
            <text:p>8,21E-01</text:p>
          </table:table-cell>
          <table:table-cell table:style-name="ce1" office:value-type="float" office:value="0.6635569" calcext:value-type="float">
            <text:p>6,64E-01</text:p>
          </table:table-cell>
          <table:table-cell table:style-name="ce1" office:value-type="float" office:value="0.8787207" calcext:value-type="float">
            <text:p>8,79E-01</text:p>
          </table:table-cell>
          <table:table-cell table:style-name="ce1" office:value-type="float" office:value="0.6761421" calcext:value-type="float">
            <text:p>6,76E-01</text:p>
          </table:table-cell>
          <table:table-cell table:style-name="ce1" office:value-type="float" office:value="0.8787207" calcext:value-type="float">
            <text:p>8,79E-01</text:p>
          </table:table-cell>
          <table:table-cell table:style-name="ce1" office:value-type="float" office:value="0.6761421" calcext:value-type="float">
            <text:p>6,76E-01</text:p>
          </table:table-cell>
          <table:table-cell table:style-name="ce1" office:value-type="float" office:value="0.8787207" calcext:value-type="float">
            <text:p>8,79E-01</text:p>
          </table:table-cell>
          <table:table-cell table:style-name="ce1" office:value-type="float" office:value="0.6761421" calcext:value-type="float">
            <text:p>6,76E-01</text:p>
          </table:table-cell>
          <table:table-cell table:style-name="ce1" office:value-type="float" office:value="0.8787207" calcext:value-type="float">
            <text:p>8,79E-01</text:p>
          </table:table-cell>
          <table:table-cell/>
          <table:table-cell table:style-name="ce1" table:formula="of:=MAX([.C31];[.E31];[.G31];[.I31];[.K31])" office:value-type="float" office:value="0.6761421" calcext:value-type="float">
            <text:p>6,76E-01</text:p>
          </table:table-cell>
          <table:table-cell table:style-name="ce8" table:formula="of:=MAX([.D31];[.F31];[.H31];[.J31];[.L31])" office:value-type="float" office:value="0.8787207" calcext:value-type="float">
            <text:p>8,79E-01</text:p>
          </table:table-cell>
          <table:table-cell table:style-name="ce1"/>
          <table:table-cell table:style-name="ce1" office:value-type="float" office:value="0.6761421" calcext:value-type="float">
            <text:p>6,76E-01</text:p>
          </table:table-cell>
          <table:table-cell table:style-name="ce1" office:value-type="float" office:value="0.8787207" calcext:value-type="float">
            <text:p>8,79E-01</text:p>
          </table:table-cell>
          <table:table-cell table:style-name="ce4" table:formula="of:=[.Q31]&gt;[.N31]" office:value-type="boolean" office:boolean-value="false" calcext:value-type="boolean">
            <text:p>БРЕХНЯ</text:p>
          </table:table-cell>
          <table:table-cell table:style-name="ce4" table:formula="of:=[.R31]&gt;[.O3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6761421" calcext:value-type="float">
            <text:p>6,76E-01</text:p>
          </table:table-cell>
          <table:table-cell table:style-name="ce4" table:formula="of:=[.V31]&gt;[.Q31]" office:value-type="boolean" office:boolean-value="false" calcext:value-type="boolean">
            <text:p>БРЕХНЯ</text:p>
          </table:table-cell>
          <table:table-cell table:style-name="ce1" table:formula="of:=MAX([.V31];[.Q31])" office:value-type="float" office:value="0.6761421" calcext:value-type="float">
            <text:p>6,76E-01</text:p>
          </table:table-cell>
          <table:table-cell table:style-name="ce4" table:formula="of:=[.X31]&gt;[.R3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1]&gt;[.C31]" office:value-type="boolean" office:boolean-value="true" calcext:value-type="boolean">
            <text:p>ІСТИНА</text:p>
          </table:table-cell>
          <table:table-cell table:style-name="ce4" table:formula="of:=[.F31]&gt;[.D31]" office:value-type="boolean" office:boolean-value="true" calcext:value-type="boolean">
            <text:p>ІСТИНА</text:p>
          </table:table-cell>
          <table:table-cell table:style-name="ce4" table:formula="of:=[.G31]&gt;MAX([.C31];[.E31])" office:value-type="boolean" office:boolean-value="true" calcext:value-type="boolean">
            <text:p>ІСТИНА</text:p>
          </table:table-cell>
          <table:table-cell table:style-name="ce4" table:formula="of:=[.H31]&gt;MAX([.D31];[.F31])" office:value-type="boolean" office:boolean-value="false" calcext:value-type="boolean">
            <text:p>БРЕХНЯ</text:p>
          </table:table-cell>
          <table:table-cell table:style-name="ce4" table:formula="of:=[.I31]&gt;MAX([.C31];[.E31];[.G31])" office:value-type="boolean" office:boolean-value="false" calcext:value-type="boolean">
            <text:p>БРЕХНЯ</text:p>
          </table:table-cell>
          <table:table-cell table:style-name="ce4" table:formula="of:=[.J31]&gt;MAX([.D31];[.F31];[.H31])" office:value-type="boolean" office:boolean-value="false" calcext:value-type="boolean">
            <text:p>БРЕХНЯ</text:p>
          </table:table-cell>
          <table:table-cell table:style-name="ce4" table:formula="of:=[.K31]&gt;MAX([.C31];[.E31];[.G31];[.I31])" office:value-type="boolean" office:boolean-value="false" calcext:value-type="boolean">
            <text:p>БРЕХНЯ</text:p>
          </table:table-cell>
          <table:table-cell table:style-name="ce4" table:formula="of:=[.L31]&gt;MAX([.D31];[.F31];[.H31];[.J3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1]&gt;0.9" office:value-type="boolean" office:boolean-value="false" calcext:value-type="boolean">
            <text:p>БРЕХНЯ</text:p>
          </table:table-cell>
          <table:table-cell table:style-name="ce4" table:formula="of:=[.R31]&gt;0.9" office:value-type="boolean" office:boolean-value="false" calcext:value-type="boolean">
            <text:p>БРЕХНЯ</text:p>
          </table:table-cell>
          <table:table-cell table:style-name="ce4" table:formula="of:=[.X31]&gt;0.8" office:value-type="boolean" office:boolean-value="false" calcext:value-type="boolean">
            <text:p>БРЕХНЯ</text:p>
          </table:table-cell>
          <table:table-cell table:style-name="ce4" table:formula="of:=[.R31]&gt;0.8" office:value-type="boolean" office:boolean-value="true" calcext:value-type="boolean">
            <text:p>ІСТИНА</text:p>
          </table:table-cell>
          <table:table-cell table:style-name="ce4" table:formula="of:=[.X31]&gt;0.7" office:value-type="boolean" office:boolean-value="false" calcext:value-type="boolean">
            <text:p>БРЕХНЯ</text:p>
          </table:table-cell>
          <table:table-cell table:style-name="ce4" table:formula="of:=[.R3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.8830048" calcext:value-type="float">
            <text:p>8,83E-01</text:p>
          </table:table-cell>
          <table:table-cell table:style-name="ce1" office:value-type="float" office:value="0.9235184" calcext:value-type="float">
            <text:p>9,24E-01</text:p>
          </table:table-cell>
          <table:table-cell table:style-name="ce1" office:value-type="float" office:value="0.8847966" calcext:value-type="float">
            <text:p>8,85E-01</text:p>
          </table:table-cell>
          <table:table-cell table:style-name="ce1" office:value-type="float" office:value="0.9235184" calcext:value-type="float">
            <text:p>9,24E-01</text:p>
          </table:table-cell>
          <table:table-cell table:style-name="ce1" office:value-type="float" office:value="0.8930072" calcext:value-type="float">
            <text:p>8,93E-01</text:p>
          </table:table-cell>
          <table:table-cell table:style-name="ce1" office:value-type="float" office:value="0.9235184" calcext:value-type="float">
            <text:p>9,24E-01</text:p>
          </table:table-cell>
          <table:table-cell table:style-name="ce1" office:value-type="float" office:value="0.8930072" calcext:value-type="float">
            <text:p>8,93E-01</text:p>
          </table:table-cell>
          <table:table-cell table:style-name="ce1" office:value-type="float" office:value="0.9235184" calcext:value-type="float">
            <text:p>9,24E-01</text:p>
          </table:table-cell>
          <table:table-cell table:style-name="ce1" office:value-type="float" office:value="0.9229923" calcext:value-type="float">
            <text:p>9,23E-01</text:p>
          </table:table-cell>
          <table:table-cell table:style-name="ce1" office:value-type="float" office:value="0.9462378" calcext:value-type="float">
            <text:p>9,46E-01</text:p>
          </table:table-cell>
          <table:table-cell/>
          <table:table-cell table:style-name="ce1" table:formula="of:=MAX([.C32];[.E32];[.G32];[.I32];[.K32])" office:value-type="float" office:value="0.9229923" calcext:value-type="float">
            <text:p>9,23E-01</text:p>
          </table:table-cell>
          <table:table-cell table:style-name="ce8" table:formula="of:=MAX([.D32];[.F32];[.H32];[.J32];[.L32])" office:value-type="float" office:value="0.9462378" calcext:value-type="float">
            <text:p>9,46E-01</text:p>
          </table:table-cell>
          <table:table-cell table:style-name="ce1"/>
          <table:table-cell table:style-name="ce1" office:value-type="float" office:value="0.9229923" calcext:value-type="float">
            <text:p>9,23E-01</text:p>
          </table:table-cell>
          <table:table-cell table:style-name="ce1" office:value-type="float" office:value="0.9462378" calcext:value-type="float">
            <text:p>9,46E-01</text:p>
          </table:table-cell>
          <table:table-cell table:style-name="ce4" table:formula="of:=[.Q32]&gt;[.N32]" office:value-type="boolean" office:boolean-value="false" calcext:value-type="boolean">
            <text:p>БРЕХНЯ</text:p>
          </table:table-cell>
          <table:table-cell table:style-name="ce4" table:formula="of:=[.R32]&gt;[.O3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229923" calcext:value-type="float">
            <text:p>9,23E-01</text:p>
          </table:table-cell>
          <table:table-cell table:style-name="ce4" table:formula="of:=[.V32]&gt;[.Q32]" office:value-type="boolean" office:boolean-value="false" calcext:value-type="boolean">
            <text:p>БРЕХНЯ</text:p>
          </table:table-cell>
          <table:table-cell table:style-name="ce1" table:formula="of:=MAX([.V32];[.Q32])" office:value-type="float" office:value="0.9229923" calcext:value-type="float">
            <text:p>9,23E-01</text:p>
          </table:table-cell>
          <table:table-cell table:style-name="ce4" table:formula="of:=[.X32]&gt;[.R3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2]&gt;[.C32]" office:value-type="boolean" office:boolean-value="true" calcext:value-type="boolean">
            <text:p>ІСТИНА</text:p>
          </table:table-cell>
          <table:table-cell table:style-name="ce4" table:formula="of:=[.F32]&gt;[.D32]" office:value-type="boolean" office:boolean-value="false" calcext:value-type="boolean">
            <text:p>БРЕХНЯ</text:p>
          </table:table-cell>
          <table:table-cell table:style-name="ce4" table:formula="of:=[.G32]&gt;MAX([.C32];[.E32])" office:value-type="boolean" office:boolean-value="true" calcext:value-type="boolean">
            <text:p>ІСТИНА</text:p>
          </table:table-cell>
          <table:table-cell table:style-name="ce4" table:formula="of:=[.H32]&gt;MAX([.D32];[.F32])" office:value-type="boolean" office:boolean-value="false" calcext:value-type="boolean">
            <text:p>БРЕХНЯ</text:p>
          </table:table-cell>
          <table:table-cell table:style-name="ce4" table:formula="of:=[.I32]&gt;MAX([.C32];[.E32];[.G32])" office:value-type="boolean" office:boolean-value="false" calcext:value-type="boolean">
            <text:p>БРЕХНЯ</text:p>
          </table:table-cell>
          <table:table-cell table:style-name="ce4" table:formula="of:=[.J32]&gt;MAX([.D32];[.F32];[.H32])" office:value-type="boolean" office:boolean-value="false" calcext:value-type="boolean">
            <text:p>БРЕХНЯ</text:p>
          </table:table-cell>
          <table:table-cell table:style-name="ce4" table:formula="of:=[.K32]&gt;MAX([.C32];[.E32];[.G32];[.I32])" office:value-type="boolean" office:boolean-value="true" calcext:value-type="boolean">
            <text:p>ІСТИНА</text:p>
          </table:table-cell>
          <table:table-cell table:style-name="ce4" table:formula="of:=[.L32]&gt;MAX([.D32];[.F32];[.H32];[.J32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32]&gt;0.9" office:value-type="boolean" office:boolean-value="true" calcext:value-type="boolean">
            <text:p>ІСТИНА</text:p>
          </table:table-cell>
          <table:table-cell table:style-name="ce4" table:formula="of:=[.R32]&gt;0.9" office:value-type="boolean" office:boolean-value="true" calcext:value-type="boolean">
            <text:p>ІСТИНА</text:p>
          </table:table-cell>
          <table:table-cell table:style-name="ce4" table:formula="of:=[.X32]&gt;0.8" office:value-type="boolean" office:boolean-value="true" calcext:value-type="boolean">
            <text:p>ІСТИНА</text:p>
          </table:table-cell>
          <table:table-cell table:style-name="ce4" table:formula="of:=[.R32]&gt;0.8" office:value-type="boolean" office:boolean-value="true" calcext:value-type="boolean">
            <text:p>ІСТИНА</text:p>
          </table:table-cell>
          <table:table-cell table:style-name="ce4" table:formula="of:=[.X32]&gt;0.7" office:value-type="boolean" office:boolean-value="true" calcext:value-type="boolean">
            <text:p>ІСТИНА</text:p>
          </table:table-cell>
          <table:table-cell table:style-name="ce4" table:formula="of:=[.R3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8043738" calcext:value-type="float">
            <text:p>8,04E-01</text:p>
          </table:table-cell>
          <table:table-cell table:style-name="ce1" office:value-type="float" office:value="0.9114099" calcext:value-type="float">
            <text:p>9,11E-01</text:p>
          </table:table-cell>
          <table:table-cell table:style-name="ce1" office:value-type="float" office:value="0.8043738" calcext:value-type="float">
            <text:p>8,04E-01</text:p>
          </table:table-cell>
          <table:table-cell table:style-name="ce1" office:value-type="float" office:value="0.9114099" calcext:value-type="float">
            <text:p>9,11E-01</text:p>
          </table:table-cell>
          <table:table-cell table:style-name="ce1" office:value-type="float" office:value="0.8043738" calcext:value-type="float">
            <text:p>8,04E-01</text:p>
          </table:table-cell>
          <table:table-cell table:style-name="ce1" office:value-type="float" office:value="0.9193589" calcext:value-type="float">
            <text:p>9,19E-01</text:p>
          </table:table-cell>
          <table:table-cell table:style-name="ce1" office:value-type="float" office:value="0.8043738" calcext:value-type="float">
            <text:p>8,04E-01</text:p>
          </table:table-cell>
          <table:table-cell table:style-name="ce1" office:value-type="float" office:value="0.9193589" calcext:value-type="float">
            <text:p>9,19E-01</text:p>
          </table:table-cell>
          <table:table-cell table:style-name="ce1" office:value-type="float" office:value="0.8043738" calcext:value-type="float">
            <text:p>8,04E-01</text:p>
          </table:table-cell>
          <table:table-cell table:style-name="ce1" office:value-type="float" office:value="0.9193589" calcext:value-type="float">
            <text:p>9,19E-01</text:p>
          </table:table-cell>
          <table:table-cell/>
          <table:table-cell table:style-name="ce1" table:formula="of:=MAX([.C33];[.E33];[.G33];[.I33];[.K33])" office:value-type="float" office:value="0.8043738" calcext:value-type="float">
            <text:p>8,04E-01</text:p>
          </table:table-cell>
          <table:table-cell table:style-name="ce8" table:formula="of:=MAX([.D33];[.F33];[.H33];[.J33];[.L33])" office:value-type="float" office:value="0.9193589" calcext:value-type="float">
            <text:p>9,19E-01</text:p>
          </table:table-cell>
          <table:table-cell table:style-name="ce1"/>
          <table:table-cell table:style-name="ce1" office:value-type="float" office:value="0.8043738" calcext:value-type="float">
            <text:p>8,04E-01</text:p>
          </table:table-cell>
          <table:table-cell table:style-name="ce1" office:value-type="float" office:value="0.9193589" calcext:value-type="float">
            <text:p>9,19E-01</text:p>
          </table:table-cell>
          <table:table-cell table:style-name="ce4" table:formula="of:=[.Q33]&gt;[.N33]" office:value-type="boolean" office:boolean-value="false" calcext:value-type="boolean">
            <text:p>БРЕХНЯ</text:p>
          </table:table-cell>
          <table:table-cell table:style-name="ce4" table:formula="of:=[.R33]&gt;[.O3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043738" calcext:value-type="float">
            <text:p>8,04E-01</text:p>
          </table:table-cell>
          <table:table-cell table:style-name="ce4" table:formula="of:=[.V33]&gt;[.Q33]" office:value-type="boolean" office:boolean-value="false" calcext:value-type="boolean">
            <text:p>БРЕХНЯ</text:p>
          </table:table-cell>
          <table:table-cell table:style-name="ce1" table:formula="of:=MAX([.V33];[.Q33])" office:value-type="float" office:value="0.8043738" calcext:value-type="float">
            <text:p>8,04E-01</text:p>
          </table:table-cell>
          <table:table-cell table:style-name="ce4" table:formula="of:=[.X33]&gt;[.R3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3]&gt;[.C33]" office:value-type="boolean" office:boolean-value="false" calcext:value-type="boolean">
            <text:p>БРЕХНЯ</text:p>
          </table:table-cell>
          <table:table-cell table:style-name="ce4" table:formula="of:=[.F33]&gt;[.D33]" office:value-type="boolean" office:boolean-value="false" calcext:value-type="boolean">
            <text:p>БРЕХНЯ</text:p>
          </table:table-cell>
          <table:table-cell table:style-name="ce4" table:formula="of:=[.G33]&gt;MAX([.C33];[.E33])" office:value-type="boolean" office:boolean-value="false" calcext:value-type="boolean">
            <text:p>БРЕХНЯ</text:p>
          </table:table-cell>
          <table:table-cell table:style-name="ce4" table:formula="of:=[.H33]&gt;MAX([.D33];[.F33])" office:value-type="boolean" office:boolean-value="true" calcext:value-type="boolean">
            <text:p>ІСТИНА</text:p>
          </table:table-cell>
          <table:table-cell table:style-name="ce4" table:formula="of:=[.I33]&gt;MAX([.C33];[.E33];[.G33])" office:value-type="boolean" office:boolean-value="false" calcext:value-type="boolean">
            <text:p>БРЕХНЯ</text:p>
          </table:table-cell>
          <table:table-cell table:style-name="ce4" table:formula="of:=[.J33]&gt;MAX([.D33];[.F33];[.H33])" office:value-type="boolean" office:boolean-value="false" calcext:value-type="boolean">
            <text:p>БРЕХНЯ</text:p>
          </table:table-cell>
          <table:table-cell table:style-name="ce4" table:formula="of:=[.K33]&gt;MAX([.C33];[.E33];[.G33];[.I33])" office:value-type="boolean" office:boolean-value="false" calcext:value-type="boolean">
            <text:p>БРЕХНЯ</text:p>
          </table:table-cell>
          <table:table-cell table:style-name="ce4" table:formula="of:=[.L33]&gt;MAX([.D33];[.F33];[.H33];[.J3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3]&gt;0.9" office:value-type="boolean" office:boolean-value="false" calcext:value-type="boolean">
            <text:p>БРЕХНЯ</text:p>
          </table:table-cell>
          <table:table-cell table:style-name="ce4" table:formula="of:=[.R33]&gt;0.9" office:value-type="boolean" office:boolean-value="true" calcext:value-type="boolean">
            <text:p>ІСТИНА</text:p>
          </table:table-cell>
          <table:table-cell table:style-name="ce4" table:formula="of:=[.X33]&gt;0.8" office:value-type="boolean" office:boolean-value="true" calcext:value-type="boolean">
            <text:p>ІСТИНА</text:p>
          </table:table-cell>
          <table:table-cell table:style-name="ce4" table:formula="of:=[.R33]&gt;0.8" office:value-type="boolean" office:boolean-value="true" calcext:value-type="boolean">
            <text:p>ІСТИНА</text:p>
          </table:table-cell>
          <table:table-cell table:style-name="ce4" table:formula="of:=[.X33]&gt;0.7" office:value-type="boolean" office:boolean-value="true" calcext:value-type="boolean">
            <text:p>ІСТИНА</text:p>
          </table:table-cell>
          <table:table-cell table:style-name="ce4" table:formula="of:=[.R3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.8147536" calcext:value-type="float">
            <text:p>8,15E-01</text:p>
          </table:table-cell>
          <table:table-cell table:style-name="ce1" office:value-type="float" office:value="0.8326177" calcext:value-type="float">
            <text:p>8,33E-01</text:p>
          </table:table-cell>
          <table:table-cell table:style-name="ce1" office:value-type="float" office:value="0.8147536" calcext:value-type="float">
            <text:p>8,15E-01</text:p>
          </table:table-cell>
          <table:table-cell table:style-name="ce1" office:value-type="float" office:value="0.9096436" calcext:value-type="float">
            <text:p>9,10E-01</text:p>
          </table:table-cell>
          <table:table-cell table:style-name="ce1" office:value-type="float" office:value="0.8147536" calcext:value-type="float">
            <text:p>8,15E-01</text:p>
          </table:table-cell>
          <table:table-cell table:style-name="ce1" office:value-type="float" office:value="0.9096436" calcext:value-type="float">
            <text:p>9,10E-01</text:p>
          </table:table-cell>
          <table:table-cell table:style-name="ce1" office:value-type="float" office:value="0.8147536" calcext:value-type="float">
            <text:p>8,15E-01</text:p>
          </table:table-cell>
          <table:table-cell table:style-name="ce1" office:value-type="float" office:value="0.9096436" calcext:value-type="float">
            <text:p>9,10E-01</text:p>
          </table:table-cell>
          <table:table-cell table:style-name="ce1" office:value-type="float" office:value="0.8147536" calcext:value-type="float">
            <text:p>8,15E-01</text:p>
          </table:table-cell>
          <table:table-cell table:style-name="ce1" office:value-type="float" office:value="0.9096436" calcext:value-type="float">
            <text:p>9,10E-01</text:p>
          </table:table-cell>
          <table:table-cell/>
          <table:table-cell table:style-name="ce1" table:formula="of:=MAX([.C34];[.E34];[.G34];[.I34];[.K34])" office:value-type="float" office:value="0.8147536" calcext:value-type="float">
            <text:p>8,15E-01</text:p>
          </table:table-cell>
          <table:table-cell table:style-name="ce8" table:formula="of:=MAX([.D34];[.F34];[.H34];[.J34];[.L34])" office:value-type="float" office:value="0.9096436" calcext:value-type="float">
            <text:p>9,10E-01</text:p>
          </table:table-cell>
          <table:table-cell table:style-name="ce2"/>
          <table:table-cell table:style-name="ce1" office:value-type="float" office:value="0.8147536" calcext:value-type="float">
            <text:p>8,15E-01</text:p>
          </table:table-cell>
          <table:table-cell table:style-name="ce1" office:value-type="float" office:value="0.9096436" calcext:value-type="float">
            <text:p>9,10E-01</text:p>
          </table:table-cell>
          <table:table-cell table:style-name="ce4" table:formula="of:=[.Q34]&gt;[.N34]" office:value-type="boolean" office:boolean-value="false" calcext:value-type="boolean">
            <text:p>БРЕХНЯ</text:p>
          </table:table-cell>
          <table:table-cell table:style-name="ce4" table:formula="of:=[.R34]&gt;[.O34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147536" calcext:value-type="float">
            <text:p>8,15E-01</text:p>
          </table:table-cell>
          <table:table-cell table:style-name="ce4" table:formula="of:=[.V34]&gt;[.Q34]" office:value-type="boolean" office:boolean-value="false" calcext:value-type="boolean">
            <text:p>БРЕХНЯ</text:p>
          </table:table-cell>
          <table:table-cell table:style-name="ce1" table:formula="of:=MAX([.V34];[.Q34])" office:value-type="float" office:value="0.8147536" calcext:value-type="float">
            <text:p>8,15E-01</text:p>
          </table:table-cell>
          <table:table-cell table:style-name="ce4" table:formula="of:=[.X34]&gt;[.R3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4]&gt;[.C34]" office:value-type="boolean" office:boolean-value="false" calcext:value-type="boolean">
            <text:p>БРЕХНЯ</text:p>
          </table:table-cell>
          <table:table-cell table:style-name="ce4" table:formula="of:=[.F34]&gt;[.D34]" office:value-type="boolean" office:boolean-value="true" calcext:value-type="boolean">
            <text:p>ІСТИНА</text:p>
          </table:table-cell>
          <table:table-cell table:style-name="ce4" table:formula="of:=[.G34]&gt;MAX([.C34];[.E34])" office:value-type="boolean" office:boolean-value="false" calcext:value-type="boolean">
            <text:p>БРЕХНЯ</text:p>
          </table:table-cell>
          <table:table-cell table:style-name="ce4" table:formula="of:=[.H34]&gt;MAX([.D34];[.F34])" office:value-type="boolean" office:boolean-value="false" calcext:value-type="boolean">
            <text:p>БРЕХНЯ</text:p>
          </table:table-cell>
          <table:table-cell table:style-name="ce4" table:formula="of:=[.I34]&gt;MAX([.C34];[.E34];[.G34])" office:value-type="boolean" office:boolean-value="false" calcext:value-type="boolean">
            <text:p>БРЕХНЯ</text:p>
          </table:table-cell>
          <table:table-cell table:style-name="ce4" table:formula="of:=[.J34]&gt;MAX([.D34];[.F34];[.H34])" office:value-type="boolean" office:boolean-value="false" calcext:value-type="boolean">
            <text:p>БРЕХНЯ</text:p>
          </table:table-cell>
          <table:table-cell table:style-name="ce4" table:formula="of:=[.K34]&gt;MAX([.C34];[.E34];[.G34];[.I34])" office:value-type="boolean" office:boolean-value="false" calcext:value-type="boolean">
            <text:p>БРЕХНЯ</text:p>
          </table:table-cell>
          <table:table-cell table:style-name="ce4" table:formula="of:=[.L34]&gt;MAX([.D34];[.F34];[.H34];[.J3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4]&gt;0.9" office:value-type="boolean" office:boolean-value="false" calcext:value-type="boolean">
            <text:p>БРЕХНЯ</text:p>
          </table:table-cell>
          <table:table-cell table:style-name="ce4" table:formula="of:=[.R34]&gt;0.9" office:value-type="boolean" office:boolean-value="true" calcext:value-type="boolean">
            <text:p>ІСТИНА</text:p>
          </table:table-cell>
          <table:table-cell table:style-name="ce4" table:formula="of:=[.X34]&gt;0.8" office:value-type="boolean" office:boolean-value="true" calcext:value-type="boolean">
            <text:p>ІСТИНА</text:p>
          </table:table-cell>
          <table:table-cell table:style-name="ce4" table:formula="of:=[.R34]&gt;0.8" office:value-type="boolean" office:boolean-value="true" calcext:value-type="boolean">
            <text:p>ІСТИНА</text:p>
          </table:table-cell>
          <table:table-cell table:style-name="ce4" table:formula="of:=[.X34]&gt;0.7" office:value-type="boolean" office:boolean-value="true" calcext:value-type="boolean">
            <text:p>ІСТИНА</text:p>
          </table:table-cell>
          <table:table-cell table:style-name="ce4" table:formula="of:=[.R3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.8063005" calcext:value-type="float">
            <text:p>8,06E-01</text:p>
          </table:table-cell>
          <table:table-cell table:style-name="ce1" office:value-type="float" office:value="0.8722073" calcext:value-type="float">
            <text:p>8,72E-01</text:p>
          </table:table-cell>
          <table:table-cell table:style-name="ce1" office:value-type="float" office:value="0.8063005" calcext:value-type="float">
            <text:p>8,06E-01</text:p>
          </table:table-cell>
          <table:table-cell table:style-name="ce1" office:value-type="float" office:value="0.8722073" calcext:value-type="float">
            <text:p>8,72E-01</text:p>
          </table:table-cell>
          <table:table-cell table:style-name="ce1" office:value-type="float" office:value="0.8063005" calcext:value-type="float">
            <text:p>8,06E-01</text:p>
          </table:table-cell>
          <table:table-cell table:style-name="ce1" office:value-type="float" office:value="0.872726" calcext:value-type="float">
            <text:p>8,73E-01</text:p>
          </table:table-cell>
          <table:table-cell table:style-name="ce1" office:value-type="float" office:value="0.8063005" calcext:value-type="float">
            <text:p>8,06E-01</text:p>
          </table:table-cell>
          <table:table-cell table:style-name="ce1" office:value-type="float" office:value="0.872726" calcext:value-type="float">
            <text:p>8,73E-01</text:p>
          </table:table-cell>
          <table:table-cell table:style-name="ce1" office:value-type="float" office:value="0.8063005" calcext:value-type="float">
            <text:p>8,06E-01</text:p>
          </table:table-cell>
          <table:table-cell table:style-name="ce1" office:value-type="float" office:value="0.872726" calcext:value-type="float">
            <text:p>8,73E-01</text:p>
          </table:table-cell>
          <table:table-cell/>
          <table:table-cell table:style-name="ce1" table:formula="of:=MAX([.C35];[.E35];[.G35];[.I35];[.K35])" office:value-type="float" office:value="0.8063005" calcext:value-type="float">
            <text:p>8,06E-01</text:p>
          </table:table-cell>
          <table:table-cell table:style-name="ce8" table:formula="of:=MAX([.D35];[.F35];[.H35];[.J35];[.L35])" office:value-type="float" office:value="0.872726" calcext:value-type="float">
            <text:p>8,73E-01</text:p>
          </table:table-cell>
          <table:table-cell table:style-name="ce1"/>
          <table:table-cell table:style-name="ce1" office:value-type="float" office:value="0.8063005" calcext:value-type="float">
            <text:p>8,06E-01</text:p>
          </table:table-cell>
          <table:table-cell table:style-name="ce1" office:value-type="float" office:value="0.872726" calcext:value-type="float">
            <text:p>8,73E-01</text:p>
          </table:table-cell>
          <table:table-cell table:style-name="ce4" table:formula="of:=[.Q35]&gt;[.N35]" office:value-type="boolean" office:boolean-value="false" calcext:value-type="boolean">
            <text:p>БРЕХНЯ</text:p>
          </table:table-cell>
          <table:table-cell table:style-name="ce4" table:formula="of:=[.R35]&gt;[.O3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063005" calcext:value-type="float">
            <text:p>8,06E-01</text:p>
          </table:table-cell>
          <table:table-cell table:style-name="ce4" table:formula="of:=[.V35]&gt;[.Q35]" office:value-type="boolean" office:boolean-value="false" calcext:value-type="boolean">
            <text:p>БРЕХНЯ</text:p>
          </table:table-cell>
          <table:table-cell table:style-name="ce1" table:formula="of:=MAX([.V35];[.Q35])" office:value-type="float" office:value="0.8063005" calcext:value-type="float">
            <text:p>8,06E-01</text:p>
          </table:table-cell>
          <table:table-cell table:style-name="ce4" table:formula="of:=[.X35]&gt;[.R3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5]&gt;[.C35]" office:value-type="boolean" office:boolean-value="false" calcext:value-type="boolean">
            <text:p>БРЕХНЯ</text:p>
          </table:table-cell>
          <table:table-cell table:style-name="ce4" table:formula="of:=[.F35]&gt;[.D35]" office:value-type="boolean" office:boolean-value="false" calcext:value-type="boolean">
            <text:p>БРЕХНЯ</text:p>
          </table:table-cell>
          <table:table-cell table:style-name="ce4" table:formula="of:=[.G35]&gt;MAX([.C35];[.E35])" office:value-type="boolean" office:boolean-value="false" calcext:value-type="boolean">
            <text:p>БРЕХНЯ</text:p>
          </table:table-cell>
          <table:table-cell table:style-name="ce4" table:formula="of:=[.H35]&gt;MAX([.D35];[.F35])" office:value-type="boolean" office:boolean-value="true" calcext:value-type="boolean">
            <text:p>ІСТИНА</text:p>
          </table:table-cell>
          <table:table-cell table:style-name="ce4" table:formula="of:=[.I35]&gt;MAX([.C35];[.E35];[.G35])" office:value-type="boolean" office:boolean-value="false" calcext:value-type="boolean">
            <text:p>БРЕХНЯ</text:p>
          </table:table-cell>
          <table:table-cell table:style-name="ce4" table:formula="of:=[.J35]&gt;MAX([.D35];[.F35];[.H35])" office:value-type="boolean" office:boolean-value="false" calcext:value-type="boolean">
            <text:p>БРЕХНЯ</text:p>
          </table:table-cell>
          <table:table-cell table:style-name="ce4" table:formula="of:=[.K35]&gt;MAX([.C35];[.E35];[.G35];[.I35])" office:value-type="boolean" office:boolean-value="false" calcext:value-type="boolean">
            <text:p>БРЕХНЯ</text:p>
          </table:table-cell>
          <table:table-cell table:style-name="ce4" table:formula="of:=[.L35]&gt;MAX([.D35];[.F35];[.H35];[.J3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5]&gt;0.9" office:value-type="boolean" office:boolean-value="false" calcext:value-type="boolean">
            <text:p>БРЕХНЯ</text:p>
          </table:table-cell>
          <table:table-cell table:style-name="ce4" table:formula="of:=[.R35]&gt;0.9" office:value-type="boolean" office:boolean-value="false" calcext:value-type="boolean">
            <text:p>БРЕХНЯ</text:p>
          </table:table-cell>
          <table:table-cell table:style-name="ce4" table:formula="of:=[.X35]&gt;0.8" office:value-type="boolean" office:boolean-value="true" calcext:value-type="boolean">
            <text:p>ІСТИНА</text:p>
          </table:table-cell>
          <table:table-cell table:style-name="ce4" table:formula="of:=[.R35]&gt;0.8" office:value-type="boolean" office:boolean-value="true" calcext:value-type="boolean">
            <text:p>ІСТИНА</text:p>
          </table:table-cell>
          <table:table-cell table:style-name="ce4" table:formula="of:=[.X35]&gt;0.7" office:value-type="boolean" office:boolean-value="true" calcext:value-type="boolean">
            <text:p>ІСТИНА</text:p>
          </table:table-cell>
          <table:table-cell table:style-name="ce4" table:formula="of:=[.R3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.6381549" calcext:value-type="float">
            <text:p>6,38E-01</text:p>
          </table:table-cell>
          <table:table-cell table:style-name="ce1" office:value-type="float" office:value="0.8707052" calcext:value-type="float">
            <text:p>8,71E-01</text:p>
          </table:table-cell>
          <table:table-cell table:style-name="ce1" office:value-type="float" office:value="0.6867382" calcext:value-type="float">
            <text:p>6,87E-01</text:p>
          </table:table-cell>
          <table:table-cell table:style-name="ce1" office:value-type="float" office:value="0.8707052" calcext:value-type="float">
            <text:p>8,71E-01</text:p>
          </table:table-cell>
          <table:table-cell table:style-name="ce1" office:value-type="float" office:value="0.6867382" calcext:value-type="float">
            <text:p>6,87E-01</text:p>
          </table:table-cell>
          <table:table-cell table:style-name="ce1" office:value-type="float" office:value="0.8914678" calcext:value-type="float">
            <text:p>8,91E-01</text:p>
          </table:table-cell>
          <table:table-cell table:style-name="ce1" office:value-type="float" office:value="0.6867382" calcext:value-type="float">
            <text:p>6,87E-01</text:p>
          </table:table-cell>
          <table:table-cell table:style-name="ce1" office:value-type="float" office:value="0.8914678" calcext:value-type="float">
            <text:p>8,91E-01</text:p>
          </table:table-cell>
          <table:table-cell table:style-name="ce1" office:value-type="float" office:value="0.7018117" calcext:value-type="float">
            <text:p>7,02E-01</text:p>
          </table:table-cell>
          <table:table-cell table:style-name="ce1" office:value-type="float" office:value="0.8914678" calcext:value-type="float">
            <text:p>8,91E-01</text:p>
          </table:table-cell>
          <table:table-cell/>
          <table:table-cell table:style-name="ce1" table:formula="of:=MAX([.C36];[.E36];[.G36];[.I36];[.K36])" office:value-type="float" office:value="0.7018117" calcext:value-type="float">
            <text:p>7,02E-01</text:p>
          </table:table-cell>
          <table:table-cell table:style-name="ce8" table:formula="of:=MAX([.D36];[.F36];[.H36];[.J36];[.L36])" office:value-type="float" office:value="0.8914678" calcext:value-type="float">
            <text:p>8,91E-01</text:p>
          </table:table-cell>
          <table:table-cell table:style-name="ce1"/>
          <table:table-cell table:style-name="ce1" office:value-type="float" office:value="0.7018117" calcext:value-type="float">
            <text:p>7,02E-01</text:p>
          </table:table-cell>
          <table:table-cell table:style-name="ce1" office:value-type="float" office:value="0.8914678" calcext:value-type="float">
            <text:p>8,91E-01</text:p>
          </table:table-cell>
          <table:table-cell table:style-name="ce4" table:formula="of:=[.Q36]&gt;[.N36]" office:value-type="boolean" office:boolean-value="false" calcext:value-type="boolean">
            <text:p>БРЕХНЯ</text:p>
          </table:table-cell>
          <table:table-cell table:style-name="ce4" table:formula="of:=[.R36]&gt;[.O3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018117" calcext:value-type="float">
            <text:p>7,02E-01</text:p>
          </table:table-cell>
          <table:table-cell table:style-name="ce4" table:formula="of:=[.V36]&gt;[.Q36]" office:value-type="boolean" office:boolean-value="false" calcext:value-type="boolean">
            <text:p>БРЕХНЯ</text:p>
          </table:table-cell>
          <table:table-cell table:style-name="ce1" table:formula="of:=MAX([.V36];[.Q36])" office:value-type="float" office:value="0.7018117" calcext:value-type="float">
            <text:p>7,02E-01</text:p>
          </table:table-cell>
          <table:table-cell table:style-name="ce4" table:formula="of:=[.X36]&gt;[.R3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6]&gt;[.C36]" office:value-type="boolean" office:boolean-value="true" calcext:value-type="boolean">
            <text:p>ІСТИНА</text:p>
          </table:table-cell>
          <table:table-cell table:style-name="ce4" table:formula="of:=[.F36]&gt;[.D36]" office:value-type="boolean" office:boolean-value="false" calcext:value-type="boolean">
            <text:p>БРЕХНЯ</text:p>
          </table:table-cell>
          <table:table-cell table:style-name="ce4" table:formula="of:=[.G36]&gt;MAX([.C36];[.E36])" office:value-type="boolean" office:boolean-value="false" calcext:value-type="boolean">
            <text:p>БРЕХНЯ</text:p>
          </table:table-cell>
          <table:table-cell table:style-name="ce4" table:formula="of:=[.H36]&gt;MAX([.D36];[.F36])" office:value-type="boolean" office:boolean-value="true" calcext:value-type="boolean">
            <text:p>ІСТИНА</text:p>
          </table:table-cell>
          <table:table-cell table:style-name="ce4" table:formula="of:=[.I36]&gt;MAX([.C36];[.E36];[.G36])" office:value-type="boolean" office:boolean-value="false" calcext:value-type="boolean">
            <text:p>БРЕХНЯ</text:p>
          </table:table-cell>
          <table:table-cell table:style-name="ce4" table:formula="of:=[.J36]&gt;MAX([.D36];[.F36];[.H36])" office:value-type="boolean" office:boolean-value="false" calcext:value-type="boolean">
            <text:p>БРЕХНЯ</text:p>
          </table:table-cell>
          <table:table-cell table:style-name="ce4" table:formula="of:=[.K36]&gt;MAX([.C36];[.E36];[.G36];[.I36])" office:value-type="boolean" office:boolean-value="true" calcext:value-type="boolean">
            <text:p>ІСТИНА</text:p>
          </table:table-cell>
          <table:table-cell table:style-name="ce4" table:formula="of:=[.L36]&gt;MAX([.D36];[.F36];[.H36];[.J3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6]&gt;0.9" office:value-type="boolean" office:boolean-value="false" calcext:value-type="boolean">
            <text:p>БРЕХНЯ</text:p>
          </table:table-cell>
          <table:table-cell table:style-name="ce4" table:formula="of:=[.R36]&gt;0.9" office:value-type="boolean" office:boolean-value="false" calcext:value-type="boolean">
            <text:p>БРЕХНЯ</text:p>
          </table:table-cell>
          <table:table-cell table:style-name="ce4" table:formula="of:=[.X36]&gt;0.8" office:value-type="boolean" office:boolean-value="false" calcext:value-type="boolean">
            <text:p>БРЕХНЯ</text:p>
          </table:table-cell>
          <table:table-cell table:style-name="ce4" table:formula="of:=[.R36]&gt;0.8" office:value-type="boolean" office:boolean-value="true" calcext:value-type="boolean">
            <text:p>ІСТИНА</text:p>
          </table:table-cell>
          <table:table-cell table:style-name="ce4" table:formula="of:=[.X36]&gt;0.7" office:value-type="boolean" office:boolean-value="true" calcext:value-type="boolean">
            <text:p>ІСТИНА</text:p>
          </table:table-cell>
          <table:table-cell table:style-name="ce4" table:formula="of:=[.R3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0.8202192" calcext:value-type="float">
            <text:p>8,20E-01</text:p>
          </table:table-cell>
          <table:table-cell table:style-name="ce1" office:value-type="float" office:value="0.9300087" calcext:value-type="float">
            <text:p>9,30E-01</text:p>
          </table:table-cell>
          <table:table-cell table:style-name="ce1" office:value-type="float" office:value="0.8749756" calcext:value-type="float">
            <text:p>8,75E-01</text:p>
          </table:table-cell>
          <table:table-cell table:style-name="ce1" office:value-type="float" office:value="0.9300087" calcext:value-type="float">
            <text:p>9,30E-01</text:p>
          </table:table-cell>
          <table:table-cell table:style-name="ce1" office:value-type="float" office:value="0.8826146" calcext:value-type="float">
            <text:p>8,83E-01</text:p>
          </table:table-cell>
          <table:table-cell table:style-name="ce1" office:value-type="float" office:value="0.9421003" calcext:value-type="float">
            <text:p>9,42E-01</text:p>
          </table:table-cell>
          <table:table-cell table:style-name="ce1" office:value-type="float" office:value="0.8826146" calcext:value-type="float">
            <text:p>8,83E-01</text:p>
          </table:table-cell>
          <table:table-cell table:style-name="ce1" office:value-type="float" office:value="0.9421003" calcext:value-type="float">
            <text:p>9,42E-01</text:p>
          </table:table-cell>
          <table:table-cell table:style-name="ce1" office:value-type="float" office:value="0.8826146" calcext:value-type="float">
            <text:p>8,83E-01</text:p>
          </table:table-cell>
          <table:table-cell table:style-name="ce1" office:value-type="float" office:value="0.9421003" calcext:value-type="float">
            <text:p>9,42E-01</text:p>
          </table:table-cell>
          <table:table-cell/>
          <table:table-cell table:style-name="ce1" table:formula="of:=MAX([.C37];[.E37];[.G37];[.I37];[.K37])" office:value-type="float" office:value="0.8826146" calcext:value-type="float">
            <text:p>8,83E-01</text:p>
          </table:table-cell>
          <table:table-cell table:style-name="ce8" table:formula="of:=MAX([.D37];[.F37];[.H37];[.J37];[.L37])" office:value-type="float" office:value="0.9421003" calcext:value-type="float">
            <text:p>9,42E-01</text:p>
          </table:table-cell>
          <table:table-cell table:style-name="ce1"/>
          <table:table-cell table:style-name="ce1" office:value-type="float" office:value="0.8826146" calcext:value-type="float">
            <text:p>8,83E-01</text:p>
          </table:table-cell>
          <table:table-cell table:style-name="ce1" office:value-type="float" office:value="0.9421003" calcext:value-type="float">
            <text:p>9,42E-01</text:p>
          </table:table-cell>
          <table:table-cell table:style-name="ce4" table:formula="of:=[.Q37]&gt;[.N37]" office:value-type="boolean" office:boolean-value="false" calcext:value-type="boolean">
            <text:p>БРЕХНЯ</text:p>
          </table:table-cell>
          <table:table-cell table:style-name="ce4" table:formula="of:=[.R37]&gt;[.O3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826146" calcext:value-type="float">
            <text:p>8,83E-01</text:p>
          </table:table-cell>
          <table:table-cell table:style-name="ce4" table:formula="of:=[.V37]&gt;[.Q37]" office:value-type="boolean" office:boolean-value="false" calcext:value-type="boolean">
            <text:p>БРЕХНЯ</text:p>
          </table:table-cell>
          <table:table-cell table:style-name="ce1" table:formula="of:=MAX([.V37];[.Q37])" office:value-type="float" office:value="0.8826146" calcext:value-type="float">
            <text:p>8,83E-01</text:p>
          </table:table-cell>
          <table:table-cell table:style-name="ce4" table:formula="of:=[.X37]&gt;[.R3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7]&gt;[.C37]" office:value-type="boolean" office:boolean-value="true" calcext:value-type="boolean">
            <text:p>ІСТИНА</text:p>
          </table:table-cell>
          <table:table-cell table:style-name="ce4" table:formula="of:=[.F37]&gt;[.D37]" office:value-type="boolean" office:boolean-value="false" calcext:value-type="boolean">
            <text:p>БРЕХНЯ</text:p>
          </table:table-cell>
          <table:table-cell table:style-name="ce4" table:formula="of:=[.G37]&gt;MAX([.C37];[.E37])" office:value-type="boolean" office:boolean-value="true" calcext:value-type="boolean">
            <text:p>ІСТИНА</text:p>
          </table:table-cell>
          <table:table-cell table:style-name="ce4" table:formula="of:=[.H37]&gt;MAX([.D37];[.F37])" office:value-type="boolean" office:boolean-value="true" calcext:value-type="boolean">
            <text:p>ІСТИНА</text:p>
          </table:table-cell>
          <table:table-cell table:style-name="ce4" table:formula="of:=[.I37]&gt;MAX([.C37];[.E37];[.G37])" office:value-type="boolean" office:boolean-value="false" calcext:value-type="boolean">
            <text:p>БРЕХНЯ</text:p>
          </table:table-cell>
          <table:table-cell table:style-name="ce4" table:formula="of:=[.J37]&gt;MAX([.D37];[.F37];[.H37])" office:value-type="boolean" office:boolean-value="false" calcext:value-type="boolean">
            <text:p>БРЕХНЯ</text:p>
          </table:table-cell>
          <table:table-cell table:style-name="ce4" table:formula="of:=[.K37]&gt;MAX([.C37];[.E37];[.G37];[.I37])" office:value-type="boolean" office:boolean-value="false" calcext:value-type="boolean">
            <text:p>БРЕХНЯ</text:p>
          </table:table-cell>
          <table:table-cell table:style-name="ce4" table:formula="of:=[.L37]&gt;MAX([.D37];[.F37];[.H37];[.J37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7]&gt;0.9" office:value-type="boolean" office:boolean-value="false" calcext:value-type="boolean">
            <text:p>БРЕХНЯ</text:p>
          </table:table-cell>
          <table:table-cell table:style-name="ce4" table:formula="of:=[.R37]&gt;0.9" office:value-type="boolean" office:boolean-value="true" calcext:value-type="boolean">
            <text:p>ІСТИНА</text:p>
          </table:table-cell>
          <table:table-cell table:style-name="ce4" table:formula="of:=[.X37]&gt;0.8" office:value-type="boolean" office:boolean-value="true" calcext:value-type="boolean">
            <text:p>ІСТИНА</text:p>
          </table:table-cell>
          <table:table-cell table:style-name="ce4" table:formula="of:=[.R37]&gt;0.8" office:value-type="boolean" office:boolean-value="true" calcext:value-type="boolean">
            <text:p>ІСТИНА</text:p>
          </table:table-cell>
          <table:table-cell table:style-name="ce4" table:formula="of:=[.X37]&gt;0.7" office:value-type="boolean" office:boolean-value="true" calcext:value-type="boolean">
            <text:p>ІСТИНА</text:p>
          </table:table-cell>
          <table:table-cell table:style-name="ce4" table:formula="of:=[.R3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0.7834881" calcext:value-type="float">
            <text:p>7,83E-01</text:p>
          </table:table-cell>
          <table:table-cell table:style-name="ce1" office:value-type="float" office:value="0.9168137" calcext:value-type="float">
            <text:p>9,17E-01</text:p>
          </table:table-cell>
          <table:table-cell table:style-name="ce1" office:value-type="float" office:value="0.7834881" calcext:value-type="float">
            <text:p>7,83E-01</text:p>
          </table:table-cell>
          <table:table-cell table:style-name="ce1" office:value-type="float" office:value="0.9168137" calcext:value-type="float">
            <text:p>9,17E-01</text:p>
          </table:table-cell>
          <table:table-cell table:style-name="ce1" office:value-type="float" office:value="0.7834881" calcext:value-type="float">
            <text:p>7,83E-01</text:p>
          </table:table-cell>
          <table:table-cell table:style-name="ce1" office:value-type="float" office:value="0.9168137" calcext:value-type="float">
            <text:p>9,17E-01</text:p>
          </table:table-cell>
          <table:table-cell table:style-name="ce1" office:value-type="float" office:value="0.7834881" calcext:value-type="float">
            <text:p>7,83E-01</text:p>
          </table:table-cell>
          <table:table-cell table:style-name="ce1" office:value-type="float" office:value="0.9168137" calcext:value-type="float">
            <text:p>9,17E-01</text:p>
          </table:table-cell>
          <table:table-cell table:style-name="ce1" office:value-type="float" office:value="0.7834881" calcext:value-type="float">
            <text:p>7,83E-01</text:p>
          </table:table-cell>
          <table:table-cell table:style-name="ce1" office:value-type="float" office:value="0.9168137" calcext:value-type="float">
            <text:p>9,17E-01</text:p>
          </table:table-cell>
          <table:table-cell/>
          <table:table-cell table:style-name="ce1" table:formula="of:=MAX([.C38];[.E38];[.G38];[.I38];[.K38])" office:value-type="float" office:value="0.7834881" calcext:value-type="float">
            <text:p>7,83E-01</text:p>
          </table:table-cell>
          <table:table-cell table:style-name="ce8" table:formula="of:=MAX([.D38];[.F38];[.H38];[.J38];[.L38])" office:value-type="float" office:value="0.9168137" calcext:value-type="float">
            <text:p>9,17E-01</text:p>
          </table:table-cell>
          <table:table-cell table:style-name="ce1"/>
          <table:table-cell table:style-name="ce1" office:value-type="float" office:value="0.7849062" calcext:value-type="float">
            <text:p>7,85E-01</text:p>
          </table:table-cell>
          <table:table-cell table:style-name="ce1" office:value-type="float" office:value="0.9168137" calcext:value-type="float">
            <text:p>9,17E-01</text:p>
          </table:table-cell>
          <table:table-cell table:style-name="ce4" table:formula="of:=[.Q38]&gt;[.N38]" office:value-type="boolean" office:boolean-value="true" calcext:value-type="boolean">
            <text:p>ІСТИНА</text:p>
          </table:table-cell>
          <table:table-cell table:style-name="ce4" table:formula="of:=[.R38]&gt;[.O3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49062" calcext:value-type="float">
            <text:p>7,85E-01</text:p>
          </table:table-cell>
          <table:table-cell table:style-name="ce4" table:formula="of:=[.V38]&gt;[.Q38]" office:value-type="boolean" office:boolean-value="false" calcext:value-type="boolean">
            <text:p>БРЕХНЯ</text:p>
          </table:table-cell>
          <table:table-cell table:style-name="ce1" table:formula="of:=MAX([.V38];[.Q38])" office:value-type="float" office:value="0.7849062" calcext:value-type="float">
            <text:p>7,85E-01</text:p>
          </table:table-cell>
          <table:table-cell table:style-name="ce4" table:formula="of:=[.X38]&gt;[.R3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8]&gt;[.C38]" office:value-type="boolean" office:boolean-value="false" calcext:value-type="boolean">
            <text:p>БРЕХНЯ</text:p>
          </table:table-cell>
          <table:table-cell table:style-name="ce4" table:formula="of:=[.F38]&gt;[.D38]" office:value-type="boolean" office:boolean-value="false" calcext:value-type="boolean">
            <text:p>БРЕХНЯ</text:p>
          </table:table-cell>
          <table:table-cell table:style-name="ce4" table:formula="of:=[.G38]&gt;MAX([.C38];[.E38])" office:value-type="boolean" office:boolean-value="false" calcext:value-type="boolean">
            <text:p>БРЕХНЯ</text:p>
          </table:table-cell>
          <table:table-cell table:style-name="ce4" table:formula="of:=[.H38]&gt;MAX([.D38];[.F38])" office:value-type="boolean" office:boolean-value="false" calcext:value-type="boolean">
            <text:p>БРЕХНЯ</text:p>
          </table:table-cell>
          <table:table-cell table:style-name="ce4" table:formula="of:=[.I38]&gt;MAX([.C38];[.E38];[.G38])" office:value-type="boolean" office:boolean-value="false" calcext:value-type="boolean">
            <text:p>БРЕХНЯ</text:p>
          </table:table-cell>
          <table:table-cell table:style-name="ce4" table:formula="of:=[.J38]&gt;MAX([.D38];[.F38];[.H38])" office:value-type="boolean" office:boolean-value="false" calcext:value-type="boolean">
            <text:p>БРЕХНЯ</text:p>
          </table:table-cell>
          <table:table-cell table:style-name="ce4" table:formula="of:=[.K38]&gt;MAX([.C38];[.E38];[.G38];[.I38])" office:value-type="boolean" office:boolean-value="false" calcext:value-type="boolean">
            <text:p>БРЕХНЯ</text:p>
          </table:table-cell>
          <table:table-cell table:style-name="ce4" table:formula="of:=[.L38]&gt;MAX([.D38];[.F38];[.H38];[.J3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8]&gt;0.9" office:value-type="boolean" office:boolean-value="false" calcext:value-type="boolean">
            <text:p>БРЕХНЯ</text:p>
          </table:table-cell>
          <table:table-cell table:style-name="ce4" table:formula="of:=[.R38]&gt;0.9" office:value-type="boolean" office:boolean-value="true" calcext:value-type="boolean">
            <text:p>ІСТИНА</text:p>
          </table:table-cell>
          <table:table-cell table:style-name="ce4" table:formula="of:=[.X38]&gt;0.8" office:value-type="boolean" office:boolean-value="false" calcext:value-type="boolean">
            <text:p>БРЕХНЯ</text:p>
          </table:table-cell>
          <table:table-cell table:style-name="ce4" table:formula="of:=[.R38]&gt;0.8" office:value-type="boolean" office:boolean-value="true" calcext:value-type="boolean">
            <text:p>ІСТИНА</text:p>
          </table:table-cell>
          <table:table-cell table:style-name="ce4" table:formula="of:=[.X38]&gt;0.7" office:value-type="boolean" office:boolean-value="true" calcext:value-type="boolean">
            <text:p>ІСТИНА</text:p>
          </table:table-cell>
          <table:table-cell table:style-name="ce4" table:formula="of:=[.R3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.7645995" calcext:value-type="float">
            <text:p>7,65E-01</text:p>
          </table:table-cell>
          <table:table-cell table:style-name="ce1" office:value-type="float" office:value="0.8965492" calcext:value-type="float">
            <text:p>8,97E-01</text:p>
          </table:table-cell>
          <table:table-cell table:style-name="ce1" office:value-type="float" office:value="0.7645995" calcext:value-type="float">
            <text:p>7,65E-01</text:p>
          </table:table-cell>
          <table:table-cell table:style-name="ce1" office:value-type="float" office:value="0.8965492" calcext:value-type="float">
            <text:p>8,97E-01</text:p>
          </table:table-cell>
          <table:table-cell table:style-name="ce1" office:value-type="float" office:value="0.7645995" calcext:value-type="float">
            <text:p>7,65E-01</text:p>
          </table:table-cell>
          <table:table-cell table:style-name="ce1" office:value-type="float" office:value="0.8965492" calcext:value-type="float">
            <text:p>8,97E-01</text:p>
          </table:table-cell>
          <table:table-cell table:style-name="ce1" office:value-type="float" office:value="0.7645995" calcext:value-type="float">
            <text:p>7,65E-01</text:p>
          </table:table-cell>
          <table:table-cell table:style-name="ce1" office:value-type="float" office:value="0.8965492" calcext:value-type="float">
            <text:p>8,97E-01</text:p>
          </table:table-cell>
          <table:table-cell table:style-name="ce1" office:value-type="float" office:value="0.7844723" calcext:value-type="float">
            <text:p>7,84E-01</text:p>
          </table:table-cell>
          <table:table-cell table:style-name="ce1" office:value-type="float" office:value="0.8965492" calcext:value-type="float">
            <text:p>8,97E-01</text:p>
          </table:table-cell>
          <table:table-cell/>
          <table:table-cell table:style-name="ce1" table:formula="of:=MAX([.C39];[.E39];[.G39];[.I39];[.K39])" office:value-type="float" office:value="0.7844723" calcext:value-type="float">
            <text:p>7,84E-01</text:p>
          </table:table-cell>
          <table:table-cell table:style-name="ce8" table:formula="of:=MAX([.D39];[.F39];[.H39];[.J39];[.L39])" office:value-type="float" office:value="0.8965492" calcext:value-type="float">
            <text:p>8,97E-01</text:p>
          </table:table-cell>
          <table:table-cell table:style-name="ce2"/>
          <table:table-cell table:style-name="ce1" office:value-type="float" office:value="0.7844723" calcext:value-type="float">
            <text:p>7,84E-01</text:p>
          </table:table-cell>
          <table:table-cell table:style-name="ce1" office:value-type="float" office:value="0.8965492" calcext:value-type="float">
            <text:p>8,97E-01</text:p>
          </table:table-cell>
          <table:table-cell table:style-name="ce4" table:formula="of:=[.Q39]&gt;[.N39]" office:value-type="boolean" office:boolean-value="false" calcext:value-type="boolean">
            <text:p>БРЕХНЯ</text:p>
          </table:table-cell>
          <table:table-cell table:style-name="ce4" table:formula="of:=[.R39]&gt;[.O39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44723" calcext:value-type="float">
            <text:p>7,84E-01</text:p>
          </table:table-cell>
          <table:table-cell table:style-name="ce4" table:formula="of:=[.V39]&gt;[.Q39]" office:value-type="boolean" office:boolean-value="false" calcext:value-type="boolean">
            <text:p>БРЕХНЯ</text:p>
          </table:table-cell>
          <table:table-cell table:style-name="ce1" table:formula="of:=MAX([.V39];[.Q39])" office:value-type="float" office:value="0.7844723" calcext:value-type="float">
            <text:p>7,84E-01</text:p>
          </table:table-cell>
          <table:table-cell table:style-name="ce4" table:formula="of:=[.X39]&gt;[.R3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9]&gt;[.C39]" office:value-type="boolean" office:boolean-value="false" calcext:value-type="boolean">
            <text:p>БРЕХНЯ</text:p>
          </table:table-cell>
          <table:table-cell table:style-name="ce4" table:formula="of:=[.F39]&gt;[.D39]" office:value-type="boolean" office:boolean-value="false" calcext:value-type="boolean">
            <text:p>БРЕХНЯ</text:p>
          </table:table-cell>
          <table:table-cell table:style-name="ce4" table:formula="of:=[.G39]&gt;MAX([.C39];[.E39])" office:value-type="boolean" office:boolean-value="false" calcext:value-type="boolean">
            <text:p>БРЕХНЯ</text:p>
          </table:table-cell>
          <table:table-cell table:style-name="ce4" table:formula="of:=[.H39]&gt;MAX([.D39];[.F39])" office:value-type="boolean" office:boolean-value="false" calcext:value-type="boolean">
            <text:p>БРЕХНЯ</text:p>
          </table:table-cell>
          <table:table-cell table:style-name="ce4" table:formula="of:=[.I39]&gt;MAX([.C39];[.E39];[.G39])" office:value-type="boolean" office:boolean-value="false" calcext:value-type="boolean">
            <text:p>БРЕХНЯ</text:p>
          </table:table-cell>
          <table:table-cell table:style-name="ce4" table:formula="of:=[.J39]&gt;MAX([.D39];[.F39];[.H39])" office:value-type="boolean" office:boolean-value="false" calcext:value-type="boolean">
            <text:p>БРЕХНЯ</text:p>
          </table:table-cell>
          <table:table-cell table:style-name="ce4" table:formula="of:=[.K39]&gt;MAX([.C39];[.E39];[.G39];[.I39])" office:value-type="boolean" office:boolean-value="true" calcext:value-type="boolean">
            <text:p>ІСТИНА</text:p>
          </table:table-cell>
          <table:table-cell table:style-name="ce4" table:formula="of:=[.L39]&gt;MAX([.D39];[.F39];[.H39];[.J3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9]&gt;0.9" office:value-type="boolean" office:boolean-value="false" calcext:value-type="boolean">
            <text:p>БРЕХНЯ</text:p>
          </table:table-cell>
          <table:table-cell table:style-name="ce4" table:formula="of:=[.R39]&gt;0.9" office:value-type="boolean" office:boolean-value="false" calcext:value-type="boolean">
            <text:p>БРЕХНЯ</text:p>
          </table:table-cell>
          <table:table-cell table:style-name="ce4" table:formula="of:=[.X39]&gt;0.8" office:value-type="boolean" office:boolean-value="false" calcext:value-type="boolean">
            <text:p>БРЕХНЯ</text:p>
          </table:table-cell>
          <table:table-cell table:style-name="ce4" table:formula="of:=[.R39]&gt;0.8" office:value-type="boolean" office:boolean-value="true" calcext:value-type="boolean">
            <text:p>ІСТИНА</text:p>
          </table:table-cell>
          <table:table-cell table:style-name="ce4" table:formula="of:=[.X39]&gt;0.7" office:value-type="boolean" office:boolean-value="true" calcext:value-type="boolean">
            <text:p>ІСТИНА</text:p>
          </table:table-cell>
          <table:table-cell table:style-name="ce4" table:formula="of:=[.R3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.7133391" calcext:value-type="float">
            <text:p>7,13E-01</text:p>
          </table:table-cell>
          <table:table-cell table:style-name="ce1" office:value-type="float" office:value="0.8863219" calcext:value-type="float">
            <text:p>8,86E-01</text:p>
          </table:table-cell>
          <table:table-cell table:style-name="ce1" office:value-type="float" office:value="0.7195731" calcext:value-type="float">
            <text:p>7,20E-01</text:p>
          </table:table-cell>
          <table:table-cell table:style-name="ce1" office:value-type="float" office:value="0.8989786" calcext:value-type="float">
            <text:p>8,99E-01</text:p>
          </table:table-cell>
          <table:table-cell table:style-name="ce1" office:value-type="float" office:value="0.7716789" calcext:value-type="float">
            <text:p>7,72E-01</text:p>
          </table:table-cell>
          <table:table-cell table:style-name="ce1" office:value-type="float" office:value="0.8989786" calcext:value-type="float">
            <text:p>8,99E-01</text:p>
          </table:table-cell>
          <table:table-cell table:style-name="ce1" office:value-type="float" office:value="0.7716789" calcext:value-type="float">
            <text:p>7,72E-01</text:p>
          </table:table-cell>
          <table:table-cell table:style-name="ce1" office:value-type="float" office:value="0.8989786" calcext:value-type="float">
            <text:p>8,99E-01</text:p>
          </table:table-cell>
          <table:table-cell table:style-name="ce1" office:value-type="float" office:value="0.7716789" calcext:value-type="float">
            <text:p>7,72E-01</text:p>
          </table:table-cell>
          <table:table-cell table:style-name="ce1" office:value-type="float" office:value="0.8989786" calcext:value-type="float">
            <text:p>8,99E-01</text:p>
          </table:table-cell>
          <table:table-cell/>
          <table:table-cell table:style-name="ce1" table:formula="of:=MAX([.C40];[.E40];[.G40];[.I40];[.K40])" office:value-type="float" office:value="0.7716789" calcext:value-type="float">
            <text:p>7,72E-01</text:p>
          </table:table-cell>
          <table:table-cell table:style-name="ce8" table:formula="of:=MAX([.D40];[.F40];[.H40];[.J40];[.L40])" office:value-type="float" office:value="0.8989786" calcext:value-type="float">
            <text:p>8,99E-01</text:p>
          </table:table-cell>
          <table:table-cell table:style-name="ce1"/>
          <table:table-cell table:style-name="ce1" office:value-type="float" office:value="0.7773189" calcext:value-type="float">
            <text:p>7,77E-01</text:p>
          </table:table-cell>
          <table:table-cell table:style-name="ce1" office:value-type="float" office:value="0.8989786" calcext:value-type="float">
            <text:p>8,99E-01</text:p>
          </table:table-cell>
          <table:table-cell table:style-name="ce4" table:formula="of:=[.Q40]&gt;[.N40]" office:value-type="boolean" office:boolean-value="true" calcext:value-type="boolean">
            <text:p>ІСТИНА</text:p>
          </table:table-cell>
          <table:table-cell table:style-name="ce4" table:formula="of:=[.R40]&gt;[.O4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773189" calcext:value-type="float">
            <text:p>7,77E-01</text:p>
          </table:table-cell>
          <table:table-cell table:style-name="ce4" table:formula="of:=[.V40]&gt;[.Q40]" office:value-type="boolean" office:boolean-value="false" calcext:value-type="boolean">
            <text:p>БРЕХНЯ</text:p>
          </table:table-cell>
          <table:table-cell table:style-name="ce1" table:formula="of:=MAX([.V40];[.Q40])" office:value-type="float" office:value="0.7773189" calcext:value-type="float">
            <text:p>7,77E-01</text:p>
          </table:table-cell>
          <table:table-cell table:style-name="ce4" table:formula="of:=[.X40]&gt;[.R4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0]&gt;[.C40]" office:value-type="boolean" office:boolean-value="true" calcext:value-type="boolean">
            <text:p>ІСТИНА</text:p>
          </table:table-cell>
          <table:table-cell table:style-name="ce4" table:formula="of:=[.F40]&gt;[.D40]" office:value-type="boolean" office:boolean-value="true" calcext:value-type="boolean">
            <text:p>ІСТИНА</text:p>
          </table:table-cell>
          <table:table-cell table:style-name="ce4" table:formula="of:=[.G40]&gt;MAX([.C40];[.E40])" office:value-type="boolean" office:boolean-value="true" calcext:value-type="boolean">
            <text:p>ІСТИНА</text:p>
          </table:table-cell>
          <table:table-cell table:style-name="ce4" table:formula="of:=[.H40]&gt;MAX([.D40];[.F40])" office:value-type="boolean" office:boolean-value="false" calcext:value-type="boolean">
            <text:p>БРЕХНЯ</text:p>
          </table:table-cell>
          <table:table-cell table:style-name="ce4" table:formula="of:=[.I40]&gt;MAX([.C40];[.E40];[.G40])" office:value-type="boolean" office:boolean-value="false" calcext:value-type="boolean">
            <text:p>БРЕХНЯ</text:p>
          </table:table-cell>
          <table:table-cell table:style-name="ce4" table:formula="of:=[.J40]&gt;MAX([.D40];[.F40];[.H40])" office:value-type="boolean" office:boolean-value="false" calcext:value-type="boolean">
            <text:p>БРЕХНЯ</text:p>
          </table:table-cell>
          <table:table-cell table:style-name="ce4" table:formula="of:=[.K40]&gt;MAX([.C40];[.E40];[.G40];[.I40])" office:value-type="boolean" office:boolean-value="false" calcext:value-type="boolean">
            <text:p>БРЕХНЯ</text:p>
          </table:table-cell>
          <table:table-cell table:style-name="ce4" table:formula="of:=[.L40]&gt;MAX([.D40];[.F40];[.H40];[.J4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0]&gt;0.9" office:value-type="boolean" office:boolean-value="false" calcext:value-type="boolean">
            <text:p>БРЕХНЯ</text:p>
          </table:table-cell>
          <table:table-cell table:style-name="ce4" table:formula="of:=[.R40]&gt;0.9" office:value-type="boolean" office:boolean-value="false" calcext:value-type="boolean">
            <text:p>БРЕХНЯ</text:p>
          </table:table-cell>
          <table:table-cell table:style-name="ce4" table:formula="of:=[.X40]&gt;0.8" office:value-type="boolean" office:boolean-value="false" calcext:value-type="boolean">
            <text:p>БРЕХНЯ</text:p>
          </table:table-cell>
          <table:table-cell table:style-name="ce4" table:formula="of:=[.R40]&gt;0.8" office:value-type="boolean" office:boolean-value="true" calcext:value-type="boolean">
            <text:p>ІСТИНА</text:p>
          </table:table-cell>
          <table:table-cell table:style-name="ce4" table:formula="of:=[.X40]&gt;0.7" office:value-type="boolean" office:boolean-value="true" calcext:value-type="boolean">
            <text:p>ІСТИНА</text:p>
          </table:table-cell>
          <table:table-cell table:style-name="ce4" table:formula="of:=[.R4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0.7245771" calcext:value-type="float">
            <text:p>7,25E-01</text:p>
          </table:table-cell>
          <table:table-cell table:style-name="ce1" office:value-type="float" office:value="0.7991673" calcext:value-type="float">
            <text:p>7,99E-01</text:p>
          </table:table-cell>
          <table:table-cell table:style-name="ce1" office:value-type="float" office:value="0.7245771" calcext:value-type="float">
            <text:p>7,25E-01</text:p>
          </table:table-cell>
          <table:table-cell table:style-name="ce1" office:value-type="float" office:value="0.8299357" calcext:value-type="float">
            <text:p>8,30E-01</text:p>
          </table:table-cell>
          <table:table-cell table:style-name="ce1" office:value-type="float" office:value="0.7245771" calcext:value-type="float">
            <text:p>7,25E-01</text:p>
          </table:table-cell>
          <table:table-cell table:style-name="ce1" office:value-type="float" office:value="0.8314116" calcext:value-type="float">
            <text:p>8,31E-01</text:p>
          </table:table-cell>
          <table:table-cell table:style-name="ce1" office:value-type="float" office:value="0.7279605" calcext:value-type="float">
            <text:p>7,28E-01</text:p>
          </table:table-cell>
          <table:table-cell table:style-name="ce1" office:value-type="float" office:value="0.8398517" calcext:value-type="float">
            <text:p>8,40E-01</text:p>
          </table:table-cell>
          <table:table-cell table:style-name="ce1" office:value-type="float" office:value="0.7279605" calcext:value-type="float">
            <text:p>7,28E-01</text:p>
          </table:table-cell>
          <table:table-cell table:style-name="ce1" office:value-type="float" office:value="0.8608979" calcext:value-type="float">
            <text:p>8,61E-01</text:p>
          </table:table-cell>
          <table:table-cell/>
          <table:table-cell table:style-name="ce1" table:formula="of:=MAX([.C41];[.E41];[.G41];[.I41];[.K41])" office:value-type="float" office:value="0.7279605" calcext:value-type="float">
            <text:p>7,28E-01</text:p>
          </table:table-cell>
          <table:table-cell table:style-name="ce8" table:formula="of:=MAX([.D41];[.F41];[.H41];[.J41];[.L41])" office:value-type="float" office:value="0.8608979" calcext:value-type="float">
            <text:p>8,61E-01</text:p>
          </table:table-cell>
          <table:table-cell table:style-name="ce1"/>
          <table:table-cell table:style-name="ce1" office:value-type="float" office:value="0.7279605" calcext:value-type="float">
            <text:p>7,28E-01</text:p>
          </table:table-cell>
          <table:table-cell table:style-name="ce1" office:value-type="float" office:value="0.8608979" calcext:value-type="float">
            <text:p>8,61E-01</text:p>
          </table:table-cell>
          <table:table-cell table:style-name="ce4" table:formula="of:=[.Q41]&gt;[.N41]" office:value-type="boolean" office:boolean-value="false" calcext:value-type="boolean">
            <text:p>БРЕХНЯ</text:p>
          </table:table-cell>
          <table:table-cell table:style-name="ce4" table:formula="of:=[.R41]&gt;[.O4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279605" calcext:value-type="float">
            <text:p>7,28E-01</text:p>
          </table:table-cell>
          <table:table-cell table:style-name="ce4" table:formula="of:=[.V41]&gt;[.Q41]" office:value-type="boolean" office:boolean-value="false" calcext:value-type="boolean">
            <text:p>БРЕХНЯ</text:p>
          </table:table-cell>
          <table:table-cell table:style-name="ce1" table:formula="of:=MAX([.V41];[.Q41])" office:value-type="float" office:value="0.7279605" calcext:value-type="float">
            <text:p>7,28E-01</text:p>
          </table:table-cell>
          <table:table-cell table:style-name="ce4" table:formula="of:=[.X41]&gt;[.R4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1]&gt;[.C41]" office:value-type="boolean" office:boolean-value="false" calcext:value-type="boolean">
            <text:p>БРЕХНЯ</text:p>
          </table:table-cell>
          <table:table-cell table:style-name="ce4" table:formula="of:=[.F41]&gt;[.D41]" office:value-type="boolean" office:boolean-value="true" calcext:value-type="boolean">
            <text:p>ІСТИНА</text:p>
          </table:table-cell>
          <table:table-cell table:style-name="ce4" table:formula="of:=[.G41]&gt;MAX([.C41];[.E41])" office:value-type="boolean" office:boolean-value="false" calcext:value-type="boolean">
            <text:p>БРЕХНЯ</text:p>
          </table:table-cell>
          <table:table-cell table:style-name="ce4" table:formula="of:=[.H41]&gt;MAX([.D41];[.F41])" office:value-type="boolean" office:boolean-value="true" calcext:value-type="boolean">
            <text:p>ІСТИНА</text:p>
          </table:table-cell>
          <table:table-cell table:style-name="ce4" table:formula="of:=[.I41]&gt;MAX([.C41];[.E41];[.G41])" office:value-type="boolean" office:boolean-value="true" calcext:value-type="boolean">
            <text:p>ІСТИНА</text:p>
          </table:table-cell>
          <table:table-cell table:style-name="ce4" table:formula="of:=[.J41]&gt;MAX([.D41];[.F41];[.H41])" office:value-type="boolean" office:boolean-value="true" calcext:value-type="boolean">
            <text:p>ІСТИНА</text:p>
          </table:table-cell>
          <table:table-cell table:style-name="ce4" table:formula="of:=[.K41]&gt;MAX([.C41];[.E41];[.G41];[.I41])" office:value-type="boolean" office:boolean-value="false" calcext:value-type="boolean">
            <text:p>БРЕХНЯ</text:p>
          </table:table-cell>
          <table:table-cell table:style-name="ce4" table:formula="of:=[.L41]&gt;MAX([.D41];[.F41];[.H41];[.J41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1]&gt;0.9" office:value-type="boolean" office:boolean-value="false" calcext:value-type="boolean">
            <text:p>БРЕХНЯ</text:p>
          </table:table-cell>
          <table:table-cell table:style-name="ce4" table:formula="of:=[.R41]&gt;0.9" office:value-type="boolean" office:boolean-value="false" calcext:value-type="boolean">
            <text:p>БРЕХНЯ</text:p>
          </table:table-cell>
          <table:table-cell table:style-name="ce4" table:formula="of:=[.X41]&gt;0.8" office:value-type="boolean" office:boolean-value="false" calcext:value-type="boolean">
            <text:p>БРЕХНЯ</text:p>
          </table:table-cell>
          <table:table-cell table:style-name="ce4" table:formula="of:=[.R41]&gt;0.8" office:value-type="boolean" office:boolean-value="true" calcext:value-type="boolean">
            <text:p>ІСТИНА</text:p>
          </table:table-cell>
          <table:table-cell table:style-name="ce4" table:formula="of:=[.X41]&gt;0.7" office:value-type="boolean" office:boolean-value="true" calcext:value-type="boolean">
            <text:p>ІСТИНА</text:p>
          </table:table-cell>
          <table:table-cell table:style-name="ce4" table:formula="of:=[.R4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.8583196" calcext:value-type="float">
            <text:p>8,58E-01</text:p>
          </table:table-cell>
          <table:table-cell table:style-name="ce1" office:value-type="float" office:value="0.9183248" calcext:value-type="float">
            <text:p>9,18E-01</text:p>
          </table:table-cell>
          <table:table-cell table:style-name="ce1" office:value-type="float" office:value="0.8583196" calcext:value-type="float">
            <text:p>8,58E-01</text:p>
          </table:table-cell>
          <table:table-cell table:style-name="ce1" office:value-type="float" office:value="0.9183248" calcext:value-type="float">
            <text:p>9,18E-01</text:p>
          </table:table-cell>
          <table:table-cell table:style-name="ce1" office:value-type="float" office:value="0.8781459" calcext:value-type="float">
            <text:p>8,78E-01</text:p>
          </table:table-cell>
          <table:table-cell table:style-name="ce1" office:value-type="float" office:value="0.9183248" calcext:value-type="float">
            <text:p>9,18E-01</text:p>
          </table:table-cell>
          <table:table-cell table:style-name="ce1" office:value-type="float" office:value="0.8781459" calcext:value-type="float">
            <text:p>8,78E-01</text:p>
          </table:table-cell>
          <table:table-cell table:style-name="ce1" office:value-type="float" office:value="0.9327541" calcext:value-type="float">
            <text:p>9,33E-01</text:p>
          </table:table-cell>
          <table:table-cell table:style-name="ce1" office:value-type="float" office:value="0.8781459" calcext:value-type="float">
            <text:p>8,78E-01</text:p>
          </table:table-cell>
          <table:table-cell table:style-name="ce1" office:value-type="float" office:value="0.93591" calcext:value-type="float">
            <text:p>9,36E-01</text:p>
          </table:table-cell>
          <table:table-cell/>
          <table:table-cell table:style-name="ce1" table:formula="of:=MAX([.C42];[.E42];[.G42];[.I42];[.K42])" office:value-type="float" office:value="0.8781459" calcext:value-type="float">
            <text:p>8,78E-01</text:p>
          </table:table-cell>
          <table:table-cell table:style-name="ce8" table:formula="of:=MAX([.D42];[.F42];[.H42];[.J42];[.L42])" office:value-type="float" office:value="0.93591" calcext:value-type="float">
            <text:p>9,36E-01</text:p>
          </table:table-cell>
          <table:table-cell table:style-name="ce1"/>
          <table:table-cell table:style-name="ce1" office:value-type="float" office:value="0.8781459" calcext:value-type="float">
            <text:p>8,78E-01</text:p>
          </table:table-cell>
          <table:table-cell table:style-name="ce1" office:value-type="float" office:value="0.93591" calcext:value-type="float">
            <text:p>9,36E-01</text:p>
          </table:table-cell>
          <table:table-cell table:style-name="ce4" table:formula="of:=[.Q42]&gt;[.N42]" office:value-type="boolean" office:boolean-value="false" calcext:value-type="boolean">
            <text:p>БРЕХНЯ</text:p>
          </table:table-cell>
          <table:table-cell table:style-name="ce4" table:formula="of:=[.R42]&gt;[.O4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781459" calcext:value-type="float">
            <text:p>8,78E-01</text:p>
          </table:table-cell>
          <table:table-cell table:style-name="ce4" table:formula="of:=[.V42]&gt;[.Q42]" office:value-type="boolean" office:boolean-value="false" calcext:value-type="boolean">
            <text:p>БРЕХНЯ</text:p>
          </table:table-cell>
          <table:table-cell table:style-name="ce1" table:formula="of:=MAX([.V42];[.Q42])" office:value-type="float" office:value="0.8781459" calcext:value-type="float">
            <text:p>8,78E-01</text:p>
          </table:table-cell>
          <table:table-cell table:style-name="ce4" table:formula="of:=[.X42]&gt;[.R4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2]&gt;[.C42]" office:value-type="boolean" office:boolean-value="false" calcext:value-type="boolean">
            <text:p>БРЕХНЯ</text:p>
          </table:table-cell>
          <table:table-cell table:style-name="ce4" table:formula="of:=[.F42]&gt;[.D42]" office:value-type="boolean" office:boolean-value="false" calcext:value-type="boolean">
            <text:p>БРЕХНЯ</text:p>
          </table:table-cell>
          <table:table-cell table:style-name="ce4" table:formula="of:=[.G42]&gt;MAX([.C42];[.E42])" office:value-type="boolean" office:boolean-value="true" calcext:value-type="boolean">
            <text:p>ІСТИНА</text:p>
          </table:table-cell>
          <table:table-cell table:style-name="ce4" table:formula="of:=[.H42]&gt;MAX([.D42];[.F42])" office:value-type="boolean" office:boolean-value="false" calcext:value-type="boolean">
            <text:p>БРЕХНЯ</text:p>
          </table:table-cell>
          <table:table-cell table:style-name="ce4" table:formula="of:=[.I42]&gt;MAX([.C42];[.E42];[.G42])" office:value-type="boolean" office:boolean-value="false" calcext:value-type="boolean">
            <text:p>БРЕХНЯ</text:p>
          </table:table-cell>
          <table:table-cell table:style-name="ce4" table:formula="of:=[.J42]&gt;MAX([.D42];[.F42];[.H42])" office:value-type="boolean" office:boolean-value="true" calcext:value-type="boolean">
            <text:p>ІСТИНА</text:p>
          </table:table-cell>
          <table:table-cell table:style-name="ce4" table:formula="of:=[.K42]&gt;MAX([.C42];[.E42];[.G42];[.I42])" office:value-type="boolean" office:boolean-value="false" calcext:value-type="boolean">
            <text:p>БРЕХНЯ</text:p>
          </table:table-cell>
          <table:table-cell table:style-name="ce4" table:formula="of:=[.L42]&gt;MAX([.D42];[.F42];[.H42];[.J42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2]&gt;0.9" office:value-type="boolean" office:boolean-value="false" calcext:value-type="boolean">
            <text:p>БРЕХНЯ</text:p>
          </table:table-cell>
          <table:table-cell table:style-name="ce4" table:formula="of:=[.R42]&gt;0.9" office:value-type="boolean" office:boolean-value="true" calcext:value-type="boolean">
            <text:p>ІСТИНА</text:p>
          </table:table-cell>
          <table:table-cell table:style-name="ce4" table:formula="of:=[.X42]&gt;0.8" office:value-type="boolean" office:boolean-value="true" calcext:value-type="boolean">
            <text:p>ІСТИНА</text:p>
          </table:table-cell>
          <table:table-cell table:style-name="ce4" table:formula="of:=[.R42]&gt;0.8" office:value-type="boolean" office:boolean-value="true" calcext:value-type="boolean">
            <text:p>ІСТИНА</text:p>
          </table:table-cell>
          <table:table-cell table:style-name="ce4" table:formula="of:=[.X42]&gt;0.7" office:value-type="boolean" office:boolean-value="true" calcext:value-type="boolean">
            <text:p>ІСТИНА</text:p>
          </table:table-cell>
          <table:table-cell table:style-name="ce4" table:formula="of:=[.R4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0.7881274" calcext:value-type="float">
            <text:p>7,88E-01</text:p>
          </table:table-cell>
          <table:table-cell table:style-name="ce1" office:value-type="float" office:value="0.8885836" calcext:value-type="float">
            <text:p>8,89E-01</text:p>
          </table:table-cell>
          <table:table-cell table:style-name="ce1" office:value-type="float" office:value="0.7881274" calcext:value-type="float">
            <text:p>7,88E-01</text:p>
          </table:table-cell>
          <table:table-cell table:style-name="ce1" office:value-type="float" office:value="0.9282239" calcext:value-type="float">
            <text:p>9,28E-01</text:p>
          </table:table-cell>
          <table:table-cell table:style-name="ce1" office:value-type="float" office:value="0.7936571" calcext:value-type="float">
            <text:p>7,94E-01</text:p>
          </table:table-cell>
          <table:table-cell table:style-name="ce1" office:value-type="float" office:value="0.9282239" calcext:value-type="float">
            <text:p>9,28E-01</text:p>
          </table:table-cell>
          <table:table-cell table:style-name="ce1" office:value-type="float" office:value="0.7936571" calcext:value-type="float">
            <text:p>7,94E-01</text:p>
          </table:table-cell>
          <table:table-cell table:style-name="ce1" office:value-type="float" office:value="0.9313311" calcext:value-type="float">
            <text:p>9,31E-01</text:p>
          </table:table-cell>
          <table:table-cell table:style-name="ce1" office:value-type="float" office:value="0.7936571" calcext:value-type="float">
            <text:p>7,94E-01</text:p>
          </table:table-cell>
          <table:table-cell table:style-name="ce1" office:value-type="float" office:value="0.9313311" calcext:value-type="float">
            <text:p>9,31E-01</text:p>
          </table:table-cell>
          <table:table-cell/>
          <table:table-cell table:style-name="ce1" table:formula="of:=MAX([.C43];[.E43];[.G43];[.I43];[.K43])" office:value-type="float" office:value="0.7936571" calcext:value-type="float">
            <text:p>7,94E-01</text:p>
          </table:table-cell>
          <table:table-cell table:style-name="ce8" table:formula="of:=MAX([.D43];[.F43];[.H43];[.J43];[.L43])" office:value-type="float" office:value="0.9313311" calcext:value-type="float">
            <text:p>9,31E-01</text:p>
          </table:table-cell>
          <table:table-cell table:style-name="ce1"/>
          <table:table-cell table:style-name="ce1" office:value-type="float" office:value="0.8189895" calcext:value-type="float">
            <text:p>8,19E-01</text:p>
          </table:table-cell>
          <table:table-cell table:style-name="ce1" office:value-type="float" office:value="0.9313311" calcext:value-type="float">
            <text:p>9,31E-01</text:p>
          </table:table-cell>
          <table:table-cell table:style-name="ce4" table:formula="of:=[.Q43]&gt;[.N43]" office:value-type="boolean" office:boolean-value="true" calcext:value-type="boolean">
            <text:p>ІСТИНА</text:p>
          </table:table-cell>
          <table:table-cell table:style-name="ce4" table:formula="of:=[.R43]&gt;[.O4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189895" calcext:value-type="float">
            <text:p>8,19E-01</text:p>
          </table:table-cell>
          <table:table-cell table:style-name="ce4" table:formula="of:=[.V43]&gt;[.Q43]" office:value-type="boolean" office:boolean-value="false" calcext:value-type="boolean">
            <text:p>БРЕХНЯ</text:p>
          </table:table-cell>
          <table:table-cell table:style-name="ce1" table:formula="of:=MAX([.V43];[.Q43])" office:value-type="float" office:value="0.8189895" calcext:value-type="float">
            <text:p>8,19E-01</text:p>
          </table:table-cell>
          <table:table-cell table:style-name="ce4" table:formula="of:=[.X43]&gt;[.R4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3]&gt;[.C43]" office:value-type="boolean" office:boolean-value="false" calcext:value-type="boolean">
            <text:p>БРЕХНЯ</text:p>
          </table:table-cell>
          <table:table-cell table:style-name="ce4" table:formula="of:=[.F43]&gt;[.D43]" office:value-type="boolean" office:boolean-value="true" calcext:value-type="boolean">
            <text:p>ІСТИНА</text:p>
          </table:table-cell>
          <table:table-cell table:style-name="ce4" table:formula="of:=[.G43]&gt;MAX([.C43];[.E43])" office:value-type="boolean" office:boolean-value="true" calcext:value-type="boolean">
            <text:p>ІСТИНА</text:p>
          </table:table-cell>
          <table:table-cell table:style-name="ce4" table:formula="of:=[.H43]&gt;MAX([.D43];[.F43])" office:value-type="boolean" office:boolean-value="false" calcext:value-type="boolean">
            <text:p>БРЕХНЯ</text:p>
          </table:table-cell>
          <table:table-cell table:style-name="ce4" table:formula="of:=[.I43]&gt;MAX([.C43];[.E43];[.G43])" office:value-type="boolean" office:boolean-value="false" calcext:value-type="boolean">
            <text:p>БРЕХНЯ</text:p>
          </table:table-cell>
          <table:table-cell table:style-name="ce4" table:formula="of:=[.J43]&gt;MAX([.D43];[.F43];[.H43])" office:value-type="boolean" office:boolean-value="true" calcext:value-type="boolean">
            <text:p>ІСТИНА</text:p>
          </table:table-cell>
          <table:table-cell table:style-name="ce4" table:formula="of:=[.K43]&gt;MAX([.C43];[.E43];[.G43];[.I43])" office:value-type="boolean" office:boolean-value="false" calcext:value-type="boolean">
            <text:p>БРЕХНЯ</text:p>
          </table:table-cell>
          <table:table-cell table:style-name="ce4" table:formula="of:=[.L43]&gt;MAX([.D43];[.F43];[.H43];[.J4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3]&gt;0.9" office:value-type="boolean" office:boolean-value="false" calcext:value-type="boolean">
            <text:p>БРЕХНЯ</text:p>
          </table:table-cell>
          <table:table-cell table:style-name="ce4" table:formula="of:=[.R43]&gt;0.9" office:value-type="boolean" office:boolean-value="true" calcext:value-type="boolean">
            <text:p>ІСТИНА</text:p>
          </table:table-cell>
          <table:table-cell table:style-name="ce4" table:formula="of:=[.X43]&gt;0.8" office:value-type="boolean" office:boolean-value="true" calcext:value-type="boolean">
            <text:p>ІСТИНА</text:p>
          </table:table-cell>
          <table:table-cell table:style-name="ce4" table:formula="of:=[.R43]&gt;0.8" office:value-type="boolean" office:boolean-value="true" calcext:value-type="boolean">
            <text:p>ІСТИНА</text:p>
          </table:table-cell>
          <table:table-cell table:style-name="ce4" table:formula="of:=[.X43]&gt;0.7" office:value-type="boolean" office:boolean-value="true" calcext:value-type="boolean">
            <text:p>ІСТИНА</text:p>
          </table:table-cell>
          <table:table-cell table:style-name="ce4" table:formula="of:=[.R4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7396453" calcext:value-type="float">
            <text:p>7,40E-01</text:p>
          </table:table-cell>
          <table:table-cell table:style-name="ce1" office:value-type="float" office:value="0.8706368" calcext:value-type="float">
            <text:p>8,71E-01</text:p>
          </table:table-cell>
          <table:table-cell table:style-name="ce1" office:value-type="float" office:value="0.8285546" calcext:value-type="float">
            <text:p>8,29E-01</text:p>
          </table:table-cell>
          <table:table-cell table:style-name="ce1" office:value-type="float" office:value="0.9219325" calcext:value-type="float">
            <text:p>9,22E-01</text:p>
          </table:table-cell>
          <table:table-cell table:style-name="ce1" office:value-type="float" office:value="0.8285546" calcext:value-type="float">
            <text:p>8,29E-01</text:p>
          </table:table-cell>
          <table:table-cell table:style-name="ce1" office:value-type="float" office:value="0.9219325" calcext:value-type="float">
            <text:p>9,22E-01</text:p>
          </table:table-cell>
          <table:table-cell table:style-name="ce1" office:value-type="float" office:value="0.8285546" calcext:value-type="float">
            <text:p>8,29E-01</text:p>
          </table:table-cell>
          <table:table-cell table:style-name="ce1" office:value-type="float" office:value="0.9219325" calcext:value-type="float">
            <text:p>9,22E-01</text:p>
          </table:table-cell>
          <table:table-cell table:style-name="ce1" office:value-type="float" office:value="0.8285546" calcext:value-type="float">
            <text:p>8,29E-01</text:p>
          </table:table-cell>
          <table:table-cell table:style-name="ce1" office:value-type="float" office:value="0.9263206" calcext:value-type="float">
            <text:p>9,26E-01</text:p>
          </table:table-cell>
          <table:table-cell/>
          <table:table-cell table:style-name="ce1" table:formula="of:=MAX([.C44];[.E44];[.G44];[.I44];[.K44])" office:value-type="float" office:value="0.8285546" calcext:value-type="float">
            <text:p>8,29E-01</text:p>
          </table:table-cell>
          <table:table-cell table:style-name="ce8" table:formula="of:=MAX([.D44];[.F44];[.H44];[.J44];[.L44])" office:value-type="float" office:value="0.9263206" calcext:value-type="float">
            <text:p>9,26E-01</text:p>
          </table:table-cell>
          <table:table-cell table:style-name="ce2"/>
          <table:table-cell table:style-name="ce1" office:value-type="float" office:value="0.8285546" calcext:value-type="float">
            <text:p>8,29E-01</text:p>
          </table:table-cell>
          <table:table-cell table:style-name="ce1" office:value-type="float" office:value="0.9263206" calcext:value-type="float">
            <text:p>9,26E-01</text:p>
          </table:table-cell>
          <table:table-cell table:style-name="ce4" table:formula="of:=[.Q44]&gt;[.N44]" office:value-type="boolean" office:boolean-value="false" calcext:value-type="boolean">
            <text:p>БРЕХНЯ</text:p>
          </table:table-cell>
          <table:table-cell table:style-name="ce4" table:formula="of:=[.R44]&gt;[.O44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285546" calcext:value-type="float">
            <text:p>8,29E-01</text:p>
          </table:table-cell>
          <table:table-cell table:style-name="ce4" table:formula="of:=[.V44]&gt;[.Q44]" office:value-type="boolean" office:boolean-value="false" calcext:value-type="boolean">
            <text:p>БРЕХНЯ</text:p>
          </table:table-cell>
          <table:table-cell table:style-name="ce1" table:formula="of:=MAX([.V44];[.Q44])" office:value-type="float" office:value="0.8285546" calcext:value-type="float">
            <text:p>8,29E-01</text:p>
          </table:table-cell>
          <table:table-cell table:style-name="ce4" table:formula="of:=[.X44]&gt;[.R4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4]&gt;[.C44]" office:value-type="boolean" office:boolean-value="true" calcext:value-type="boolean">
            <text:p>ІСТИНА</text:p>
          </table:table-cell>
          <table:table-cell table:style-name="ce4" table:formula="of:=[.F44]&gt;[.D44]" office:value-type="boolean" office:boolean-value="true" calcext:value-type="boolean">
            <text:p>ІСТИНА</text:p>
          </table:table-cell>
          <table:table-cell table:style-name="ce4" table:formula="of:=[.G44]&gt;MAX([.C44];[.E44])" office:value-type="boolean" office:boolean-value="false" calcext:value-type="boolean">
            <text:p>БРЕХНЯ</text:p>
          </table:table-cell>
          <table:table-cell table:style-name="ce4" table:formula="of:=[.H44]&gt;MAX([.D44];[.F44])" office:value-type="boolean" office:boolean-value="false" calcext:value-type="boolean">
            <text:p>БРЕХНЯ</text:p>
          </table:table-cell>
          <table:table-cell table:style-name="ce4" table:formula="of:=[.I44]&gt;MAX([.C44];[.E44];[.G44])" office:value-type="boolean" office:boolean-value="false" calcext:value-type="boolean">
            <text:p>БРЕХНЯ</text:p>
          </table:table-cell>
          <table:table-cell table:style-name="ce4" table:formula="of:=[.J44]&gt;MAX([.D44];[.F44];[.H44])" office:value-type="boolean" office:boolean-value="false" calcext:value-type="boolean">
            <text:p>БРЕХНЯ</text:p>
          </table:table-cell>
          <table:table-cell table:style-name="ce4" table:formula="of:=[.K44]&gt;MAX([.C44];[.E44];[.G44];[.I44])" office:value-type="boolean" office:boolean-value="false" calcext:value-type="boolean">
            <text:p>БРЕХНЯ</text:p>
          </table:table-cell>
          <table:table-cell table:style-name="ce4" table:formula="of:=[.L44]&gt;MAX([.D44];[.F44];[.H44];[.J44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4]&gt;0.9" office:value-type="boolean" office:boolean-value="false" calcext:value-type="boolean">
            <text:p>БРЕХНЯ</text:p>
          </table:table-cell>
          <table:table-cell table:style-name="ce4" table:formula="of:=[.R44]&gt;0.9" office:value-type="boolean" office:boolean-value="true" calcext:value-type="boolean">
            <text:p>ІСТИНА</text:p>
          </table:table-cell>
          <table:table-cell table:style-name="ce4" table:formula="of:=[.X44]&gt;0.8" office:value-type="boolean" office:boolean-value="true" calcext:value-type="boolean">
            <text:p>ІСТИНА</text:p>
          </table:table-cell>
          <table:table-cell table:style-name="ce4" table:formula="of:=[.R44]&gt;0.8" office:value-type="boolean" office:boolean-value="true" calcext:value-type="boolean">
            <text:p>ІСТИНА</text:p>
          </table:table-cell>
          <table:table-cell table:style-name="ce4" table:formula="of:=[.X44]&gt;0.7" office:value-type="boolean" office:boolean-value="true" calcext:value-type="boolean">
            <text:p>ІСТИНА</text:p>
          </table:table-cell>
          <table:table-cell table:style-name="ce4" table:formula="of:=[.R4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0.6798696" calcext:value-type="float">
            <text:p>6,80E-01</text:p>
          </table:table-cell>
          <table:table-cell table:style-name="ce1" office:value-type="float" office:value="0.8886749" calcext:value-type="float">
            <text:p>8,89E-01</text:p>
          </table:table-cell>
          <table:table-cell table:style-name="ce1" office:value-type="float" office:value="0.7806491" calcext:value-type="float">
            <text:p>7,81E-01</text:p>
          </table:table-cell>
          <table:table-cell table:style-name="ce1" office:value-type="float" office:value="0.8886749" calcext:value-type="float">
            <text:p>8,89E-01</text:p>
          </table:table-cell>
          <table:table-cell table:style-name="ce1" office:value-type="float" office:value="0.7806491" calcext:value-type="float">
            <text:p>7,81E-01</text:p>
          </table:table-cell>
          <table:table-cell table:style-name="ce1" office:value-type="float" office:value="0.8886749" calcext:value-type="float">
            <text:p>8,89E-01</text:p>
          </table:table-cell>
          <table:table-cell table:style-name="ce1" office:value-type="float" office:value="0.7806491" calcext:value-type="float">
            <text:p>7,81E-01</text:p>
          </table:table-cell>
          <table:table-cell table:style-name="ce1" office:value-type="float" office:value="0.9232007" calcext:value-type="float">
            <text:p>9,23E-01</text:p>
          </table:table-cell>
          <table:table-cell table:style-name="ce1" office:value-type="float" office:value="0.7806491" calcext:value-type="float">
            <text:p>7,81E-01</text:p>
          </table:table-cell>
          <table:table-cell table:style-name="ce1" office:value-type="float" office:value="0.9232007" calcext:value-type="float">
            <text:p>9,23E-01</text:p>
          </table:table-cell>
          <table:table-cell/>
          <table:table-cell table:style-name="ce1" table:formula="of:=MAX([.C45];[.E45];[.G45];[.I45];[.K45])" office:value-type="float" office:value="0.7806491" calcext:value-type="float">
            <text:p>7,81E-01</text:p>
          </table:table-cell>
          <table:table-cell table:style-name="ce8" table:formula="of:=MAX([.D45];[.F45];[.H45];[.J45];[.L45])" office:value-type="float" office:value="0.9232007" calcext:value-type="float">
            <text:p>9,23E-01</text:p>
          </table:table-cell>
          <table:table-cell table:style-name="ce1"/>
          <table:table-cell table:style-name="ce1" office:value-type="float" office:value="0.7806491" calcext:value-type="float">
            <text:p>7,81E-01</text:p>
          </table:table-cell>
          <table:table-cell table:style-name="ce1" office:value-type="float" office:value="0.9232007" calcext:value-type="float">
            <text:p>9,23E-01</text:p>
          </table:table-cell>
          <table:table-cell table:style-name="ce4" table:formula="of:=[.Q45]&gt;[.N45]" office:value-type="boolean" office:boolean-value="false" calcext:value-type="boolean">
            <text:p>БРЕХНЯ</text:p>
          </table:table-cell>
          <table:table-cell table:style-name="ce4" table:formula="of:=[.R45]&gt;[.O4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06491" calcext:value-type="float">
            <text:p>7,81E-01</text:p>
          </table:table-cell>
          <table:table-cell table:style-name="ce4" table:formula="of:=[.V45]&gt;[.Q45]" office:value-type="boolean" office:boolean-value="false" calcext:value-type="boolean">
            <text:p>БРЕХНЯ</text:p>
          </table:table-cell>
          <table:table-cell table:style-name="ce1" table:formula="of:=MAX([.V45];[.Q45])" office:value-type="float" office:value="0.7806491" calcext:value-type="float">
            <text:p>7,81E-01</text:p>
          </table:table-cell>
          <table:table-cell table:style-name="ce4" table:formula="of:=[.X45]&gt;[.R4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5]&gt;[.C45]" office:value-type="boolean" office:boolean-value="true" calcext:value-type="boolean">
            <text:p>ІСТИНА</text:p>
          </table:table-cell>
          <table:table-cell table:style-name="ce4" table:formula="of:=[.F45]&gt;[.D45]" office:value-type="boolean" office:boolean-value="false" calcext:value-type="boolean">
            <text:p>БРЕХНЯ</text:p>
          </table:table-cell>
          <table:table-cell table:style-name="ce4" table:formula="of:=[.G45]&gt;MAX([.C45];[.E45])" office:value-type="boolean" office:boolean-value="false" calcext:value-type="boolean">
            <text:p>БРЕХНЯ</text:p>
          </table:table-cell>
          <table:table-cell table:style-name="ce4" table:formula="of:=[.H45]&gt;MAX([.D45];[.F45])" office:value-type="boolean" office:boolean-value="false" calcext:value-type="boolean">
            <text:p>БРЕХНЯ</text:p>
          </table:table-cell>
          <table:table-cell table:style-name="ce4" table:formula="of:=[.I45]&gt;MAX([.C45];[.E45];[.G45])" office:value-type="boolean" office:boolean-value="false" calcext:value-type="boolean">
            <text:p>БРЕХНЯ</text:p>
          </table:table-cell>
          <table:table-cell table:style-name="ce4" table:formula="of:=[.J45]&gt;MAX([.D45];[.F45];[.H45])" office:value-type="boolean" office:boolean-value="true" calcext:value-type="boolean">
            <text:p>ІСТИНА</text:p>
          </table:table-cell>
          <table:table-cell table:style-name="ce4" table:formula="of:=[.K45]&gt;MAX([.C45];[.E45];[.G45];[.I45])" office:value-type="boolean" office:boolean-value="false" calcext:value-type="boolean">
            <text:p>БРЕХНЯ</text:p>
          </table:table-cell>
          <table:table-cell table:style-name="ce4" table:formula="of:=[.L45]&gt;MAX([.D45];[.F45];[.H45];[.J4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5]&gt;0.9" office:value-type="boolean" office:boolean-value="false" calcext:value-type="boolean">
            <text:p>БРЕХНЯ</text:p>
          </table:table-cell>
          <table:table-cell table:style-name="ce4" table:formula="of:=[.R45]&gt;0.9" office:value-type="boolean" office:boolean-value="true" calcext:value-type="boolean">
            <text:p>ІСТИНА</text:p>
          </table:table-cell>
          <table:table-cell table:style-name="ce4" table:formula="of:=[.X45]&gt;0.8" office:value-type="boolean" office:boolean-value="false" calcext:value-type="boolean">
            <text:p>БРЕХНЯ</text:p>
          </table:table-cell>
          <table:table-cell table:style-name="ce4" table:formula="of:=[.R45]&gt;0.8" office:value-type="boolean" office:boolean-value="true" calcext:value-type="boolean">
            <text:p>ІСТИНА</text:p>
          </table:table-cell>
          <table:table-cell table:style-name="ce4" table:formula="of:=[.X45]&gt;0.7" office:value-type="boolean" office:boolean-value="true" calcext:value-type="boolean">
            <text:p>ІСТИНА</text:p>
          </table:table-cell>
          <table:table-cell table:style-name="ce4" table:formula="of:=[.R4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.6835979" calcext:value-type="float">
            <text:p>6,84E-01</text:p>
          </table:table-cell>
          <table:table-cell table:style-name="ce1" office:value-type="float" office:value="0.843931" calcext:value-type="float">
            <text:p>8,44E-01</text:p>
          </table:table-cell>
          <table:table-cell table:style-name="ce1" office:value-type="float" office:value="0.6835979" calcext:value-type="float">
            <text:p>6,84E-01</text:p>
          </table:table-cell>
          <table:table-cell table:style-name="ce1" office:value-type="float" office:value="0.8900471" calcext:value-type="float">
            <text:p>8,90E-01</text:p>
          </table:table-cell>
          <table:table-cell table:style-name="ce1" office:value-type="float" office:value="0.7823158" calcext:value-type="float">
            <text:p>7,82E-01</text:p>
          </table:table-cell>
          <table:table-cell table:style-name="ce1" office:value-type="float" office:value="0.8900471" calcext:value-type="float">
            <text:p>8,90E-01</text:p>
          </table:table-cell>
          <table:table-cell table:style-name="ce1" office:value-type="float" office:value="0.7823158" calcext:value-type="float">
            <text:p>7,82E-01</text:p>
          </table:table-cell>
          <table:table-cell table:style-name="ce1" office:value-type="float" office:value="0.910221" calcext:value-type="float">
            <text:p>9,10E-01</text:p>
          </table:table-cell>
          <table:table-cell table:style-name="ce1" office:value-type="float" office:value="0.7823158" calcext:value-type="float">
            <text:p>7,82E-01</text:p>
          </table:table-cell>
          <table:table-cell table:style-name="ce1" office:value-type="float" office:value="0.910221" calcext:value-type="float">
            <text:p>9,10E-01</text:p>
          </table:table-cell>
          <table:table-cell/>
          <table:table-cell table:style-name="ce1" table:formula="of:=MAX([.C46];[.E46];[.G46];[.I46];[.K46])" office:value-type="float" office:value="0.7823158" calcext:value-type="float">
            <text:p>7,82E-01</text:p>
          </table:table-cell>
          <table:table-cell table:style-name="ce8" table:formula="of:=MAX([.D46];[.F46];[.H46];[.J46];[.L46])" office:value-type="float" office:value="0.910221" calcext:value-type="float">
            <text:p>9,10E-01</text:p>
          </table:table-cell>
          <table:table-cell table:style-name="ce1"/>
          <table:table-cell table:style-name="ce1" office:value-type="float" office:value="0.7823158" calcext:value-type="float">
            <text:p>7,82E-01</text:p>
          </table:table-cell>
          <table:table-cell table:style-name="ce1" office:value-type="float" office:value="0.910221" calcext:value-type="float">
            <text:p>9,10E-01</text:p>
          </table:table-cell>
          <table:table-cell table:style-name="ce4" table:formula="of:=[.Q46]&gt;[.N46]" office:value-type="boolean" office:boolean-value="false" calcext:value-type="boolean">
            <text:p>БРЕХНЯ</text:p>
          </table:table-cell>
          <table:table-cell table:style-name="ce4" table:formula="of:=[.R46]&gt;[.O4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23158" calcext:value-type="float">
            <text:p>7,82E-01</text:p>
          </table:table-cell>
          <table:table-cell table:style-name="ce4" table:formula="of:=[.V46]&gt;[.Q46]" office:value-type="boolean" office:boolean-value="false" calcext:value-type="boolean">
            <text:p>БРЕХНЯ</text:p>
          </table:table-cell>
          <table:table-cell table:style-name="ce1" table:formula="of:=MAX([.V46];[.Q46])" office:value-type="float" office:value="0.7823158" calcext:value-type="float">
            <text:p>7,82E-01</text:p>
          </table:table-cell>
          <table:table-cell table:style-name="ce4" table:formula="of:=[.X46]&gt;[.R4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6]&gt;[.C46]" office:value-type="boolean" office:boolean-value="false" calcext:value-type="boolean">
            <text:p>БРЕХНЯ</text:p>
          </table:table-cell>
          <table:table-cell table:style-name="ce4" table:formula="of:=[.F46]&gt;[.D46]" office:value-type="boolean" office:boolean-value="true" calcext:value-type="boolean">
            <text:p>ІСТИНА</text:p>
          </table:table-cell>
          <table:table-cell table:style-name="ce4" table:formula="of:=[.G46]&gt;MAX([.C46];[.E46])" office:value-type="boolean" office:boolean-value="true" calcext:value-type="boolean">
            <text:p>ІСТИНА</text:p>
          </table:table-cell>
          <table:table-cell table:style-name="ce4" table:formula="of:=[.H46]&gt;MAX([.D46];[.F46])" office:value-type="boolean" office:boolean-value="false" calcext:value-type="boolean">
            <text:p>БРЕХНЯ</text:p>
          </table:table-cell>
          <table:table-cell table:style-name="ce4" table:formula="of:=[.I46]&gt;MAX([.C46];[.E46];[.G46])" office:value-type="boolean" office:boolean-value="false" calcext:value-type="boolean">
            <text:p>БРЕХНЯ</text:p>
          </table:table-cell>
          <table:table-cell table:style-name="ce4" table:formula="of:=[.J46]&gt;MAX([.D46];[.F46];[.H46])" office:value-type="boolean" office:boolean-value="true" calcext:value-type="boolean">
            <text:p>ІСТИНА</text:p>
          </table:table-cell>
          <table:table-cell table:style-name="ce4" table:formula="of:=[.K46]&gt;MAX([.C46];[.E46];[.G46];[.I46])" office:value-type="boolean" office:boolean-value="false" calcext:value-type="boolean">
            <text:p>БРЕХНЯ</text:p>
          </table:table-cell>
          <table:table-cell table:style-name="ce4" table:formula="of:=[.L46]&gt;MAX([.D46];[.F46];[.H46];[.J4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6]&gt;0.9" office:value-type="boolean" office:boolean-value="false" calcext:value-type="boolean">
            <text:p>БРЕХНЯ</text:p>
          </table:table-cell>
          <table:table-cell table:style-name="ce4" table:formula="of:=[.R46]&gt;0.9" office:value-type="boolean" office:boolean-value="true" calcext:value-type="boolean">
            <text:p>ІСТИНА</text:p>
          </table:table-cell>
          <table:table-cell table:style-name="ce4" table:formula="of:=[.X46]&gt;0.8" office:value-type="boolean" office:boolean-value="false" calcext:value-type="boolean">
            <text:p>БРЕХНЯ</text:p>
          </table:table-cell>
          <table:table-cell table:style-name="ce4" table:formula="of:=[.R46]&gt;0.8" office:value-type="boolean" office:boolean-value="true" calcext:value-type="boolean">
            <text:p>ІСТИНА</text:p>
          </table:table-cell>
          <table:table-cell table:style-name="ce4" table:formula="of:=[.X46]&gt;0.7" office:value-type="boolean" office:boolean-value="true" calcext:value-type="boolean">
            <text:p>ІСТИНА</text:p>
          </table:table-cell>
          <table:table-cell table:style-name="ce4" table:formula="of:=[.R4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0.845836" calcext:value-type="float">
            <text:p>8,46E-01</text:p>
          </table:table-cell>
          <table:table-cell table:style-name="ce1" office:value-type="float" office:value="0.9165171" calcext:value-type="float">
            <text:p>9,17E-01</text:p>
          </table:table-cell>
          <table:table-cell table:style-name="ce1" office:value-type="float" office:value="0.845836" calcext:value-type="float">
            <text:p>8,46E-01</text:p>
          </table:table-cell>
          <table:table-cell table:style-name="ce1" office:value-type="float" office:value="0.9299668" calcext:value-type="float">
            <text:p>9,30E-01</text:p>
          </table:table-cell>
          <table:table-cell table:style-name="ce1" office:value-type="float" office:value="0.8859951" calcext:value-type="float">
            <text:p>8,86E-01</text:p>
          </table:table-cell>
          <table:table-cell table:style-name="ce1" office:value-type="float" office:value="0.9299668" calcext:value-type="float">
            <text:p>9,30E-01</text:p>
          </table:table-cell>
          <table:table-cell table:style-name="ce1" office:value-type="float" office:value="0.8859951" calcext:value-type="float">
            <text:p>8,86E-01</text:p>
          </table:table-cell>
          <table:table-cell table:style-name="ce1" office:value-type="float" office:value="0.937145" calcext:value-type="float">
            <text:p>9,37E-01</text:p>
          </table:table-cell>
          <table:table-cell table:style-name="ce1" office:value-type="float" office:value="0.8859951" calcext:value-type="float">
            <text:p>8,86E-01</text:p>
          </table:table-cell>
          <table:table-cell table:style-name="ce1" office:value-type="float" office:value="0.937145" calcext:value-type="float">
            <text:p>9,37E-01</text:p>
          </table:table-cell>
          <table:table-cell/>
          <table:table-cell table:style-name="ce1" table:formula="of:=MAX([.C47];[.E47];[.G47];[.I47];[.K47])" office:value-type="float" office:value="0.8859951" calcext:value-type="float">
            <text:p>8,86E-01</text:p>
          </table:table-cell>
          <table:table-cell table:style-name="ce8" table:formula="of:=MAX([.D47];[.F47];[.H47];[.J47];[.L47])" office:value-type="float" office:value="0.937145" calcext:value-type="float">
            <text:p>9,37E-01</text:p>
          </table:table-cell>
          <table:table-cell table:style-name="ce1"/>
          <table:table-cell table:style-name="ce1" office:value-type="float" office:value="0.8859951" calcext:value-type="float">
            <text:p>8,86E-01</text:p>
          </table:table-cell>
          <table:table-cell table:style-name="ce1" office:value-type="float" office:value="0.937145" calcext:value-type="float">
            <text:p>9,37E-01</text:p>
          </table:table-cell>
          <table:table-cell table:style-name="ce4" table:formula="of:=[.Q47]&gt;[.N47]" office:value-type="boolean" office:boolean-value="false" calcext:value-type="boolean">
            <text:p>БРЕХНЯ</text:p>
          </table:table-cell>
          <table:table-cell table:style-name="ce4" table:formula="of:=[.R47]&gt;[.O4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859951" calcext:value-type="float">
            <text:p>8,86E-01</text:p>
          </table:table-cell>
          <table:table-cell table:style-name="ce4" table:formula="of:=[.V47]&gt;[.Q47]" office:value-type="boolean" office:boolean-value="false" calcext:value-type="boolean">
            <text:p>БРЕХНЯ</text:p>
          </table:table-cell>
          <table:table-cell table:style-name="ce1" table:formula="of:=MAX([.V47];[.Q47])" office:value-type="float" office:value="0.8859951" calcext:value-type="float">
            <text:p>8,86E-01</text:p>
          </table:table-cell>
          <table:table-cell table:style-name="ce4" table:formula="of:=[.X47]&gt;[.R4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7]&gt;[.C47]" office:value-type="boolean" office:boolean-value="false" calcext:value-type="boolean">
            <text:p>БРЕХНЯ</text:p>
          </table:table-cell>
          <table:table-cell table:style-name="ce4" table:formula="of:=[.F47]&gt;[.D47]" office:value-type="boolean" office:boolean-value="true" calcext:value-type="boolean">
            <text:p>ІСТИНА</text:p>
          </table:table-cell>
          <table:table-cell table:style-name="ce4" table:formula="of:=[.G47]&gt;MAX([.C47];[.E47])" office:value-type="boolean" office:boolean-value="true" calcext:value-type="boolean">
            <text:p>ІСТИНА</text:p>
          </table:table-cell>
          <table:table-cell table:style-name="ce4" table:formula="of:=[.H47]&gt;MAX([.D47];[.F47])" office:value-type="boolean" office:boolean-value="false" calcext:value-type="boolean">
            <text:p>БРЕХНЯ</text:p>
          </table:table-cell>
          <table:table-cell table:style-name="ce4" table:formula="of:=[.I47]&gt;MAX([.C47];[.E47];[.G47])" office:value-type="boolean" office:boolean-value="false" calcext:value-type="boolean">
            <text:p>БРЕХНЯ</text:p>
          </table:table-cell>
          <table:table-cell table:style-name="ce4" table:formula="of:=[.J47]&gt;MAX([.D47];[.F47];[.H47])" office:value-type="boolean" office:boolean-value="true" calcext:value-type="boolean">
            <text:p>ІСТИНА</text:p>
          </table:table-cell>
          <table:table-cell table:style-name="ce4" table:formula="of:=[.K47]&gt;MAX([.C47];[.E47];[.G47];[.I47])" office:value-type="boolean" office:boolean-value="false" calcext:value-type="boolean">
            <text:p>БРЕХНЯ</text:p>
          </table:table-cell>
          <table:table-cell table:style-name="ce4" table:formula="of:=[.L47]&gt;MAX([.D47];[.F47];[.H47];[.J47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7]&gt;0.9" office:value-type="boolean" office:boolean-value="false" calcext:value-type="boolean">
            <text:p>БРЕХНЯ</text:p>
          </table:table-cell>
          <table:table-cell table:style-name="ce4" table:formula="of:=[.R47]&gt;0.9" office:value-type="boolean" office:boolean-value="true" calcext:value-type="boolean">
            <text:p>ІСТИНА</text:p>
          </table:table-cell>
          <table:table-cell table:style-name="ce4" table:formula="of:=[.X47]&gt;0.8" office:value-type="boolean" office:boolean-value="true" calcext:value-type="boolean">
            <text:p>ІСТИНА</text:p>
          </table:table-cell>
          <table:table-cell table:style-name="ce4" table:formula="of:=[.R47]&gt;0.8" office:value-type="boolean" office:boolean-value="true" calcext:value-type="boolean">
            <text:p>ІСТИНА</text:p>
          </table:table-cell>
          <table:table-cell table:style-name="ce4" table:formula="of:=[.X47]&gt;0.7" office:value-type="boolean" office:boolean-value="true" calcext:value-type="boolean">
            <text:p>ІСТИНА</text:p>
          </table:table-cell>
          <table:table-cell table:style-name="ce4" table:formula="of:=[.R4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.7737899" calcext:value-type="float">
            <text:p>7,74E-01</text:p>
          </table:table-cell>
          <table:table-cell table:style-name="ce1" office:value-type="float" office:value="0.8755742" calcext:value-type="float">
            <text:p>8,76E-01</text:p>
          </table:table-cell>
          <table:table-cell table:style-name="ce1" office:value-type="float" office:value="0.7737899" calcext:value-type="float">
            <text:p>7,74E-01</text:p>
          </table:table-cell>
          <table:table-cell table:style-name="ce1" office:value-type="float" office:value="0.8755742" calcext:value-type="float">
            <text:p>8,76E-01</text:p>
          </table:table-cell>
          <table:table-cell table:style-name="ce1" office:value-type="float" office:value="0.800835" calcext:value-type="float">
            <text:p>8,01E-01</text:p>
          </table:table-cell>
          <table:table-cell table:style-name="ce1" office:value-type="float" office:value="0.8755742" calcext:value-type="float">
            <text:p>8,76E-01</text:p>
          </table:table-cell>
          <table:table-cell table:style-name="ce1" office:value-type="float" office:value="0.8137472" calcext:value-type="float">
            <text:p>8,14E-01</text:p>
          </table:table-cell>
          <table:table-cell table:style-name="ce1" office:value-type="float" office:value="0.8772132" calcext:value-type="float">
            <text:p>8,77E-01</text:p>
          </table:table-cell>
          <table:table-cell table:style-name="ce1" office:value-type="float" office:value="0.8137472" calcext:value-type="float">
            <text:p>8,14E-01</text:p>
          </table:table-cell>
          <table:table-cell table:style-name="ce1" office:value-type="float" office:value="0.9194155" calcext:value-type="float">
            <text:p>9,19E-01</text:p>
          </table:table-cell>
          <table:table-cell/>
          <table:table-cell table:style-name="ce1" table:formula="of:=MAX([.C48];[.E48];[.G48];[.I48];[.K48])" office:value-type="float" office:value="0.8137472" calcext:value-type="float">
            <text:p>8,14E-01</text:p>
          </table:table-cell>
          <table:table-cell table:style-name="ce8" table:formula="of:=MAX([.D48];[.F48];[.H48];[.J48];[.L48])" office:value-type="float" office:value="0.9194155" calcext:value-type="float">
            <text:p>9,19E-01</text:p>
          </table:table-cell>
          <table:table-cell table:style-name="ce1"/>
          <table:table-cell table:style-name="ce1" office:value-type="float" office:value="0.8137472" calcext:value-type="float">
            <text:p>8,14E-01</text:p>
          </table:table-cell>
          <table:table-cell table:style-name="ce1" office:value-type="float" office:value="0.9194155" calcext:value-type="float">
            <text:p>9,19E-01</text:p>
          </table:table-cell>
          <table:table-cell table:style-name="ce4" table:formula="of:=[.Q48]&gt;[.N48]" office:value-type="boolean" office:boolean-value="false" calcext:value-type="boolean">
            <text:p>БРЕХНЯ</text:p>
          </table:table-cell>
          <table:table-cell table:style-name="ce4" table:formula="of:=[.R48]&gt;[.O4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137472" calcext:value-type="float">
            <text:p>8,14E-01</text:p>
          </table:table-cell>
          <table:table-cell table:style-name="ce4" table:formula="of:=[.V48]&gt;[.Q48]" office:value-type="boolean" office:boolean-value="false" calcext:value-type="boolean">
            <text:p>БРЕХНЯ</text:p>
          </table:table-cell>
          <table:table-cell table:style-name="ce1" table:formula="of:=MAX([.V48];[.Q48])" office:value-type="float" office:value="0.8137472" calcext:value-type="float">
            <text:p>8,14E-01</text:p>
          </table:table-cell>
          <table:table-cell table:style-name="ce4" table:formula="of:=[.X48]&gt;[.R4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8]&gt;[.C48]" office:value-type="boolean" office:boolean-value="false" calcext:value-type="boolean">
            <text:p>БРЕХНЯ</text:p>
          </table:table-cell>
          <table:table-cell table:style-name="ce4" table:formula="of:=[.F48]&gt;[.D48]" office:value-type="boolean" office:boolean-value="false" calcext:value-type="boolean">
            <text:p>БРЕХНЯ</text:p>
          </table:table-cell>
          <table:table-cell table:style-name="ce4" table:formula="of:=[.G48]&gt;MAX([.C48];[.E48])" office:value-type="boolean" office:boolean-value="true" calcext:value-type="boolean">
            <text:p>ІСТИНА</text:p>
          </table:table-cell>
          <table:table-cell table:style-name="ce4" table:formula="of:=[.H48]&gt;MAX([.D48];[.F48])" office:value-type="boolean" office:boolean-value="false" calcext:value-type="boolean">
            <text:p>БРЕХНЯ</text:p>
          </table:table-cell>
          <table:table-cell table:style-name="ce4" table:formula="of:=[.I48]&gt;MAX([.C48];[.E48];[.G48])" office:value-type="boolean" office:boolean-value="true" calcext:value-type="boolean">
            <text:p>ІСТИНА</text:p>
          </table:table-cell>
          <table:table-cell table:style-name="ce4" table:formula="of:=[.J48]&gt;MAX([.D48];[.F48];[.H48])" office:value-type="boolean" office:boolean-value="true" calcext:value-type="boolean">
            <text:p>ІСТИНА</text:p>
          </table:table-cell>
          <table:table-cell table:style-name="ce4" table:formula="of:=[.K48]&gt;MAX([.C48];[.E48];[.G48];[.I48])" office:value-type="boolean" office:boolean-value="false" calcext:value-type="boolean">
            <text:p>БРЕХНЯ</text:p>
          </table:table-cell>
          <table:table-cell table:style-name="ce4" table:formula="of:=[.L48]&gt;MAX([.D48];[.F48];[.H48];[.J48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8]&gt;0.9" office:value-type="boolean" office:boolean-value="false" calcext:value-type="boolean">
            <text:p>БРЕХНЯ</text:p>
          </table:table-cell>
          <table:table-cell table:style-name="ce4" table:formula="of:=[.R48]&gt;0.9" office:value-type="boolean" office:boolean-value="true" calcext:value-type="boolean">
            <text:p>ІСТИНА</text:p>
          </table:table-cell>
          <table:table-cell table:style-name="ce4" table:formula="of:=[.X48]&gt;0.8" office:value-type="boolean" office:boolean-value="true" calcext:value-type="boolean">
            <text:p>ІСТИНА</text:p>
          </table:table-cell>
          <table:table-cell table:style-name="ce4" table:formula="of:=[.R48]&gt;0.8" office:value-type="boolean" office:boolean-value="true" calcext:value-type="boolean">
            <text:p>ІСТИНА</text:p>
          </table:table-cell>
          <table:table-cell table:style-name="ce4" table:formula="of:=[.X48]&gt;0.7" office:value-type="boolean" office:boolean-value="true" calcext:value-type="boolean">
            <text:p>ІСТИНА</text:p>
          </table:table-cell>
          <table:table-cell table:style-name="ce4" table:formula="of:=[.R4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.7810277" calcext:value-type="float">
            <text:p>7,81E-01</text:p>
          </table:table-cell>
          <table:table-cell table:style-name="ce1" office:value-type="float" office:value="0.8761586" calcext:value-type="float">
            <text:p>8,76E-01</text:p>
          </table:table-cell>
          <table:table-cell table:style-name="ce1" office:value-type="float" office:value="0.7810277" calcext:value-type="float">
            <text:p>7,81E-01</text:p>
          </table:table-cell>
          <table:table-cell table:style-name="ce1" office:value-type="float" office:value="0.9338126" calcext:value-type="float">
            <text:p>9,34E-01</text:p>
          </table:table-cell>
          <table:table-cell table:style-name="ce1" office:value-type="float" office:value="0.7810277" calcext:value-type="float">
            <text:p>7,81E-01</text:p>
          </table:table-cell>
          <table:table-cell table:style-name="ce1" office:value-type="float" office:value="0.9338126" calcext:value-type="float">
            <text:p>9,34E-01</text:p>
          </table:table-cell>
          <table:table-cell table:style-name="ce1" office:value-type="float" office:value="0.7810277" calcext:value-type="float">
            <text:p>7,81E-01</text:p>
          </table:table-cell>
          <table:table-cell table:style-name="ce1" office:value-type="float" office:value="0.9338126" calcext:value-type="float">
            <text:p>9,34E-01</text:p>
          </table:table-cell>
          <table:table-cell table:style-name="ce1" office:value-type="float" office:value="0.7810277" calcext:value-type="float">
            <text:p>7,81E-01</text:p>
          </table:table-cell>
          <table:table-cell table:style-name="ce1" office:value-type="float" office:value="0.9338126" calcext:value-type="float">
            <text:p>9,34E-01</text:p>
          </table:table-cell>
          <table:table-cell/>
          <table:table-cell table:style-name="ce1" table:formula="of:=MAX([.C49];[.E49];[.G49];[.I49];[.K49])" office:value-type="float" office:value="0.7810277" calcext:value-type="float">
            <text:p>7,81E-01</text:p>
          </table:table-cell>
          <table:table-cell table:style-name="ce8" table:formula="of:=MAX([.D49];[.F49];[.H49];[.J49];[.L49])" office:value-type="float" office:value="0.9338126" calcext:value-type="float">
            <text:p>9,34E-01</text:p>
          </table:table-cell>
          <table:table-cell table:style-name="ce2"/>
          <table:table-cell table:style-name="ce1" office:value-type="float" office:value="0.8353739" calcext:value-type="float">
            <text:p>8,35E-01</text:p>
          </table:table-cell>
          <table:table-cell table:style-name="ce1" office:value-type="float" office:value="0.9338126" calcext:value-type="float">
            <text:p>9,34E-01</text:p>
          </table:table-cell>
          <table:table-cell table:style-name="ce4" table:formula="of:=[.Q49]&gt;[.N49]" office:value-type="boolean" office:boolean-value="true" calcext:value-type="boolean">
            <text:p>ІСТИНА</text:p>
          </table:table-cell>
          <table:table-cell table:style-name="ce4" table:formula="of:=[.R49]&gt;[.O49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353739" calcext:value-type="float">
            <text:p>8,35E-01</text:p>
          </table:table-cell>
          <table:table-cell table:style-name="ce4" table:formula="of:=[.V49]&gt;[.Q49]" office:value-type="boolean" office:boolean-value="false" calcext:value-type="boolean">
            <text:p>БРЕХНЯ</text:p>
          </table:table-cell>
          <table:table-cell table:style-name="ce1" table:formula="of:=MAX([.V49];[.Q49])" office:value-type="float" office:value="0.8353739" calcext:value-type="float">
            <text:p>8,35E-01</text:p>
          </table:table-cell>
          <table:table-cell table:style-name="ce4" table:formula="of:=[.X49]&gt;[.R4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9]&gt;[.C49]" office:value-type="boolean" office:boolean-value="false" calcext:value-type="boolean">
            <text:p>БРЕХНЯ</text:p>
          </table:table-cell>
          <table:table-cell table:style-name="ce4" table:formula="of:=[.F49]&gt;[.D49]" office:value-type="boolean" office:boolean-value="true" calcext:value-type="boolean">
            <text:p>ІСТИНА</text:p>
          </table:table-cell>
          <table:table-cell table:style-name="ce4" table:formula="of:=[.G49]&gt;MAX([.C49];[.E49])" office:value-type="boolean" office:boolean-value="false" calcext:value-type="boolean">
            <text:p>БРЕХНЯ</text:p>
          </table:table-cell>
          <table:table-cell table:style-name="ce4" table:formula="of:=[.H49]&gt;MAX([.D49];[.F49])" office:value-type="boolean" office:boolean-value="false" calcext:value-type="boolean">
            <text:p>БРЕХНЯ</text:p>
          </table:table-cell>
          <table:table-cell table:style-name="ce4" table:formula="of:=[.I49]&gt;MAX([.C49];[.E49];[.G49])" office:value-type="boolean" office:boolean-value="false" calcext:value-type="boolean">
            <text:p>БРЕХНЯ</text:p>
          </table:table-cell>
          <table:table-cell table:style-name="ce4" table:formula="of:=[.J49]&gt;MAX([.D49];[.F49];[.H49])" office:value-type="boolean" office:boolean-value="false" calcext:value-type="boolean">
            <text:p>БРЕХНЯ</text:p>
          </table:table-cell>
          <table:table-cell table:style-name="ce4" table:formula="of:=[.K49]&gt;MAX([.C49];[.E49];[.G49];[.I49])" office:value-type="boolean" office:boolean-value="false" calcext:value-type="boolean">
            <text:p>БРЕХНЯ</text:p>
          </table:table-cell>
          <table:table-cell table:style-name="ce4" table:formula="of:=[.L49]&gt;MAX([.D49];[.F49];[.H49];[.J4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9]&gt;0.9" office:value-type="boolean" office:boolean-value="false" calcext:value-type="boolean">
            <text:p>БРЕХНЯ</text:p>
          </table:table-cell>
          <table:table-cell table:style-name="ce4" table:formula="of:=[.R49]&gt;0.9" office:value-type="boolean" office:boolean-value="true" calcext:value-type="boolean">
            <text:p>ІСТИНА</text:p>
          </table:table-cell>
          <table:table-cell table:style-name="ce4" table:formula="of:=[.X49]&gt;0.8" office:value-type="boolean" office:boolean-value="true" calcext:value-type="boolean">
            <text:p>ІСТИНА</text:p>
          </table:table-cell>
          <table:table-cell table:style-name="ce4" table:formula="of:=[.R49]&gt;0.8" office:value-type="boolean" office:boolean-value="true" calcext:value-type="boolean">
            <text:p>ІСТИНА</text:p>
          </table:table-cell>
          <table:table-cell table:style-name="ce4" table:formula="of:=[.X49]&gt;0.7" office:value-type="boolean" office:boolean-value="true" calcext:value-type="boolean">
            <text:p>ІСТИНА</text:p>
          </table:table-cell>
          <table:table-cell table:style-name="ce4" table:formula="of:=[.R4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0.7355089" calcext:value-type="float">
            <text:p>7,36E-01</text:p>
          </table:table-cell>
          <table:table-cell table:style-name="ce1" office:value-type="float" office:value="0.9174963" calcext:value-type="float">
            <text:p>9,17E-01</text:p>
          </table:table-cell>
          <table:table-cell table:style-name="ce1" office:value-type="float" office:value="0.7355089" calcext:value-type="float">
            <text:p>7,36E-01</text:p>
          </table:table-cell>
          <table:table-cell table:style-name="ce1" office:value-type="float" office:value="0.9174963" calcext:value-type="float">
            <text:p>9,17E-01</text:p>
          </table:table-cell>
          <table:table-cell table:style-name="ce1" office:value-type="float" office:value="0.7355089" calcext:value-type="float">
            <text:p>7,36E-01</text:p>
          </table:table-cell>
          <table:table-cell table:style-name="ce1" office:value-type="float" office:value="0.9174963" calcext:value-type="float">
            <text:p>9,17E-01</text:p>
          </table:table-cell>
          <table:table-cell table:style-name="ce1" office:value-type="float" office:value="0.776533" calcext:value-type="float">
            <text:p>7,77E-01</text:p>
          </table:table-cell>
          <table:table-cell table:style-name="ce1" office:value-type="float" office:value="0.9174963" calcext:value-type="float">
            <text:p>9,17E-01</text:p>
          </table:table-cell>
          <table:table-cell table:style-name="ce1" office:value-type="float" office:value="0.776533" calcext:value-type="float">
            <text:p>7,77E-01</text:p>
          </table:table-cell>
          <table:table-cell table:style-name="ce1" office:value-type="float" office:value="0.9174963" calcext:value-type="float">
            <text:p>9,17E-01</text:p>
          </table:table-cell>
          <table:table-cell/>
          <table:table-cell table:style-name="ce1" table:formula="of:=MAX([.C50];[.E50];[.G50];[.I50];[.K50])" office:value-type="float" office:value="0.776533" calcext:value-type="float">
            <text:p>7,77E-01</text:p>
          </table:table-cell>
          <table:table-cell table:style-name="ce8" table:formula="of:=MAX([.D50];[.F50];[.H50];[.J50];[.L50])" office:value-type="float" office:value="0.9174963" calcext:value-type="float">
            <text:p>9,17E-01</text:p>
          </table:table-cell>
          <table:table-cell table:style-name="ce1"/>
          <table:table-cell table:style-name="ce1" office:value-type="float" office:value="0.776533" calcext:value-type="float">
            <text:p>7,77E-01</text:p>
          </table:table-cell>
          <table:table-cell table:style-name="ce1" office:value-type="float" office:value="0.9174963" calcext:value-type="float">
            <text:p>9,17E-01</text:p>
          </table:table-cell>
          <table:table-cell table:style-name="ce4" table:formula="of:=[.Q50]&gt;[.N50]" office:value-type="boolean" office:boolean-value="false" calcext:value-type="boolean">
            <text:p>БРЕХНЯ</text:p>
          </table:table-cell>
          <table:table-cell table:style-name="ce4" table:formula="of:=[.R50]&gt;[.O5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76533" calcext:value-type="float">
            <text:p>7,77E-01</text:p>
          </table:table-cell>
          <table:table-cell table:style-name="ce4" table:formula="of:=[.V50]&gt;[.Q50]" office:value-type="boolean" office:boolean-value="false" calcext:value-type="boolean">
            <text:p>БРЕХНЯ</text:p>
          </table:table-cell>
          <table:table-cell table:style-name="ce1" table:formula="of:=MAX([.V50];[.Q50])" office:value-type="float" office:value="0.776533" calcext:value-type="float">
            <text:p>7,77E-01</text:p>
          </table:table-cell>
          <table:table-cell table:style-name="ce4" table:formula="of:=[.X50]&gt;[.R5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0]&gt;[.C50]" office:value-type="boolean" office:boolean-value="false" calcext:value-type="boolean">
            <text:p>БРЕХНЯ</text:p>
          </table:table-cell>
          <table:table-cell table:style-name="ce4" table:formula="of:=[.F50]&gt;[.D50]" office:value-type="boolean" office:boolean-value="false" calcext:value-type="boolean">
            <text:p>БРЕХНЯ</text:p>
          </table:table-cell>
          <table:table-cell table:style-name="ce4" table:formula="of:=[.G50]&gt;MAX([.C50];[.E50])" office:value-type="boolean" office:boolean-value="false" calcext:value-type="boolean">
            <text:p>БРЕХНЯ</text:p>
          </table:table-cell>
          <table:table-cell table:style-name="ce4" table:formula="of:=[.H50]&gt;MAX([.D50];[.F50])" office:value-type="boolean" office:boolean-value="false" calcext:value-type="boolean">
            <text:p>БРЕХНЯ</text:p>
          </table:table-cell>
          <table:table-cell table:style-name="ce4" table:formula="of:=[.I50]&gt;MAX([.C50];[.E50];[.G50])" office:value-type="boolean" office:boolean-value="true" calcext:value-type="boolean">
            <text:p>ІСТИНА</text:p>
          </table:table-cell>
          <table:table-cell table:style-name="ce4" table:formula="of:=[.J50]&gt;MAX([.D50];[.F50];[.H50])" office:value-type="boolean" office:boolean-value="false" calcext:value-type="boolean">
            <text:p>БРЕХНЯ</text:p>
          </table:table-cell>
          <table:table-cell table:style-name="ce4" table:formula="of:=[.K50]&gt;MAX([.C50];[.E50];[.G50];[.I50])" office:value-type="boolean" office:boolean-value="false" calcext:value-type="boolean">
            <text:p>БРЕХНЯ</text:p>
          </table:table-cell>
          <table:table-cell table:style-name="ce4" table:formula="of:=[.L50]&gt;MAX([.D50];[.F50];[.H50];[.J5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0]&gt;0.9" office:value-type="boolean" office:boolean-value="false" calcext:value-type="boolean">
            <text:p>БРЕХНЯ</text:p>
          </table:table-cell>
          <table:table-cell table:style-name="ce4" table:formula="of:=[.R50]&gt;0.9" office:value-type="boolean" office:boolean-value="true" calcext:value-type="boolean">
            <text:p>ІСТИНА</text:p>
          </table:table-cell>
          <table:table-cell table:style-name="ce4" table:formula="of:=[.X50]&gt;0.8" office:value-type="boolean" office:boolean-value="false" calcext:value-type="boolean">
            <text:p>БРЕХНЯ</text:p>
          </table:table-cell>
          <table:table-cell table:style-name="ce4" table:formula="of:=[.R50]&gt;0.8" office:value-type="boolean" office:boolean-value="true" calcext:value-type="boolean">
            <text:p>ІСТИНА</text:p>
          </table:table-cell>
          <table:table-cell table:style-name="ce4" table:formula="of:=[.X50]&gt;0.7" office:value-type="boolean" office:boolean-value="true" calcext:value-type="boolean">
            <text:p>ІСТИНА</text:p>
          </table:table-cell>
          <table:table-cell table:style-name="ce4" table:formula="of:=[.R5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0.6828953" calcext:value-type="float">
            <text:p>6,83E-01</text:p>
          </table:table-cell>
          <table:table-cell table:style-name="ce1" office:value-type="float" office:value="0.8626478" calcext:value-type="float">
            <text:p>8,63E-01</text:p>
          </table:table-cell>
          <table:table-cell table:style-name="ce1" office:value-type="float" office:value="0.6828953" calcext:value-type="float">
            <text:p>6,83E-01</text:p>
          </table:table-cell>
          <table:table-cell table:style-name="ce1" office:value-type="float" office:value="0.8630752" calcext:value-type="float">
            <text:p>8,63E-01</text:p>
          </table:table-cell>
          <table:table-cell table:style-name="ce1" office:value-type="float" office:value="0.7239955" calcext:value-type="float">
            <text:p>7,24E-01</text:p>
          </table:table-cell>
          <table:table-cell table:style-name="ce1" office:value-type="float" office:value="0.8852013" calcext:value-type="float">
            <text:p>8,85E-01</text:p>
          </table:table-cell>
          <table:table-cell table:style-name="ce1" office:value-type="float" office:value="0.7239955" calcext:value-type="float">
            <text:p>7,24E-01</text:p>
          </table:table-cell>
          <table:table-cell table:style-name="ce1" office:value-type="float" office:value="0.9132036" calcext:value-type="float">
            <text:p>9,13E-01</text:p>
          </table:table-cell>
          <table:table-cell table:style-name="ce1" office:value-type="float" office:value="0.7239955" calcext:value-type="float">
            <text:p>7,24E-01</text:p>
          </table:table-cell>
          <table:table-cell table:style-name="ce1" office:value-type="float" office:value="0.9132036" calcext:value-type="float">
            <text:p>9,13E-01</text:p>
          </table:table-cell>
          <table:table-cell/>
          <table:table-cell table:style-name="ce1" table:formula="of:=MAX([.C51];[.E51];[.G51];[.I51];[.K51])" office:value-type="float" office:value="0.7239955" calcext:value-type="float">
            <text:p>7,24E-01</text:p>
          </table:table-cell>
          <table:table-cell table:style-name="ce8" table:formula="of:=MAX([.D51];[.F51];[.H51];[.J51];[.L51])" office:value-type="float" office:value="0.9132036" calcext:value-type="float">
            <text:p>9,13E-01</text:p>
          </table:table-cell>
          <table:table-cell table:style-name="ce1"/>
          <table:table-cell table:style-name="ce1" office:value-type="float" office:value="0.7744367" calcext:value-type="float">
            <text:p>7,74E-01</text:p>
          </table:table-cell>
          <table:table-cell table:style-name="ce1" office:value-type="float" office:value="0.9132036" calcext:value-type="float">
            <text:p>9,13E-01</text:p>
          </table:table-cell>
          <table:table-cell table:style-name="ce4" table:formula="of:=[.Q51]&gt;[.N51]" office:value-type="boolean" office:boolean-value="true" calcext:value-type="boolean">
            <text:p>ІСТИНА</text:p>
          </table:table-cell>
          <table:table-cell table:style-name="ce4" table:formula="of:=[.R51]&gt;[.O5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744367" calcext:value-type="float">
            <text:p>7,74E-01</text:p>
          </table:table-cell>
          <table:table-cell table:style-name="ce4" table:formula="of:=[.V51]&gt;[.Q51]" office:value-type="boolean" office:boolean-value="false" calcext:value-type="boolean">
            <text:p>БРЕХНЯ</text:p>
          </table:table-cell>
          <table:table-cell table:style-name="ce1" table:formula="of:=MAX([.V51];[.Q51])" office:value-type="float" office:value="0.7744367" calcext:value-type="float">
            <text:p>7,74E-01</text:p>
          </table:table-cell>
          <table:table-cell table:style-name="ce4" table:formula="of:=[.X51]&gt;[.R5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1]&gt;[.C51]" office:value-type="boolean" office:boolean-value="false" calcext:value-type="boolean">
            <text:p>БРЕХНЯ</text:p>
          </table:table-cell>
          <table:table-cell table:style-name="ce4" table:formula="of:=[.F51]&gt;[.D51]" office:value-type="boolean" office:boolean-value="true" calcext:value-type="boolean">
            <text:p>ІСТИНА</text:p>
          </table:table-cell>
          <table:table-cell table:style-name="ce4" table:formula="of:=[.G51]&gt;MAX([.C51];[.E51])" office:value-type="boolean" office:boolean-value="true" calcext:value-type="boolean">
            <text:p>ІСТИНА</text:p>
          </table:table-cell>
          <table:table-cell table:style-name="ce4" table:formula="of:=[.H51]&gt;MAX([.D51];[.F51])" office:value-type="boolean" office:boolean-value="true" calcext:value-type="boolean">
            <text:p>ІСТИНА</text:p>
          </table:table-cell>
          <table:table-cell table:style-name="ce4" table:formula="of:=[.I51]&gt;MAX([.C51];[.E51];[.G51])" office:value-type="boolean" office:boolean-value="false" calcext:value-type="boolean">
            <text:p>БРЕХНЯ</text:p>
          </table:table-cell>
          <table:table-cell table:style-name="ce4" table:formula="of:=[.J51]&gt;MAX([.D51];[.F51];[.H51])" office:value-type="boolean" office:boolean-value="true" calcext:value-type="boolean">
            <text:p>ІСТИНА</text:p>
          </table:table-cell>
          <table:table-cell table:style-name="ce4" table:formula="of:=[.K51]&gt;MAX([.C51];[.E51];[.G51];[.I51])" office:value-type="boolean" office:boolean-value="false" calcext:value-type="boolean">
            <text:p>БРЕХНЯ</text:p>
          </table:table-cell>
          <table:table-cell table:style-name="ce4" table:formula="of:=[.L51]&gt;MAX([.D51];[.F51];[.H51];[.J5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1]&gt;0.9" office:value-type="boolean" office:boolean-value="false" calcext:value-type="boolean">
            <text:p>БРЕХНЯ</text:p>
          </table:table-cell>
          <table:table-cell table:style-name="ce4" table:formula="of:=[.R51]&gt;0.9" office:value-type="boolean" office:boolean-value="true" calcext:value-type="boolean">
            <text:p>ІСТИНА</text:p>
          </table:table-cell>
          <table:table-cell table:style-name="ce4" table:formula="of:=[.X51]&gt;0.8" office:value-type="boolean" office:boolean-value="false" calcext:value-type="boolean">
            <text:p>БРЕХНЯ</text:p>
          </table:table-cell>
          <table:table-cell table:style-name="ce4" table:formula="of:=[.R51]&gt;0.8" office:value-type="boolean" office:boolean-value="true" calcext:value-type="boolean">
            <text:p>ІСТИНА</text:p>
          </table:table-cell>
          <table:table-cell table:style-name="ce4" table:formula="of:=[.X51]&gt;0.7" office:value-type="boolean" office:boolean-value="true" calcext:value-type="boolean">
            <text:p>ІСТИНА</text:p>
          </table:table-cell>
          <table:table-cell table:style-name="ce4" table:formula="of:=[.R5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.8769741" calcext:value-type="float">
            <text:p>8,77E-01</text:p>
          </table:table-cell>
          <table:table-cell table:style-name="ce1" office:value-type="float" office:value="0.8538826" calcext:value-type="float">
            <text:p>8,54E-01</text:p>
          </table:table-cell>
          <table:table-cell table:style-name="ce1" office:value-type="float" office:value="0.8769741" calcext:value-type="float">
            <text:p>8,77E-01</text:p>
          </table:table-cell>
          <table:table-cell table:style-name="ce1" office:value-type="float" office:value="0.9201827" calcext:value-type="float">
            <text:p>9,20E-01</text:p>
          </table:table-cell>
          <table:table-cell table:style-name="ce1" office:value-type="float" office:value="0.8769741" calcext:value-type="float">
            <text:p>8,77E-01</text:p>
          </table:table-cell>
          <table:table-cell table:style-name="ce1" office:value-type="float" office:value="0.9344712" calcext:value-type="float">
            <text:p>9,34E-01</text:p>
          </table:table-cell>
          <table:table-cell table:style-name="ce1" office:value-type="float" office:value="0.8769741" calcext:value-type="float">
            <text:p>8,77E-01</text:p>
          </table:table-cell>
          <table:table-cell table:style-name="ce1" office:value-type="float" office:value="0.9344712" calcext:value-type="float">
            <text:p>9,34E-01</text:p>
          </table:table-cell>
          <table:table-cell table:style-name="ce1" office:value-type="float" office:value="0.8769741" calcext:value-type="float">
            <text:p>8,77E-01</text:p>
          </table:table-cell>
          <table:table-cell table:style-name="ce1" office:value-type="float" office:value="0.9344712" calcext:value-type="float">
            <text:p>9,34E-01</text:p>
          </table:table-cell>
          <table:table-cell/>
          <table:table-cell table:style-name="ce1" table:formula="of:=MAX([.C52];[.E52];[.G52];[.I52];[.K52])" office:value-type="float" office:value="0.8769741" calcext:value-type="float">
            <text:p>8,77E-01</text:p>
          </table:table-cell>
          <table:table-cell table:style-name="ce8" table:formula="of:=MAX([.D52];[.F52];[.H52];[.J52];[.L52])" office:value-type="float" office:value="0.9344712" calcext:value-type="float">
            <text:p>9,34E-01</text:p>
          </table:table-cell>
          <table:table-cell table:style-name="ce1"/>
          <table:table-cell table:style-name="ce1" office:value-type="float" office:value="0.8769741" calcext:value-type="float">
            <text:p>8,77E-01</text:p>
          </table:table-cell>
          <table:table-cell table:style-name="ce1" office:value-type="float" office:value="0.9344712" calcext:value-type="float">
            <text:p>9,34E-01</text:p>
          </table:table-cell>
          <table:table-cell table:style-name="ce4" table:formula="of:=[.Q52]&gt;[.N52]" office:value-type="boolean" office:boolean-value="false" calcext:value-type="boolean">
            <text:p>БРЕХНЯ</text:p>
          </table:table-cell>
          <table:table-cell table:style-name="ce4" table:formula="of:=[.R52]&gt;[.O5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769741" calcext:value-type="float">
            <text:p>8,77E-01</text:p>
          </table:table-cell>
          <table:table-cell table:style-name="ce4" table:formula="of:=[.V52]&gt;[.Q52]" office:value-type="boolean" office:boolean-value="false" calcext:value-type="boolean">
            <text:p>БРЕХНЯ</text:p>
          </table:table-cell>
          <table:table-cell table:style-name="ce1" table:formula="of:=MAX([.V52];[.Q52])" office:value-type="float" office:value="0.8769741" calcext:value-type="float">
            <text:p>8,77E-01</text:p>
          </table:table-cell>
          <table:table-cell table:style-name="ce4" table:formula="of:=[.X52]&gt;[.R5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2]&gt;[.C52]" office:value-type="boolean" office:boolean-value="false" calcext:value-type="boolean">
            <text:p>БРЕХНЯ</text:p>
          </table:table-cell>
          <table:table-cell table:style-name="ce4" table:formula="of:=[.F52]&gt;[.D52]" office:value-type="boolean" office:boolean-value="true" calcext:value-type="boolean">
            <text:p>ІСТИНА</text:p>
          </table:table-cell>
          <table:table-cell table:style-name="ce4" table:formula="of:=[.G52]&gt;MAX([.C52];[.E52])" office:value-type="boolean" office:boolean-value="false" calcext:value-type="boolean">
            <text:p>БРЕХНЯ</text:p>
          </table:table-cell>
          <table:table-cell table:style-name="ce4" table:formula="of:=[.H52]&gt;MAX([.D52];[.F52])" office:value-type="boolean" office:boolean-value="true" calcext:value-type="boolean">
            <text:p>ІСТИНА</text:p>
          </table:table-cell>
          <table:table-cell table:style-name="ce4" table:formula="of:=[.I52]&gt;MAX([.C52];[.E52];[.G52])" office:value-type="boolean" office:boolean-value="false" calcext:value-type="boolean">
            <text:p>БРЕХНЯ</text:p>
          </table:table-cell>
          <table:table-cell table:style-name="ce4" table:formula="of:=[.J52]&gt;MAX([.D52];[.F52];[.H52])" office:value-type="boolean" office:boolean-value="false" calcext:value-type="boolean">
            <text:p>БРЕХНЯ</text:p>
          </table:table-cell>
          <table:table-cell table:style-name="ce4" table:formula="of:=[.K52]&gt;MAX([.C52];[.E52];[.G52];[.I52])" office:value-type="boolean" office:boolean-value="false" calcext:value-type="boolean">
            <text:p>БРЕХНЯ</text:p>
          </table:table-cell>
          <table:table-cell table:style-name="ce4" table:formula="of:=[.L52]&gt;MAX([.D52];[.F52];[.H52];[.J52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2]&gt;0.9" office:value-type="boolean" office:boolean-value="false" calcext:value-type="boolean">
            <text:p>БРЕХНЯ</text:p>
          </table:table-cell>
          <table:table-cell table:style-name="ce4" table:formula="of:=[.R52]&gt;0.9" office:value-type="boolean" office:boolean-value="true" calcext:value-type="boolean">
            <text:p>ІСТИНА</text:p>
          </table:table-cell>
          <table:table-cell table:style-name="ce4" table:formula="of:=[.X52]&gt;0.8" office:value-type="boolean" office:boolean-value="true" calcext:value-type="boolean">
            <text:p>ІСТИНА</text:p>
          </table:table-cell>
          <table:table-cell table:style-name="ce4" table:formula="of:=[.R52]&gt;0.8" office:value-type="boolean" office:boolean-value="true" calcext:value-type="boolean">
            <text:p>ІСТИНА</text:p>
          </table:table-cell>
          <table:table-cell table:style-name="ce4" table:formula="of:=[.X52]&gt;0.7" office:value-type="boolean" office:boolean-value="true" calcext:value-type="boolean">
            <text:p>ІСТИНА</text:p>
          </table:table-cell>
          <table:table-cell table:style-name="ce4" table:formula="of:=[.R5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0.7731865" calcext:value-type="float">
            <text:p>7,73E-01</text:p>
          </table:table-cell>
          <table:table-cell table:style-name="ce1" office:value-type="float" office:value="0.9165464" calcext:value-type="float">
            <text:p>9,17E-01</text:p>
          </table:table-cell>
          <table:table-cell table:style-name="ce1" office:value-type="float" office:value="0.7890481" calcext:value-type="float">
            <text:p>7,89E-01</text:p>
          </table:table-cell>
          <table:table-cell table:style-name="ce1" office:value-type="float" office:value="0.9165464" calcext:value-type="float">
            <text:p>9,17E-01</text:p>
          </table:table-cell>
          <table:table-cell table:style-name="ce1" office:value-type="float" office:value="0.7890481" calcext:value-type="float">
            <text:p>7,89E-01</text:p>
          </table:table-cell>
          <table:table-cell table:style-name="ce1" office:value-type="float" office:value="0.9165464" calcext:value-type="float">
            <text:p>9,17E-01</text:p>
          </table:table-cell>
          <table:table-cell table:style-name="ce1" office:value-type="float" office:value="0.7933223" calcext:value-type="float">
            <text:p>7,93E-01</text:p>
          </table:table-cell>
          <table:table-cell table:style-name="ce1" office:value-type="float" office:value="0.9319414" calcext:value-type="float">
            <text:p>9,32E-01</text:p>
          </table:table-cell>
          <table:table-cell table:style-name="ce1" office:value-type="float" office:value="0.7933223" calcext:value-type="float">
            <text:p>7,93E-01</text:p>
          </table:table-cell>
          <table:table-cell table:style-name="ce1" office:value-type="float" office:value="0.9319414" calcext:value-type="float">
            <text:p>9,32E-01</text:p>
          </table:table-cell>
          <table:table-cell/>
          <table:table-cell table:style-name="ce1" table:formula="of:=MAX([.C53];[.E53];[.G53];[.I53];[.K53])" office:value-type="float" office:value="0.7933223" calcext:value-type="float">
            <text:p>7,93E-01</text:p>
          </table:table-cell>
          <table:table-cell table:style-name="ce8" table:formula="of:=MAX([.D53];[.F53];[.H53];[.J53];[.L53])" office:value-type="float" office:value="0.9319414" calcext:value-type="float">
            <text:p>9,32E-01</text:p>
          </table:table-cell>
          <table:table-cell table:style-name="ce1"/>
          <table:table-cell table:style-name="ce1" office:value-type="float" office:value="0.7933223" calcext:value-type="float">
            <text:p>7,93E-01</text:p>
          </table:table-cell>
          <table:table-cell table:style-name="ce1" office:value-type="float" office:value="0.9319414" calcext:value-type="float">
            <text:p>9,32E-01</text:p>
          </table:table-cell>
          <table:table-cell table:style-name="ce4" table:formula="of:=[.Q53]&gt;[.N53]" office:value-type="boolean" office:boolean-value="false" calcext:value-type="boolean">
            <text:p>БРЕХНЯ</text:p>
          </table:table-cell>
          <table:table-cell table:style-name="ce4" table:formula="of:=[.R53]&gt;[.O5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933223" calcext:value-type="float">
            <text:p>7,93E-01</text:p>
          </table:table-cell>
          <table:table-cell table:style-name="ce4" table:formula="of:=[.V53]&gt;[.Q53]" office:value-type="boolean" office:boolean-value="false" calcext:value-type="boolean">
            <text:p>БРЕХНЯ</text:p>
          </table:table-cell>
          <table:table-cell table:style-name="ce1" table:formula="of:=MAX([.V53];[.Q53])" office:value-type="float" office:value="0.7933223" calcext:value-type="float">
            <text:p>7,93E-01</text:p>
          </table:table-cell>
          <table:table-cell table:style-name="ce4" table:formula="of:=[.X53]&gt;[.R5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3]&gt;[.C53]" office:value-type="boolean" office:boolean-value="true" calcext:value-type="boolean">
            <text:p>ІСТИНА</text:p>
          </table:table-cell>
          <table:table-cell table:style-name="ce4" table:formula="of:=[.F53]&gt;[.D53]" office:value-type="boolean" office:boolean-value="false" calcext:value-type="boolean">
            <text:p>БРЕХНЯ</text:p>
          </table:table-cell>
          <table:table-cell table:style-name="ce4" table:formula="of:=[.G53]&gt;MAX([.C53];[.E53])" office:value-type="boolean" office:boolean-value="false" calcext:value-type="boolean">
            <text:p>БРЕХНЯ</text:p>
          </table:table-cell>
          <table:table-cell table:style-name="ce4" table:formula="of:=[.H53]&gt;MAX([.D53];[.F53])" office:value-type="boolean" office:boolean-value="false" calcext:value-type="boolean">
            <text:p>БРЕХНЯ</text:p>
          </table:table-cell>
          <table:table-cell table:style-name="ce4" table:formula="of:=[.I53]&gt;MAX([.C53];[.E53];[.G53])" office:value-type="boolean" office:boolean-value="true" calcext:value-type="boolean">
            <text:p>ІСТИНА</text:p>
          </table:table-cell>
          <table:table-cell table:style-name="ce4" table:formula="of:=[.J53]&gt;MAX([.D53];[.F53];[.H53])" office:value-type="boolean" office:boolean-value="true" calcext:value-type="boolean">
            <text:p>ІСТИНА</text:p>
          </table:table-cell>
          <table:table-cell table:style-name="ce4" table:formula="of:=[.K53]&gt;MAX([.C53];[.E53];[.G53];[.I53])" office:value-type="boolean" office:boolean-value="false" calcext:value-type="boolean">
            <text:p>БРЕХНЯ</text:p>
          </table:table-cell>
          <table:table-cell table:style-name="ce4" table:formula="of:=[.L53]&gt;MAX([.D53];[.F53];[.H53];[.J5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3]&gt;0.9" office:value-type="boolean" office:boolean-value="false" calcext:value-type="boolean">
            <text:p>БРЕХНЯ</text:p>
          </table:table-cell>
          <table:table-cell table:style-name="ce4" table:formula="of:=[.R53]&gt;0.9" office:value-type="boolean" office:boolean-value="true" calcext:value-type="boolean">
            <text:p>ІСТИНА</text:p>
          </table:table-cell>
          <table:table-cell table:style-name="ce4" table:formula="of:=[.X53]&gt;0.8" office:value-type="boolean" office:boolean-value="false" calcext:value-type="boolean">
            <text:p>БРЕХНЯ</text:p>
          </table:table-cell>
          <table:table-cell table:style-name="ce4" table:formula="of:=[.R53]&gt;0.8" office:value-type="boolean" office:boolean-value="true" calcext:value-type="boolean">
            <text:p>ІСТИНА</text:p>
          </table:table-cell>
          <table:table-cell table:style-name="ce4" table:formula="of:=[.X53]&gt;0.7" office:value-type="boolean" office:boolean-value="true" calcext:value-type="boolean">
            <text:p>ІСТИНА</text:p>
          </table:table-cell>
          <table:table-cell table:style-name="ce4" table:formula="of:=[.R5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.7673785" calcext:value-type="float">
            <text:p>7,67E-01</text:p>
          </table:table-cell>
          <table:table-cell table:style-name="ce1" office:value-type="float" office:value="0.8935227" calcext:value-type="float">
            <text:p>8,94E-01</text:p>
          </table:table-cell>
          <table:table-cell table:style-name="ce1" office:value-type="float" office:value="0.7724554" calcext:value-type="float">
            <text:p>7,72E-01</text:p>
          </table:table-cell>
          <table:table-cell table:style-name="ce1" office:value-type="float" office:value="0.8935227" calcext:value-type="float">
            <text:p>8,94E-01</text:p>
          </table:table-cell>
          <table:table-cell table:style-name="ce1" office:value-type="float" office:value="0.7941704" calcext:value-type="float">
            <text:p>7,94E-01</text:p>
          </table:table-cell>
          <table:table-cell table:style-name="ce1" office:value-type="float" office:value="0.8935227" calcext:value-type="float">
            <text:p>8,94E-01</text:p>
          </table:table-cell>
          <table:table-cell table:style-name="ce1" office:value-type="float" office:value="0.7941704" calcext:value-type="float">
            <text:p>7,94E-01</text:p>
          </table:table-cell>
          <table:table-cell table:style-name="ce1" office:value-type="float" office:value="0.9256616" calcext:value-type="float">
            <text:p>9,26E-01</text:p>
          </table:table-cell>
          <table:table-cell table:style-name="ce1" office:value-type="float" office:value="0.7941704" calcext:value-type="float">
            <text:p>7,94E-01</text:p>
          </table:table-cell>
          <table:table-cell table:style-name="ce1" office:value-type="float" office:value="0.9256616" calcext:value-type="float">
            <text:p>9,26E-01</text:p>
          </table:table-cell>
          <table:table-cell/>
          <table:table-cell table:style-name="ce1" table:formula="of:=MAX([.C54];[.E54];[.G54];[.I54];[.K54])" office:value-type="float" office:value="0.7941704" calcext:value-type="float">
            <text:p>7,94E-01</text:p>
          </table:table-cell>
          <table:table-cell table:style-name="ce8" table:formula="of:=MAX([.D54];[.F54];[.H54];[.J54];[.L54])" office:value-type="float" office:value="0.9256616" calcext:value-type="float">
            <text:p>9,26E-01</text:p>
          </table:table-cell>
          <table:table-cell table:style-name="ce2"/>
          <table:table-cell table:style-name="ce1" office:value-type="float" office:value="0.7941704" calcext:value-type="float">
            <text:p>7,94E-01</text:p>
          </table:table-cell>
          <table:table-cell table:style-name="ce1" office:value-type="float" office:value="0.9256616" calcext:value-type="float">
            <text:p>9,26E-01</text:p>
          </table:table-cell>
          <table:table-cell table:style-name="ce4" table:formula="of:=[.Q54]&gt;[.N54]" office:value-type="boolean" office:boolean-value="false" calcext:value-type="boolean">
            <text:p>БРЕХНЯ</text:p>
          </table:table-cell>
          <table:table-cell table:style-name="ce4" table:formula="of:=[.R54]&gt;[.O54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941704" calcext:value-type="float">
            <text:p>7,94E-01</text:p>
          </table:table-cell>
          <table:table-cell table:style-name="ce4" table:formula="of:=[.V54]&gt;[.Q54]" office:value-type="boolean" office:boolean-value="false" calcext:value-type="boolean">
            <text:p>БРЕХНЯ</text:p>
          </table:table-cell>
          <table:table-cell table:style-name="ce1" table:formula="of:=MAX([.V54];[.Q54])" office:value-type="float" office:value="0.7941704" calcext:value-type="float">
            <text:p>7,94E-01</text:p>
          </table:table-cell>
          <table:table-cell table:style-name="ce4" table:formula="of:=[.X54]&gt;[.R5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4]&gt;[.C54]" office:value-type="boolean" office:boolean-value="true" calcext:value-type="boolean">
            <text:p>ІСТИНА</text:p>
          </table:table-cell>
          <table:table-cell table:style-name="ce4" table:formula="of:=[.F54]&gt;[.D54]" office:value-type="boolean" office:boolean-value="false" calcext:value-type="boolean">
            <text:p>БРЕХНЯ</text:p>
          </table:table-cell>
          <table:table-cell table:style-name="ce4" table:formula="of:=[.G54]&gt;MAX([.C54];[.E54])" office:value-type="boolean" office:boolean-value="true" calcext:value-type="boolean">
            <text:p>ІСТИНА</text:p>
          </table:table-cell>
          <table:table-cell table:style-name="ce4" table:formula="of:=[.H54]&gt;MAX([.D54];[.F54])" office:value-type="boolean" office:boolean-value="false" calcext:value-type="boolean">
            <text:p>БРЕХНЯ</text:p>
          </table:table-cell>
          <table:table-cell table:style-name="ce4" table:formula="of:=[.I54]&gt;MAX([.C54];[.E54];[.G54])" office:value-type="boolean" office:boolean-value="false" calcext:value-type="boolean">
            <text:p>БРЕХНЯ</text:p>
          </table:table-cell>
          <table:table-cell table:style-name="ce4" table:formula="of:=[.J54]&gt;MAX([.D54];[.F54];[.H54])" office:value-type="boolean" office:boolean-value="true" calcext:value-type="boolean">
            <text:p>ІСТИНА</text:p>
          </table:table-cell>
          <table:table-cell table:style-name="ce4" table:formula="of:=[.K54]&gt;MAX([.C54];[.E54];[.G54];[.I54])" office:value-type="boolean" office:boolean-value="false" calcext:value-type="boolean">
            <text:p>БРЕХНЯ</text:p>
          </table:table-cell>
          <table:table-cell table:style-name="ce4" table:formula="of:=[.L54]&gt;MAX([.D54];[.F54];[.H54];[.J5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4]&gt;0.9" office:value-type="boolean" office:boolean-value="false" calcext:value-type="boolean">
            <text:p>БРЕХНЯ</text:p>
          </table:table-cell>
          <table:table-cell table:style-name="ce4" table:formula="of:=[.R54]&gt;0.9" office:value-type="boolean" office:boolean-value="true" calcext:value-type="boolean">
            <text:p>ІСТИНА</text:p>
          </table:table-cell>
          <table:table-cell table:style-name="ce4" table:formula="of:=[.X54]&gt;0.8" office:value-type="boolean" office:boolean-value="false" calcext:value-type="boolean">
            <text:p>БРЕХНЯ</text:p>
          </table:table-cell>
          <table:table-cell table:style-name="ce4" table:formula="of:=[.R54]&gt;0.8" office:value-type="boolean" office:boolean-value="true" calcext:value-type="boolean">
            <text:p>ІСТИНА</text:p>
          </table:table-cell>
          <table:table-cell table:style-name="ce4" table:formula="of:=[.X54]&gt;0.7" office:value-type="boolean" office:boolean-value="true" calcext:value-type="boolean">
            <text:p>ІСТИНА</text:p>
          </table:table-cell>
          <table:table-cell table:style-name="ce4" table:formula="of:=[.R5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.7732508" calcext:value-type="float">
            <text:p>7,73E-01</text:p>
          </table:table-cell>
          <table:table-cell table:style-name="ce1" office:value-type="float" office:value="0.89632" calcext:value-type="float">
            <text:p>8,96E-01</text:p>
          </table:table-cell>
          <table:table-cell table:style-name="ce1" office:value-type="float" office:value="0.7732508" calcext:value-type="float">
            <text:p>7,73E-01</text:p>
          </table:table-cell>
          <table:table-cell table:style-name="ce1" office:value-type="float" office:value="0.9027567" calcext:value-type="float">
            <text:p>9,03E-01</text:p>
          </table:table-cell>
          <table:table-cell table:style-name="ce1" office:value-type="float" office:value="0.7732508" calcext:value-type="float">
            <text:p>7,73E-01</text:p>
          </table:table-cell>
          <table:table-cell table:style-name="ce1" office:value-type="float" office:value="0.9027567" calcext:value-type="float">
            <text:p>9,03E-01</text:p>
          </table:table-cell>
          <table:table-cell table:style-name="ce1" office:value-type="float" office:value="0.7732508" calcext:value-type="float">
            <text:p>7,73E-01</text:p>
          </table:table-cell>
          <table:table-cell table:style-name="ce1" office:value-type="float" office:value="0.9027567" calcext:value-type="float">
            <text:p>9,03E-01</text:p>
          </table:table-cell>
          <table:table-cell table:style-name="ce1" office:value-type="float" office:value="0.7732508" calcext:value-type="float">
            <text:p>7,73E-01</text:p>
          </table:table-cell>
          <table:table-cell table:style-name="ce1" office:value-type="float" office:value="0.9027567" calcext:value-type="float">
            <text:p>9,03E-01</text:p>
          </table:table-cell>
          <table:table-cell/>
          <table:table-cell table:style-name="ce1" table:formula="of:=MAX([.C55];[.E55];[.G55];[.I55];[.K55])" office:value-type="float" office:value="0.7732508" calcext:value-type="float">
            <text:p>7,73E-01</text:p>
          </table:table-cell>
          <table:table-cell table:style-name="ce8" table:formula="of:=MAX([.D55];[.F55];[.H55];[.J55];[.L55])" office:value-type="float" office:value="0.9027567" calcext:value-type="float">
            <text:p>9,03E-01</text:p>
          </table:table-cell>
          <table:table-cell table:style-name="ce1"/>
          <table:table-cell table:style-name="ce1" office:value-type="float" office:value="0.7911347" calcext:value-type="float">
            <text:p>7,91E-01</text:p>
          </table:table-cell>
          <table:table-cell table:style-name="ce1" office:value-type="float" office:value="0.9027567" calcext:value-type="float">
            <text:p>9,03E-01</text:p>
          </table:table-cell>
          <table:table-cell table:style-name="ce4" table:formula="of:=[.Q55]&gt;[.N55]" office:value-type="boolean" office:boolean-value="true" calcext:value-type="boolean">
            <text:p>ІСТИНА</text:p>
          </table:table-cell>
          <table:table-cell table:style-name="ce4" table:formula="of:=[.R55]&gt;[.O5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911347" calcext:value-type="float">
            <text:p>7,91E-01</text:p>
          </table:table-cell>
          <table:table-cell table:style-name="ce4" table:formula="of:=[.V55]&gt;[.Q55]" office:value-type="boolean" office:boolean-value="false" calcext:value-type="boolean">
            <text:p>БРЕХНЯ</text:p>
          </table:table-cell>
          <table:table-cell table:style-name="ce1" table:formula="of:=MAX([.V55];[.Q55])" office:value-type="float" office:value="0.7911347" calcext:value-type="float">
            <text:p>7,91E-01</text:p>
          </table:table-cell>
          <table:table-cell table:style-name="ce4" table:formula="of:=[.X55]&gt;[.R5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5]&gt;[.C55]" office:value-type="boolean" office:boolean-value="false" calcext:value-type="boolean">
            <text:p>БРЕХНЯ</text:p>
          </table:table-cell>
          <table:table-cell table:style-name="ce4" table:formula="of:=[.F55]&gt;[.D55]" office:value-type="boolean" office:boolean-value="true" calcext:value-type="boolean">
            <text:p>ІСТИНА</text:p>
          </table:table-cell>
          <table:table-cell table:style-name="ce4" table:formula="of:=[.G55]&gt;MAX([.C55];[.E55])" office:value-type="boolean" office:boolean-value="false" calcext:value-type="boolean">
            <text:p>БРЕХНЯ</text:p>
          </table:table-cell>
          <table:table-cell table:style-name="ce4" table:formula="of:=[.H55]&gt;MAX([.D55];[.F55])" office:value-type="boolean" office:boolean-value="false" calcext:value-type="boolean">
            <text:p>БРЕХНЯ</text:p>
          </table:table-cell>
          <table:table-cell table:style-name="ce4" table:formula="of:=[.I55]&gt;MAX([.C55];[.E55];[.G55])" office:value-type="boolean" office:boolean-value="false" calcext:value-type="boolean">
            <text:p>БРЕХНЯ</text:p>
          </table:table-cell>
          <table:table-cell table:style-name="ce4" table:formula="of:=[.J55]&gt;MAX([.D55];[.F55];[.H55])" office:value-type="boolean" office:boolean-value="false" calcext:value-type="boolean">
            <text:p>БРЕХНЯ</text:p>
          </table:table-cell>
          <table:table-cell table:style-name="ce4" table:formula="of:=[.K55]&gt;MAX([.C55];[.E55];[.G55];[.I55])" office:value-type="boolean" office:boolean-value="false" calcext:value-type="boolean">
            <text:p>БРЕХНЯ</text:p>
          </table:table-cell>
          <table:table-cell table:style-name="ce4" table:formula="of:=[.L55]&gt;MAX([.D55];[.F55];[.H55];[.J5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5]&gt;0.9" office:value-type="boolean" office:boolean-value="false" calcext:value-type="boolean">
            <text:p>БРЕХНЯ</text:p>
          </table:table-cell>
          <table:table-cell table:style-name="ce4" table:formula="of:=[.R55]&gt;0.9" office:value-type="boolean" office:boolean-value="true" calcext:value-type="boolean">
            <text:p>ІСТИНА</text:p>
          </table:table-cell>
          <table:table-cell table:style-name="ce4" table:formula="of:=[.X55]&gt;0.8" office:value-type="boolean" office:boolean-value="false" calcext:value-type="boolean">
            <text:p>БРЕХНЯ</text:p>
          </table:table-cell>
          <table:table-cell table:style-name="ce4" table:formula="of:=[.R55]&gt;0.8" office:value-type="boolean" office:boolean-value="true" calcext:value-type="boolean">
            <text:p>ІСТИНА</text:p>
          </table:table-cell>
          <table:table-cell table:style-name="ce4" table:formula="of:=[.X55]&gt;0.7" office:value-type="boolean" office:boolean-value="true" calcext:value-type="boolean">
            <text:p>ІСТИНА</text:p>
          </table:table-cell>
          <table:table-cell table:style-name="ce4" table:formula="of:=[.R5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0.6752645" calcext:value-type="float">
            <text:p>6,75E-01</text:p>
          </table:table-cell>
          <table:table-cell table:style-name="ce1" office:value-type="float" office:value="0.8549746" calcext:value-type="float">
            <text:p>8,55E-01</text:p>
          </table:table-cell>
          <table:table-cell table:style-name="ce1" office:value-type="float" office:value="0.7299032" calcext:value-type="float">
            <text:p>7,30E-01</text:p>
          </table:table-cell>
          <table:table-cell table:style-name="ce1" office:value-type="float" office:value="0.8900951" calcext:value-type="float">
            <text:p>8,90E-01</text:p>
          </table:table-cell>
          <table:table-cell table:style-name="ce1" office:value-type="float" office:value="0.7299032" calcext:value-type="float">
            <text:p>7,30E-01</text:p>
          </table:table-cell>
          <table:table-cell table:style-name="ce1" office:value-type="float" office:value="0.9011199" calcext:value-type="float">
            <text:p>9,01E-01</text:p>
          </table:table-cell>
          <table:table-cell table:style-name="ce1" office:value-type="float" office:value="0.7299032" calcext:value-type="float">
            <text:p>7,30E-01</text:p>
          </table:table-cell>
          <table:table-cell table:style-name="ce1" office:value-type="float" office:value="0.9011199" calcext:value-type="float">
            <text:p>9,01E-01</text:p>
          </table:table-cell>
          <table:table-cell table:style-name="ce1" office:value-type="float" office:value="0.7368461" calcext:value-type="float">
            <text:p>7,37E-01</text:p>
          </table:table-cell>
          <table:table-cell table:style-name="ce1" office:value-type="float" office:value="0.9011199" calcext:value-type="float">
            <text:p>9,01E-01</text:p>
          </table:table-cell>
          <table:table-cell/>
          <table:table-cell table:style-name="ce1" table:formula="of:=MAX([.C56];[.E56];[.G56];[.I56];[.K56])" office:value-type="float" office:value="0.7368461" calcext:value-type="float">
            <text:p>7,37E-01</text:p>
          </table:table-cell>
          <table:table-cell table:style-name="ce8" table:formula="of:=MAX([.D56];[.F56];[.H56];[.J56];[.L56])" office:value-type="float" office:value="0.9011199" calcext:value-type="float">
            <text:p>9,01E-01</text:p>
          </table:table-cell>
          <table:table-cell table:style-name="ce1"/>
          <table:table-cell table:style-name="ce1" office:value-type="float" office:value="0.7368461" calcext:value-type="float">
            <text:p>7,37E-01</text:p>
          </table:table-cell>
          <table:table-cell table:style-name="ce1" office:value-type="float" office:value="0.9011199" calcext:value-type="float">
            <text:p>9,01E-01</text:p>
          </table:table-cell>
          <table:table-cell table:style-name="ce4" table:formula="of:=[.Q56]&gt;[.N56]" office:value-type="boolean" office:boolean-value="false" calcext:value-type="boolean">
            <text:p>БРЕХНЯ</text:p>
          </table:table-cell>
          <table:table-cell table:style-name="ce4" table:formula="of:=[.R56]&gt;[.O5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36522" calcext:value-type="float">
            <text:p>7,54E-01</text:p>
          </table:table-cell>
          <table:table-cell table:style-name="ce4" table:formula="of:=[.V56]&gt;[.Q56]" office:value-type="boolean" office:boolean-value="true" calcext:value-type="boolean">
            <text:p>ІСТИНА</text:p>
          </table:table-cell>
          <table:table-cell table:style-name="ce1" table:formula="of:=MAX([.V56];[.Q56])" office:value-type="float" office:value="0.7536522" calcext:value-type="float">
            <text:p>7,54E-01</text:p>
          </table:table-cell>
          <table:table-cell table:style-name="ce4" table:formula="of:=[.X56]&gt;[.R5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6]&gt;[.C56]" office:value-type="boolean" office:boolean-value="true" calcext:value-type="boolean">
            <text:p>ІСТИНА</text:p>
          </table:table-cell>
          <table:table-cell table:style-name="ce4" table:formula="of:=[.F56]&gt;[.D56]" office:value-type="boolean" office:boolean-value="true" calcext:value-type="boolean">
            <text:p>ІСТИНА</text:p>
          </table:table-cell>
          <table:table-cell table:style-name="ce4" table:formula="of:=[.G56]&gt;MAX([.C56];[.E56])" office:value-type="boolean" office:boolean-value="false" calcext:value-type="boolean">
            <text:p>БРЕХНЯ</text:p>
          </table:table-cell>
          <table:table-cell table:style-name="ce4" table:formula="of:=[.H56]&gt;MAX([.D56];[.F56])" office:value-type="boolean" office:boolean-value="true" calcext:value-type="boolean">
            <text:p>ІСТИНА</text:p>
          </table:table-cell>
          <table:table-cell table:style-name="ce4" table:formula="of:=[.I56]&gt;MAX([.C56];[.E56];[.G56])" office:value-type="boolean" office:boolean-value="false" calcext:value-type="boolean">
            <text:p>БРЕХНЯ</text:p>
          </table:table-cell>
          <table:table-cell table:style-name="ce4" table:formula="of:=[.J56]&gt;MAX([.D56];[.F56];[.H56])" office:value-type="boolean" office:boolean-value="false" calcext:value-type="boolean">
            <text:p>БРЕХНЯ</text:p>
          </table:table-cell>
          <table:table-cell table:style-name="ce4" table:formula="of:=[.K56]&gt;MAX([.C56];[.E56];[.G56];[.I56])" office:value-type="boolean" office:boolean-value="true" calcext:value-type="boolean">
            <text:p>ІСТИНА</text:p>
          </table:table-cell>
          <table:table-cell table:style-name="ce4" table:formula="of:=[.L56]&gt;MAX([.D56];[.F56];[.H56];[.J5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6]&gt;0.9" office:value-type="boolean" office:boolean-value="false" calcext:value-type="boolean">
            <text:p>БРЕХНЯ</text:p>
          </table:table-cell>
          <table:table-cell table:style-name="ce4" table:formula="of:=[.R56]&gt;0.9" office:value-type="boolean" office:boolean-value="true" calcext:value-type="boolean">
            <text:p>ІСТИНА</text:p>
          </table:table-cell>
          <table:table-cell table:style-name="ce4" table:formula="of:=[.X56]&gt;0.8" office:value-type="boolean" office:boolean-value="false" calcext:value-type="boolean">
            <text:p>БРЕХНЯ</text:p>
          </table:table-cell>
          <table:table-cell table:style-name="ce4" table:formula="of:=[.R56]&gt;0.8" office:value-type="boolean" office:boolean-value="true" calcext:value-type="boolean">
            <text:p>ІСТИНА</text:p>
          </table:table-cell>
          <table:table-cell table:style-name="ce4" table:formula="of:=[.X56]&gt;0.7" office:value-type="boolean" office:boolean-value="true" calcext:value-type="boolean">
            <text:p>ІСТИНА</text:p>
          </table:table-cell>
          <table:table-cell table:style-name="ce4" table:formula="of:=[.R5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.8667034" calcext:value-type="float">
            <text:p>8,67E-01</text:p>
          </table:table-cell>
          <table:table-cell table:style-name="ce1" office:value-type="float" office:value="0.8162788" calcext:value-type="float">
            <text:p>8,16E-01</text:p>
          </table:table-cell>
          <table:table-cell table:style-name="ce1" office:value-type="float" office:value="0.9007344" calcext:value-type="float">
            <text:p>9,01E-01</text:p>
          </table:table-cell>
          <table:table-cell table:style-name="ce1" office:value-type="float" office:value="0.9037754" calcext:value-type="float">
            <text:p>9,04E-01</text:p>
          </table:table-cell>
          <table:table-cell table:style-name="ce1" office:value-type="float" office:value="0.9007344" calcext:value-type="float">
            <text:p>9,01E-01</text:p>
          </table:table-cell>
          <table:table-cell table:style-name="ce1" office:value-type="float" office:value="0.9037754" calcext:value-type="float">
            <text:p>9,04E-01</text:p>
          </table:table-cell>
          <table:table-cell table:style-name="ce1" office:value-type="float" office:value="0.9007344" calcext:value-type="float">
            <text:p>9,01E-01</text:p>
          </table:table-cell>
          <table:table-cell table:style-name="ce1" office:value-type="float" office:value="0.9037754" calcext:value-type="float">
            <text:p>9,04E-01</text:p>
          </table:table-cell>
          <table:table-cell table:style-name="ce1" office:value-type="float" office:value="0.9007344" calcext:value-type="float">
            <text:p>9,01E-01</text:p>
          </table:table-cell>
          <table:table-cell table:style-name="ce1" office:value-type="float" office:value="0.9068635" calcext:value-type="float">
            <text:p>9,07E-01</text:p>
          </table:table-cell>
          <table:table-cell/>
          <table:table-cell table:style-name="ce1" table:formula="of:=MAX([.C57];[.E57];[.G57];[.I57];[.K57])" office:value-type="float" office:value="0.9007344" calcext:value-type="float">
            <text:p>9,01E-01</text:p>
          </table:table-cell>
          <table:table-cell table:style-name="ce8" table:formula="of:=MAX([.D57];[.F57];[.H57];[.J57];[.L57])" office:value-type="float" office:value="0.9068635" calcext:value-type="float">
            <text:p>9,07E-01</text:p>
          </table:table-cell>
          <table:table-cell table:style-name="ce1"/>
          <table:table-cell table:style-name="ce1" office:value-type="float" office:value="0.9007344" calcext:value-type="float">
            <text:p>9,01E-01</text:p>
          </table:table-cell>
          <table:table-cell table:style-name="ce1" office:value-type="float" office:value="0.9068635" calcext:value-type="float">
            <text:p>9,07E-01</text:p>
          </table:table-cell>
          <table:table-cell table:style-name="ce4" table:formula="of:=[.Q57]&gt;[.N57]" office:value-type="boolean" office:boolean-value="false" calcext:value-type="boolean">
            <text:p>БРЕХНЯ</text:p>
          </table:table-cell>
          <table:table-cell table:style-name="ce4" table:formula="of:=[.R57]&gt;[.O5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007344" calcext:value-type="float">
            <text:p>9,01E-01</text:p>
          </table:table-cell>
          <table:table-cell table:style-name="ce4" table:formula="of:=[.V57]&gt;[.Q57]" office:value-type="boolean" office:boolean-value="false" calcext:value-type="boolean">
            <text:p>БРЕХНЯ</text:p>
          </table:table-cell>
          <table:table-cell table:style-name="ce1" table:formula="of:=MAX([.V57];[.Q57])" office:value-type="float" office:value="0.9007344" calcext:value-type="float">
            <text:p>9,01E-01</text:p>
          </table:table-cell>
          <table:table-cell table:style-name="ce4" table:formula="of:=[.X57]&gt;[.R5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7]&gt;[.C57]" office:value-type="boolean" office:boolean-value="true" calcext:value-type="boolean">
            <text:p>ІСТИНА</text:p>
          </table:table-cell>
          <table:table-cell table:style-name="ce4" table:formula="of:=[.F57]&gt;[.D57]" office:value-type="boolean" office:boolean-value="true" calcext:value-type="boolean">
            <text:p>ІСТИНА</text:p>
          </table:table-cell>
          <table:table-cell table:style-name="ce4" table:formula="of:=[.G57]&gt;MAX([.C57];[.E57])" office:value-type="boolean" office:boolean-value="false" calcext:value-type="boolean">
            <text:p>БРЕХНЯ</text:p>
          </table:table-cell>
          <table:table-cell table:style-name="ce4" table:formula="of:=[.H57]&gt;MAX([.D57];[.F57])" office:value-type="boolean" office:boolean-value="false" calcext:value-type="boolean">
            <text:p>БРЕХНЯ</text:p>
          </table:table-cell>
          <table:table-cell table:style-name="ce4" table:formula="of:=[.I57]&gt;MAX([.C57];[.E57];[.G57])" office:value-type="boolean" office:boolean-value="false" calcext:value-type="boolean">
            <text:p>БРЕХНЯ</text:p>
          </table:table-cell>
          <table:table-cell table:style-name="ce4" table:formula="of:=[.J57]&gt;MAX([.D57];[.F57];[.H57])" office:value-type="boolean" office:boolean-value="false" calcext:value-type="boolean">
            <text:p>БРЕХНЯ</text:p>
          </table:table-cell>
          <table:table-cell table:style-name="ce4" table:formula="of:=[.K57]&gt;MAX([.C57];[.E57];[.G57];[.I57])" office:value-type="boolean" office:boolean-value="false" calcext:value-type="boolean">
            <text:p>БРЕХНЯ</text:p>
          </table:table-cell>
          <table:table-cell table:style-name="ce4" table:formula="of:=[.L57]&gt;MAX([.D57];[.F57];[.H57];[.J57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57]&gt;0.9" office:value-type="boolean" office:boolean-value="true" calcext:value-type="boolean">
            <text:p>ІСТИНА</text:p>
          </table:table-cell>
          <table:table-cell table:style-name="ce4" table:formula="of:=[.R57]&gt;0.9" office:value-type="boolean" office:boolean-value="true" calcext:value-type="boolean">
            <text:p>ІСТИНА</text:p>
          </table:table-cell>
          <table:table-cell table:style-name="ce4" table:formula="of:=[.X57]&gt;0.8" office:value-type="boolean" office:boolean-value="true" calcext:value-type="boolean">
            <text:p>ІСТИНА</text:p>
          </table:table-cell>
          <table:table-cell table:style-name="ce4" table:formula="of:=[.R57]&gt;0.8" office:value-type="boolean" office:boolean-value="true" calcext:value-type="boolean">
            <text:p>ІСТИНА</text:p>
          </table:table-cell>
          <table:table-cell table:style-name="ce4" table:formula="of:=[.X57]&gt;0.7" office:value-type="boolean" office:boolean-value="true" calcext:value-type="boolean">
            <text:p>ІСТИНА</text:p>
          </table:table-cell>
          <table:table-cell table:style-name="ce4" table:formula="of:=[.R5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0.7906809" calcext:value-type="float">
            <text:p>7,91E-01</text:p>
          </table:table-cell>
          <table:table-cell table:style-name="ce1" office:value-type="float" office:value="0.9005726" calcext:value-type="float">
            <text:p>9,01E-01</text:p>
          </table:table-cell>
          <table:table-cell table:style-name="ce1" office:value-type="float" office:value="0.7906809" calcext:value-type="float">
            <text:p>7,91E-01</text:p>
          </table:table-cell>
          <table:table-cell table:style-name="ce1" office:value-type="float" office:value="0.9094785" calcext:value-type="float">
            <text:p>9,09E-01</text:p>
          </table:table-cell>
          <table:table-cell table:style-name="ce1" office:value-type="float" office:value="0.7906809" calcext:value-type="float">
            <text:p>7,91E-01</text:p>
          </table:table-cell>
          <table:table-cell table:style-name="ce1" office:value-type="float" office:value="0.9094785" calcext:value-type="float">
            <text:p>9,09E-01</text:p>
          </table:table-cell>
          <table:table-cell table:style-name="ce1" office:value-type="float" office:value="0.7967879" calcext:value-type="float">
            <text:p>7,97E-01</text:p>
          </table:table-cell>
          <table:table-cell table:style-name="ce1" office:value-type="float" office:value="0.9104438" calcext:value-type="float">
            <text:p>9,10E-01</text:p>
          </table:table-cell>
          <table:table-cell table:style-name="ce1" office:value-type="float" office:value="0.8089413" calcext:value-type="float">
            <text:p>8,09E-01</text:p>
          </table:table-cell>
          <table:table-cell table:style-name="ce1" office:value-type="float" office:value="0.9104438" calcext:value-type="float">
            <text:p>9,10E-01</text:p>
          </table:table-cell>
          <table:table-cell/>
          <table:table-cell table:style-name="ce1" table:formula="of:=MAX([.C58];[.E58];[.G58];[.I58];[.K58])" office:value-type="float" office:value="0.8089413" calcext:value-type="float">
            <text:p>8,09E-01</text:p>
          </table:table-cell>
          <table:table-cell table:style-name="ce8" table:formula="of:=MAX([.D58];[.F58];[.H58];[.J58];[.L58])" office:value-type="float" office:value="0.9104438" calcext:value-type="float">
            <text:p>9,10E-01</text:p>
          </table:table-cell>
          <table:table-cell table:style-name="ce1"/>
          <table:table-cell table:style-name="ce1" office:value-type="float" office:value="0.8089413" calcext:value-type="float">
            <text:p>8,09E-01</text:p>
          </table:table-cell>
          <table:table-cell table:style-name="ce1" office:value-type="float" office:value="0.9104438" calcext:value-type="float">
            <text:p>9,10E-01</text:p>
          </table:table-cell>
          <table:table-cell table:style-name="ce4" table:formula="of:=[.Q58]&gt;[.N58]" office:value-type="boolean" office:boolean-value="false" calcext:value-type="boolean">
            <text:p>БРЕХНЯ</text:p>
          </table:table-cell>
          <table:table-cell table:style-name="ce4" table:formula="of:=[.R58]&gt;[.O5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089413" calcext:value-type="float">
            <text:p>8,09E-01</text:p>
          </table:table-cell>
          <table:table-cell table:style-name="ce4" table:formula="of:=[.V58]&gt;[.Q58]" office:value-type="boolean" office:boolean-value="false" calcext:value-type="boolean">
            <text:p>БРЕХНЯ</text:p>
          </table:table-cell>
          <table:table-cell table:style-name="ce1" table:formula="of:=MAX([.V58];[.Q58])" office:value-type="float" office:value="0.8089413" calcext:value-type="float">
            <text:p>8,09E-01</text:p>
          </table:table-cell>
          <table:table-cell table:style-name="ce4" table:formula="of:=[.X58]&gt;[.R5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8]&gt;[.C58]" office:value-type="boolean" office:boolean-value="false" calcext:value-type="boolean">
            <text:p>БРЕХНЯ</text:p>
          </table:table-cell>
          <table:table-cell table:style-name="ce4" table:formula="of:=[.F58]&gt;[.D58]" office:value-type="boolean" office:boolean-value="true" calcext:value-type="boolean">
            <text:p>ІСТИНА</text:p>
          </table:table-cell>
          <table:table-cell table:style-name="ce4" table:formula="of:=[.G58]&gt;MAX([.C58];[.E58])" office:value-type="boolean" office:boolean-value="false" calcext:value-type="boolean">
            <text:p>БРЕХНЯ</text:p>
          </table:table-cell>
          <table:table-cell table:style-name="ce4" table:formula="of:=[.H58]&gt;MAX([.D58];[.F58])" office:value-type="boolean" office:boolean-value="false" calcext:value-type="boolean">
            <text:p>БРЕХНЯ</text:p>
          </table:table-cell>
          <table:table-cell table:style-name="ce4" table:formula="of:=[.I58]&gt;MAX([.C58];[.E58];[.G58])" office:value-type="boolean" office:boolean-value="true" calcext:value-type="boolean">
            <text:p>ІСТИНА</text:p>
          </table:table-cell>
          <table:table-cell table:style-name="ce4" table:formula="of:=[.J58]&gt;MAX([.D58];[.F58];[.H58])" office:value-type="boolean" office:boolean-value="true" calcext:value-type="boolean">
            <text:p>ІСТИНА</text:p>
          </table:table-cell>
          <table:table-cell table:style-name="ce4" table:formula="of:=[.K58]&gt;MAX([.C58];[.E58];[.G58];[.I58])" office:value-type="boolean" office:boolean-value="true" calcext:value-type="boolean">
            <text:p>ІСТИНА</text:p>
          </table:table-cell>
          <table:table-cell table:style-name="ce4" table:formula="of:=[.L58]&gt;MAX([.D58];[.F58];[.H58];[.J5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8]&gt;0.9" office:value-type="boolean" office:boolean-value="false" calcext:value-type="boolean">
            <text:p>БРЕХНЯ</text:p>
          </table:table-cell>
          <table:table-cell table:style-name="ce4" table:formula="of:=[.R58]&gt;0.9" office:value-type="boolean" office:boolean-value="true" calcext:value-type="boolean">
            <text:p>ІСТИНА</text:p>
          </table:table-cell>
          <table:table-cell table:style-name="ce4" table:formula="of:=[.X58]&gt;0.8" office:value-type="boolean" office:boolean-value="true" calcext:value-type="boolean">
            <text:p>ІСТИНА</text:p>
          </table:table-cell>
          <table:table-cell table:style-name="ce4" table:formula="of:=[.R58]&gt;0.8" office:value-type="boolean" office:boolean-value="true" calcext:value-type="boolean">
            <text:p>ІСТИНА</text:p>
          </table:table-cell>
          <table:table-cell table:style-name="ce4" table:formula="of:=[.X58]&gt;0.7" office:value-type="boolean" office:boolean-value="true" calcext:value-type="boolean">
            <text:p>ІСТИНА</text:p>
          </table:table-cell>
          <table:table-cell table:style-name="ce4" table:formula="of:=[.R5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0.7493422" calcext:value-type="float">
            <text:p>7,49E-01</text:p>
          </table:table-cell>
          <table:table-cell table:style-name="ce1" office:value-type="float" office:value="0.9131786" calcext:value-type="float">
            <text:p>9,13E-01</text:p>
          </table:table-cell>
          <table:table-cell table:style-name="ce1" office:value-type="float" office:value="0.7573576" calcext:value-type="float">
            <text:p>7,57E-01</text:p>
          </table:table-cell>
          <table:table-cell table:style-name="ce1" office:value-type="float" office:value="0.9131786" calcext:value-type="float">
            <text:p>9,13E-01</text:p>
          </table:table-cell>
          <table:table-cell table:style-name="ce1" office:value-type="float" office:value="0.7797098" calcext:value-type="float">
            <text:p>7,80E-01</text:p>
          </table:table-cell>
          <table:table-cell table:style-name="ce1" office:value-type="float" office:value="0.9131786" calcext:value-type="float">
            <text:p>9,13E-01</text:p>
          </table:table-cell>
          <table:table-cell table:style-name="ce1" office:value-type="float" office:value="0.7797098" calcext:value-type="float">
            <text:p>7,80E-01</text:p>
          </table:table-cell>
          <table:table-cell table:style-name="ce1" office:value-type="float" office:value="0.9183647" calcext:value-type="float">
            <text:p>9,18E-01</text:p>
          </table:table-cell>
          <table:table-cell table:style-name="ce1" office:value-type="float" office:value="0.7797098" calcext:value-type="float">
            <text:p>7,80E-01</text:p>
          </table:table-cell>
          <table:table-cell table:style-name="ce1" office:value-type="float" office:value="0.9183647" calcext:value-type="float">
            <text:p>9,18E-01</text:p>
          </table:table-cell>
          <table:table-cell/>
          <table:table-cell table:style-name="ce1" table:formula="of:=MAX([.C59];[.E59];[.G59];[.I59];[.K59])" office:value-type="float" office:value="0.7797098" calcext:value-type="float">
            <text:p>7,80E-01</text:p>
          </table:table-cell>
          <table:table-cell table:style-name="ce8" table:formula="of:=MAX([.D59];[.F59];[.H59];[.J59];[.L59])" office:value-type="float" office:value="0.9183647" calcext:value-type="float">
            <text:p>9,18E-01</text:p>
          </table:table-cell>
          <table:table-cell table:style-name="ce2"/>
          <table:table-cell table:style-name="ce1" office:value-type="float" office:value="0.7797098" calcext:value-type="float">
            <text:p>7,80E-01</text:p>
          </table:table-cell>
          <table:table-cell table:style-name="ce1" office:value-type="float" office:value="0.9183647" calcext:value-type="float">
            <text:p>9,18E-01</text:p>
          </table:table-cell>
          <table:table-cell table:style-name="ce4" table:formula="of:=[.Q59]&gt;[.N59]" office:value-type="boolean" office:boolean-value="false" calcext:value-type="boolean">
            <text:p>БРЕХНЯ</text:p>
          </table:table-cell>
          <table:table-cell table:style-name="ce4" table:formula="of:=[.R59]&gt;[.O59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797098" calcext:value-type="float">
            <text:p>7,80E-01</text:p>
          </table:table-cell>
          <table:table-cell table:style-name="ce4" table:formula="of:=[.V59]&gt;[.Q59]" office:value-type="boolean" office:boolean-value="false" calcext:value-type="boolean">
            <text:p>БРЕХНЯ</text:p>
          </table:table-cell>
          <table:table-cell table:style-name="ce1" table:formula="of:=MAX([.V59];[.Q59])" office:value-type="float" office:value="0.7797098" calcext:value-type="float">
            <text:p>7,80E-01</text:p>
          </table:table-cell>
          <table:table-cell table:style-name="ce4" table:formula="of:=[.X59]&gt;[.R5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9]&gt;[.C59]" office:value-type="boolean" office:boolean-value="true" calcext:value-type="boolean">
            <text:p>ІСТИНА</text:p>
          </table:table-cell>
          <table:table-cell table:style-name="ce4" table:formula="of:=[.F59]&gt;[.D59]" office:value-type="boolean" office:boolean-value="false" calcext:value-type="boolean">
            <text:p>БРЕХНЯ</text:p>
          </table:table-cell>
          <table:table-cell table:style-name="ce4" table:formula="of:=[.G59]&gt;MAX([.C59];[.E59])" office:value-type="boolean" office:boolean-value="true" calcext:value-type="boolean">
            <text:p>ІСТИНА</text:p>
          </table:table-cell>
          <table:table-cell table:style-name="ce4" table:formula="of:=[.H59]&gt;MAX([.D59];[.F59])" office:value-type="boolean" office:boolean-value="false" calcext:value-type="boolean">
            <text:p>БРЕХНЯ</text:p>
          </table:table-cell>
          <table:table-cell table:style-name="ce4" table:formula="of:=[.I59]&gt;MAX([.C59];[.E59];[.G59])" office:value-type="boolean" office:boolean-value="false" calcext:value-type="boolean">
            <text:p>БРЕХНЯ</text:p>
          </table:table-cell>
          <table:table-cell table:style-name="ce4" table:formula="of:=[.J59]&gt;MAX([.D59];[.F59];[.H59])" office:value-type="boolean" office:boolean-value="true" calcext:value-type="boolean">
            <text:p>ІСТИНА</text:p>
          </table:table-cell>
          <table:table-cell table:style-name="ce4" table:formula="of:=[.K59]&gt;MAX([.C59];[.E59];[.G59];[.I59])" office:value-type="boolean" office:boolean-value="false" calcext:value-type="boolean">
            <text:p>БРЕХНЯ</text:p>
          </table:table-cell>
          <table:table-cell table:style-name="ce4" table:formula="of:=[.L59]&gt;MAX([.D59];[.F59];[.H59];[.J5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9]&gt;0.9" office:value-type="boolean" office:boolean-value="false" calcext:value-type="boolean">
            <text:p>БРЕХНЯ</text:p>
          </table:table-cell>
          <table:table-cell table:style-name="ce4" table:formula="of:=[.R59]&gt;0.9" office:value-type="boolean" office:boolean-value="true" calcext:value-type="boolean">
            <text:p>ІСТИНА</text:p>
          </table:table-cell>
          <table:table-cell table:style-name="ce4" table:formula="of:=[.X59]&gt;0.8" office:value-type="boolean" office:boolean-value="false" calcext:value-type="boolean">
            <text:p>БРЕХНЯ</text:p>
          </table:table-cell>
          <table:table-cell table:style-name="ce4" table:formula="of:=[.R59]&gt;0.8" office:value-type="boolean" office:boolean-value="true" calcext:value-type="boolean">
            <text:p>ІСТИНА</text:p>
          </table:table-cell>
          <table:table-cell table:style-name="ce4" table:formula="of:=[.X59]&gt;0.7" office:value-type="boolean" office:boolean-value="true" calcext:value-type="boolean">
            <text:p>ІСТИНА</text:p>
          </table:table-cell>
          <table:table-cell table:style-name="ce4" table:formula="of:=[.R5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0.7474758" calcext:value-type="float">
            <text:p>7,47E-01</text:p>
          </table:table-cell>
          <table:table-cell table:style-name="ce1" office:value-type="float" office:value="0.9256226" calcext:value-type="float">
            <text:p>9,26E-01</text:p>
          </table:table-cell>
          <table:table-cell table:style-name="ce1" office:value-type="float" office:value="0.7474758" calcext:value-type="float">
            <text:p>7,47E-01</text:p>
          </table:table-cell>
          <table:table-cell table:style-name="ce1" office:value-type="float" office:value="0.9256226" calcext:value-type="float">
            <text:p>9,26E-01</text:p>
          </table:table-cell>
          <table:table-cell table:style-name="ce1" office:value-type="float" office:value="0.7474758" calcext:value-type="float">
            <text:p>7,47E-01</text:p>
          </table:table-cell>
          <table:table-cell table:style-name="ce1" office:value-type="float" office:value="0.9256226" calcext:value-type="float">
            <text:p>9,26E-01</text:p>
          </table:table-cell>
          <table:table-cell table:style-name="ce1" office:value-type="float" office:value="0.7474758" calcext:value-type="float">
            <text:p>7,47E-01</text:p>
          </table:table-cell>
          <table:table-cell table:style-name="ce1" office:value-type="float" office:value="0.9256226" calcext:value-type="float">
            <text:p>9,26E-01</text:p>
          </table:table-cell>
          <table:table-cell table:style-name="ce1" office:value-type="float" office:value="0.7474758" calcext:value-type="float">
            <text:p>7,47E-01</text:p>
          </table:table-cell>
          <table:table-cell table:style-name="ce1" office:value-type="float" office:value="0.9256226" calcext:value-type="float">
            <text:p>9,26E-01</text:p>
          </table:table-cell>
          <table:table-cell/>
          <table:table-cell table:style-name="ce1" table:formula="of:=MAX([.C60];[.E60];[.G60];[.I60];[.K60])" office:value-type="float" office:value="0.7474758" calcext:value-type="float">
            <text:p>7,47E-01</text:p>
          </table:table-cell>
          <table:table-cell table:style-name="ce8" table:formula="of:=MAX([.D60];[.F60];[.H60];[.J60];[.L60])" office:value-type="float" office:value="0.9256226" calcext:value-type="float">
            <text:p>9,26E-01</text:p>
          </table:table-cell>
          <table:table-cell table:style-name="ce1"/>
          <table:table-cell table:style-name="ce1" office:value-type="float" office:value="0.7653979" calcext:value-type="float">
            <text:p>7,65E-01</text:p>
          </table:table-cell>
          <table:table-cell table:style-name="ce1" office:value-type="float" office:value="0.9256226" calcext:value-type="float">
            <text:p>9,26E-01</text:p>
          </table:table-cell>
          <table:table-cell table:style-name="ce4" table:formula="of:=[.Q60]&gt;[.N60]" office:value-type="boolean" office:boolean-value="true" calcext:value-type="boolean">
            <text:p>ІСТИНА</text:p>
          </table:table-cell>
          <table:table-cell table:style-name="ce4" table:formula="of:=[.R60]&gt;[.O6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653979" calcext:value-type="float">
            <text:p>7,65E-01</text:p>
          </table:table-cell>
          <table:table-cell table:style-name="ce4" table:formula="of:=[.V60]&gt;[.Q60]" office:value-type="boolean" office:boolean-value="false" calcext:value-type="boolean">
            <text:p>БРЕХНЯ</text:p>
          </table:table-cell>
          <table:table-cell table:style-name="ce1" table:formula="of:=MAX([.V60];[.Q60])" office:value-type="float" office:value="0.7653979" calcext:value-type="float">
            <text:p>7,65E-01</text:p>
          </table:table-cell>
          <table:table-cell table:style-name="ce4" table:formula="of:=[.X60]&gt;[.R6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0]&gt;[.C60]" office:value-type="boolean" office:boolean-value="false" calcext:value-type="boolean">
            <text:p>БРЕХНЯ</text:p>
          </table:table-cell>
          <table:table-cell table:style-name="ce4" table:formula="of:=[.F60]&gt;[.D60]" office:value-type="boolean" office:boolean-value="false" calcext:value-type="boolean">
            <text:p>БРЕХНЯ</text:p>
          </table:table-cell>
          <table:table-cell table:style-name="ce4" table:formula="of:=[.G60]&gt;MAX([.C60];[.E60])" office:value-type="boolean" office:boolean-value="false" calcext:value-type="boolean">
            <text:p>БРЕХНЯ</text:p>
          </table:table-cell>
          <table:table-cell table:style-name="ce4" table:formula="of:=[.H60]&gt;MAX([.D60];[.F60])" office:value-type="boolean" office:boolean-value="false" calcext:value-type="boolean">
            <text:p>БРЕХНЯ</text:p>
          </table:table-cell>
          <table:table-cell table:style-name="ce4" table:formula="of:=[.I60]&gt;MAX([.C60];[.E60];[.G60])" office:value-type="boolean" office:boolean-value="false" calcext:value-type="boolean">
            <text:p>БРЕХНЯ</text:p>
          </table:table-cell>
          <table:table-cell table:style-name="ce4" table:formula="of:=[.J60]&gt;MAX([.D60];[.F60];[.H60])" office:value-type="boolean" office:boolean-value="false" calcext:value-type="boolean">
            <text:p>БРЕХНЯ</text:p>
          </table:table-cell>
          <table:table-cell table:style-name="ce4" table:formula="of:=[.K60]&gt;MAX([.C60];[.E60];[.G60];[.I60])" office:value-type="boolean" office:boolean-value="false" calcext:value-type="boolean">
            <text:p>БРЕХНЯ</text:p>
          </table:table-cell>
          <table:table-cell table:style-name="ce4" table:formula="of:=[.L60]&gt;MAX([.D60];[.F60];[.H60];[.J6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0]&gt;0.9" office:value-type="boolean" office:boolean-value="false" calcext:value-type="boolean">
            <text:p>БРЕХНЯ</text:p>
          </table:table-cell>
          <table:table-cell table:style-name="ce4" table:formula="of:=[.R60]&gt;0.9" office:value-type="boolean" office:boolean-value="true" calcext:value-type="boolean">
            <text:p>ІСТИНА</text:p>
          </table:table-cell>
          <table:table-cell table:style-name="ce4" table:formula="of:=[.X60]&gt;0.8" office:value-type="boolean" office:boolean-value="false" calcext:value-type="boolean">
            <text:p>БРЕХНЯ</text:p>
          </table:table-cell>
          <table:table-cell table:style-name="ce4" table:formula="of:=[.R60]&gt;0.8" office:value-type="boolean" office:boolean-value="true" calcext:value-type="boolean">
            <text:p>ІСТИНА</text:p>
          </table:table-cell>
          <table:table-cell table:style-name="ce4" table:formula="of:=[.X60]&gt;0.7" office:value-type="boolean" office:boolean-value="true" calcext:value-type="boolean">
            <text:p>ІСТИНА</text:p>
          </table:table-cell>
          <table:table-cell table:style-name="ce4" table:formula="of:=[.R6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.729912" calcext:value-type="float">
            <text:p>7,30E-01</text:p>
          </table:table-cell>
          <table:table-cell table:style-name="ce1" office:value-type="float" office:value="0.9075478" calcext:value-type="float">
            <text:p>9,08E-01</text:p>
          </table:table-cell>
          <table:table-cell table:style-name="ce1" office:value-type="float" office:value="0.7501764" calcext:value-type="float">
            <text:p>7,50E-01</text:p>
          </table:table-cell>
          <table:table-cell table:style-name="ce1" office:value-type="float" office:value="0.9075478" calcext:value-type="float">
            <text:p>9,08E-01</text:p>
          </table:table-cell>
          <table:table-cell table:style-name="ce1" office:value-type="float" office:value="0.7501764" calcext:value-type="float">
            <text:p>7,50E-01</text:p>
          </table:table-cell>
          <table:table-cell table:style-name="ce1" office:value-type="float" office:value="0.9075478" calcext:value-type="float">
            <text:p>9,08E-01</text:p>
          </table:table-cell>
          <table:table-cell table:style-name="ce1" office:value-type="float" office:value="0.7501764" calcext:value-type="float">
            <text:p>7,50E-01</text:p>
          </table:table-cell>
          <table:table-cell table:style-name="ce1" office:value-type="float" office:value="0.9075478" calcext:value-type="float">
            <text:p>9,08E-01</text:p>
          </table:table-cell>
          <table:table-cell table:style-name="ce1" office:value-type="float" office:value="0.7501764" calcext:value-type="float">
            <text:p>7,50E-01</text:p>
          </table:table-cell>
          <table:table-cell table:style-name="ce1" office:value-type="float" office:value="0.9082175" calcext:value-type="float">
            <text:p>9,08E-01</text:p>
          </table:table-cell>
          <table:table-cell/>
          <table:table-cell table:style-name="ce1" table:formula="of:=MAX([.C61];[.E61];[.G61];[.I61];[.K61])" office:value-type="float" office:value="0.7501764" calcext:value-type="float">
            <text:p>7,50E-01</text:p>
          </table:table-cell>
          <table:table-cell table:style-name="ce8" table:formula="of:=MAX([.D61];[.F61];[.H61];[.J61];[.L61])" office:value-type="float" office:value="0.9082175" calcext:value-type="float">
            <text:p>9,08E-01</text:p>
          </table:table-cell>
          <table:table-cell table:style-name="ce1"/>
          <table:table-cell table:style-name="ce1" office:value-type="float" office:value="0.7501764" calcext:value-type="float">
            <text:p>7,50E-01</text:p>
          </table:table-cell>
          <table:table-cell table:style-name="ce1" office:value-type="float" office:value="0.9082175" calcext:value-type="float">
            <text:p>9,08E-01</text:p>
          </table:table-cell>
          <table:table-cell table:style-name="ce4" table:formula="of:=[.Q61]&gt;[.N61]" office:value-type="boolean" office:boolean-value="false" calcext:value-type="boolean">
            <text:p>БРЕХНЯ</text:p>
          </table:table-cell>
          <table:table-cell table:style-name="ce4" table:formula="of:=[.R61]&gt;[.O6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01764" calcext:value-type="float">
            <text:p>7,50E-01</text:p>
          </table:table-cell>
          <table:table-cell table:style-name="ce4" table:formula="of:=[.V61]&gt;[.Q61]" office:value-type="boolean" office:boolean-value="false" calcext:value-type="boolean">
            <text:p>БРЕХНЯ</text:p>
          </table:table-cell>
          <table:table-cell table:style-name="ce1" table:formula="of:=MAX([.V61];[.Q61])" office:value-type="float" office:value="0.7501764" calcext:value-type="float">
            <text:p>7,50E-01</text:p>
          </table:table-cell>
          <table:table-cell table:style-name="ce4" table:formula="of:=[.X61]&gt;[.R6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1]&gt;[.C61]" office:value-type="boolean" office:boolean-value="true" calcext:value-type="boolean">
            <text:p>ІСТИНА</text:p>
          </table:table-cell>
          <table:table-cell table:style-name="ce4" table:formula="of:=[.F61]&gt;[.D61]" office:value-type="boolean" office:boolean-value="false" calcext:value-type="boolean">
            <text:p>БРЕХНЯ</text:p>
          </table:table-cell>
          <table:table-cell table:style-name="ce4" table:formula="of:=[.G61]&gt;MAX([.C61];[.E61])" office:value-type="boolean" office:boolean-value="false" calcext:value-type="boolean">
            <text:p>БРЕХНЯ</text:p>
          </table:table-cell>
          <table:table-cell table:style-name="ce4" table:formula="of:=[.H61]&gt;MAX([.D61];[.F61])" office:value-type="boolean" office:boolean-value="false" calcext:value-type="boolean">
            <text:p>БРЕХНЯ</text:p>
          </table:table-cell>
          <table:table-cell table:style-name="ce4" table:formula="of:=[.I61]&gt;MAX([.C61];[.E61];[.G61])" office:value-type="boolean" office:boolean-value="false" calcext:value-type="boolean">
            <text:p>БРЕХНЯ</text:p>
          </table:table-cell>
          <table:table-cell table:style-name="ce4" table:formula="of:=[.J61]&gt;MAX([.D61];[.F61];[.H61])" office:value-type="boolean" office:boolean-value="false" calcext:value-type="boolean">
            <text:p>БРЕХНЯ</text:p>
          </table:table-cell>
          <table:table-cell table:style-name="ce4" table:formula="of:=[.K61]&gt;MAX([.C61];[.E61];[.G61];[.I61])" office:value-type="boolean" office:boolean-value="false" calcext:value-type="boolean">
            <text:p>БРЕХНЯ</text:p>
          </table:table-cell>
          <table:table-cell table:style-name="ce4" table:formula="of:=[.L61]&gt;MAX([.D61];[.F61];[.H61];[.J61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61]&gt;0.9" office:value-type="boolean" office:boolean-value="false" calcext:value-type="boolean">
            <text:p>БРЕХНЯ</text:p>
          </table:table-cell>
          <table:table-cell table:style-name="ce4" table:formula="of:=[.R61]&gt;0.9" office:value-type="boolean" office:boolean-value="true" calcext:value-type="boolean">
            <text:p>ІСТИНА</text:p>
          </table:table-cell>
          <table:table-cell table:style-name="ce4" table:formula="of:=[.X61]&gt;0.8" office:value-type="boolean" office:boolean-value="false" calcext:value-type="boolean">
            <text:p>БРЕХНЯ</text:p>
          </table:table-cell>
          <table:table-cell table:style-name="ce4" table:formula="of:=[.R61]&gt;0.8" office:value-type="boolean" office:boolean-value="true" calcext:value-type="boolean">
            <text:p>ІСТИНА</text:p>
          </table:table-cell>
          <table:table-cell table:style-name="ce4" table:formula="of:=[.X61]&gt;0.7" office:value-type="boolean" office:boolean-value="true" calcext:value-type="boolean">
            <text:p>ІСТИНА</text:p>
          </table:table-cell>
          <table:table-cell table:style-name="ce4" table:formula="of:=[.R6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8592469" calcext:value-type="float">
            <text:p>8,59E-01</text:p>
          </table:table-cell>
          <table:table-cell table:style-name="ce1" office:value-type="float" office:value="0.9259061" calcext:value-type="float">
            <text:p>9,26E-01</text:p>
          </table:table-cell>
          <table:table-cell table:style-name="ce1" office:value-type="float" office:value="0.909259" calcext:value-type="float">
            <text:p>9,09E-01</text:p>
          </table:table-cell>
          <table:table-cell table:style-name="ce1" office:value-type="float" office:value="0.9259061" calcext:value-type="float">
            <text:p>9,26E-01</text:p>
          </table:table-cell>
          <table:table-cell table:style-name="ce1" office:value-type="float" office:value="0.909259" calcext:value-type="float">
            <text:p>9,09E-01</text:p>
          </table:table-cell>
          <table:table-cell table:style-name="ce1" office:value-type="float" office:value="0.9259061" calcext:value-type="float">
            <text:p>9,26E-01</text:p>
          </table:table-cell>
          <table:table-cell table:style-name="ce1" office:value-type="float" office:value="0.909259" calcext:value-type="float">
            <text:p>9,09E-01</text:p>
          </table:table-cell>
          <table:table-cell table:style-name="ce1" office:value-type="float" office:value="0.9259061" calcext:value-type="float">
            <text:p>9,26E-01</text:p>
          </table:table-cell>
          <table:table-cell table:style-name="ce1" office:value-type="float" office:value="0.909259" calcext:value-type="float">
            <text:p>9,09E-01</text:p>
          </table:table-cell>
          <table:table-cell table:style-name="ce1" office:value-type="float" office:value="0.9259061" calcext:value-type="float">
            <text:p>9,26E-01</text:p>
          </table:table-cell>
          <table:table-cell/>
          <table:table-cell table:style-name="ce1" table:formula="of:=MAX([.C62];[.E62];[.G62];[.I62];[.K62])" office:value-type="float" office:value="0.909259" calcext:value-type="float">
            <text:p>9,09E-01</text:p>
          </table:table-cell>
          <table:table-cell table:style-name="ce8" table:formula="of:=MAX([.D62];[.F62];[.H62];[.J62];[.L62])" office:value-type="float" office:value="0.9259061" calcext:value-type="float">
            <text:p>9,26E-01</text:p>
          </table:table-cell>
          <table:table-cell table:style-name="ce1"/>
          <table:table-cell table:style-name="ce1" office:value-type="float" office:value="0.909259" calcext:value-type="float">
            <text:p>9,09E-01</text:p>
          </table:table-cell>
          <table:table-cell table:style-name="ce1" office:value-type="float" office:value="0.9259061" calcext:value-type="float">
            <text:p>9,26E-01</text:p>
          </table:table-cell>
          <table:table-cell table:style-name="ce4" table:formula="of:=[.Q62]&gt;[.N62]" office:value-type="boolean" office:boolean-value="false" calcext:value-type="boolean">
            <text:p>БРЕХНЯ</text:p>
          </table:table-cell>
          <table:table-cell table:style-name="ce4" table:formula="of:=[.R62]&gt;[.O6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09259" calcext:value-type="float">
            <text:p>9,09E-01</text:p>
          </table:table-cell>
          <table:table-cell table:style-name="ce4" table:formula="of:=[.V62]&gt;[.Q62]" office:value-type="boolean" office:boolean-value="false" calcext:value-type="boolean">
            <text:p>БРЕХНЯ</text:p>
          </table:table-cell>
          <table:table-cell table:style-name="ce1" table:formula="of:=MAX([.V62];[.Q62])" office:value-type="float" office:value="0.909259" calcext:value-type="float">
            <text:p>9,09E-01</text:p>
          </table:table-cell>
          <table:table-cell table:style-name="ce4" table:formula="of:=[.X62]&gt;[.R6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2]&gt;[.C62]" office:value-type="boolean" office:boolean-value="true" calcext:value-type="boolean">
            <text:p>ІСТИНА</text:p>
          </table:table-cell>
          <table:table-cell table:style-name="ce4" table:formula="of:=[.F62]&gt;[.D62]" office:value-type="boolean" office:boolean-value="false" calcext:value-type="boolean">
            <text:p>БРЕХНЯ</text:p>
          </table:table-cell>
          <table:table-cell table:style-name="ce4" table:formula="of:=[.G62]&gt;MAX([.C62];[.E62])" office:value-type="boolean" office:boolean-value="false" calcext:value-type="boolean">
            <text:p>БРЕХНЯ</text:p>
          </table:table-cell>
          <table:table-cell table:style-name="ce4" table:formula="of:=[.H62]&gt;MAX([.D62];[.F62])" office:value-type="boolean" office:boolean-value="false" calcext:value-type="boolean">
            <text:p>БРЕХНЯ</text:p>
          </table:table-cell>
          <table:table-cell table:style-name="ce4" table:formula="of:=[.I62]&gt;MAX([.C62];[.E62];[.G62])" office:value-type="boolean" office:boolean-value="false" calcext:value-type="boolean">
            <text:p>БРЕХНЯ</text:p>
          </table:table-cell>
          <table:table-cell table:style-name="ce4" table:formula="of:=[.J62]&gt;MAX([.D62];[.F62];[.H62])" office:value-type="boolean" office:boolean-value="false" calcext:value-type="boolean">
            <text:p>БРЕХНЯ</text:p>
          </table:table-cell>
          <table:table-cell table:style-name="ce4" table:formula="of:=[.K62]&gt;MAX([.C62];[.E62];[.G62];[.I62])" office:value-type="boolean" office:boolean-value="false" calcext:value-type="boolean">
            <text:p>БРЕХНЯ</text:p>
          </table:table-cell>
          <table:table-cell table:style-name="ce4" table:formula="of:=[.L62]&gt;MAX([.D62];[.F62];[.H62];[.J62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2]&gt;0.9" office:value-type="boolean" office:boolean-value="true" calcext:value-type="boolean">
            <text:p>ІСТИНА</text:p>
          </table:table-cell>
          <table:table-cell table:style-name="ce4" table:formula="of:=[.R62]&gt;0.9" office:value-type="boolean" office:boolean-value="true" calcext:value-type="boolean">
            <text:p>ІСТИНА</text:p>
          </table:table-cell>
          <table:table-cell table:style-name="ce4" table:formula="of:=[.X62]&gt;0.8" office:value-type="boolean" office:boolean-value="true" calcext:value-type="boolean">
            <text:p>ІСТИНА</text:p>
          </table:table-cell>
          <table:table-cell table:style-name="ce4" table:formula="of:=[.R62]&gt;0.8" office:value-type="boolean" office:boolean-value="true" calcext:value-type="boolean">
            <text:p>ІСТИНА</text:p>
          </table:table-cell>
          <table:table-cell table:style-name="ce4" table:formula="of:=[.X62]&gt;0.7" office:value-type="boolean" office:boolean-value="true" calcext:value-type="boolean">
            <text:p>ІСТИНА</text:p>
          </table:table-cell>
          <table:table-cell table:style-name="ce4" table:formula="of:=[.R6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0.7087505" calcext:value-type="float">
            <text:p>7,09E-01</text:p>
          </table:table-cell>
          <table:table-cell table:style-name="ce1" office:value-type="float" office:value="0.9317945" calcext:value-type="float">
            <text:p>9,32E-01</text:p>
          </table:table-cell>
          <table:table-cell table:style-name="ce1" office:value-type="float" office:value="0.7240857" calcext:value-type="float">
            <text:p>7,24E-01</text:p>
          </table:table-cell>
          <table:table-cell table:style-name="ce1" office:value-type="float" office:value="0.9317945" calcext:value-type="float">
            <text:p>9,32E-01</text:p>
          </table:table-cell>
          <table:table-cell table:style-name="ce1" office:value-type="float" office:value="0.7626219" calcext:value-type="float">
            <text:p>7,63E-01</text:p>
          </table:table-cell>
          <table:table-cell table:style-name="ce1" office:value-type="float" office:value="0.9317945" calcext:value-type="float">
            <text:p>9,32E-01</text:p>
          </table:table-cell>
          <table:table-cell table:style-name="ce1" office:value-type="float" office:value="0.827103" calcext:value-type="float">
            <text:p>8,27E-01</text:p>
          </table:table-cell>
          <table:table-cell table:style-name="ce1" office:value-type="float" office:value="0.9317945" calcext:value-type="float">
            <text:p>9,32E-01</text:p>
          </table:table-cell>
          <table:table-cell table:style-name="ce1" office:value-type="float" office:value="0.827103" calcext:value-type="float">
            <text:p>8,27E-01</text:p>
          </table:table-cell>
          <table:table-cell table:style-name="ce1" office:value-type="float" office:value="0.9317945" calcext:value-type="float">
            <text:p>9,32E-01</text:p>
          </table:table-cell>
          <table:table-cell/>
          <table:table-cell table:style-name="ce1" table:formula="of:=MAX([.C63];[.E63];[.G63];[.I63];[.K63])" office:value-type="float" office:value="0.827103" calcext:value-type="float">
            <text:p>8,27E-01</text:p>
          </table:table-cell>
          <table:table-cell table:style-name="ce8" table:formula="of:=MAX([.D63];[.F63];[.H63];[.J63];[.L63])" office:value-type="float" office:value="0.9317945" calcext:value-type="float">
            <text:p>9,32E-01</text:p>
          </table:table-cell>
          <table:table-cell table:style-name="ce1"/>
          <table:table-cell table:style-name="ce1" office:value-type="float" office:value="0.827103" calcext:value-type="float">
            <text:p>8,27E-01</text:p>
          </table:table-cell>
          <table:table-cell table:style-name="ce1" office:value-type="float" office:value="0.9317945" calcext:value-type="float">
            <text:p>9,32E-01</text:p>
          </table:table-cell>
          <table:table-cell table:style-name="ce4" table:formula="of:=[.Q63]&gt;[.N63]" office:value-type="boolean" office:boolean-value="false" calcext:value-type="boolean">
            <text:p>БРЕХНЯ</text:p>
          </table:table-cell>
          <table:table-cell table:style-name="ce4" table:formula="of:=[.R63]&gt;[.O6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27103" calcext:value-type="float">
            <text:p>8,27E-01</text:p>
          </table:table-cell>
          <table:table-cell table:style-name="ce4" table:formula="of:=[.V63]&gt;[.Q63]" office:value-type="boolean" office:boolean-value="false" calcext:value-type="boolean">
            <text:p>БРЕХНЯ</text:p>
          </table:table-cell>
          <table:table-cell table:style-name="ce1" table:formula="of:=MAX([.V63];[.Q63])" office:value-type="float" office:value="0.827103" calcext:value-type="float">
            <text:p>8,27E-01</text:p>
          </table:table-cell>
          <table:table-cell table:style-name="ce4" table:formula="of:=[.X63]&gt;[.R6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3]&gt;[.C63]" office:value-type="boolean" office:boolean-value="true" calcext:value-type="boolean">
            <text:p>ІСТИНА</text:p>
          </table:table-cell>
          <table:table-cell table:style-name="ce4" table:formula="of:=[.F63]&gt;[.D63]" office:value-type="boolean" office:boolean-value="false" calcext:value-type="boolean">
            <text:p>БРЕХНЯ</text:p>
          </table:table-cell>
          <table:table-cell table:style-name="ce4" table:formula="of:=[.G63]&gt;MAX([.C63];[.E63])" office:value-type="boolean" office:boolean-value="true" calcext:value-type="boolean">
            <text:p>ІСТИНА</text:p>
          </table:table-cell>
          <table:table-cell table:style-name="ce4" table:formula="of:=[.H63]&gt;MAX([.D63];[.F63])" office:value-type="boolean" office:boolean-value="false" calcext:value-type="boolean">
            <text:p>БРЕХНЯ</text:p>
          </table:table-cell>
          <table:table-cell table:style-name="ce4" table:formula="of:=[.I63]&gt;MAX([.C63];[.E63];[.G63])" office:value-type="boolean" office:boolean-value="true" calcext:value-type="boolean">
            <text:p>ІСТИНА</text:p>
          </table:table-cell>
          <table:table-cell table:style-name="ce4" table:formula="of:=[.J63]&gt;MAX([.D63];[.F63];[.H63])" office:value-type="boolean" office:boolean-value="false" calcext:value-type="boolean">
            <text:p>БРЕХНЯ</text:p>
          </table:table-cell>
          <table:table-cell table:style-name="ce4" table:formula="of:=[.K63]&gt;MAX([.C63];[.E63];[.G63];[.I63])" office:value-type="boolean" office:boolean-value="false" calcext:value-type="boolean">
            <text:p>БРЕХНЯ</text:p>
          </table:table-cell>
          <table:table-cell table:style-name="ce4" table:formula="of:=[.L63]&gt;MAX([.D63];[.F63];[.H63];[.J6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3]&gt;0.9" office:value-type="boolean" office:boolean-value="false" calcext:value-type="boolean">
            <text:p>БРЕХНЯ</text:p>
          </table:table-cell>
          <table:table-cell table:style-name="ce4" table:formula="of:=[.R63]&gt;0.9" office:value-type="boolean" office:boolean-value="true" calcext:value-type="boolean">
            <text:p>ІСТИНА</text:p>
          </table:table-cell>
          <table:table-cell table:style-name="ce4" table:formula="of:=[.X63]&gt;0.8" office:value-type="boolean" office:boolean-value="true" calcext:value-type="boolean">
            <text:p>ІСТИНА</text:p>
          </table:table-cell>
          <table:table-cell table:style-name="ce4" table:formula="of:=[.R63]&gt;0.8" office:value-type="boolean" office:boolean-value="true" calcext:value-type="boolean">
            <text:p>ІСТИНА</text:p>
          </table:table-cell>
          <table:table-cell table:style-name="ce4" table:formula="of:=[.X63]&gt;0.7" office:value-type="boolean" office:boolean-value="true" calcext:value-type="boolean">
            <text:p>ІСТИНА</text:p>
          </table:table-cell>
          <table:table-cell table:style-name="ce4" table:formula="of:=[.R6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0.7470522" calcext:value-type="float">
            <text:p>7,47E-01</text:p>
          </table:table-cell>
          <table:table-cell table:style-name="ce1" office:value-type="float" office:value="0.8957634" calcext:value-type="float">
            <text:p>8,96E-01</text:p>
          </table:table-cell>
          <table:table-cell table:style-name="ce1" office:value-type="float" office:value="0.7470522" calcext:value-type="float">
            <text:p>7,47E-01</text:p>
          </table:table-cell>
          <table:table-cell table:style-name="ce1" office:value-type="float" office:value="0.9158498" calcext:value-type="float">
            <text:p>9,16E-01</text:p>
          </table:table-cell>
          <table:table-cell table:style-name="ce1" office:value-type="float" office:value="0.7526391" calcext:value-type="float">
            <text:p>7,53E-01</text:p>
          </table:table-cell>
          <table:table-cell table:style-name="ce1" office:value-type="float" office:value="0.9158498" calcext:value-type="float">
            <text:p>9,16E-01</text:p>
          </table:table-cell>
          <table:table-cell table:style-name="ce1" office:value-type="float" office:value="0.7715164" calcext:value-type="float">
            <text:p>7,72E-01</text:p>
          </table:table-cell>
          <table:table-cell table:style-name="ce1" office:value-type="float" office:value="0.9158498" calcext:value-type="float">
            <text:p>9,16E-01</text:p>
          </table:table-cell>
          <table:table-cell table:style-name="ce1" office:value-type="float" office:value="0.7715164" calcext:value-type="float">
            <text:p>7,72E-01</text:p>
          </table:table-cell>
          <table:table-cell table:style-name="ce1" office:value-type="float" office:value="0.9158498" calcext:value-type="float">
            <text:p>9,16E-01</text:p>
          </table:table-cell>
          <table:table-cell/>
          <table:table-cell table:style-name="ce1" table:formula="of:=MAX([.C64];[.E64];[.G64];[.I64];[.K64])" office:value-type="float" office:value="0.7715164" calcext:value-type="float">
            <text:p>7,72E-01</text:p>
          </table:table-cell>
          <table:table-cell table:style-name="ce8" table:formula="of:=MAX([.D64];[.F64];[.H64];[.J64];[.L64])" office:value-type="float" office:value="0.9158498" calcext:value-type="float">
            <text:p>9,16E-01</text:p>
          </table:table-cell>
          <table:table-cell table:style-name="ce2"/>
          <table:table-cell table:style-name="ce1" office:value-type="float" office:value="0.7715164" calcext:value-type="float">
            <text:p>7,72E-01</text:p>
          </table:table-cell>
          <table:table-cell table:style-name="ce1" office:value-type="float" office:value="0.9158498" calcext:value-type="float">
            <text:p>9,16E-01</text:p>
          </table:table-cell>
          <table:table-cell table:style-name="ce4" table:formula="of:=[.Q64]&gt;[.N64]" office:value-type="boolean" office:boolean-value="false" calcext:value-type="boolean">
            <text:p>БРЕХНЯ</text:p>
          </table:table-cell>
          <table:table-cell table:style-name="ce4" table:formula="of:=[.R64]&gt;[.O64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715164" calcext:value-type="float">
            <text:p>7,72E-01</text:p>
          </table:table-cell>
          <table:table-cell table:style-name="ce4" table:formula="of:=[.V64]&gt;[.Q64]" office:value-type="boolean" office:boolean-value="false" calcext:value-type="boolean">
            <text:p>БРЕХНЯ</text:p>
          </table:table-cell>
          <table:table-cell table:style-name="ce1" table:formula="of:=MAX([.V64];[.Q64])" office:value-type="float" office:value="0.7715164" calcext:value-type="float">
            <text:p>7,72E-01</text:p>
          </table:table-cell>
          <table:table-cell table:style-name="ce4" table:formula="of:=[.X64]&gt;[.R6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4]&gt;[.C64]" office:value-type="boolean" office:boolean-value="false" calcext:value-type="boolean">
            <text:p>БРЕХНЯ</text:p>
          </table:table-cell>
          <table:table-cell table:style-name="ce4" table:formula="of:=[.F64]&gt;[.D64]" office:value-type="boolean" office:boolean-value="true" calcext:value-type="boolean">
            <text:p>ІСТИНА</text:p>
          </table:table-cell>
          <table:table-cell table:style-name="ce4" table:formula="of:=[.G64]&gt;MAX([.C64];[.E64])" office:value-type="boolean" office:boolean-value="true" calcext:value-type="boolean">
            <text:p>ІСТИНА</text:p>
          </table:table-cell>
          <table:table-cell table:style-name="ce4" table:formula="of:=[.H64]&gt;MAX([.D64];[.F64])" office:value-type="boolean" office:boolean-value="false" calcext:value-type="boolean">
            <text:p>БРЕХНЯ</text:p>
          </table:table-cell>
          <table:table-cell table:style-name="ce4" table:formula="of:=[.I64]&gt;MAX([.C64];[.E64];[.G64])" office:value-type="boolean" office:boolean-value="true" calcext:value-type="boolean">
            <text:p>ІСТИНА</text:p>
          </table:table-cell>
          <table:table-cell table:style-name="ce4" table:formula="of:=[.J64]&gt;MAX([.D64];[.F64];[.H64])" office:value-type="boolean" office:boolean-value="false" calcext:value-type="boolean">
            <text:p>БРЕХНЯ</text:p>
          </table:table-cell>
          <table:table-cell table:style-name="ce4" table:formula="of:=[.K64]&gt;MAX([.C64];[.E64];[.G64];[.I64])" office:value-type="boolean" office:boolean-value="false" calcext:value-type="boolean">
            <text:p>БРЕХНЯ</text:p>
          </table:table-cell>
          <table:table-cell table:style-name="ce4" table:formula="of:=[.L64]&gt;MAX([.D64];[.F64];[.H64];[.J6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4]&gt;0.9" office:value-type="boolean" office:boolean-value="false" calcext:value-type="boolean">
            <text:p>БРЕХНЯ</text:p>
          </table:table-cell>
          <table:table-cell table:style-name="ce4" table:formula="of:=[.R64]&gt;0.9" office:value-type="boolean" office:boolean-value="true" calcext:value-type="boolean">
            <text:p>ІСТИНА</text:p>
          </table:table-cell>
          <table:table-cell table:style-name="ce4" table:formula="of:=[.X64]&gt;0.8" office:value-type="boolean" office:boolean-value="false" calcext:value-type="boolean">
            <text:p>БРЕХНЯ</text:p>
          </table:table-cell>
          <table:table-cell table:style-name="ce4" table:formula="of:=[.R64]&gt;0.8" office:value-type="boolean" office:boolean-value="true" calcext:value-type="boolean">
            <text:p>ІСТИНА</text:p>
          </table:table-cell>
          <table:table-cell table:style-name="ce4" table:formula="of:=[.X64]&gt;0.7" office:value-type="boolean" office:boolean-value="true" calcext:value-type="boolean">
            <text:p>ІСТИНА</text:p>
          </table:table-cell>
          <table:table-cell table:style-name="ce4" table:formula="of:=[.R6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0.7599091" calcext:value-type="float">
            <text:p>7,60E-01</text:p>
          </table:table-cell>
          <table:table-cell table:style-name="ce1" office:value-type="float" office:value="0.869752" calcext:value-type="float">
            <text:p>8,70E-01</text:p>
          </table:table-cell>
          <table:table-cell table:style-name="ce1" office:value-type="float" office:value="0.7599091" calcext:value-type="float">
            <text:p>7,60E-01</text:p>
          </table:table-cell>
          <table:table-cell table:style-name="ce1" office:value-type="float" office:value="0.8974528" calcext:value-type="float">
            <text:p>8,97E-01</text:p>
          </table:table-cell>
          <table:table-cell table:style-name="ce1" office:value-type="float" office:value="0.7599091" calcext:value-type="float">
            <text:p>7,60E-01</text:p>
          </table:table-cell>
          <table:table-cell table:style-name="ce1" office:value-type="float" office:value="0.9086502" calcext:value-type="float">
            <text:p>9,09E-01</text:p>
          </table:table-cell>
          <table:table-cell table:style-name="ce1" office:value-type="float" office:value="0.7735014" calcext:value-type="float">
            <text:p>7,74E-01</text:p>
          </table:table-cell>
          <table:table-cell table:style-name="ce1" office:value-type="float" office:value="0.9266515" calcext:value-type="float">
            <text:p>9,27E-01</text:p>
          </table:table-cell>
          <table:table-cell table:style-name="ce1" office:value-type="float" office:value="0.7829871" calcext:value-type="float">
            <text:p>7,83E-01</text:p>
          </table:table-cell>
          <table:table-cell table:style-name="ce1" office:value-type="float" office:value="0.9266515" calcext:value-type="float">
            <text:p>9,27E-01</text:p>
          </table:table-cell>
          <table:table-cell/>
          <table:table-cell table:style-name="ce1" table:formula="of:=MAX([.C65];[.E65];[.G65];[.I65];[.K65])" office:value-type="float" office:value="0.7829871" calcext:value-type="float">
            <text:p>7,83E-01</text:p>
          </table:table-cell>
          <table:table-cell table:style-name="ce8" table:formula="of:=MAX([.D65];[.F65];[.H65];[.J65];[.L65])" office:value-type="float" office:value="0.9266515" calcext:value-type="float">
            <text:p>9,27E-01</text:p>
          </table:table-cell>
          <table:table-cell table:style-name="ce1"/>
          <table:table-cell table:style-name="ce1" office:value-type="float" office:value="0.7829871" calcext:value-type="float">
            <text:p>7,83E-01</text:p>
          </table:table-cell>
          <table:table-cell table:style-name="ce1" office:value-type="float" office:value="0.9266515" calcext:value-type="float">
            <text:p>9,27E-01</text:p>
          </table:table-cell>
          <table:table-cell table:style-name="ce4" table:formula="of:=[.Q65]&gt;[.N65]" office:value-type="boolean" office:boolean-value="false" calcext:value-type="boolean">
            <text:p>БРЕХНЯ</text:p>
          </table:table-cell>
          <table:table-cell table:style-name="ce4" table:formula="of:=[.R65]&gt;[.O6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29871" calcext:value-type="float">
            <text:p>7,83E-01</text:p>
          </table:table-cell>
          <table:table-cell table:style-name="ce4" table:formula="of:=[.V65]&gt;[.Q65]" office:value-type="boolean" office:boolean-value="false" calcext:value-type="boolean">
            <text:p>БРЕХНЯ</text:p>
          </table:table-cell>
          <table:table-cell table:style-name="ce1" table:formula="of:=MAX([.V65];[.Q65])" office:value-type="float" office:value="0.7829871" calcext:value-type="float">
            <text:p>7,83E-01</text:p>
          </table:table-cell>
          <table:table-cell table:style-name="ce4" table:formula="of:=[.X65]&gt;[.R6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5]&gt;[.C65]" office:value-type="boolean" office:boolean-value="false" calcext:value-type="boolean">
            <text:p>БРЕХНЯ</text:p>
          </table:table-cell>
          <table:table-cell table:style-name="ce4" table:formula="of:=[.F65]&gt;[.D65]" office:value-type="boolean" office:boolean-value="true" calcext:value-type="boolean">
            <text:p>ІСТИНА</text:p>
          </table:table-cell>
          <table:table-cell table:style-name="ce4" table:formula="of:=[.G65]&gt;MAX([.C65];[.E65])" office:value-type="boolean" office:boolean-value="false" calcext:value-type="boolean">
            <text:p>БРЕХНЯ</text:p>
          </table:table-cell>
          <table:table-cell table:style-name="ce4" table:formula="of:=[.H65]&gt;MAX([.D65];[.F65])" office:value-type="boolean" office:boolean-value="true" calcext:value-type="boolean">
            <text:p>ІСТИНА</text:p>
          </table:table-cell>
          <table:table-cell table:style-name="ce4" table:formula="of:=[.I65]&gt;MAX([.C65];[.E65];[.G65])" office:value-type="boolean" office:boolean-value="true" calcext:value-type="boolean">
            <text:p>ІСТИНА</text:p>
          </table:table-cell>
          <table:table-cell table:style-name="ce4" table:formula="of:=[.J65]&gt;MAX([.D65];[.F65];[.H65])" office:value-type="boolean" office:boolean-value="true" calcext:value-type="boolean">
            <text:p>ІСТИНА</text:p>
          </table:table-cell>
          <table:table-cell table:style-name="ce4" table:formula="of:=[.K65]&gt;MAX([.C65];[.E65];[.G65];[.I65])" office:value-type="boolean" office:boolean-value="true" calcext:value-type="boolean">
            <text:p>ІСТИНА</text:p>
          </table:table-cell>
          <table:table-cell table:style-name="ce4" table:formula="of:=[.L65]&gt;MAX([.D65];[.F65];[.H65];[.J6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5]&gt;0.9" office:value-type="boolean" office:boolean-value="false" calcext:value-type="boolean">
            <text:p>БРЕХНЯ</text:p>
          </table:table-cell>
          <table:table-cell table:style-name="ce4" table:formula="of:=[.R65]&gt;0.9" office:value-type="boolean" office:boolean-value="true" calcext:value-type="boolean">
            <text:p>ІСТИНА</text:p>
          </table:table-cell>
          <table:table-cell table:style-name="ce4" table:formula="of:=[.X65]&gt;0.8" office:value-type="boolean" office:boolean-value="false" calcext:value-type="boolean">
            <text:p>БРЕХНЯ</text:p>
          </table:table-cell>
          <table:table-cell table:style-name="ce4" table:formula="of:=[.R65]&gt;0.8" office:value-type="boolean" office:boolean-value="true" calcext:value-type="boolean">
            <text:p>ІСТИНА</text:p>
          </table:table-cell>
          <table:table-cell table:style-name="ce4" table:formula="of:=[.X65]&gt;0.7" office:value-type="boolean" office:boolean-value="true" calcext:value-type="boolean">
            <text:p>ІСТИНА</text:p>
          </table:table-cell>
          <table:table-cell table:style-name="ce4" table:formula="of:=[.R6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0.7656721" calcext:value-type="float">
            <text:p>7,66E-01</text:p>
          </table:table-cell>
          <table:table-cell table:style-name="ce1" office:value-type="float" office:value="0.8945121" calcext:value-type="float">
            <text:p>8,95E-01</text:p>
          </table:table-cell>
          <table:table-cell table:style-name="ce1" office:value-type="float" office:value="0.7656721" calcext:value-type="float">
            <text:p>7,66E-01</text:p>
          </table:table-cell>
          <table:table-cell table:style-name="ce1" office:value-type="float" office:value="0.8945121" calcext:value-type="float">
            <text:p>8,95E-01</text:p>
          </table:table-cell>
          <table:table-cell table:style-name="ce1" office:value-type="float" office:value="0.7714814" calcext:value-type="float">
            <text:p>7,71E-01</text:p>
          </table:table-cell>
          <table:table-cell table:style-name="ce1" office:value-type="float" office:value="0.8971644" calcext:value-type="float">
            <text:p>8,97E-01</text:p>
          </table:table-cell>
          <table:table-cell table:style-name="ce1" office:value-type="float" office:value="0.7714814" calcext:value-type="float">
            <text:p>7,71E-01</text:p>
          </table:table-cell>
          <table:table-cell table:style-name="ce1" office:value-type="float" office:value="0.9207651" calcext:value-type="float">
            <text:p>9,21E-01</text:p>
          </table:table-cell>
          <table:table-cell table:style-name="ce1" office:value-type="float" office:value="0.7714814" calcext:value-type="float">
            <text:p>7,71E-01</text:p>
          </table:table-cell>
          <table:table-cell table:style-name="ce1" office:value-type="float" office:value="0.9207651" calcext:value-type="float">
            <text:p>9,21E-01</text:p>
          </table:table-cell>
          <table:table-cell/>
          <table:table-cell table:style-name="ce1" table:formula="of:=MAX([.C66];[.E66];[.G66];[.I66];[.K66])" office:value-type="float" office:value="0.7714814" calcext:value-type="float">
            <text:p>7,71E-01</text:p>
          </table:table-cell>
          <table:table-cell table:style-name="ce8" table:formula="of:=MAX([.D66];[.F66];[.H66];[.J66];[.L66])" office:value-type="float" office:value="0.9207651" calcext:value-type="float">
            <text:p>9,21E-01</text:p>
          </table:table-cell>
          <table:table-cell table:style-name="ce1"/>
          <table:table-cell table:style-name="ce1" office:value-type="float" office:value="0.7714814" calcext:value-type="float">
            <text:p>7,71E-01</text:p>
          </table:table-cell>
          <table:table-cell table:style-name="ce1" office:value-type="float" office:value="0.9207651" calcext:value-type="float">
            <text:p>9,21E-01</text:p>
          </table:table-cell>
          <table:table-cell table:style-name="ce4" table:formula="of:=[.Q66]&gt;[.N66]" office:value-type="boolean" office:boolean-value="false" calcext:value-type="boolean">
            <text:p>БРЕХНЯ</text:p>
          </table:table-cell>
          <table:table-cell table:style-name="ce4" table:formula="of:=[.R66]&gt;[.O6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714814" calcext:value-type="float">
            <text:p>7,71E-01</text:p>
          </table:table-cell>
          <table:table-cell table:style-name="ce4" table:formula="of:=[.V66]&gt;[.Q66]" office:value-type="boolean" office:boolean-value="false" calcext:value-type="boolean">
            <text:p>БРЕХНЯ</text:p>
          </table:table-cell>
          <table:table-cell table:style-name="ce1" table:formula="of:=MAX([.V66];[.Q66])" office:value-type="float" office:value="0.7714814" calcext:value-type="float">
            <text:p>7,71E-01</text:p>
          </table:table-cell>
          <table:table-cell table:style-name="ce4" table:formula="of:=[.X66]&gt;[.R6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6]&gt;[.C66]" office:value-type="boolean" office:boolean-value="false" calcext:value-type="boolean">
            <text:p>БРЕХНЯ</text:p>
          </table:table-cell>
          <table:table-cell table:style-name="ce4" table:formula="of:=[.F66]&gt;[.D66]" office:value-type="boolean" office:boolean-value="false" calcext:value-type="boolean">
            <text:p>БРЕХНЯ</text:p>
          </table:table-cell>
          <table:table-cell table:style-name="ce4" table:formula="of:=[.G66]&gt;MAX([.C66];[.E66])" office:value-type="boolean" office:boolean-value="true" calcext:value-type="boolean">
            <text:p>ІСТИНА</text:p>
          </table:table-cell>
          <table:table-cell table:style-name="ce4" table:formula="of:=[.H66]&gt;MAX([.D66];[.F66])" office:value-type="boolean" office:boolean-value="true" calcext:value-type="boolean">
            <text:p>ІСТИНА</text:p>
          </table:table-cell>
          <table:table-cell table:style-name="ce4" table:formula="of:=[.I66]&gt;MAX([.C66];[.E66];[.G66])" office:value-type="boolean" office:boolean-value="false" calcext:value-type="boolean">
            <text:p>БРЕХНЯ</text:p>
          </table:table-cell>
          <table:table-cell table:style-name="ce4" table:formula="of:=[.J66]&gt;MAX([.D66];[.F66];[.H66])" office:value-type="boolean" office:boolean-value="true" calcext:value-type="boolean">
            <text:p>ІСТИНА</text:p>
          </table:table-cell>
          <table:table-cell table:style-name="ce4" table:formula="of:=[.K66]&gt;MAX([.C66];[.E66];[.G66];[.I66])" office:value-type="boolean" office:boolean-value="false" calcext:value-type="boolean">
            <text:p>БРЕХНЯ</text:p>
          </table:table-cell>
          <table:table-cell table:style-name="ce4" table:formula="of:=[.L66]&gt;MAX([.D66];[.F66];[.H66];[.J6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6]&gt;0.9" office:value-type="boolean" office:boolean-value="false" calcext:value-type="boolean">
            <text:p>БРЕХНЯ</text:p>
          </table:table-cell>
          <table:table-cell table:style-name="ce4" table:formula="of:=[.R66]&gt;0.9" office:value-type="boolean" office:boolean-value="true" calcext:value-type="boolean">
            <text:p>ІСТИНА</text:p>
          </table:table-cell>
          <table:table-cell table:style-name="ce4" table:formula="of:=[.X66]&gt;0.8" office:value-type="boolean" office:boolean-value="false" calcext:value-type="boolean">
            <text:p>БРЕХНЯ</text:p>
          </table:table-cell>
          <table:table-cell table:style-name="ce4" table:formula="of:=[.R66]&gt;0.8" office:value-type="boolean" office:boolean-value="true" calcext:value-type="boolean">
            <text:p>ІСТИНА</text:p>
          </table:table-cell>
          <table:table-cell table:style-name="ce4" table:formula="of:=[.X66]&gt;0.7" office:value-type="boolean" office:boolean-value="true" calcext:value-type="boolean">
            <text:p>ІСТИНА</text:p>
          </table:table-cell>
          <table:table-cell table:style-name="ce4" table:formula="of:=[.R6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0.8650347" calcext:value-type="float">
            <text:p>8,65E-01</text:p>
          </table:table-cell>
          <table:table-cell table:style-name="ce1" office:value-type="float" office:value="0.923596" calcext:value-type="float">
            <text:p>9,24E-01</text:p>
          </table:table-cell>
          <table:table-cell table:style-name="ce1" office:value-type="float" office:value="0.8669107" calcext:value-type="float">
            <text:p>8,67E-01</text:p>
          </table:table-cell>
          <table:table-cell table:style-name="ce1" office:value-type="float" office:value="0.923596" calcext:value-type="float">
            <text:p>9,24E-01</text:p>
          </table:table-cell>
          <table:table-cell table:style-name="ce1" office:value-type="float" office:value="0.8669107" calcext:value-type="float">
            <text:p>8,67E-01</text:p>
          </table:table-cell>
          <table:table-cell table:style-name="ce1" office:value-type="float" office:value="0.923596" calcext:value-type="float">
            <text:p>9,24E-01</text:p>
          </table:table-cell>
          <table:table-cell table:style-name="ce1" office:value-type="float" office:value="0.8669107" calcext:value-type="float">
            <text:p>8,67E-01</text:p>
          </table:table-cell>
          <table:table-cell table:style-name="ce1" office:value-type="float" office:value="0.923596" calcext:value-type="float">
            <text:p>9,24E-01</text:p>
          </table:table-cell>
          <table:table-cell table:style-name="ce1" office:value-type="float" office:value="0.8669107" calcext:value-type="float">
            <text:p>8,67E-01</text:p>
          </table:table-cell>
          <table:table-cell table:style-name="ce1" office:value-type="float" office:value="0.923596" calcext:value-type="float">
            <text:p>9,24E-01</text:p>
          </table:table-cell>
          <table:table-cell/>
          <table:table-cell table:style-name="ce1" table:formula="of:=MAX([.C67];[.E67];[.G67];[.I67];[.K67])" office:value-type="float" office:value="0.8669107" calcext:value-type="float">
            <text:p>8,67E-01</text:p>
          </table:table-cell>
          <table:table-cell table:style-name="ce8" table:formula="of:=MAX([.D67];[.F67];[.H67];[.J67];[.L67])" office:value-type="float" office:value="0.923596" calcext:value-type="float">
            <text:p>9,24E-01</text:p>
          </table:table-cell>
          <table:table-cell table:style-name="ce1"/>
          <table:table-cell table:style-name="ce1" office:value-type="float" office:value="0.8669107" calcext:value-type="float">
            <text:p>8,67E-01</text:p>
          </table:table-cell>
          <table:table-cell table:style-name="ce1" office:value-type="float" office:value="0.923596" calcext:value-type="float">
            <text:p>9,24E-01</text:p>
          </table:table-cell>
          <table:table-cell table:style-name="ce4" table:formula="of:=[.Q67]&gt;[.N67]" office:value-type="boolean" office:boolean-value="false" calcext:value-type="boolean">
            <text:p>БРЕХНЯ</text:p>
          </table:table-cell>
          <table:table-cell table:style-name="ce4" table:formula="of:=[.R67]&gt;[.O6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669107" calcext:value-type="float">
            <text:p>8,67E-01</text:p>
          </table:table-cell>
          <table:table-cell table:style-name="ce4" table:formula="of:=[.V67]&gt;[.Q67]" office:value-type="boolean" office:boolean-value="false" calcext:value-type="boolean">
            <text:p>БРЕХНЯ</text:p>
          </table:table-cell>
          <table:table-cell table:style-name="ce1" table:formula="of:=MAX([.V67];[.Q67])" office:value-type="float" office:value="0.8669107" calcext:value-type="float">
            <text:p>8,67E-01</text:p>
          </table:table-cell>
          <table:table-cell table:style-name="ce4" table:formula="of:=[.X67]&gt;[.R6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7]&gt;[.C67]" office:value-type="boolean" office:boolean-value="true" calcext:value-type="boolean">
            <text:p>ІСТИНА</text:p>
          </table:table-cell>
          <table:table-cell table:style-name="ce4" table:formula="of:=[.F67]&gt;[.D67]" office:value-type="boolean" office:boolean-value="false" calcext:value-type="boolean">
            <text:p>БРЕХНЯ</text:p>
          </table:table-cell>
          <table:table-cell table:style-name="ce4" table:formula="of:=[.G67]&gt;MAX([.C67];[.E67])" office:value-type="boolean" office:boolean-value="false" calcext:value-type="boolean">
            <text:p>БРЕХНЯ</text:p>
          </table:table-cell>
          <table:table-cell table:style-name="ce4" table:formula="of:=[.H67]&gt;MAX([.D67];[.F67])" office:value-type="boolean" office:boolean-value="false" calcext:value-type="boolean">
            <text:p>БРЕХНЯ</text:p>
          </table:table-cell>
          <table:table-cell table:style-name="ce4" table:formula="of:=[.I67]&gt;MAX([.C67];[.E67];[.G67])" office:value-type="boolean" office:boolean-value="false" calcext:value-type="boolean">
            <text:p>БРЕХНЯ</text:p>
          </table:table-cell>
          <table:table-cell table:style-name="ce4" table:formula="of:=[.J67]&gt;MAX([.D67];[.F67];[.H67])" office:value-type="boolean" office:boolean-value="false" calcext:value-type="boolean">
            <text:p>БРЕХНЯ</text:p>
          </table:table-cell>
          <table:table-cell table:style-name="ce4" table:formula="of:=[.K67]&gt;MAX([.C67];[.E67];[.G67];[.I67])" office:value-type="boolean" office:boolean-value="false" calcext:value-type="boolean">
            <text:p>БРЕХНЯ</text:p>
          </table:table-cell>
          <table:table-cell table:style-name="ce4" table:formula="of:=[.L67]&gt;MAX([.D67];[.F67];[.H67];[.J67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7]&gt;0.9" office:value-type="boolean" office:boolean-value="false" calcext:value-type="boolean">
            <text:p>БРЕХНЯ</text:p>
          </table:table-cell>
          <table:table-cell table:style-name="ce4" table:formula="of:=[.R67]&gt;0.9" office:value-type="boolean" office:boolean-value="true" calcext:value-type="boolean">
            <text:p>ІСТИНА</text:p>
          </table:table-cell>
          <table:table-cell table:style-name="ce4" table:formula="of:=[.X67]&gt;0.8" office:value-type="boolean" office:boolean-value="true" calcext:value-type="boolean">
            <text:p>ІСТИНА</text:p>
          </table:table-cell>
          <table:table-cell table:style-name="ce4" table:formula="of:=[.R67]&gt;0.8" office:value-type="boolean" office:boolean-value="true" calcext:value-type="boolean">
            <text:p>ІСТИНА</text:p>
          </table:table-cell>
          <table:table-cell table:style-name="ce4" table:formula="of:=[.X67]&gt;0.7" office:value-type="boolean" office:boolean-value="true" calcext:value-type="boolean">
            <text:p>ІСТИНА</text:p>
          </table:table-cell>
          <table:table-cell table:style-name="ce4" table:formula="of:=[.R6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0.8243802" calcext:value-type="float">
            <text:p>8,24E-01</text:p>
          </table:table-cell>
          <table:table-cell table:style-name="ce1" office:value-type="float" office:value="0.9368658" calcext:value-type="float">
            <text:p>9,37E-01</text:p>
          </table:table-cell>
          <table:table-cell table:style-name="ce1" office:value-type="float" office:value="0.8243802" calcext:value-type="float">
            <text:p>8,24E-01</text:p>
          </table:table-cell>
          <table:table-cell table:style-name="ce1" office:value-type="float" office:value="0.9368658" calcext:value-type="float">
            <text:p>9,37E-01</text:p>
          </table:table-cell>
          <table:table-cell table:style-name="ce1" office:value-type="float" office:value="0.8243802" calcext:value-type="float">
            <text:p>8,24E-01</text:p>
          </table:table-cell>
          <table:table-cell table:style-name="ce1" office:value-type="float" office:value="0.9368658" calcext:value-type="float">
            <text:p>9,37E-01</text:p>
          </table:table-cell>
          <table:table-cell table:style-name="ce1" office:value-type="float" office:value="0.8243802" calcext:value-type="float">
            <text:p>8,24E-01</text:p>
          </table:table-cell>
          <table:table-cell table:style-name="ce1" office:value-type="float" office:value="0.9368658" calcext:value-type="float">
            <text:p>9,37E-01</text:p>
          </table:table-cell>
          <table:table-cell table:style-name="ce1" office:value-type="float" office:value="0.8314891" calcext:value-type="float">
            <text:p>8,31E-01</text:p>
          </table:table-cell>
          <table:table-cell table:style-name="ce1" office:value-type="float" office:value="0.9368658" calcext:value-type="float">
            <text:p>9,37E-01</text:p>
          </table:table-cell>
          <table:table-cell/>
          <table:table-cell table:style-name="ce1" table:formula="of:=MAX([.C68];[.E68];[.G68];[.I68];[.K68])" office:value-type="float" office:value="0.8314891" calcext:value-type="float">
            <text:p>8,31E-01</text:p>
          </table:table-cell>
          <table:table-cell table:style-name="ce8" table:formula="of:=MAX([.D68];[.F68];[.H68];[.J68];[.L68])" office:value-type="float" office:value="0.9368658" calcext:value-type="float">
            <text:p>9,37E-01</text:p>
          </table:table-cell>
          <table:table-cell table:style-name="ce1"/>
          <table:table-cell table:style-name="ce1" office:value-type="float" office:value="0.8314891" calcext:value-type="float">
            <text:p>8,31E-01</text:p>
          </table:table-cell>
          <table:table-cell table:style-name="ce1" office:value-type="float" office:value="0.9368658" calcext:value-type="float">
            <text:p>9,37E-01</text:p>
          </table:table-cell>
          <table:table-cell table:style-name="ce4" table:formula="of:=[.Q68]&gt;[.N68]" office:value-type="boolean" office:boolean-value="false" calcext:value-type="boolean">
            <text:p>БРЕХНЯ</text:p>
          </table:table-cell>
          <table:table-cell table:style-name="ce4" table:formula="of:=[.R68]&gt;[.O6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314891" calcext:value-type="float">
            <text:p>8,31E-01</text:p>
          </table:table-cell>
          <table:table-cell table:style-name="ce4" table:formula="of:=[.V68]&gt;[.Q68]" office:value-type="boolean" office:boolean-value="false" calcext:value-type="boolean">
            <text:p>БРЕХНЯ</text:p>
          </table:table-cell>
          <table:table-cell table:style-name="ce1" table:formula="of:=MAX([.V68];[.Q68])" office:value-type="float" office:value="0.8314891" calcext:value-type="float">
            <text:p>8,31E-01</text:p>
          </table:table-cell>
          <table:table-cell table:style-name="ce4" table:formula="of:=[.X68]&gt;[.R6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8]&gt;[.C68]" office:value-type="boolean" office:boolean-value="false" calcext:value-type="boolean">
            <text:p>БРЕХНЯ</text:p>
          </table:table-cell>
          <table:table-cell table:style-name="ce4" table:formula="of:=[.F68]&gt;[.D68]" office:value-type="boolean" office:boolean-value="false" calcext:value-type="boolean">
            <text:p>БРЕХНЯ</text:p>
          </table:table-cell>
          <table:table-cell table:style-name="ce4" table:formula="of:=[.G68]&gt;MAX([.C68];[.E68])" office:value-type="boolean" office:boolean-value="false" calcext:value-type="boolean">
            <text:p>БРЕХНЯ</text:p>
          </table:table-cell>
          <table:table-cell table:style-name="ce4" table:formula="of:=[.H68]&gt;MAX([.D68];[.F68])" office:value-type="boolean" office:boolean-value="false" calcext:value-type="boolean">
            <text:p>БРЕХНЯ</text:p>
          </table:table-cell>
          <table:table-cell table:style-name="ce4" table:formula="of:=[.I68]&gt;MAX([.C68];[.E68];[.G68])" office:value-type="boolean" office:boolean-value="false" calcext:value-type="boolean">
            <text:p>БРЕХНЯ</text:p>
          </table:table-cell>
          <table:table-cell table:style-name="ce4" table:formula="of:=[.J68]&gt;MAX([.D68];[.F68];[.H68])" office:value-type="boolean" office:boolean-value="false" calcext:value-type="boolean">
            <text:p>БРЕХНЯ</text:p>
          </table:table-cell>
          <table:table-cell table:style-name="ce4" table:formula="of:=[.K68]&gt;MAX([.C68];[.E68];[.G68];[.I68])" office:value-type="boolean" office:boolean-value="true" calcext:value-type="boolean">
            <text:p>ІСТИНА</text:p>
          </table:table-cell>
          <table:table-cell table:style-name="ce4" table:formula="of:=[.L68]&gt;MAX([.D68];[.F68];[.H68];[.J6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8]&gt;0.9" office:value-type="boolean" office:boolean-value="false" calcext:value-type="boolean">
            <text:p>БРЕХНЯ</text:p>
          </table:table-cell>
          <table:table-cell table:style-name="ce4" table:formula="of:=[.R68]&gt;0.9" office:value-type="boolean" office:boolean-value="true" calcext:value-type="boolean">
            <text:p>ІСТИНА</text:p>
          </table:table-cell>
          <table:table-cell table:style-name="ce4" table:formula="of:=[.X68]&gt;0.8" office:value-type="boolean" office:boolean-value="true" calcext:value-type="boolean">
            <text:p>ІСТИНА</text:p>
          </table:table-cell>
          <table:table-cell table:style-name="ce4" table:formula="of:=[.R68]&gt;0.8" office:value-type="boolean" office:boolean-value="true" calcext:value-type="boolean">
            <text:p>ІСТИНА</text:p>
          </table:table-cell>
          <table:table-cell table:style-name="ce4" table:formula="of:=[.X68]&gt;0.7" office:value-type="boolean" office:boolean-value="true" calcext:value-type="boolean">
            <text:p>ІСТИНА</text:p>
          </table:table-cell>
          <table:table-cell table:style-name="ce4" table:formula="of:=[.R6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0.7461947" calcext:value-type="float">
            <text:p>7,46E-01</text:p>
          </table:table-cell>
          <table:table-cell table:style-name="ce1" office:value-type="float" office:value="0.8852227" calcext:value-type="float">
            <text:p>8,85E-01</text:p>
          </table:table-cell>
          <table:table-cell table:style-name="ce1" office:value-type="float" office:value="0.7676036" calcext:value-type="float">
            <text:p>7,68E-01</text:p>
          </table:table-cell>
          <table:table-cell table:style-name="ce1" office:value-type="float" office:value="0.9282984" calcext:value-type="float">
            <text:p>9,28E-01</text:p>
          </table:table-cell>
          <table:table-cell table:style-name="ce1" office:value-type="float" office:value="0.7676036" calcext:value-type="float">
            <text:p>7,68E-01</text:p>
          </table:table-cell>
          <table:table-cell table:style-name="ce1" office:value-type="float" office:value="0.931688" calcext:value-type="float">
            <text:p>9,32E-01</text:p>
          </table:table-cell>
          <table:table-cell table:style-name="ce1" office:value-type="float" office:value="0.7676036" calcext:value-type="float">
            <text:p>7,68E-01</text:p>
          </table:table-cell>
          <table:table-cell table:style-name="ce1" office:value-type="float" office:value="0.931688" calcext:value-type="float">
            <text:p>9,32E-01</text:p>
          </table:table-cell>
          <table:table-cell table:style-name="ce1" office:value-type="float" office:value="0.7676036" calcext:value-type="float">
            <text:p>7,68E-01</text:p>
          </table:table-cell>
          <table:table-cell table:style-name="ce1" office:value-type="float" office:value="0.931688" calcext:value-type="float">
            <text:p>9,32E-01</text:p>
          </table:table-cell>
          <table:table-cell/>
          <table:table-cell table:style-name="ce1" table:formula="of:=MAX([.C69];[.E69];[.G69];[.I69];[.K69])" office:value-type="float" office:value="0.7676036" calcext:value-type="float">
            <text:p>7,68E-01</text:p>
          </table:table-cell>
          <table:table-cell table:style-name="ce8" table:formula="of:=MAX([.D69];[.F69];[.H69];[.J69];[.L69])" office:value-type="float" office:value="0.931688" calcext:value-type="float">
            <text:p>9,32E-01</text:p>
          </table:table-cell>
          <table:table-cell table:style-name="ce2"/>
          <table:table-cell table:style-name="ce1" office:value-type="float" office:value="0.8360023" calcext:value-type="float">
            <text:p>8,36E-01</text:p>
          </table:table-cell>
          <table:table-cell table:style-name="ce1" office:value-type="float" office:value="0.931688" calcext:value-type="float">
            <text:p>9,32E-01</text:p>
          </table:table-cell>
          <table:table-cell table:style-name="ce4" table:formula="of:=[.Q69]&gt;[.N69]" office:value-type="boolean" office:boolean-value="true" calcext:value-type="boolean">
            <text:p>ІСТИНА</text:p>
          </table:table-cell>
          <table:table-cell table:style-name="ce4" table:formula="of:=[.R69]&gt;[.O69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360023" calcext:value-type="float">
            <text:p>8,36E-01</text:p>
          </table:table-cell>
          <table:table-cell table:style-name="ce4" table:formula="of:=[.V69]&gt;[.Q69]" office:value-type="boolean" office:boolean-value="false" calcext:value-type="boolean">
            <text:p>БРЕХНЯ</text:p>
          </table:table-cell>
          <table:table-cell table:style-name="ce1" table:formula="of:=MAX([.V69];[.Q69])" office:value-type="float" office:value="0.8360023" calcext:value-type="float">
            <text:p>8,36E-01</text:p>
          </table:table-cell>
          <table:table-cell table:style-name="ce4" table:formula="of:=[.X69]&gt;[.R6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9]&gt;[.C69]" office:value-type="boolean" office:boolean-value="true" calcext:value-type="boolean">
            <text:p>ІСТИНА</text:p>
          </table:table-cell>
          <table:table-cell table:style-name="ce4" table:formula="of:=[.F69]&gt;[.D69]" office:value-type="boolean" office:boolean-value="true" calcext:value-type="boolean">
            <text:p>ІСТИНА</text:p>
          </table:table-cell>
          <table:table-cell table:style-name="ce4" table:formula="of:=[.G69]&gt;MAX([.C69];[.E69])" office:value-type="boolean" office:boolean-value="false" calcext:value-type="boolean">
            <text:p>БРЕХНЯ</text:p>
          </table:table-cell>
          <table:table-cell table:style-name="ce4" table:formula="of:=[.H69]&gt;MAX([.D69];[.F69])" office:value-type="boolean" office:boolean-value="true" calcext:value-type="boolean">
            <text:p>ІСТИНА</text:p>
          </table:table-cell>
          <table:table-cell table:style-name="ce4" table:formula="of:=[.I69]&gt;MAX([.C69];[.E69];[.G69])" office:value-type="boolean" office:boolean-value="false" calcext:value-type="boolean">
            <text:p>БРЕХНЯ</text:p>
          </table:table-cell>
          <table:table-cell table:style-name="ce4" table:formula="of:=[.J69]&gt;MAX([.D69];[.F69];[.H69])" office:value-type="boolean" office:boolean-value="false" calcext:value-type="boolean">
            <text:p>БРЕХНЯ</text:p>
          </table:table-cell>
          <table:table-cell table:style-name="ce4" table:formula="of:=[.K69]&gt;MAX([.C69];[.E69];[.G69];[.I69])" office:value-type="boolean" office:boolean-value="false" calcext:value-type="boolean">
            <text:p>БРЕХНЯ</text:p>
          </table:table-cell>
          <table:table-cell table:style-name="ce4" table:formula="of:=[.L69]&gt;MAX([.D69];[.F69];[.H69];[.J6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9]&gt;0.9" office:value-type="boolean" office:boolean-value="false" calcext:value-type="boolean">
            <text:p>БРЕХНЯ</text:p>
          </table:table-cell>
          <table:table-cell table:style-name="ce4" table:formula="of:=[.R69]&gt;0.9" office:value-type="boolean" office:boolean-value="true" calcext:value-type="boolean">
            <text:p>ІСТИНА</text:p>
          </table:table-cell>
          <table:table-cell table:style-name="ce4" table:formula="of:=[.X69]&gt;0.8" office:value-type="boolean" office:boolean-value="true" calcext:value-type="boolean">
            <text:p>ІСТИНА</text:p>
          </table:table-cell>
          <table:table-cell table:style-name="ce4" table:formula="of:=[.R69]&gt;0.8" office:value-type="boolean" office:boolean-value="true" calcext:value-type="boolean">
            <text:p>ІСТИНА</text:p>
          </table:table-cell>
          <table:table-cell table:style-name="ce4" table:formula="of:=[.X69]&gt;0.7" office:value-type="boolean" office:boolean-value="true" calcext:value-type="boolean">
            <text:p>ІСТИНА</text:p>
          </table:table-cell>
          <table:table-cell table:style-name="ce4" table:formula="of:=[.R6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7509098" calcext:value-type="float">
            <text:p>7,51E-01</text:p>
          </table:table-cell>
          <table:table-cell table:style-name="ce1" office:value-type="float" office:value="0.9042275" calcext:value-type="float">
            <text:p>9,04E-01</text:p>
          </table:table-cell>
          <table:table-cell table:style-name="ce1" office:value-type="float" office:value="0.7509098" calcext:value-type="float">
            <text:p>7,51E-01</text:p>
          </table:table-cell>
          <table:table-cell table:style-name="ce1" office:value-type="float" office:value="0.9042275" calcext:value-type="float">
            <text:p>9,04E-01</text:p>
          </table:table-cell>
          <table:table-cell table:style-name="ce1" office:value-type="float" office:value="0.7509098" calcext:value-type="float">
            <text:p>7,51E-01</text:p>
          </table:table-cell>
          <table:table-cell table:style-name="ce1" office:value-type="float" office:value="0.9244759" calcext:value-type="float">
            <text:p>9,24E-01</text:p>
          </table:table-cell>
          <table:table-cell table:style-name="ce1" office:value-type="float" office:value="0.7509098" calcext:value-type="float">
            <text:p>7,51E-01</text:p>
          </table:table-cell>
          <table:table-cell table:style-name="ce1" office:value-type="float" office:value="0.9338092" calcext:value-type="float">
            <text:p>9,34E-01</text:p>
          </table:table-cell>
          <table:table-cell table:style-name="ce1" office:value-type="float" office:value="0.7509098" calcext:value-type="float">
            <text:p>7,51E-01</text:p>
          </table:table-cell>
          <table:table-cell table:style-name="ce1" office:value-type="float" office:value="0.9338092" calcext:value-type="float">
            <text:p>9,34E-01</text:p>
          </table:table-cell>
          <table:table-cell/>
          <table:table-cell table:style-name="ce1" table:formula="of:=MAX([.C70];[.E70];[.G70];[.I70];[.K70])" office:value-type="float" office:value="0.7509098" calcext:value-type="float">
            <text:p>7,51E-01</text:p>
          </table:table-cell>
          <table:table-cell table:style-name="ce8" table:formula="of:=MAX([.D70];[.F70];[.H70];[.J70];[.L70])" office:value-type="float" office:value="0.9338092" calcext:value-type="float">
            <text:p>9,34E-01</text:p>
          </table:table-cell>
          <table:table-cell table:style-name="ce1"/>
          <table:table-cell table:style-name="ce1" office:value-type="float" office:value="0.7509098" calcext:value-type="float">
            <text:p>7,51E-01</text:p>
          </table:table-cell>
          <table:table-cell table:style-name="ce1" office:value-type="float" office:value="0.9338092" calcext:value-type="float">
            <text:p>9,34E-01</text:p>
          </table:table-cell>
          <table:table-cell table:style-name="ce4" table:formula="of:=[.Q70]&gt;[.N70]" office:value-type="boolean" office:boolean-value="false" calcext:value-type="boolean">
            <text:p>БРЕХНЯ</text:p>
          </table:table-cell>
          <table:table-cell table:style-name="ce4" table:formula="of:=[.R70]&gt;[.O7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45763" calcext:value-type="float">
            <text:p>7,55E-01</text:p>
          </table:table-cell>
          <table:table-cell table:style-name="ce4" table:formula="of:=[.V70]&gt;[.Q70]" office:value-type="boolean" office:boolean-value="true" calcext:value-type="boolean">
            <text:p>ІСТИНА</text:p>
          </table:table-cell>
          <table:table-cell table:style-name="ce1" table:formula="of:=MAX([.V70];[.Q70])" office:value-type="float" office:value="0.7545763" calcext:value-type="float">
            <text:p>7,55E-01</text:p>
          </table:table-cell>
          <table:table-cell table:style-name="ce4" table:formula="of:=[.X70]&gt;[.R7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0]&gt;[.C70]" office:value-type="boolean" office:boolean-value="false" calcext:value-type="boolean">
            <text:p>БРЕХНЯ</text:p>
          </table:table-cell>
          <table:table-cell table:style-name="ce4" table:formula="of:=[.F70]&gt;[.D70]" office:value-type="boolean" office:boolean-value="false" calcext:value-type="boolean">
            <text:p>БРЕХНЯ</text:p>
          </table:table-cell>
          <table:table-cell table:style-name="ce4" table:formula="of:=[.G70]&gt;MAX([.C70];[.E70])" office:value-type="boolean" office:boolean-value="false" calcext:value-type="boolean">
            <text:p>БРЕХНЯ</text:p>
          </table:table-cell>
          <table:table-cell table:style-name="ce4" table:formula="of:=[.H70]&gt;MAX([.D70];[.F70])" office:value-type="boolean" office:boolean-value="true" calcext:value-type="boolean">
            <text:p>ІСТИНА</text:p>
          </table:table-cell>
          <table:table-cell table:style-name="ce4" table:formula="of:=[.I70]&gt;MAX([.C70];[.E70];[.G70])" office:value-type="boolean" office:boolean-value="false" calcext:value-type="boolean">
            <text:p>БРЕХНЯ</text:p>
          </table:table-cell>
          <table:table-cell table:style-name="ce4" table:formula="of:=[.J70]&gt;MAX([.D70];[.F70];[.H70])" office:value-type="boolean" office:boolean-value="true" calcext:value-type="boolean">
            <text:p>ІСТИНА</text:p>
          </table:table-cell>
          <table:table-cell table:style-name="ce4" table:formula="of:=[.K70]&gt;MAX([.C70];[.E70];[.G70];[.I70])" office:value-type="boolean" office:boolean-value="false" calcext:value-type="boolean">
            <text:p>БРЕХНЯ</text:p>
          </table:table-cell>
          <table:table-cell table:style-name="ce4" table:formula="of:=[.L70]&gt;MAX([.D70];[.F70];[.H70];[.J7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0]&gt;0.9" office:value-type="boolean" office:boolean-value="false" calcext:value-type="boolean">
            <text:p>БРЕХНЯ</text:p>
          </table:table-cell>
          <table:table-cell table:style-name="ce4" table:formula="of:=[.R70]&gt;0.9" office:value-type="boolean" office:boolean-value="true" calcext:value-type="boolean">
            <text:p>ІСТИНА</text:p>
          </table:table-cell>
          <table:table-cell table:style-name="ce4" table:formula="of:=[.X70]&gt;0.8" office:value-type="boolean" office:boolean-value="false" calcext:value-type="boolean">
            <text:p>БРЕХНЯ</text:p>
          </table:table-cell>
          <table:table-cell table:style-name="ce4" table:formula="of:=[.R70]&gt;0.8" office:value-type="boolean" office:boolean-value="true" calcext:value-type="boolean">
            <text:p>ІСТИНА</text:p>
          </table:table-cell>
          <table:table-cell table:style-name="ce4" table:formula="of:=[.X70]&gt;0.7" office:value-type="boolean" office:boolean-value="true" calcext:value-type="boolean">
            <text:p>ІСТИНА</text:p>
          </table:table-cell>
          <table:table-cell table:style-name="ce4" table:formula="of:=[.R7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6561825" calcext:value-type="float">
            <text:p>6,56E-01</text:p>
          </table:table-cell>
          <table:table-cell table:style-name="ce1" office:value-type="float" office:value="0.8733483" calcext:value-type="float">
            <text:p>8,73E-01</text:p>
          </table:table-cell>
          <table:table-cell table:style-name="ce1" office:value-type="float" office:value="0.7118306" calcext:value-type="float">
            <text:p>7,12E-01</text:p>
          </table:table-cell>
          <table:table-cell table:style-name="ce1" office:value-type="float" office:value="0.9078218" calcext:value-type="float">
            <text:p>9,08E-01</text:p>
          </table:table-cell>
          <table:table-cell table:style-name="ce1" office:value-type="float" office:value="0.7150335" calcext:value-type="float">
            <text:p>7,15E-01</text:p>
          </table:table-cell>
          <table:table-cell table:style-name="ce1" office:value-type="float" office:value="0.9078218" calcext:value-type="float">
            <text:p>9,08E-01</text:p>
          </table:table-cell>
          <table:table-cell table:style-name="ce1" office:value-type="float" office:value="0.7459412" calcext:value-type="float">
            <text:p>7,46E-01</text:p>
          </table:table-cell>
          <table:table-cell table:style-name="ce1" office:value-type="float" office:value="0.9078218" calcext:value-type="float">
            <text:p>9,08E-01</text:p>
          </table:table-cell>
          <table:table-cell table:style-name="ce1" office:value-type="float" office:value="0.7459412" calcext:value-type="float">
            <text:p>7,46E-01</text:p>
          </table:table-cell>
          <table:table-cell table:style-name="ce1" office:value-type="float" office:value="0.9078218" calcext:value-type="float">
            <text:p>9,08E-01</text:p>
          </table:table-cell>
          <table:table-cell/>
          <table:table-cell table:style-name="ce1" table:formula="of:=MAX([.C71];[.E71];[.G71];[.I71];[.K71])" office:value-type="float" office:value="0.7459412" calcext:value-type="float">
            <text:p>7,46E-01</text:p>
          </table:table-cell>
          <table:table-cell table:style-name="ce8" table:formula="of:=MAX([.D71];[.F71];[.H71];[.J71];[.L71])" office:value-type="float" office:value="0.9078218" calcext:value-type="float">
            <text:p>9,08E-01</text:p>
          </table:table-cell>
          <table:table-cell table:style-name="ce1"/>
          <table:table-cell table:style-name="ce1" office:value-type="float" office:value="0.7459412" calcext:value-type="float">
            <text:p>7,46E-01</text:p>
          </table:table-cell>
          <table:table-cell table:style-name="ce1" office:value-type="float" office:value="0.9078218" calcext:value-type="float">
            <text:p>9,08E-01</text:p>
          </table:table-cell>
          <table:table-cell table:style-name="ce4" table:formula="of:=[.Q71]&gt;[.N71]" office:value-type="boolean" office:boolean-value="false" calcext:value-type="boolean">
            <text:p>БРЕХНЯ</text:p>
          </table:table-cell>
          <table:table-cell table:style-name="ce4" table:formula="of:=[.R71]&gt;[.O7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459412" calcext:value-type="float">
            <text:p>7,46E-01</text:p>
          </table:table-cell>
          <table:table-cell table:style-name="ce4" table:formula="of:=[.V71]&gt;[.Q71]" office:value-type="boolean" office:boolean-value="false" calcext:value-type="boolean">
            <text:p>БРЕХНЯ</text:p>
          </table:table-cell>
          <table:table-cell table:style-name="ce1" table:formula="of:=MAX([.V71];[.Q71])" office:value-type="float" office:value="0.7459412" calcext:value-type="float">
            <text:p>7,46E-01</text:p>
          </table:table-cell>
          <table:table-cell table:style-name="ce4" table:formula="of:=[.X71]&gt;[.R7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1]&gt;[.C71]" office:value-type="boolean" office:boolean-value="true" calcext:value-type="boolean">
            <text:p>ІСТИНА</text:p>
          </table:table-cell>
          <table:table-cell table:style-name="ce4" table:formula="of:=[.F71]&gt;[.D71]" office:value-type="boolean" office:boolean-value="true" calcext:value-type="boolean">
            <text:p>ІСТИНА</text:p>
          </table:table-cell>
          <table:table-cell table:style-name="ce4" table:formula="of:=[.G71]&gt;MAX([.C71];[.E71])" office:value-type="boolean" office:boolean-value="true" calcext:value-type="boolean">
            <text:p>ІСТИНА</text:p>
          </table:table-cell>
          <table:table-cell table:style-name="ce4" table:formula="of:=[.H71]&gt;MAX([.D71];[.F71])" office:value-type="boolean" office:boolean-value="false" calcext:value-type="boolean">
            <text:p>БРЕХНЯ</text:p>
          </table:table-cell>
          <table:table-cell table:style-name="ce4" table:formula="of:=[.I71]&gt;MAX([.C71];[.E71];[.G71])" office:value-type="boolean" office:boolean-value="true" calcext:value-type="boolean">
            <text:p>ІСТИНА</text:p>
          </table:table-cell>
          <table:table-cell table:style-name="ce4" table:formula="of:=[.J71]&gt;MAX([.D71];[.F71];[.H71])" office:value-type="boolean" office:boolean-value="false" calcext:value-type="boolean">
            <text:p>БРЕХНЯ</text:p>
          </table:table-cell>
          <table:table-cell table:style-name="ce4" table:formula="of:=[.K71]&gt;MAX([.C71];[.E71];[.G71];[.I71])" office:value-type="boolean" office:boolean-value="false" calcext:value-type="boolean">
            <text:p>БРЕХНЯ</text:p>
          </table:table-cell>
          <table:table-cell table:style-name="ce4" table:formula="of:=[.L71]&gt;MAX([.D71];[.F71];[.H71];[.J7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1]&gt;0.9" office:value-type="boolean" office:boolean-value="false" calcext:value-type="boolean">
            <text:p>БРЕХНЯ</text:p>
          </table:table-cell>
          <table:table-cell table:style-name="ce4" table:formula="of:=[.R71]&gt;0.9" office:value-type="boolean" office:boolean-value="true" calcext:value-type="boolean">
            <text:p>ІСТИНА</text:p>
          </table:table-cell>
          <table:table-cell table:style-name="ce4" table:formula="of:=[.X71]&gt;0.8" office:value-type="boolean" office:boolean-value="false" calcext:value-type="boolean">
            <text:p>БРЕХНЯ</text:p>
          </table:table-cell>
          <table:table-cell table:style-name="ce4" table:formula="of:=[.R71]&gt;0.8" office:value-type="boolean" office:boolean-value="true" calcext:value-type="boolean">
            <text:p>ІСТИНА</text:p>
          </table:table-cell>
          <table:table-cell table:style-name="ce4" table:formula="of:=[.X71]&gt;0.7" office:value-type="boolean" office:boolean-value="true" calcext:value-type="boolean">
            <text:p>ІСТИНА</text:p>
          </table:table-cell>
          <table:table-cell table:style-name="ce4" table:formula="of:=[.R7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8529099" calcext:value-type="float">
            <text:p>8,53E-01</text:p>
          </table:table-cell>
          <table:table-cell table:style-name="ce1" office:value-type="float" office:value="0.9045847" calcext:value-type="float">
            <text:p>9,05E-01</text:p>
          </table:table-cell>
          <table:table-cell table:style-name="ce1" office:value-type="float" office:value="0.8879645" calcext:value-type="float">
            <text:p>8,88E-01</text:p>
          </table:table-cell>
          <table:table-cell table:style-name="ce1" office:value-type="float" office:value="0.9338924" calcext:value-type="float">
            <text:p>9,34E-01</text:p>
          </table:table-cell>
          <table:table-cell table:style-name="ce1" office:value-type="float" office:value="0.8879645" calcext:value-type="float">
            <text:p>8,88E-01</text:p>
          </table:table-cell>
          <table:table-cell table:style-name="ce1" office:value-type="float" office:value="0.9338924" calcext:value-type="float">
            <text:p>9,34E-01</text:p>
          </table:table-cell>
          <table:table-cell table:style-name="ce1" office:value-type="float" office:value="0.8879645" calcext:value-type="float">
            <text:p>8,88E-01</text:p>
          </table:table-cell>
          <table:table-cell table:style-name="ce1" office:value-type="float" office:value="0.9338924" calcext:value-type="float">
            <text:p>9,34E-01</text:p>
          </table:table-cell>
          <table:table-cell table:style-name="ce1" office:value-type="float" office:value="0.8879645" calcext:value-type="float">
            <text:p>8,88E-01</text:p>
          </table:table-cell>
          <table:table-cell table:style-name="ce1" office:value-type="float" office:value="0.9338924" calcext:value-type="float">
            <text:p>9,34E-01</text:p>
          </table:table-cell>
          <table:table-cell/>
          <table:table-cell table:style-name="ce1" table:formula="of:=MAX([.C72];[.E72];[.G72];[.I72];[.K72])" office:value-type="float" office:value="0.8879645" calcext:value-type="float">
            <text:p>8,88E-01</text:p>
          </table:table-cell>
          <table:table-cell table:style-name="ce8" table:formula="of:=MAX([.D72];[.F72];[.H72];[.J72];[.L72])" office:value-type="float" office:value="0.9338924" calcext:value-type="float">
            <text:p>9,34E-01</text:p>
          </table:table-cell>
          <table:table-cell table:style-name="ce1"/>
          <table:table-cell table:style-name="ce1" office:value-type="float" office:value="0.8879645" calcext:value-type="float">
            <text:p>8,88E-01</text:p>
          </table:table-cell>
          <table:table-cell table:style-name="ce1" office:value-type="float" office:value="0.9338924" calcext:value-type="float">
            <text:p>9,34E-01</text:p>
          </table:table-cell>
          <table:table-cell table:style-name="ce4" table:formula="of:=[.Q72]&gt;[.N72]" office:value-type="boolean" office:boolean-value="false" calcext:value-type="boolean">
            <text:p>БРЕХНЯ</text:p>
          </table:table-cell>
          <table:table-cell table:style-name="ce4" table:formula="of:=[.R72]&gt;[.O7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879645" calcext:value-type="float">
            <text:p>8,88E-01</text:p>
          </table:table-cell>
          <table:table-cell table:style-name="ce4" table:formula="of:=[.V72]&gt;[.Q72]" office:value-type="boolean" office:boolean-value="false" calcext:value-type="boolean">
            <text:p>БРЕХНЯ</text:p>
          </table:table-cell>
          <table:table-cell table:style-name="ce1" table:formula="of:=MAX([.V72];[.Q72])" office:value-type="float" office:value="0.8879645" calcext:value-type="float">
            <text:p>8,88E-01</text:p>
          </table:table-cell>
          <table:table-cell table:style-name="ce4" table:formula="of:=[.X72]&gt;[.R7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2]&gt;[.C72]" office:value-type="boolean" office:boolean-value="true" calcext:value-type="boolean">
            <text:p>ІСТИНА</text:p>
          </table:table-cell>
          <table:table-cell table:style-name="ce4" table:formula="of:=[.F72]&gt;[.D72]" office:value-type="boolean" office:boolean-value="true" calcext:value-type="boolean">
            <text:p>ІСТИНА</text:p>
          </table:table-cell>
          <table:table-cell table:style-name="ce4" table:formula="of:=[.G72]&gt;MAX([.C72];[.E72])" office:value-type="boolean" office:boolean-value="false" calcext:value-type="boolean">
            <text:p>БРЕХНЯ</text:p>
          </table:table-cell>
          <table:table-cell table:style-name="ce4" table:formula="of:=[.H72]&gt;MAX([.D72];[.F72])" office:value-type="boolean" office:boolean-value="false" calcext:value-type="boolean">
            <text:p>БРЕХНЯ</text:p>
          </table:table-cell>
          <table:table-cell table:style-name="ce4" table:formula="of:=[.I72]&gt;MAX([.C72];[.E72];[.G72])" office:value-type="boolean" office:boolean-value="false" calcext:value-type="boolean">
            <text:p>БРЕХНЯ</text:p>
          </table:table-cell>
          <table:table-cell table:style-name="ce4" table:formula="of:=[.J72]&gt;MAX([.D72];[.F72];[.H72])" office:value-type="boolean" office:boolean-value="false" calcext:value-type="boolean">
            <text:p>БРЕХНЯ</text:p>
          </table:table-cell>
          <table:table-cell table:style-name="ce4" table:formula="of:=[.K72]&gt;MAX([.C72];[.E72];[.G72];[.I72])" office:value-type="boolean" office:boolean-value="false" calcext:value-type="boolean">
            <text:p>БРЕХНЯ</text:p>
          </table:table-cell>
          <table:table-cell table:style-name="ce4" table:formula="of:=[.L72]&gt;MAX([.D72];[.F72];[.H72];[.J72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2]&gt;0.9" office:value-type="boolean" office:boolean-value="false" calcext:value-type="boolean">
            <text:p>БРЕХНЯ</text:p>
          </table:table-cell>
          <table:table-cell table:style-name="ce4" table:formula="of:=[.R72]&gt;0.9" office:value-type="boolean" office:boolean-value="true" calcext:value-type="boolean">
            <text:p>ІСТИНА</text:p>
          </table:table-cell>
          <table:table-cell table:style-name="ce4" table:formula="of:=[.X72]&gt;0.8" office:value-type="boolean" office:boolean-value="true" calcext:value-type="boolean">
            <text:p>ІСТИНА</text:p>
          </table:table-cell>
          <table:table-cell table:style-name="ce4" table:formula="of:=[.R72]&gt;0.8" office:value-type="boolean" office:boolean-value="true" calcext:value-type="boolean">
            <text:p>ІСТИНА</text:p>
          </table:table-cell>
          <table:table-cell table:style-name="ce4" table:formula="of:=[.X72]&gt;0.7" office:value-type="boolean" office:boolean-value="true" calcext:value-type="boolean">
            <text:p>ІСТИНА</text:p>
          </table:table-cell>
          <table:table-cell table:style-name="ce4" table:formula="of:=[.R7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0.762056" calcext:value-type="float">
            <text:p>7,62E-01</text:p>
          </table:table-cell>
          <table:table-cell table:style-name="ce1" office:value-type="float" office:value="0.8869674" calcext:value-type="float">
            <text:p>8,87E-01</text:p>
          </table:table-cell>
          <table:table-cell table:style-name="ce1" office:value-type="float" office:value="0.8387304" calcext:value-type="float">
            <text:p>8,39E-01</text:p>
          </table:table-cell>
          <table:table-cell table:style-name="ce1" office:value-type="float" office:value="0.8869674" calcext:value-type="float">
            <text:p>8,87E-01</text:p>
          </table:table-cell>
          <table:table-cell table:style-name="ce1" office:value-type="float" office:value="0.8387304" calcext:value-type="float">
            <text:p>8,39E-01</text:p>
          </table:table-cell>
          <table:table-cell table:style-name="ce1" office:value-type="float" office:value="0.9098752" calcext:value-type="float">
            <text:p>9,10E-01</text:p>
          </table:table-cell>
          <table:table-cell table:style-name="ce1" office:value-type="float" office:value="0.8387304" calcext:value-type="float">
            <text:p>8,39E-01</text:p>
          </table:table-cell>
          <table:table-cell table:style-name="ce1" office:value-type="float" office:value="0.9098752" calcext:value-type="float">
            <text:p>9,10E-01</text:p>
          </table:table-cell>
          <table:table-cell table:style-name="ce1" office:value-type="float" office:value="0.8387304" calcext:value-type="float">
            <text:p>8,39E-01</text:p>
          </table:table-cell>
          <table:table-cell table:style-name="ce1" office:value-type="float" office:value="0.9200001" calcext:value-type="float">
            <text:p>9,20E-01</text:p>
          </table:table-cell>
          <table:table-cell/>
          <table:table-cell table:style-name="ce1" table:formula="of:=MAX([.C73];[.E73];[.G73];[.I73];[.K73])" office:value-type="float" office:value="0.8387304" calcext:value-type="float">
            <text:p>8,39E-01</text:p>
          </table:table-cell>
          <table:table-cell table:style-name="ce8" table:formula="of:=MAX([.D73];[.F73];[.H73];[.J73];[.L73])" office:value-type="float" office:value="0.9200001" calcext:value-type="float">
            <text:p>9,20E-01</text:p>
          </table:table-cell>
          <table:table-cell table:style-name="ce1"/>
          <table:table-cell table:style-name="ce1" office:value-type="float" office:value="0.8387304" calcext:value-type="float">
            <text:p>8,39E-01</text:p>
          </table:table-cell>
          <table:table-cell table:style-name="ce1" office:value-type="float" office:value="0.9200001" calcext:value-type="float">
            <text:p>9,20E-01</text:p>
          </table:table-cell>
          <table:table-cell table:style-name="ce4" table:formula="of:=[.Q73]&gt;[.N73]" office:value-type="boolean" office:boolean-value="false" calcext:value-type="boolean">
            <text:p>БРЕХНЯ</text:p>
          </table:table-cell>
          <table:table-cell table:style-name="ce4" table:formula="of:=[.R73]&gt;[.O7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387304" calcext:value-type="float">
            <text:p>8,39E-01</text:p>
          </table:table-cell>
          <table:table-cell table:style-name="ce4" table:formula="of:=[.V73]&gt;[.Q73]" office:value-type="boolean" office:boolean-value="false" calcext:value-type="boolean">
            <text:p>БРЕХНЯ</text:p>
          </table:table-cell>
          <table:table-cell table:style-name="ce1" table:formula="of:=MAX([.V73];[.Q73])" office:value-type="float" office:value="0.8387304" calcext:value-type="float">
            <text:p>8,39E-01</text:p>
          </table:table-cell>
          <table:table-cell table:style-name="ce4" table:formula="of:=[.X73]&gt;[.R7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3]&gt;[.C73]" office:value-type="boolean" office:boolean-value="true" calcext:value-type="boolean">
            <text:p>ІСТИНА</text:p>
          </table:table-cell>
          <table:table-cell table:style-name="ce4" table:formula="of:=[.F73]&gt;[.D73]" office:value-type="boolean" office:boolean-value="false" calcext:value-type="boolean">
            <text:p>БРЕХНЯ</text:p>
          </table:table-cell>
          <table:table-cell table:style-name="ce4" table:formula="of:=[.G73]&gt;MAX([.C73];[.E73])" office:value-type="boolean" office:boolean-value="false" calcext:value-type="boolean">
            <text:p>БРЕХНЯ</text:p>
          </table:table-cell>
          <table:table-cell table:style-name="ce4" table:formula="of:=[.H73]&gt;MAX([.D73];[.F73])" office:value-type="boolean" office:boolean-value="true" calcext:value-type="boolean">
            <text:p>ІСТИНА</text:p>
          </table:table-cell>
          <table:table-cell table:style-name="ce4" table:formula="of:=[.I73]&gt;MAX([.C73];[.E73];[.G73])" office:value-type="boolean" office:boolean-value="false" calcext:value-type="boolean">
            <text:p>БРЕХНЯ</text:p>
          </table:table-cell>
          <table:table-cell table:style-name="ce4" table:formula="of:=[.J73]&gt;MAX([.D73];[.F73];[.H73])" office:value-type="boolean" office:boolean-value="false" calcext:value-type="boolean">
            <text:p>БРЕХНЯ</text:p>
          </table:table-cell>
          <table:table-cell table:style-name="ce4" table:formula="of:=[.K73]&gt;MAX([.C73];[.E73];[.G73];[.I73])" office:value-type="boolean" office:boolean-value="false" calcext:value-type="boolean">
            <text:p>БРЕХНЯ</text:p>
          </table:table-cell>
          <table:table-cell table:style-name="ce4" table:formula="of:=[.L73]&gt;MAX([.D73];[.F73];[.H73];[.J73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73]&gt;0.9" office:value-type="boolean" office:boolean-value="false" calcext:value-type="boolean">
            <text:p>БРЕХНЯ</text:p>
          </table:table-cell>
          <table:table-cell table:style-name="ce4" table:formula="of:=[.R73]&gt;0.9" office:value-type="boolean" office:boolean-value="true" calcext:value-type="boolean">
            <text:p>ІСТИНА</text:p>
          </table:table-cell>
          <table:table-cell table:style-name="ce4" table:formula="of:=[.X73]&gt;0.8" office:value-type="boolean" office:boolean-value="true" calcext:value-type="boolean">
            <text:p>ІСТИНА</text:p>
          </table:table-cell>
          <table:table-cell table:style-name="ce4" table:formula="of:=[.R73]&gt;0.8" office:value-type="boolean" office:boolean-value="true" calcext:value-type="boolean">
            <text:p>ІСТИНА</text:p>
          </table:table-cell>
          <table:table-cell table:style-name="ce4" table:formula="of:=[.X73]&gt;0.7" office:value-type="boolean" office:boolean-value="true" calcext:value-type="boolean">
            <text:p>ІСТИНА</text:p>
          </table:table-cell>
          <table:table-cell table:style-name="ce4" table:formula="of:=[.R7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0.7665716" calcext:value-type="float">
            <text:p>7,67E-01</text:p>
          </table:table-cell>
          <table:table-cell table:style-name="ce1" office:value-type="float" office:value="0.9366681" calcext:value-type="float">
            <text:p>9,37E-01</text:p>
          </table:table-cell>
          <table:table-cell table:style-name="ce1" office:value-type="float" office:value="0.7665716" calcext:value-type="float">
            <text:p>7,67E-01</text:p>
          </table:table-cell>
          <table:table-cell table:style-name="ce1" office:value-type="float" office:value="0.9366681" calcext:value-type="float">
            <text:p>9,37E-01</text:p>
          </table:table-cell>
          <table:table-cell table:style-name="ce1" office:value-type="float" office:value="0.7665716" calcext:value-type="float">
            <text:p>7,67E-01</text:p>
          </table:table-cell>
          <table:table-cell table:style-name="ce1" office:value-type="float" office:value="0.9366681" calcext:value-type="float">
            <text:p>9,37E-01</text:p>
          </table:table-cell>
          <table:table-cell table:style-name="ce1" office:value-type="float" office:value="0.7665716" calcext:value-type="float">
            <text:p>7,67E-01</text:p>
          </table:table-cell>
          <table:table-cell table:style-name="ce1" office:value-type="float" office:value="0.9366681" calcext:value-type="float">
            <text:p>9,37E-01</text:p>
          </table:table-cell>
          <table:table-cell table:style-name="ce1" office:value-type="float" office:value="0.7873148" calcext:value-type="float">
            <text:p>7,87E-01</text:p>
          </table:table-cell>
          <table:table-cell table:style-name="ce1" office:value-type="float" office:value="0.9366681" calcext:value-type="float">
            <text:p>9,37E-01</text:p>
          </table:table-cell>
          <table:table-cell/>
          <table:table-cell table:style-name="ce1" table:formula="of:=MAX([.C74];[.E74];[.G74];[.I74];[.K74])" office:value-type="float" office:value="0.7873148" calcext:value-type="float">
            <text:p>7,87E-01</text:p>
          </table:table-cell>
          <table:table-cell table:style-name="ce8" table:formula="of:=MAX([.D74];[.F74];[.H74];[.J74];[.L74])" office:value-type="float" office:value="0.9366681" calcext:value-type="float">
            <text:p>9,37E-01</text:p>
          </table:table-cell>
          <table:table-cell table:style-name="ce2"/>
          <table:table-cell table:style-name="ce1" office:value-type="float" office:value="0.8127334" calcext:value-type="float">
            <text:p>8,13E-01</text:p>
          </table:table-cell>
          <table:table-cell table:style-name="ce1" office:value-type="float" office:value="0.9366681" calcext:value-type="float">
            <text:p>9,37E-01</text:p>
          </table:table-cell>
          <table:table-cell table:style-name="ce4" table:formula="of:=[.Q74]&gt;[.N74]" office:value-type="boolean" office:boolean-value="true" calcext:value-type="boolean">
            <text:p>ІСТИНА</text:p>
          </table:table-cell>
          <table:table-cell table:style-name="ce4" table:formula="of:=[.R74]&gt;[.O74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127334" calcext:value-type="float">
            <text:p>8,13E-01</text:p>
          </table:table-cell>
          <table:table-cell table:style-name="ce4" table:formula="of:=[.V74]&gt;[.Q74]" office:value-type="boolean" office:boolean-value="false" calcext:value-type="boolean">
            <text:p>БРЕХНЯ</text:p>
          </table:table-cell>
          <table:table-cell table:style-name="ce1" table:formula="of:=MAX([.V74];[.Q74])" office:value-type="float" office:value="0.8127334" calcext:value-type="float">
            <text:p>8,13E-01</text:p>
          </table:table-cell>
          <table:table-cell table:style-name="ce4" table:formula="of:=[.X74]&gt;[.R7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4]&gt;[.C74]" office:value-type="boolean" office:boolean-value="false" calcext:value-type="boolean">
            <text:p>БРЕХНЯ</text:p>
          </table:table-cell>
          <table:table-cell table:style-name="ce4" table:formula="of:=[.F74]&gt;[.D74]" office:value-type="boolean" office:boolean-value="false" calcext:value-type="boolean">
            <text:p>БРЕХНЯ</text:p>
          </table:table-cell>
          <table:table-cell table:style-name="ce4" table:formula="of:=[.G74]&gt;MAX([.C74];[.E74])" office:value-type="boolean" office:boolean-value="false" calcext:value-type="boolean">
            <text:p>БРЕХНЯ</text:p>
          </table:table-cell>
          <table:table-cell table:style-name="ce4" table:formula="of:=[.H74]&gt;MAX([.D74];[.F74])" office:value-type="boolean" office:boolean-value="false" calcext:value-type="boolean">
            <text:p>БРЕХНЯ</text:p>
          </table:table-cell>
          <table:table-cell table:style-name="ce4" table:formula="of:=[.I74]&gt;MAX([.C74];[.E74];[.G74])" office:value-type="boolean" office:boolean-value="false" calcext:value-type="boolean">
            <text:p>БРЕХНЯ</text:p>
          </table:table-cell>
          <table:table-cell table:style-name="ce4" table:formula="of:=[.J74]&gt;MAX([.D74];[.F74];[.H74])" office:value-type="boolean" office:boolean-value="false" calcext:value-type="boolean">
            <text:p>БРЕХНЯ</text:p>
          </table:table-cell>
          <table:table-cell table:style-name="ce4" table:formula="of:=[.K74]&gt;MAX([.C74];[.E74];[.G74];[.I74])" office:value-type="boolean" office:boolean-value="true" calcext:value-type="boolean">
            <text:p>ІСТИНА</text:p>
          </table:table-cell>
          <table:table-cell table:style-name="ce4" table:formula="of:=[.L74]&gt;MAX([.D74];[.F74];[.H74];[.J7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4]&gt;0.9" office:value-type="boolean" office:boolean-value="false" calcext:value-type="boolean">
            <text:p>БРЕХНЯ</text:p>
          </table:table-cell>
          <table:table-cell table:style-name="ce4" table:formula="of:=[.R74]&gt;0.9" office:value-type="boolean" office:boolean-value="true" calcext:value-type="boolean">
            <text:p>ІСТИНА</text:p>
          </table:table-cell>
          <table:table-cell table:style-name="ce4" table:formula="of:=[.X74]&gt;0.8" office:value-type="boolean" office:boolean-value="true" calcext:value-type="boolean">
            <text:p>ІСТИНА</text:p>
          </table:table-cell>
          <table:table-cell table:style-name="ce4" table:formula="of:=[.R74]&gt;0.8" office:value-type="boolean" office:boolean-value="true" calcext:value-type="boolean">
            <text:p>ІСТИНА</text:p>
          </table:table-cell>
          <table:table-cell table:style-name="ce4" table:formula="of:=[.X74]&gt;0.7" office:value-type="boolean" office:boolean-value="true" calcext:value-type="boolean">
            <text:p>ІСТИНА</text:p>
          </table:table-cell>
          <table:table-cell table:style-name="ce4" table:formula="of:=[.R7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0.7013618" calcext:value-type="float">
            <text:p>7,01E-01</text:p>
          </table:table-cell>
          <table:table-cell table:style-name="ce1" office:value-type="float" office:value="0.9280086" calcext:value-type="float">
            <text:p>9,28E-01</text:p>
          </table:table-cell>
          <table:table-cell table:style-name="ce1" office:value-type="float" office:value="0.7623799" calcext:value-type="float">
            <text:p>7,62E-01</text:p>
          </table:table-cell>
          <table:table-cell table:style-name="ce1" office:value-type="float" office:value="0.9280086" calcext:value-type="float">
            <text:p>9,28E-01</text:p>
          </table:table-cell>
          <table:table-cell table:style-name="ce1" office:value-type="float" office:value="0.7623799" calcext:value-type="float">
            <text:p>7,62E-01</text:p>
          </table:table-cell>
          <table:table-cell table:style-name="ce1" office:value-type="float" office:value="0.9280086" calcext:value-type="float">
            <text:p>9,28E-01</text:p>
          </table:table-cell>
          <table:table-cell table:style-name="ce1" office:value-type="float" office:value="0.7961482" calcext:value-type="float">
            <text:p>7,96E-01</text:p>
          </table:table-cell>
          <table:table-cell table:style-name="ce1" office:value-type="float" office:value="0.9280086" calcext:value-type="float">
            <text:p>9,28E-01</text:p>
          </table:table-cell>
          <table:table-cell table:style-name="ce1" office:value-type="float" office:value="0.7961482" calcext:value-type="float">
            <text:p>7,96E-01</text:p>
          </table:table-cell>
          <table:table-cell table:style-name="ce1" office:value-type="float" office:value="0.935103" calcext:value-type="float">
            <text:p>9,35E-01</text:p>
          </table:table-cell>
          <table:table-cell/>
          <table:table-cell table:style-name="ce1" table:formula="of:=MAX([.C75];[.E75];[.G75];[.I75];[.K75])" office:value-type="float" office:value="0.7961482" calcext:value-type="float">
            <text:p>7,96E-01</text:p>
          </table:table-cell>
          <table:table-cell table:style-name="ce8" table:formula="of:=MAX([.D75];[.F75];[.H75];[.J75];[.L75])" office:value-type="float" office:value="0.935103" calcext:value-type="float">
            <text:p>9,35E-01</text:p>
          </table:table-cell>
          <table:table-cell table:style-name="ce1"/>
          <table:table-cell table:style-name="ce1" office:value-type="float" office:value="0.7961482" calcext:value-type="float">
            <text:p>7,96E-01</text:p>
          </table:table-cell>
          <table:table-cell table:style-name="ce1" office:value-type="float" office:value="0.935103" calcext:value-type="float">
            <text:p>9,35E-01</text:p>
          </table:table-cell>
          <table:table-cell table:style-name="ce4" table:formula="of:=[.Q75]&gt;[.N75]" office:value-type="boolean" office:boolean-value="false" calcext:value-type="boolean">
            <text:p>БРЕХНЯ</text:p>
          </table:table-cell>
          <table:table-cell table:style-name="ce4" table:formula="of:=[.R75]&gt;[.O7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961482" calcext:value-type="float">
            <text:p>7,96E-01</text:p>
          </table:table-cell>
          <table:table-cell table:style-name="ce4" table:formula="of:=[.V75]&gt;[.Q75]" office:value-type="boolean" office:boolean-value="false" calcext:value-type="boolean">
            <text:p>БРЕХНЯ</text:p>
          </table:table-cell>
          <table:table-cell table:style-name="ce1" table:formula="of:=MAX([.V75];[.Q75])" office:value-type="float" office:value="0.7961482" calcext:value-type="float">
            <text:p>7,96E-01</text:p>
          </table:table-cell>
          <table:table-cell table:style-name="ce4" table:formula="of:=[.X75]&gt;[.R7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5]&gt;[.C75]" office:value-type="boolean" office:boolean-value="true" calcext:value-type="boolean">
            <text:p>ІСТИНА</text:p>
          </table:table-cell>
          <table:table-cell table:style-name="ce4" table:formula="of:=[.F75]&gt;[.D75]" office:value-type="boolean" office:boolean-value="false" calcext:value-type="boolean">
            <text:p>БРЕХНЯ</text:p>
          </table:table-cell>
          <table:table-cell table:style-name="ce4" table:formula="of:=[.G75]&gt;MAX([.C75];[.E75])" office:value-type="boolean" office:boolean-value="false" calcext:value-type="boolean">
            <text:p>БРЕХНЯ</text:p>
          </table:table-cell>
          <table:table-cell table:style-name="ce4" table:formula="of:=[.H75]&gt;MAX([.D75];[.F75])" office:value-type="boolean" office:boolean-value="false" calcext:value-type="boolean">
            <text:p>БРЕХНЯ</text:p>
          </table:table-cell>
          <table:table-cell table:style-name="ce4" table:formula="of:=[.I75]&gt;MAX([.C75];[.E75];[.G75])" office:value-type="boolean" office:boolean-value="true" calcext:value-type="boolean">
            <text:p>ІСТИНА</text:p>
          </table:table-cell>
          <table:table-cell table:style-name="ce4" table:formula="of:=[.J75]&gt;MAX([.D75];[.F75];[.H75])" office:value-type="boolean" office:boolean-value="false" calcext:value-type="boolean">
            <text:p>БРЕХНЯ</text:p>
          </table:table-cell>
          <table:table-cell table:style-name="ce4" table:formula="of:=[.K75]&gt;MAX([.C75];[.E75];[.G75];[.I75])" office:value-type="boolean" office:boolean-value="false" calcext:value-type="boolean">
            <text:p>БРЕХНЯ</text:p>
          </table:table-cell>
          <table:table-cell table:style-name="ce4" table:formula="of:=[.L75]&gt;MAX([.D75];[.F75];[.H75];[.J75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75]&gt;0.9" office:value-type="boolean" office:boolean-value="false" calcext:value-type="boolean">
            <text:p>БРЕХНЯ</text:p>
          </table:table-cell>
          <table:table-cell table:style-name="ce4" table:formula="of:=[.R75]&gt;0.9" office:value-type="boolean" office:boolean-value="true" calcext:value-type="boolean">
            <text:p>ІСТИНА</text:p>
          </table:table-cell>
          <table:table-cell table:style-name="ce4" table:formula="of:=[.X75]&gt;0.8" office:value-type="boolean" office:boolean-value="false" calcext:value-type="boolean">
            <text:p>БРЕХНЯ</text:p>
          </table:table-cell>
          <table:table-cell table:style-name="ce4" table:formula="of:=[.R75]&gt;0.8" office:value-type="boolean" office:boolean-value="true" calcext:value-type="boolean">
            <text:p>ІСТИНА</text:p>
          </table:table-cell>
          <table:table-cell table:style-name="ce4" table:formula="of:=[.X75]&gt;0.7" office:value-type="boolean" office:boolean-value="true" calcext:value-type="boolean">
            <text:p>ІСТИНА</text:p>
          </table:table-cell>
          <table:table-cell table:style-name="ce4" table:formula="of:=[.R7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7205436" calcext:value-type="float">
            <text:p>7,21E-01</text:p>
          </table:table-cell>
          <table:table-cell table:style-name="ce1" office:value-type="float" office:value="0.8919667" calcext:value-type="float">
            <text:p>8,92E-01</text:p>
          </table:table-cell>
          <table:table-cell table:style-name="ce1" office:value-type="float" office:value="0.7482536" calcext:value-type="float">
            <text:p>7,48E-01</text:p>
          </table:table-cell>
          <table:table-cell table:style-name="ce1" office:value-type="float" office:value="0.9150133" calcext:value-type="float">
            <text:p>9,15E-01</text:p>
          </table:table-cell>
          <table:table-cell table:style-name="ce1" office:value-type="float" office:value="0.7482536" calcext:value-type="float">
            <text:p>7,48E-01</text:p>
          </table:table-cell>
          <table:table-cell table:style-name="ce1" office:value-type="float" office:value="0.9150133" calcext:value-type="float">
            <text:p>9,15E-01</text:p>
          </table:table-cell>
          <table:table-cell table:style-name="ce1" office:value-type="float" office:value="0.7482536" calcext:value-type="float">
            <text:p>7,48E-01</text:p>
          </table:table-cell>
          <table:table-cell table:style-name="ce1" office:value-type="float" office:value="0.9161245" calcext:value-type="float">
            <text:p>9,16E-01</text:p>
          </table:table-cell>
          <table:table-cell table:style-name="ce1" office:value-type="float" office:value="0.760299" calcext:value-type="float">
            <text:p>7,60E-01</text:p>
          </table:table-cell>
          <table:table-cell table:style-name="ce1" office:value-type="float" office:value="0.9161245" calcext:value-type="float">
            <text:p>9,16E-01</text:p>
          </table:table-cell>
          <table:table-cell/>
          <table:table-cell table:style-name="ce1" table:formula="of:=MAX([.C76];[.E76];[.G76];[.I76];[.K76])" office:value-type="float" office:value="0.760299" calcext:value-type="float">
            <text:p>7,60E-01</text:p>
          </table:table-cell>
          <table:table-cell table:style-name="ce8" table:formula="of:=MAX([.D76];[.F76];[.H76];[.J76];[.L76])" office:value-type="float" office:value="0.9161245" calcext:value-type="float">
            <text:p>9,16E-01</text:p>
          </table:table-cell>
          <table:table-cell table:style-name="ce1"/>
          <table:table-cell table:style-name="ce1" office:value-type="float" office:value="0.760299" calcext:value-type="float">
            <text:p>7,60E-01</text:p>
          </table:table-cell>
          <table:table-cell table:style-name="ce1" office:value-type="float" office:value="0.9161245" calcext:value-type="float">
            <text:p>9,16E-01</text:p>
          </table:table-cell>
          <table:table-cell table:style-name="ce4" table:formula="of:=[.Q76]&gt;[.N76]" office:value-type="boolean" office:boolean-value="false" calcext:value-type="boolean">
            <text:p>БРЕХНЯ</text:p>
          </table:table-cell>
          <table:table-cell table:style-name="ce4" table:formula="of:=[.R76]&gt;[.O7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60299" calcext:value-type="float">
            <text:p>7,60E-01</text:p>
          </table:table-cell>
          <table:table-cell table:style-name="ce4" table:formula="of:=[.V76]&gt;[.Q76]" office:value-type="boolean" office:boolean-value="false" calcext:value-type="boolean">
            <text:p>БРЕХНЯ</text:p>
          </table:table-cell>
          <table:table-cell table:style-name="ce1" table:formula="of:=MAX([.V76];[.Q76])" office:value-type="float" office:value="0.760299" calcext:value-type="float">
            <text:p>7,60E-01</text:p>
          </table:table-cell>
          <table:table-cell table:style-name="ce4" table:formula="of:=[.X76]&gt;[.R7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6]&gt;[.C76]" office:value-type="boolean" office:boolean-value="true" calcext:value-type="boolean">
            <text:p>ІСТИНА</text:p>
          </table:table-cell>
          <table:table-cell table:style-name="ce4" table:formula="of:=[.F76]&gt;[.D76]" office:value-type="boolean" office:boolean-value="true" calcext:value-type="boolean">
            <text:p>ІСТИНА</text:p>
          </table:table-cell>
          <table:table-cell table:style-name="ce4" table:formula="of:=[.G76]&gt;MAX([.C76];[.E76])" office:value-type="boolean" office:boolean-value="false" calcext:value-type="boolean">
            <text:p>БРЕХНЯ</text:p>
          </table:table-cell>
          <table:table-cell table:style-name="ce4" table:formula="of:=[.H76]&gt;MAX([.D76];[.F76])" office:value-type="boolean" office:boolean-value="false" calcext:value-type="boolean">
            <text:p>БРЕХНЯ</text:p>
          </table:table-cell>
          <table:table-cell table:style-name="ce4" table:formula="of:=[.I76]&gt;MAX([.C76];[.E76];[.G76])" office:value-type="boolean" office:boolean-value="false" calcext:value-type="boolean">
            <text:p>БРЕХНЯ</text:p>
          </table:table-cell>
          <table:table-cell table:style-name="ce4" table:formula="of:=[.J76]&gt;MAX([.D76];[.F76];[.H76])" office:value-type="boolean" office:boolean-value="true" calcext:value-type="boolean">
            <text:p>ІСТИНА</text:p>
          </table:table-cell>
          <table:table-cell table:style-name="ce4" table:formula="of:=[.K76]&gt;MAX([.C76];[.E76];[.G76];[.I76])" office:value-type="boolean" office:boolean-value="true" calcext:value-type="boolean">
            <text:p>ІСТИНА</text:p>
          </table:table-cell>
          <table:table-cell table:style-name="ce4" table:formula="of:=[.L76]&gt;MAX([.D76];[.F76];[.H76];[.J7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6]&gt;0.9" office:value-type="boolean" office:boolean-value="false" calcext:value-type="boolean">
            <text:p>БРЕХНЯ</text:p>
          </table:table-cell>
          <table:table-cell table:style-name="ce4" table:formula="of:=[.R76]&gt;0.9" office:value-type="boolean" office:boolean-value="true" calcext:value-type="boolean">
            <text:p>ІСТИНА</text:p>
          </table:table-cell>
          <table:table-cell table:style-name="ce4" table:formula="of:=[.X76]&gt;0.8" office:value-type="boolean" office:boolean-value="false" calcext:value-type="boolean">
            <text:p>БРЕХНЯ</text:p>
          </table:table-cell>
          <table:table-cell table:style-name="ce4" table:formula="of:=[.R76]&gt;0.8" office:value-type="boolean" office:boolean-value="true" calcext:value-type="boolean">
            <text:p>ІСТИНА</text:p>
          </table:table-cell>
          <table:table-cell table:style-name="ce4" table:formula="of:=[.X76]&gt;0.7" office:value-type="boolean" office:boolean-value="true" calcext:value-type="boolean">
            <text:p>ІСТИНА</text:p>
          </table:table-cell>
          <table:table-cell table:style-name="ce4" table:formula="of:=[.R76]&gt;0.7" office:value-type="boolean" office:boolean-value="true" calcext:value-type="boolean">
            <text:p>ІСТИНА</text:p>
          </table:table-cell>
        </table:table-row>
        <table:table-row table:style-name="ro1" table:number-rows-repeated="1048499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.00.0000</text:date>, <text:time style:data-style-name="N2" text:time-value="10:26:33.493194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21:22:45.096141662</meta:creation-date>
    <dc:date>2026-03-24T10:28:45.495213466</dc:date>
    <meta:editing-duration>PT6H33M48S</meta:editing-duration>
    <meta:editing-cycles>55</meta:editing-cycles>
    <meta:generator>LibreOffice/25.8.2.2$Linux_X86_64 LibreOffice_project/d401f2107ccab8f924a8e2df40f573aab7605b6f</meta:generator>
    <meta:document-statistic meta:table-count="1" meta:cell-count="2698" meta:object-count="0"/>
  </office:meta>
</office:document-meta>
</file>