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5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81">
      <style:text-properties fo:font-weight="normal" style:font-weight-asian="normal" style:font-weight-complex="normal"/>
    </style:style>
    <style:style style:name="ce2" style:family="table-cell" style:parent-style-name="Default" style:data-style-name="N8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1" table:default-cell-style-name="ce5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R2 testing part</text:p>
          </table:table-cell>
          <table:table-cell/>
          <table:table-cell office:value-type="string" calcext:value-type="string">
            <text:p>run0</text:p>
          </table:table-cell>
          <table:table-cell/>
          <table:table-cell office:value-type="string" calcext:value-type="string">
            <text:p>run1</text:p>
          </table:table-cell>
          <table:table-cell/>
          <table:table-cell office:value-type="string" calcext:value-type="string">
            <text:p>run2</text:p>
          </table:table-cell>
          <table:table-cell/>
          <table:table-cell office:value-type="string" calcext:value-type="string">
            <text:p>run3</text:p>
          </table:table-cell>
          <table:table-cell/>
          <table:table-cell office:value-type="string" calcext:value-type="string">
            <text:p>run4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Max (5runs,train on large dataset)</text:p>
          </table:table-cell>
          <table:table-cell/>
          <table:table-cell table:style-name="ce3" table:formula="of:=SUM([.S3:.S76])/COUNT([.S3:.S76])" office:value-type="percentage" office:value="0.513513513513514" calcext:value-type="percentage">
            <text:p>51,35%</text:p>
          </table:table-cell>
          <table:table-cell table:style-name="ce3" table:formula="of:=SUM([.T3:.T76])/COUNT([.T3:.T76])" office:value-type="percentage" office:value="0.243243243243243" calcext:value-type="percentage">
            <text:p>24,32%</text:p>
          </table:table-cell>
          <table:table-cell table:style-name="ce3"/>
          <table:table-cell office:value-type="string" calcext:value-type="string">
            <text:p>GP through NN (10000)</text:p>
          </table:table-cell>
          <table:table-cell table:style-name="ce3" table:formula="of:=SUM([.W3:.W76])/COUNT([.W3:.W76])" office:value-type="percentage" office:value="0.323076923076923" calcext:value-type="percentage">
            <text:p>32,31%</text:p>
          </table:table-cell>
          <table:table-cell office:value-type="string" calcext:value-type="string">
            <text:p>-</text:p>
          </table:table-cell>
          <table:table-cell table:style-name="ce3" table:formula="of:=SUM([.Y3:.Y76])/COUNT([.Y3:.Y76])" office:value-type="percentage" office:value="0.0135135135135135" calcext:value-type="percentage">
            <text:p>1,35%</text:p>
          </table:table-cell>
          <table:table-cell table:style-name="ce3"/>
          <table:table-cell office:value-type="string" calcext:value-type="string">
            <text:p>imp run1</text:p>
          </table:table-cell>
          <table:table-cell/>
          <table:table-cell office:value-type="string" calcext:value-type="string">
            <text:p>imp run2</text:p>
          </table:table-cell>
          <table:table-cell/>
          <table:table-cell office:value-type="string" calcext:value-type="string">
            <text:p>imp run 3</text:p>
          </table:table-cell>
          <table:table-cell/>
          <table:table-cell office:value-type="string" calcext:value-type="string">
            <text:p>imp run 4</text:p>
          </table:table-cell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2&gt;0.9</text:p>
          </table:table-cell>
          <table:table-cell/>
          <table:table-cell office:value-type="string" calcext:value-type="string">
            <text:p>R2&gt;0.8</text:p>
          </table:table-cell>
          <table:table-cell/>
          <table:table-cell office:value-type="string" calcext:value-type="string">
            <text:p>R2&gt;0.7</text:p>
          </table:table-cell>
          <table:table-cell/>
        </table:table-row>
        <table:table-row table:style-name="ro1">
          <table:table-cell office:value-type="string" calcext:value-type="string">
            <text:p>0 -inv / 1 — direct</text:p>
          </table:table-cell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GP</text:p>
          </table:table-cell>
          <table:table-cell office:value-type="string" calcext:value-type="string">
            <text:p>GP total max</text:p>
          </table:table-cell>
          <table:table-cell office:value-type="string" calcext:value-type="string">
            <text:p>GP better NN</text:p>
          </table:table-cell>
          <table:table-cell/>
          <table:table-cell table:style-name="ce3" table:formula="of:=SUM([.AA3:.AA76])/COUNT([.AA3:.AA76])" office:value-type="percentage" office:value="0.405405405405405" calcext:value-type="percentage">
            <text:p>40,54%</text:p>
          </table:table-cell>
          <table:table-cell table:style-name="ce3" table:formula="of:=SUM([.AB3:.AB76])/COUNT([.AB3:.AB76])" office:value-type="percentage" office:value="0.675675675675676" calcext:value-type="percentage">
            <text:p>67,57%</text:p>
          </table:table-cell>
          <table:table-cell table:style-name="ce3" table:formula="of:=SUM([.AC3:.AC76])/COUNT([.AC3:.AC76])" office:value-type="percentage" office:value="0.283783783783784" calcext:value-type="percentage">
            <text:p>28,38%</text:p>
          </table:table-cell>
          <table:table-cell table:style-name="ce3" table:formula="of:=SUM([.AD3:.AD76])/COUNT([.AD3:.AD76])" office:value-type="percentage" office:value="0.324324324324324" calcext:value-type="percentage">
            <text:p>32,43%</text:p>
          </table:table-cell>
          <table:table-cell table:style-name="ce3" table:formula="of:=SUM([.AE3:.AE76])/COUNT([.AE3:.AE76])" office:value-type="percentage" office:value="0.364864864864865" calcext:value-type="percentage">
            <text:p>36,49%</text:p>
          </table:table-cell>
          <table:table-cell table:style-name="ce3" table:formula="of:=SUM([.AF3:.AF76])/COUNT([.AF3:.AF76])" office:value-type="percentage" office:value="0.256756756756757" calcext:value-type="percentage">
            <text:p>25,68%</text:p>
          </table:table-cell>
          <table:table-cell table:style-name="ce3" table:formula="of:=SUM([.AG3:.AG76])/COUNT([.AG3:.AG76])" office:value-type="percentage" office:value="0.283783783783784" calcext:value-type="percentage">
            <text:p>28,38%</text:p>
          </table:table-cell>
          <table:table-cell table:style-name="ce3" table:formula="of:=SUM([.AH3:.AH76])/COUNT([.AH3:.AH76])" office:value-type="percentage" office:value="0.27027027027027" calcext:value-type="percentage">
            <text:p>27,03%</text:p>
          </table:table-cell>
          <table:table-cell table:style-name="ce3"/>
          <table:table-cell table:style-name="ce3" table:formula="of:=SUM([.AJ3:.AJ76])/COUNT([.AJ3:.AJ76])" office:value-type="percentage" office:value="0.0675675675675676" calcext:value-type="percentage">
            <text:p>6,76%</text:p>
          </table:table-cell>
          <table:table-cell table:style-name="ce3" table:formula="of:=SUM([.AK3:.AK76])/COUNT([.AK3:.AK76])" office:value-type="percentage" office:value="0.351351351351351" calcext:value-type="percentage">
            <text:p>35,14%</text:p>
          </table:table-cell>
          <table:table-cell table:style-name="ce3" table:formula="of:=SUM([.AL3:.AL76])/COUNT([.AL3:.AL76])" office:value-type="percentage" office:value="0.135135135135135" calcext:value-type="percentage">
            <text:p>13,51%</text:p>
          </table:table-cell>
          <table:table-cell table:style-name="ce3" table:formula="of:=SUM([.AM3:.AM76])/COUNT([.AM3:.AM76])" office:value-type="percentage" office:value="0.851351351351351" calcext:value-type="percentage">
            <text:p>85,14%</text:p>
          </table:table-cell>
          <table:table-cell table:style-name="ce3" table:formula="of:=SUM([.AN3:.AN76])/COUNT([.AN3:.AN76])" office:value-type="percentage" office:value="0.743243243243243" calcext:value-type="percentage">
            <text:p>74,32%</text:p>
          </table:table-cell>
          <table:table-cell table:style-name="ce3" table:formula="of:=SUM([.AO3:.AO76])/COUNT([.AO3:.AO76])" office:value-type="percentage" office:value="0.959459459459459" calcext:value-type="percentage">
            <text:p>95,95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8638633" calcext:value-type="float">
            <text:p>8,64E-01</text:p>
          </table:table-cell>
          <table:table-cell table:style-name="ce1" office:value-type="float" office:value="0.9654602" calcext:value-type="float">
            <text:p>9,65E-01</text:p>
          </table:table-cell>
          <table:table-cell table:style-name="ce1" office:value-type="float" office:value="0.8955281" calcext:value-type="float">
            <text:p>8,96E-01</text:p>
          </table:table-cell>
          <table:table-cell table:style-name="ce1" office:value-type="float" office:value="0.9659318" calcext:value-type="float">
            <text:p>9,66E-01</text:p>
          </table:table-cell>
          <table:table-cell table:style-name="ce1" office:value-type="float" office:value="0.8825436" calcext:value-type="float">
            <text:p>8,83E-01</text:p>
          </table:table-cell>
          <table:table-cell table:style-name="ce1" office:value-type="float" office:value="0.9573379" calcext:value-type="float">
            <text:p>9,57E-01</text:p>
          </table:table-cell>
          <table:table-cell table:style-name="ce1" office:value-type="float" office:value="0.8901207" calcext:value-type="float">
            <text:p>8,90E-01</text:p>
          </table:table-cell>
          <table:table-cell table:style-name="ce1" office:value-type="float" office:value="0.9697482" calcext:value-type="float">
            <text:p>9,70E-01</text:p>
          </table:table-cell>
          <table:table-cell table:style-name="ce1" office:value-type="float" office:value="0.8328338" calcext:value-type="float">
            <text:p>8,33E-01</text:p>
          </table:table-cell>
          <table:table-cell table:style-name="ce1" office:value-type="float" office:value="0.9643139" calcext:value-type="float">
            <text:p>9,64E-01</text:p>
          </table:table-cell>
          <table:table-cell/>
          <table:table-cell table:style-name="ce1" table:formula="of:=MAX([.C3];[.E3];[.G3];[.I3];[.K3])" office:value-type="float" office:value="0.8955281" calcext:value-type="float">
            <text:p>8,96E-01</text:p>
          </table:table-cell>
          <table:table-cell table:style-name="ce8" table:formula="of:=MAX([.D3];[.F3];[.H3];[.J3];[.L3])" office:value-type="float" office:value="0.9697482" calcext:value-type="float">
            <text:p>9,70E-01</text:p>
          </table:table-cell>
          <table:table-cell table:style-name="ce1"/>
          <table:table-cell table:style-name="ce1" office:value-type="float" office:value="0.8955281" calcext:value-type="float">
            <text:p>8,96E-01</text:p>
          </table:table-cell>
          <table:table-cell table:style-name="ce1" office:value-type="float" office:value="0.9697482" calcext:value-type="float">
            <text:p>9,70E-01</text:p>
          </table:table-cell>
          <table:table-cell table:style-name="ce4" table:formula="of:=[.Q3]&gt;[.N3]" office:value-type="boolean" office:boolean-value="false" calcext:value-type="boolean">
            <text:p>БРЕХНЯ</text:p>
          </table:table-cell>
          <table:table-cell table:style-name="ce4" table:formula="of:=[.R3]&gt;[.O3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3]" office:value-type="float" office:value="0.8955281" calcext:value-type="float">
            <text:p>8,96E-01</text:p>
          </table:table-cell>
          <table:table-cell table:style-name="ce4" table:formula="of:=[.X3]&gt;[.R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]&gt;[.C3]" office:value-type="boolean" office:boolean-value="true" calcext:value-type="boolean">
            <text:p>ІСТИНА</text:p>
          </table:table-cell>
          <table:table-cell table:style-name="ce4" table:formula="of:=[.F3]&gt;[.D3]" office:value-type="boolean" office:boolean-value="true" calcext:value-type="boolean">
            <text:p>ІСТИНА</text:p>
          </table:table-cell>
          <table:table-cell table:style-name="ce4" table:formula="of:=[.G3]&gt;MAX([.C3];[.E3])" office:value-type="boolean" office:boolean-value="false" calcext:value-type="boolean">
            <text:p>БРЕХНЯ</text:p>
          </table:table-cell>
          <table:table-cell table:style-name="ce4" table:formula="of:=[.H3]&gt;MAX([.D3];[.F3])" office:value-type="boolean" office:boolean-value="false" calcext:value-type="boolean">
            <text:p>БРЕХНЯ</text:p>
          </table:table-cell>
          <table:table-cell table:style-name="ce4" table:formula="of:=[.I3]&gt;MAX([.C3];[.E3];[.G3])" office:value-type="boolean" office:boolean-value="false" calcext:value-type="boolean">
            <text:p>БРЕХНЯ</text:p>
          </table:table-cell>
          <table:table-cell table:style-name="ce4" table:formula="of:=[.J3]&gt;MAX([.D3];[.F3];[.H3])" office:value-type="boolean" office:boolean-value="true" calcext:value-type="boolean">
            <text:p>ІСТИНА</text:p>
          </table:table-cell>
          <table:table-cell table:style-name="ce4" table:formula="of:=[.K3]&gt;MAX([.C3];[.E3];[.G3];[.I3])" office:value-type="boolean" office:boolean-value="false" calcext:value-type="boolean">
            <text:p>БРЕХНЯ</text:p>
          </table:table-cell>
          <table:table-cell table:style-name="ce4" table:formula="of:=[.L3]&gt;MAX([.D3];[.F3];[.H3];[.J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]&gt;0.9" office:value-type="boolean" office:boolean-value="false" calcext:value-type="boolean">
            <text:p>БРЕХНЯ</text:p>
          </table:table-cell>
          <table:table-cell table:style-name="ce4" table:formula="of:=[.R3]&gt;0.9" office:value-type="boolean" office:boolean-value="true" calcext:value-type="boolean">
            <text:p>ІСТИНА</text:p>
          </table:table-cell>
          <table:table-cell table:style-name="ce4" table:formula="of:=[.X3]&gt;0.8" office:value-type="boolean" office:boolean-value="true" calcext:value-type="boolean">
            <text:p>ІСТИНА</text:p>
          </table:table-cell>
          <table:table-cell table:style-name="ce4" table:formula="of:=[.R3]&gt;0.8" office:value-type="boolean" office:boolean-value="true" calcext:value-type="boolean">
            <text:p>ІСТИНА</text:p>
          </table:table-cell>
          <table:table-cell table:style-name="ce4" table:formula="of:=[.X3]&gt;0.7" office:value-type="boolean" office:boolean-value="true" calcext:value-type="boolean">
            <text:p>ІСТИНА</text:p>
          </table:table-cell>
          <table:table-cell table:style-name="ce4" table:formula="of:=[.R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7513281" calcext:value-type="float">
            <text:p>7,51E-01</text:p>
          </table:table-cell>
          <table:table-cell table:style-name="ce1" office:value-type="float" office:value="0.8341552" calcext:value-type="float">
            <text:p>8,34E-01</text:p>
          </table:table-cell>
          <table:table-cell table:style-name="ce1" office:value-type="float" office:value="0.737701" calcext:value-type="float">
            <text:p>7,38E-01</text:p>
          </table:table-cell>
          <table:table-cell table:style-name="ce1" office:value-type="float" office:value="0.8578489" calcext:value-type="float">
            <text:p>8,58E-01</text:p>
          </table:table-cell>
          <table:table-cell table:style-name="ce1" office:value-type="float" office:value="0.7212751" calcext:value-type="float">
            <text:p>7,21E-01</text:p>
          </table:table-cell>
          <table:table-cell table:style-name="ce1" office:value-type="float" office:value="0.7376362" calcext:value-type="float">
            <text:p>7,38E-01</text:p>
          </table:table-cell>
          <table:table-cell table:style-name="ce1" office:value-type="float" office:value="0.7544434" calcext:value-type="float">
            <text:p>7,54E-01</text:p>
          </table:table-cell>
          <table:table-cell table:style-name="ce1" office:value-type="float" office:value="0.7901372" calcext:value-type="float">
            <text:p>7,90E-01</text:p>
          </table:table-cell>
          <table:table-cell table:style-name="ce1" office:value-type="float" office:value="0.7352242" calcext:value-type="float">
            <text:p>7,35E-01</text:p>
          </table:table-cell>
          <table:table-cell table:style-name="ce1" office:value-type="float" office:value="0.8935513" calcext:value-type="float">
            <text:p>8,94E-01</text:p>
          </table:table-cell>
          <table:table-cell/>
          <table:table-cell table:style-name="ce1" table:formula="of:=MAX([.C4];[.E4];[.G4];[.I4];[.K4])" office:value-type="float" office:value="0.7544434" calcext:value-type="float">
            <text:p>7,54E-01</text:p>
          </table:table-cell>
          <table:table-cell table:style-name="ce8" table:formula="of:=MAX([.D4];[.F4];[.H4];[.J4];[.L4])" office:value-type="float" office:value="0.8935513" calcext:value-type="float">
            <text:p>8,94E-01</text:p>
          </table:table-cell>
          <table:table-cell table:style-name="ce1"/>
          <table:table-cell table:style-name="ce1" office:value-type="float" office:value="0.7599212" calcext:value-type="float">
            <text:p>7,60E-01</text:p>
          </table:table-cell>
          <table:table-cell table:style-name="ce1" office:value-type="float" office:value="0.8935513" calcext:value-type="float">
            <text:p>8,94E-01</text:p>
          </table:table-cell>
          <table:table-cell table:style-name="ce4" table:formula="of:=[.Q4]&gt;[.N4]" office:value-type="boolean" office:boolean-value="true" calcext:value-type="boolean">
            <text:p>ІСТИНА</text:p>
          </table:table-cell>
          <table:table-cell table:style-name="ce4" table:formula="of:=[.R4]&gt;[.O4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4]" office:value-type="float" office:value="0.7599212" calcext:value-type="float">
            <text:p>7,60E-01</text:p>
          </table:table-cell>
          <table:table-cell table:style-name="ce4" table:formula="of:=[.X4]&gt;[.R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]&gt;[.C4]" office:value-type="boolean" office:boolean-value="false" calcext:value-type="boolean">
            <text:p>БРЕХНЯ</text:p>
          </table:table-cell>
          <table:table-cell table:style-name="ce4" table:formula="of:=[.F4]&gt;[.D4]" office:value-type="boolean" office:boolean-value="true" calcext:value-type="boolean">
            <text:p>ІСТИНА</text:p>
          </table:table-cell>
          <table:table-cell table:style-name="ce4" table:formula="of:=[.G4]&gt;MAX([.C4];[.E4])" office:value-type="boolean" office:boolean-value="false" calcext:value-type="boolean">
            <text:p>БРЕХНЯ</text:p>
          </table:table-cell>
          <table:table-cell table:style-name="ce4" table:formula="of:=[.H4]&gt;MAX([.D4];[.F4])" office:value-type="boolean" office:boolean-value="false" calcext:value-type="boolean">
            <text:p>БРЕХНЯ</text:p>
          </table:table-cell>
          <table:table-cell table:style-name="ce4" table:formula="of:=[.I4]&gt;MAX([.C4];[.E4];[.G4])" office:value-type="boolean" office:boolean-value="true" calcext:value-type="boolean">
            <text:p>ІСТИНА</text:p>
          </table:table-cell>
          <table:table-cell table:style-name="ce4" table:formula="of:=[.J4]&gt;MAX([.D4];[.F4];[.H4])" office:value-type="boolean" office:boolean-value="false" calcext:value-type="boolean">
            <text:p>БРЕХНЯ</text:p>
          </table:table-cell>
          <table:table-cell table:style-name="ce4" table:formula="of:=[.K4]&gt;MAX([.C4];[.E4];[.G4];[.I4])" office:value-type="boolean" office:boolean-value="false" calcext:value-type="boolean">
            <text:p>БРЕХНЯ</text:p>
          </table:table-cell>
          <table:table-cell table:style-name="ce4" table:formula="of:=[.L4]&gt;MAX([.D4];[.F4];[.H4];[.J4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]&gt;0.9" office:value-type="boolean" office:boolean-value="false" calcext:value-type="boolean">
            <text:p>БРЕХНЯ</text:p>
          </table:table-cell>
          <table:table-cell table:style-name="ce4" table:formula="of:=[.R4]&gt;0.9" office:value-type="boolean" office:boolean-value="false" calcext:value-type="boolean">
            <text:p>БРЕХНЯ</text:p>
          </table:table-cell>
          <table:table-cell table:style-name="ce4" table:formula="of:=[.X4]&gt;0.8" office:value-type="boolean" office:boolean-value="false" calcext:value-type="boolean">
            <text:p>БРЕХНЯ</text:p>
          </table:table-cell>
          <table:table-cell table:style-name="ce4" table:formula="of:=[.R4]&gt;0.8" office:value-type="boolean" office:boolean-value="true" calcext:value-type="boolean">
            <text:p>ІСТИНА</text:p>
          </table:table-cell>
          <table:table-cell table:style-name="ce4" table:formula="of:=[.X4]&gt;0.7" office:value-type="boolean" office:boolean-value="true" calcext:value-type="boolean">
            <text:p>ІСТИНА</text:p>
          </table:table-cell>
          <table:table-cell table:style-name="ce4" table:formula="of:=[.R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614995" calcext:value-type="float">
            <text:p>2,61E-01</text:p>
          </table:table-cell>
          <table:table-cell table:style-name="ce1" office:value-type="float" office:value="0.5068544" calcext:value-type="float">
            <text:p>5,07E-01</text:p>
          </table:table-cell>
          <table:table-cell table:style-name="ce1" office:value-type="float" office:value="0.24776" calcext:value-type="float">
            <text:p>2,48E-01</text:p>
          </table:table-cell>
          <table:table-cell table:style-name="ce1" office:value-type="float" office:value="0.5929407" calcext:value-type="float">
            <text:p>5,93E-01</text:p>
          </table:table-cell>
          <table:table-cell table:style-name="ce1" office:value-type="float" office:value="0.2691446" calcext:value-type="float">
            <text:p>2,69E-01</text:p>
          </table:table-cell>
          <table:table-cell table:style-name="ce1" office:value-type="float" office:value="0.6240191" calcext:value-type="float">
            <text:p>6,24E-01</text:p>
          </table:table-cell>
          <table:table-cell table:style-name="ce1" office:value-type="float" office:value="0.320665" calcext:value-type="float">
            <text:p>3,21E-01</text:p>
          </table:table-cell>
          <table:table-cell table:style-name="ce1" office:value-type="float" office:value="0.4558684" calcext:value-type="float">
            <text:p>4,56E-01</text:p>
          </table:table-cell>
          <table:table-cell table:style-name="ce1" office:value-type="float" office:value="0.3973304" calcext:value-type="float">
            <text:p>3,97E-01</text:p>
          </table:table-cell>
          <table:table-cell table:style-name="ce1" office:value-type="float" office:value="0.1579258" calcext:value-type="float">
            <text:p>1,58E-01</text:p>
          </table:table-cell>
          <table:table-cell/>
          <table:table-cell table:style-name="ce1" table:formula="of:=MAX([.C5];[.E5];[.G5];[.I5];[.K5])" office:value-type="float" office:value="0.3973304" calcext:value-type="float">
            <text:p>3,97E-01</text:p>
          </table:table-cell>
          <table:table-cell table:style-name="ce8" table:formula="of:=MAX([.D5];[.F5];[.H5];[.J5];[.L5])" office:value-type="float" office:value="0.6240191" calcext:value-type="float">
            <text:p>6,24E-01</text:p>
          </table:table-cell>
          <table:table-cell table:style-name="ce2"/>
          <table:table-cell table:style-name="ce1" office:value-type="float" office:value="0.3973304" calcext:value-type="float">
            <text:p>3,97E-01</text:p>
          </table:table-cell>
          <table:table-cell table:style-name="ce1" office:value-type="float" office:value="0.7385177" calcext:value-type="float">
            <text:p>7,39E-01</text:p>
          </table:table-cell>
          <table:table-cell table:style-name="ce4" table:formula="of:=[.Q5]&gt;[.N5]" office:value-type="boolean" office:boolean-value="false" calcext:value-type="boolean">
            <text:p>БРЕХНЯ</text:p>
          </table:table-cell>
          <table:table-cell table:style-name="ce4" table:formula="of:=[.R5]&gt;[.O5]" office:value-type="boolean" office:boolean-value="true" calcext:value-type="boolean">
            <text:p>ІСТИНА</text:p>
          </table:table-cell>
          <table:table-cell table:style-name="ce1"/>
          <table:table-cell table:style-name="ce2" table:number-columns-repeated="2"/>
          <table:table-cell table:style-name="ce1" table:formula="of:=[.Q5]" office:value-type="float" office:value="0.3973304" calcext:value-type="float">
            <text:p>3,97E-01</text:p>
          </table:table-cell>
          <table:table-cell table:style-name="ce4" table:formula="of:=[.X5]&gt;[.R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]&gt;[.C5]" office:value-type="boolean" office:boolean-value="false" calcext:value-type="boolean">
            <text:p>БРЕХНЯ</text:p>
          </table:table-cell>
          <table:table-cell table:style-name="ce4" table:formula="of:=[.F5]&gt;[.D5]" office:value-type="boolean" office:boolean-value="true" calcext:value-type="boolean">
            <text:p>ІСТИНА</text:p>
          </table:table-cell>
          <table:table-cell table:style-name="ce4" table:formula="of:=[.G5]&gt;MAX([.C5];[.E5])" office:value-type="boolean" office:boolean-value="true" calcext:value-type="boolean">
            <text:p>ІСТИНА</text:p>
          </table:table-cell>
          <table:table-cell table:style-name="ce4" table:formula="of:=[.H5]&gt;MAX([.D5];[.F5])" office:value-type="boolean" office:boolean-value="true" calcext:value-type="boolean">
            <text:p>ІСТИНА</text:p>
          </table:table-cell>
          <table:table-cell table:style-name="ce4" table:formula="of:=[.I5]&gt;MAX([.C5];[.E5];[.G5])" office:value-type="boolean" office:boolean-value="true" calcext:value-type="boolean">
            <text:p>ІСТИНА</text:p>
          </table:table-cell>
          <table:table-cell table:style-name="ce4" table:formula="of:=[.J5]&gt;MAX([.D5];[.F5];[.H5])" office:value-type="boolean" office:boolean-value="false" calcext:value-type="boolean">
            <text:p>БРЕХНЯ</text:p>
          </table:table-cell>
          <table:table-cell table:style-name="ce4" table:formula="of:=[.K5]&gt;MAX([.C5];[.E5];[.G5];[.I5])" office:value-type="boolean" office:boolean-value="true" calcext:value-type="boolean">
            <text:p>ІСТИНА</text:p>
          </table:table-cell>
          <table:table-cell table:style-name="ce4" table:formula="of:=[.L5]&gt;MAX([.D5];[.F5];[.H5];[.J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]&gt;0.9" office:value-type="boolean" office:boolean-value="false" calcext:value-type="boolean">
            <text:p>БРЕХНЯ</text:p>
          </table:table-cell>
          <table:table-cell table:style-name="ce4" table:formula="of:=[.R5]&gt;0.9" office:value-type="boolean" office:boolean-value="false" calcext:value-type="boolean">
            <text:p>БРЕХНЯ</text:p>
          </table:table-cell>
          <table:table-cell table:style-name="ce4" table:formula="of:=[.X5]&gt;0.8" office:value-type="boolean" office:boolean-value="false" calcext:value-type="boolean">
            <text:p>БРЕХНЯ</text:p>
          </table:table-cell>
          <table:table-cell table:style-name="ce4" table:formula="of:=[.R5]&gt;0.8" office:value-type="boolean" office:boolean-value="false" calcext:value-type="boolean">
            <text:p>БРЕХНЯ</text:p>
          </table:table-cell>
          <table:table-cell table:style-name="ce4" table:formula="of:=[.X5]&gt;0.7" office:value-type="boolean" office:boolean-value="false" calcext:value-type="boolean">
            <text:p>БРЕХНЯ</text:p>
          </table:table-cell>
          <table:table-cell table:style-name="ce4" table:formula="of:=[.R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504089" calcext:value-type="float">
            <text:p>6,50E-01</text:p>
          </table:table-cell>
          <table:table-cell table:style-name="ce1" office:value-type="float" office:value="0.8686169" calcext:value-type="float">
            <text:p>8,69E-01</text:p>
          </table:table-cell>
          <table:table-cell table:style-name="ce1" office:value-type="float" office:value="0.6244789" calcext:value-type="float">
            <text:p>6,24E-01</text:p>
          </table:table-cell>
          <table:table-cell table:style-name="ce1" office:value-type="float" office:value="0.8635295" calcext:value-type="float">
            <text:p>8,64E-01</text:p>
          </table:table-cell>
          <table:table-cell table:style-name="ce1" office:value-type="float" office:value="0.6626638" calcext:value-type="float">
            <text:p>6,63E-01</text:p>
          </table:table-cell>
          <table:table-cell table:style-name="ce1" office:value-type="float" office:value="0.8474981" calcext:value-type="float">
            <text:p>8,47E-01</text:p>
          </table:table-cell>
          <table:table-cell table:style-name="ce1" office:value-type="float" office:value="0.6991685" calcext:value-type="float">
            <text:p>6,99E-01</text:p>
          </table:table-cell>
          <table:table-cell table:style-name="ce1" office:value-type="float" office:value="0.8383668" calcext:value-type="float">
            <text:p>8,38E-01</text:p>
          </table:table-cell>
          <table:table-cell table:style-name="ce1" office:value-type="float" office:value="0.6853397" calcext:value-type="float">
            <text:p>6,85E-01</text:p>
          </table:table-cell>
          <table:table-cell table:style-name="ce1" office:value-type="float" office:value="0.8553308" calcext:value-type="float">
            <text:p>8,55E-01</text:p>
          </table:table-cell>
          <table:table-cell/>
          <table:table-cell table:style-name="ce1" table:formula="of:=MAX([.C6];[.E6];[.G6];[.I6];[.K6])" office:value-type="float" office:value="0.6991685" calcext:value-type="float">
            <text:p>6,99E-01</text:p>
          </table:table-cell>
          <table:table-cell table:style-name="ce8" table:formula="of:=MAX([.D6];[.F6];[.H6];[.J6];[.L6])" office:value-type="float" office:value="0.8686169" calcext:value-type="float">
            <text:p>8,69E-01</text:p>
          </table:table-cell>
          <table:table-cell table:style-name="ce1"/>
          <table:table-cell table:style-name="ce1" office:value-type="float" office:value="0.7228747" calcext:value-type="float">
            <text:p>7,23E-01</text:p>
          </table:table-cell>
          <table:table-cell table:style-name="ce1" office:value-type="float" office:value="0.8686169" calcext:value-type="float">
            <text:p>8,69E-01</text:p>
          </table:table-cell>
          <table:table-cell table:style-name="ce4" table:formula="of:=[.Q6]&gt;[.N6]" office:value-type="boolean" office:boolean-value="true" calcext:value-type="boolean">
            <text:p>ІСТИНА</text:p>
          </table:table-cell>
          <table:table-cell table:style-name="ce4" table:formula="of:=[.R6]&gt;[.O6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6]" office:value-type="float" office:value="0.7228747" calcext:value-type="float">
            <text:p>7,23E-01</text:p>
          </table:table-cell>
          <table:table-cell table:style-name="ce4" table:formula="of:=[.X6]&gt;[.R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]&gt;[.C6]" office:value-type="boolean" office:boolean-value="false" calcext:value-type="boolean">
            <text:p>БРЕХНЯ</text:p>
          </table:table-cell>
          <table:table-cell table:style-name="ce4" table:formula="of:=[.F6]&gt;[.D6]" office:value-type="boolean" office:boolean-value="false" calcext:value-type="boolean">
            <text:p>БРЕХНЯ</text:p>
          </table:table-cell>
          <table:table-cell table:style-name="ce4" table:formula="of:=[.G6]&gt;MAX([.C6];[.E6])" office:value-type="boolean" office:boolean-value="true" calcext:value-type="boolean">
            <text:p>ІСТИНА</text:p>
          </table:table-cell>
          <table:table-cell table:style-name="ce4" table:formula="of:=[.H6]&gt;MAX([.D6];[.F6])" office:value-type="boolean" office:boolean-value="false" calcext:value-type="boolean">
            <text:p>БРЕХНЯ</text:p>
          </table:table-cell>
          <table:table-cell table:style-name="ce4" table:formula="of:=[.I6]&gt;MAX([.C6];[.E6];[.G6])" office:value-type="boolean" office:boolean-value="true" calcext:value-type="boolean">
            <text:p>ІСТИНА</text:p>
          </table:table-cell>
          <table:table-cell table:style-name="ce4" table:formula="of:=[.J6]&gt;MAX([.D6];[.F6];[.H6])" office:value-type="boolean" office:boolean-value="false" calcext:value-type="boolean">
            <text:p>БРЕХНЯ</text:p>
          </table:table-cell>
          <table:table-cell table:style-name="ce4" table:formula="of:=[.K6]&gt;MAX([.C6];[.E6];[.G6];[.I6])" office:value-type="boolean" office:boolean-value="false" calcext:value-type="boolean">
            <text:p>БРЕХНЯ</text:p>
          </table:table-cell>
          <table:table-cell table:style-name="ce4" table:formula="of:=[.L6]&gt;MAX([.D6];[.F6];[.H6];[.J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]&gt;0.9" office:value-type="boolean" office:boolean-value="false" calcext:value-type="boolean">
            <text:p>БРЕХНЯ</text:p>
          </table:table-cell>
          <table:table-cell table:style-name="ce4" table:formula="of:=[.R6]&gt;0.9" office:value-type="boolean" office:boolean-value="false" calcext:value-type="boolean">
            <text:p>БРЕХНЯ</text:p>
          </table:table-cell>
          <table:table-cell table:style-name="ce4" table:formula="of:=[.X6]&gt;0.8" office:value-type="boolean" office:boolean-value="false" calcext:value-type="boolean">
            <text:p>БРЕХНЯ</text:p>
          </table:table-cell>
          <table:table-cell table:style-name="ce4" table:formula="of:=[.R6]&gt;0.8" office:value-type="boolean" office:boolean-value="true" calcext:value-type="boolean">
            <text:p>ІСТИНА</text:p>
          </table:table-cell>
          <table:table-cell table:style-name="ce4" table:formula="of:=[.X6]&gt;0.7" office:value-type="boolean" office:boolean-value="true" calcext:value-type="boolean">
            <text:p>ІСТИНА</text:p>
          </table:table-cell>
          <table:table-cell table:style-name="ce4" table:formula="of:=[.R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-0.4061775" calcext:value-type="float">
            <text:p>-4,06E-01</text:p>
          </table:table-cell>
          <table:table-cell table:style-name="ce1" office:value-type="float" office:value="0.09469038" calcext:value-type="float">
            <text:p>9,47E-02</text:p>
          </table:table-cell>
          <table:table-cell table:style-name="ce1" office:value-type="float" office:value="-0.3428181" calcext:value-type="float">
            <text:p>-3,43E-01</text:p>
          </table:table-cell>
          <table:table-cell table:style-name="ce1" office:value-type="float" office:value="0.1433963" calcext:value-type="float">
            <text:p>1,43E-01</text:p>
          </table:table-cell>
          <table:table-cell table:style-name="ce1" office:value-type="float" office:value="-0.4576397" calcext:value-type="float">
            <text:p>-4,58E-01</text:p>
          </table:table-cell>
          <table:table-cell table:style-name="ce1" office:value-type="float" office:value="0.1351602" calcext:value-type="float">
            <text:p>1,35E-01</text:p>
          </table:table-cell>
          <table:table-cell table:style-name="ce1" office:value-type="float" office:value="-0.3444262" calcext:value-type="float">
            <text:p>-3,44E-01</text:p>
          </table:table-cell>
          <table:table-cell table:style-name="ce1" office:value-type="float" office:value="0.161355" calcext:value-type="float">
            <text:p>1,61E-01</text:p>
          </table:table-cell>
          <table:table-cell table:style-name="ce1" office:value-type="float" office:value="-0.6216974" calcext:value-type="float">
            <text:p>-6,22E-01</text:p>
          </table:table-cell>
          <table:table-cell/>
          <table:table-cell table:style-name="ce1" table:formula="of:=MAX([.C7];[.E7];[.G7];[.I7];[.K7])" office:value-type="float" office:value="0.161355" calcext:value-type="float">
            <text:p>1,61E-01</text:p>
          </table:table-cell>
          <table:table-cell table:style-name="ce8" table:formula="of:=MAX([.D7];[.F7];[.H7];[.J7];[.L7])" office:value-type="float" office:value="-0.3428181" calcext:value-type="float">
            <text:p>-3,43E-01</text:p>
          </table:table-cell>
          <table:table-cell table:style-name="ce2"/>
          <table:table-cell table:style-name="ce1" table:formula="of:=MAX([.F7];[.H7];[.J7];[.L7];[.N7])" office:value-type="float" office:value="0.161355" calcext:value-type="float">
            <text:p>1,61E-01</text:p>
          </table:table-cell>
          <table:table-cell table:style-name="ce1" office:value-type="float" office:value="0.237575" calcext:value-type="float">
            <text:p>2,38E-01</text:p>
          </table:table-cell>
          <table:table-cell table:style-name="ce4" table:formula="of:=[.Q7]&gt;[.N7]" office:value-type="boolean" office:boolean-value="false" calcext:value-type="boolean">
            <text:p>БРЕХНЯ</text:p>
          </table:table-cell>
          <table:table-cell table:style-name="ce4" table:formula="of:=[.R7]&gt;[.O7]" office:value-type="boolean" office:boolean-value="true" calcext:value-type="boolean">
            <text:p>ІСТИНА</text:p>
          </table:table-cell>
          <table:table-cell table:style-name="ce1"/>
          <table:table-cell table:style-name="ce2" table:number-columns-repeated="2"/>
          <table:table-cell table:style-name="ce1" table:formula="of:=[.Q7]" office:value-type="float" office:value="0.161355" calcext:value-type="float">
            <text:p>1,61E-01</text:p>
          </table:table-cell>
          <table:table-cell table:style-name="ce4" table:formula="of:=[.X7]&gt;[.R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]&gt;[.C7]" office:value-type="boolean" office:boolean-value="true" calcext:value-type="boolean">
            <text:p>ІСТИНА</text:p>
          </table:table-cell>
          <table:table-cell table:style-name="ce4" table:formula="of:=[.F7]&gt;[.D7]" office:value-type="boolean" office:boolean-value="true" calcext:value-type="boolean">
            <text:p>ІСТИНА</text:p>
          </table:table-cell>
          <table:table-cell table:style-name="ce4" table:formula="of:=[.G7]&gt;MAX([.C7];[.E7])" office:value-type="boolean" office:boolean-value="true" calcext:value-type="boolean">
            <text:p>ІСТИНА</text:p>
          </table:table-cell>
          <table:table-cell table:style-name="ce4" table:formula="of:=[.H7]&gt;MAX([.D7];[.F7])" office:value-type="boolean" office:boolean-value="false" calcext:value-type="boolean">
            <text:p>БРЕХНЯ</text:p>
          </table:table-cell>
          <table:table-cell table:style-name="ce4" table:formula="of:=[.I7]&gt;MAX([.C7];[.E7];[.G7])" office:value-type="boolean" office:boolean-value="false" calcext:value-type="boolean">
            <text:p>БРЕХНЯ</text:p>
          </table:table-cell>
          <table:table-cell table:style-name="ce4" table:formula="of:=[.J7]&gt;MAX([.D7];[.F7];[.H7])" office:value-type="boolean" office:boolean-value="false" calcext:value-type="boolean">
            <text:p>БРЕХНЯ</text:p>
          </table:table-cell>
          <table:table-cell table:style-name="ce4" table:formula="of:=[.K7]&gt;MAX([.C7];[.E7];[.G7];[.I7])" office:value-type="boolean" office:boolean-value="true" calcext:value-type="boolean">
            <text:p>ІСТИНА</text:p>
          </table:table-cell>
          <table:table-cell table:style-name="ce4" table:formula="of:=[.L7]&gt;MAX([.D7];[.F7];[.H7];[.J7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]&gt;0.9" office:value-type="boolean" office:boolean-value="false" calcext:value-type="boolean">
            <text:p>БРЕХНЯ</text:p>
          </table:table-cell>
          <table:table-cell table:style-name="ce4" table:formula="of:=[.R7]&gt;0.9" office:value-type="boolean" office:boolean-value="false" calcext:value-type="boolean">
            <text:p>БРЕХНЯ</text:p>
          </table:table-cell>
          <table:table-cell table:style-name="ce4" table:formula="of:=[.X7]&gt;0.8" office:value-type="boolean" office:boolean-value="false" calcext:value-type="boolean">
            <text:p>БРЕХНЯ</text:p>
          </table:table-cell>
          <table:table-cell table:style-name="ce4" table:formula="of:=[.R7]&gt;0.8" office:value-type="boolean" office:boolean-value="false" calcext:value-type="boolean">
            <text:p>БРЕХНЯ</text:p>
          </table:table-cell>
          <table:table-cell table:style-name="ce4" table:formula="of:=[.X7]&gt;0.7" office:value-type="boolean" office:boolean-value="false" calcext:value-type="boolean">
            <text:p>БРЕХНЯ</text:p>
          </table:table-cell>
          <table:table-cell table:style-name="ce4" table:formula="of:=[.R7]&gt;0.7" office:value-type="boolean" office:boolean-value="false" calcext:value-type="boolean">
            <text:p>БРЕХНЯ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8215269" calcext:value-type="float">
            <text:p>8,22E-01</text:p>
          </table:table-cell>
          <table:table-cell table:style-name="ce1" office:value-type="float" office:value="0.7906162" calcext:value-type="float">
            <text:p>7,91E-01</text:p>
          </table:table-cell>
          <table:table-cell table:style-name="ce1" office:value-type="float" office:value="0.8323701" calcext:value-type="float">
            <text:p>8,32E-01</text:p>
          </table:table-cell>
          <table:table-cell table:style-name="ce1" office:value-type="float" office:value="0.7968584" calcext:value-type="float">
            <text:p>7,97E-01</text:p>
          </table:table-cell>
          <table:table-cell/>
          <table:table-cell table:style-name="ce1" office:value-type="float" office:value="0.9187232" calcext:value-type="float">
            <text:p>9,19E-01</text:p>
          </table:table-cell>
          <table:table-cell table:style-name="ce1" office:value-type="float" office:value="0.767596" calcext:value-type="float">
            <text:p>7,68E-01</text:p>
          </table:table-cell>
          <table:table-cell table:style-name="ce1" office:value-type="float" office:value="0.9167736" calcext:value-type="float">
            <text:p>9,17E-01</text:p>
          </table:table-cell>
          <table:table-cell table:style-name="ce1" office:value-type="float" office:value="0.8000543" calcext:value-type="float">
            <text:p>8,00E-01</text:p>
          </table:table-cell>
          <table:table-cell table:style-name="ce1" office:value-type="float" office:value="0.8551044" calcext:value-type="float">
            <text:p>8,55E-01</text:p>
          </table:table-cell>
          <table:table-cell/>
          <table:table-cell table:style-name="ce1" table:formula="of:=MAX([.C8];[.E8];[.G8];[.I8];[.K8])" office:value-type="float" office:value="0.8323701" calcext:value-type="float">
            <text:p>8,32E-01</text:p>
          </table:table-cell>
          <table:table-cell table:style-name="ce8" table:formula="of:=MAX([.D8];[.F8];[.H8];[.J8];[.L8])" office:value-type="float" office:value="0.9187232" calcext:value-type="float">
            <text:p>9,19E-01</text:p>
          </table:table-cell>
          <table:table-cell table:style-name="ce1"/>
          <table:table-cell table:style-name="ce1" office:value-type="float" office:value="0.8323701" calcext:value-type="float">
            <text:p>8,32E-01</text:p>
          </table:table-cell>
          <table:table-cell table:style-name="ce1" office:value-type="float" office:value="0.9187232" calcext:value-type="float">
            <text:p>9,19E-01</text:p>
          </table:table-cell>
          <table:table-cell table:style-name="ce4" table:formula="of:=[.Q8]&gt;[.N8]" office:value-type="boolean" office:boolean-value="false" calcext:value-type="boolean">
            <text:p>БРЕХНЯ</text:p>
          </table:table-cell>
          <table:table-cell table:style-name="ce4" table:formula="of:=[.R8]&gt;[.O8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8]" office:value-type="float" office:value="0.8323701" calcext:value-type="float">
            <text:p>8,32E-01</text:p>
          </table:table-cell>
          <table:table-cell table:style-name="ce4" table:formula="of:=[.X8]&gt;[.R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8]&gt;[.C8]" office:value-type="boolean" office:boolean-value="true" calcext:value-type="boolean">
            <text:p>ІСТИНА</text:p>
          </table:table-cell>
          <table:table-cell table:style-name="ce4" table:formula="of:=[.F8]&gt;[.D8]" office:value-type="boolean" office:boolean-value="true" calcext:value-type="boolean">
            <text:p>ІСТИНА</text:p>
          </table:table-cell>
          <table:table-cell table:style-name="ce4" table:formula="of:=[.G8]&gt;MAX([.C8];[.E8])" office:value-type="boolean" office:boolean-value="false" calcext:value-type="boolean">
            <text:p>БРЕХНЯ</text:p>
          </table:table-cell>
          <table:table-cell table:style-name="ce4" table:formula="of:=[.H8]&gt;MAX([.D8];[.F8])" office:value-type="boolean" office:boolean-value="true" calcext:value-type="boolean">
            <text:p>ІСТИНА</text:p>
          </table:table-cell>
          <table:table-cell table:style-name="ce4" table:formula="of:=[.I8]&gt;MAX([.C8];[.E8];[.G8])" office:value-type="boolean" office:boolean-value="false" calcext:value-type="boolean">
            <text:p>БРЕХНЯ</text:p>
          </table:table-cell>
          <table:table-cell table:style-name="ce4" table:formula="of:=[.J8]&gt;MAX([.D8];[.F8];[.H8])" office:value-type="boolean" office:boolean-value="false" calcext:value-type="boolean">
            <text:p>БРЕХНЯ</text:p>
          </table:table-cell>
          <table:table-cell table:style-name="ce4" table:formula="of:=[.K8]&gt;MAX([.C8];[.E8];[.G8];[.I8])" office:value-type="boolean" office:boolean-value="false" calcext:value-type="boolean">
            <text:p>БРЕХНЯ</text:p>
          </table:table-cell>
          <table:table-cell table:style-name="ce4" table:formula="of:=[.L8]&gt;MAX([.D8];[.F8];[.H8];[.J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8]&gt;0.9" office:value-type="boolean" office:boolean-value="false" calcext:value-type="boolean">
            <text:p>БРЕХНЯ</text:p>
          </table:table-cell>
          <table:table-cell table:style-name="ce4" table:formula="of:=[.R8]&gt;0.9" office:value-type="boolean" office:boolean-value="true" calcext:value-type="boolean">
            <text:p>ІСТИНА</text:p>
          </table:table-cell>
          <table:table-cell table:style-name="ce4" table:formula="of:=[.X8]&gt;0.8" office:value-type="boolean" office:boolean-value="true" calcext:value-type="boolean">
            <text:p>ІСТИНА</text:p>
          </table:table-cell>
          <table:table-cell table:style-name="ce4" table:formula="of:=[.R8]&gt;0.8" office:value-type="boolean" office:boolean-value="true" calcext:value-type="boolean">
            <text:p>ІСТИНА</text:p>
          </table:table-cell>
          <table:table-cell table:style-name="ce4" table:formula="of:=[.X8]&gt;0.7" office:value-type="boolean" office:boolean-value="true" calcext:value-type="boolean">
            <text:p>ІСТИНА</text:p>
          </table:table-cell>
          <table:table-cell table:style-name="ce4" table:formula="of:=[.R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7962966" calcext:value-type="float">
            <text:p>7,96E-01</text:p>
          </table:table-cell>
          <table:table-cell table:style-name="ce1" office:value-type="float" office:value="0.9742515" calcext:value-type="float">
            <text:p>9,74E-01</text:p>
          </table:table-cell>
          <table:table-cell table:style-name="ce1" office:value-type="float" office:value="0.7955053" calcext:value-type="float">
            <text:p>7,96E-01</text:p>
          </table:table-cell>
          <table:table-cell table:style-name="ce1" office:value-type="float" office:value="0.9803056" calcext:value-type="float">
            <text:p>9,80E-01</text:p>
          </table:table-cell>
          <table:table-cell table:style-name="ce1" office:value-type="float" office:value="0.8165137" calcext:value-type="float">
            <text:p>8,17E-01</text:p>
          </table:table-cell>
          <table:table-cell table:style-name="ce1" office:value-type="float" office:value="0.9847202" calcext:value-type="float">
            <text:p>9,85E-01</text:p>
          </table:table-cell>
          <table:table-cell table:style-name="ce1" office:value-type="float" office:value="0.84368" calcext:value-type="float">
            <text:p>8,44E-01</text:p>
          </table:table-cell>
          <table:table-cell table:style-name="ce1" office:value-type="float" office:value="0.9246924" calcext:value-type="float">
            <text:p>9,25E-01</text:p>
          </table:table-cell>
          <table:table-cell table:style-name="ce1" office:value-type="float" office:value="0.857508" calcext:value-type="float">
            <text:p>8,58E-01</text:p>
          </table:table-cell>
          <table:table-cell table:style-name="ce1" office:value-type="float" office:value="0.9795919" calcext:value-type="float">
            <text:p>9,80E-01</text:p>
          </table:table-cell>
          <table:table-cell/>
          <table:table-cell table:style-name="ce1" table:formula="of:=MAX([.C9];[.E9];[.G9];[.I9];[.K9])" office:value-type="float" office:value="0.857508" calcext:value-type="float">
            <text:p>8,58E-01</text:p>
          </table:table-cell>
          <table:table-cell table:style-name="ce8" table:formula="of:=MAX([.D9];[.F9];[.H9];[.J9];[.L9])" office:value-type="float" office:value="0.9847202" calcext:value-type="float">
            <text:p>9,85E-01</text:p>
          </table:table-cell>
          <table:table-cell table:style-name="ce1"/>
          <table:table-cell table:style-name="ce1" office:value-type="float" office:value="0.857508" calcext:value-type="float">
            <text:p>8,58E-01</text:p>
          </table:table-cell>
          <table:table-cell table:style-name="ce1" office:value-type="float" office:value="0.9847202" calcext:value-type="float">
            <text:p>9,85E-01</text:p>
          </table:table-cell>
          <table:table-cell table:style-name="ce4" table:formula="of:=[.Q9]&gt;[.N9]" office:value-type="boolean" office:boolean-value="false" calcext:value-type="boolean">
            <text:p>БРЕХНЯ</text:p>
          </table:table-cell>
          <table:table-cell table:style-name="ce4" table:formula="of:=[.R9]&gt;[.O9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9]" office:value-type="float" office:value="0.857508" calcext:value-type="float">
            <text:p>8,58E-01</text:p>
          </table:table-cell>
          <table:table-cell table:style-name="ce4" table:formula="of:=[.X9]&gt;[.R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9]&gt;[.C9]" office:value-type="boolean" office:boolean-value="false" calcext:value-type="boolean">
            <text:p>БРЕХНЯ</text:p>
          </table:table-cell>
          <table:table-cell table:style-name="ce4" table:formula="of:=[.F9]&gt;[.D9]" office:value-type="boolean" office:boolean-value="true" calcext:value-type="boolean">
            <text:p>ІСТИНА</text:p>
          </table:table-cell>
          <table:table-cell table:style-name="ce4" table:formula="of:=[.G9]&gt;MAX([.C9];[.E9])" office:value-type="boolean" office:boolean-value="true" calcext:value-type="boolean">
            <text:p>ІСТИНА</text:p>
          </table:table-cell>
          <table:table-cell table:style-name="ce4" table:formula="of:=[.H9]&gt;MAX([.D9];[.F9])" office:value-type="boolean" office:boolean-value="true" calcext:value-type="boolean">
            <text:p>ІСТИНА</text:p>
          </table:table-cell>
          <table:table-cell table:style-name="ce4" table:formula="of:=[.I9]&gt;MAX([.C9];[.E9];[.G9])" office:value-type="boolean" office:boolean-value="true" calcext:value-type="boolean">
            <text:p>ІСТИНА</text:p>
          </table:table-cell>
          <table:table-cell table:style-name="ce4" table:formula="of:=[.J9]&gt;MAX([.D9];[.F9];[.H9])" office:value-type="boolean" office:boolean-value="false" calcext:value-type="boolean">
            <text:p>БРЕХНЯ</text:p>
          </table:table-cell>
          <table:table-cell table:style-name="ce4" table:formula="of:=[.K9]&gt;MAX([.C9];[.E9];[.G9];[.I9])" office:value-type="boolean" office:boolean-value="true" calcext:value-type="boolean">
            <text:p>ІСТИНА</text:p>
          </table:table-cell>
          <table:table-cell table:style-name="ce4" table:formula="of:=[.L9]&gt;MAX([.D9];[.F9];[.H9];[.J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9]&gt;0.9" office:value-type="boolean" office:boolean-value="false" calcext:value-type="boolean">
            <text:p>БРЕХНЯ</text:p>
          </table:table-cell>
          <table:table-cell table:style-name="ce4" table:formula="of:=[.R9]&gt;0.9" office:value-type="boolean" office:boolean-value="true" calcext:value-type="boolean">
            <text:p>ІСТИНА</text:p>
          </table:table-cell>
          <table:table-cell table:style-name="ce4" table:formula="of:=[.X9]&gt;0.8" office:value-type="boolean" office:boolean-value="true" calcext:value-type="boolean">
            <text:p>ІСТИНА</text:p>
          </table:table-cell>
          <table:table-cell table:style-name="ce4" table:formula="of:=[.R9]&gt;0.8" office:value-type="boolean" office:boolean-value="true" calcext:value-type="boolean">
            <text:p>ІСТИНА</text:p>
          </table:table-cell>
          <table:table-cell table:style-name="ce4" table:formula="of:=[.X9]&gt;0.7" office:value-type="boolean" office:boolean-value="true" calcext:value-type="boolean">
            <text:p>ІСТИНА</text:p>
          </table:table-cell>
          <table:table-cell table:style-name="ce4" table:formula="of:=[.R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8856291" calcext:value-type="float">
            <text:p>8,86E-01</text:p>
          </table:table-cell>
          <table:table-cell table:style-name="ce1" office:value-type="float" office:value="0.9467037" calcext:value-type="float">
            <text:p>9,47E-01</text:p>
          </table:table-cell>
          <table:table-cell table:style-name="ce1" office:value-type="float" office:value="0.8864029" calcext:value-type="float">
            <text:p>8,86E-01</text:p>
          </table:table-cell>
          <table:table-cell table:style-name="ce1" office:value-type="float" office:value="0.9416769" calcext:value-type="float">
            <text:p>9,42E-01</text:p>
          </table:table-cell>
          <table:table-cell table:style-name="ce1" office:value-type="float" office:value="0.8839087" calcext:value-type="float">
            <text:p>8,84E-01</text:p>
          </table:table-cell>
          <table:table-cell table:style-name="ce1" office:value-type="float" office:value="0.9404243" calcext:value-type="float">
            <text:p>9,40E-01</text:p>
          </table:table-cell>
          <table:table-cell table:style-name="ce1" office:value-type="float" office:value="0.8645714" calcext:value-type="float">
            <text:p>8,65E-01</text:p>
          </table:table-cell>
          <table:table-cell table:style-name="ce1" office:value-type="float" office:value="0.9334119" calcext:value-type="float">
            <text:p>9,33E-01</text:p>
          </table:table-cell>
          <table:table-cell table:style-name="ce1" office:value-type="float" office:value="0.9098865" calcext:value-type="float">
            <text:p>9,10E-01</text:p>
          </table:table-cell>
          <table:table-cell table:style-name="ce1" office:value-type="float" office:value="0.9476991" calcext:value-type="float">
            <text:p>9,48E-01</text:p>
          </table:table-cell>
          <table:table-cell/>
          <table:table-cell table:style-name="ce1" table:formula="of:=MAX([.C10];[.E10];[.G10];[.I10];[.K10])" office:value-type="float" office:value="0.9098865" calcext:value-type="float">
            <text:p>9,10E-01</text:p>
          </table:table-cell>
          <table:table-cell table:style-name="ce8" table:formula="of:=MAX([.D10];[.F10];[.H10];[.J10];[.L10])" office:value-type="float" office:value="0.9476991" calcext:value-type="float">
            <text:p>9,48E-01</text:p>
          </table:table-cell>
          <table:table-cell table:style-name="ce1"/>
          <table:table-cell table:style-name="ce1" office:value-type="float" office:value="0.9098865" calcext:value-type="float">
            <text:p>9,10E-01</text:p>
          </table:table-cell>
          <table:table-cell table:style-name="ce1" office:value-type="float" office:value="0.9476991" calcext:value-type="float">
            <text:p>9,48E-01</text:p>
          </table:table-cell>
          <table:table-cell table:style-name="ce4" table:formula="of:=[.Q10]&gt;[.N10]" office:value-type="boolean" office:boolean-value="false" calcext:value-type="boolean">
            <text:p>БРЕХНЯ</text:p>
          </table:table-cell>
          <table:table-cell table:style-name="ce4" table:formula="of:=[.R10]&gt;[.O10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10]" office:value-type="float" office:value="0.9098865" calcext:value-type="float">
            <text:p>9,10E-01</text:p>
          </table:table-cell>
          <table:table-cell table:style-name="ce4" table:formula="of:=[.X10]&gt;[.R1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0]&gt;[.C10]" office:value-type="boolean" office:boolean-value="true" calcext:value-type="boolean">
            <text:p>ІСТИНА</text:p>
          </table:table-cell>
          <table:table-cell table:style-name="ce4" table:formula="of:=[.F10]&gt;[.D10]" office:value-type="boolean" office:boolean-value="false" calcext:value-type="boolean">
            <text:p>БРЕХНЯ</text:p>
          </table:table-cell>
          <table:table-cell table:style-name="ce4" table:formula="of:=[.G10]&gt;MAX([.C10];[.E10])" office:value-type="boolean" office:boolean-value="false" calcext:value-type="boolean">
            <text:p>БРЕХНЯ</text:p>
          </table:table-cell>
          <table:table-cell table:style-name="ce4" table:formula="of:=[.H10]&gt;MAX([.D10];[.F10])" office:value-type="boolean" office:boolean-value="false" calcext:value-type="boolean">
            <text:p>БРЕХНЯ</text:p>
          </table:table-cell>
          <table:table-cell table:style-name="ce4" table:formula="of:=[.I10]&gt;MAX([.C10];[.E10];[.G10])" office:value-type="boolean" office:boolean-value="false" calcext:value-type="boolean">
            <text:p>БРЕХНЯ</text:p>
          </table:table-cell>
          <table:table-cell table:style-name="ce4" table:formula="of:=[.J10]&gt;MAX([.D10];[.F10];[.H10])" office:value-type="boolean" office:boolean-value="false" calcext:value-type="boolean">
            <text:p>БРЕХНЯ</text:p>
          </table:table-cell>
          <table:table-cell table:style-name="ce4" table:formula="of:=[.K10]&gt;MAX([.C10];[.E10];[.G10];[.I10])" office:value-type="boolean" office:boolean-value="true" calcext:value-type="boolean">
            <text:p>ІСТИНА</text:p>
          </table:table-cell>
          <table:table-cell table:style-name="ce4" table:formula="of:=[.L10]&gt;MAX([.D10];[.F10];[.H10];[.J10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10]&gt;0.9" office:value-type="boolean" office:boolean-value="true" calcext:value-type="boolean">
            <text:p>ІСТИНА</text:p>
          </table:table-cell>
          <table:table-cell table:style-name="ce4" table:formula="of:=[.R10]&gt;0.9" office:value-type="boolean" office:boolean-value="true" calcext:value-type="boolean">
            <text:p>ІСТИНА</text:p>
          </table:table-cell>
          <table:table-cell table:style-name="ce4" table:formula="of:=[.X10]&gt;0.8" office:value-type="boolean" office:boolean-value="true" calcext:value-type="boolean">
            <text:p>ІСТИНА</text:p>
          </table:table-cell>
          <table:table-cell table:style-name="ce4" table:formula="of:=[.R10]&gt;0.8" office:value-type="boolean" office:boolean-value="true" calcext:value-type="boolean">
            <text:p>ІСТИНА</text:p>
          </table:table-cell>
          <table:table-cell table:style-name="ce4" table:formula="of:=[.X10]&gt;0.7" office:value-type="boolean" office:boolean-value="true" calcext:value-type="boolean">
            <text:p>ІСТИНА</text:p>
          </table:table-cell>
          <table:table-cell table:style-name="ce4" table:formula="of:=[.R1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7678485" calcext:value-type="float">
            <text:p>7,68E-01</text:p>
          </table:table-cell>
          <table:table-cell table:style-name="ce1" office:value-type="float" office:value="0.9669645" calcext:value-type="float">
            <text:p>9,67E-01</text:p>
          </table:table-cell>
          <table:table-cell table:style-name="ce1" office:value-type="float" office:value="-0.1981177" calcext:value-type="float">
            <text:p>-1,98E-01</text:p>
          </table:table-cell>
          <table:table-cell table:style-name="ce1" office:value-type="float" office:value="0.975542" calcext:value-type="float">
            <text:p>9,76E-01</text:p>
          </table:table-cell>
          <table:table-cell table:style-name="ce1" office:value-type="float" office:value="0.7733931" calcext:value-type="float">
            <text:p>7,73E-01</text:p>
          </table:table-cell>
          <table:table-cell table:style-name="ce1" office:value-type="float" office:value="0.9750266" calcext:value-type="float">
            <text:p>9,75E-01</text:p>
          </table:table-cell>
          <table:table-cell table:style-name="ce1" office:value-type="float" office:value="0.71918" calcext:value-type="float">
            <text:p>7,19E-01</text:p>
          </table:table-cell>
          <table:table-cell table:style-name="ce1" office:value-type="float" office:value="0.9654898" calcext:value-type="float">
            <text:p>9,65E-01</text:p>
          </table:table-cell>
          <table:table-cell/>
          <table:table-cell table:style-name="ce1" office:value-type="float" office:value="0.9686302" calcext:value-type="float">
            <text:p>9,69E-01</text:p>
          </table:table-cell>
          <table:table-cell/>
          <table:table-cell table:style-name="ce1" table:formula="of:=MAX([.C11];[.E11];[.G11];[.I11];[.K11])" office:value-type="float" office:value="0.7733931" calcext:value-type="float">
            <text:p>7,73E-01</text:p>
          </table:table-cell>
          <table:table-cell table:style-name="ce8" table:formula="of:=MAX([.D11];[.F11];[.H11];[.J11];[.L11])" office:value-type="float" office:value="0.975542" calcext:value-type="float">
            <text:p>9,76E-01</text:p>
          </table:table-cell>
          <table:table-cell table:style-name="ce1"/>
          <table:table-cell table:style-name="ce1" office:value-type="float" office:value="0.7769075" calcext:value-type="float">
            <text:p>7,77E-01</text:p>
          </table:table-cell>
          <table:table-cell table:style-name="ce1" office:value-type="float" office:value="0.975542" calcext:value-type="float">
            <text:p>9,76E-01</text:p>
          </table:table-cell>
          <table:table-cell table:style-name="ce4" table:formula="of:=[.Q11]&gt;[.N11]" office:value-type="boolean" office:boolean-value="true" calcext:value-type="boolean">
            <text:p>ІСТИНА</text:p>
          </table:table-cell>
          <table:table-cell table:style-name="ce4" table:formula="of:=[.R11]&gt;[.O11]" office:value-type="boolean" office:boolean-value="false" calcext:value-type="boolean">
            <text:p>БРЕХНЯ</text:p>
          </table:table-cell>
          <table:table-cell table:style-name="ce1" table:number-columns-repeated="3"/>
          <table:table-cell table:style-name="ce1" table:formula="of:=[.Q11]" office:value-type="float" office:value="0.7769075" calcext:value-type="float">
            <text:p>7,77E-01</text:p>
          </table:table-cell>
          <table:table-cell table:style-name="ce4" table:formula="of:=[.X11]&gt;[.R1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1]&gt;[.C11]" office:value-type="boolean" office:boolean-value="false" calcext:value-type="boolean">
            <text:p>БРЕХНЯ</text:p>
          </table:table-cell>
          <table:table-cell table:style-name="ce4" table:formula="of:=[.F11]&gt;[.D11]" office:value-type="boolean" office:boolean-value="true" calcext:value-type="boolean">
            <text:p>ІСТИНА</text:p>
          </table:table-cell>
          <table:table-cell table:style-name="ce4" table:formula="of:=[.G11]&gt;MAX([.C11];[.E11])" office:value-type="boolean" office:boolean-value="true" calcext:value-type="boolean">
            <text:p>ІСТИНА</text:p>
          </table:table-cell>
          <table:table-cell table:style-name="ce4" table:formula="of:=[.H11]&gt;MAX([.D11];[.F11])" office:value-type="boolean" office:boolean-value="false" calcext:value-type="boolean">
            <text:p>БРЕХНЯ</text:p>
          </table:table-cell>
          <table:table-cell table:style-name="ce4" table:formula="of:=[.I11]&gt;MAX([.C11];[.E11];[.G11])" office:value-type="boolean" office:boolean-value="false" calcext:value-type="boolean">
            <text:p>БРЕХНЯ</text:p>
          </table:table-cell>
          <table:table-cell table:style-name="ce4" table:formula="of:=[.J11]&gt;MAX([.D11];[.F11];[.H11])" office:value-type="boolean" office:boolean-value="false" calcext:value-type="boolean">
            <text:p>БРЕХНЯ</text:p>
          </table:table-cell>
          <table:table-cell table:style-name="ce4" table:formula="of:=[.K11]&gt;MAX([.C11];[.E11];[.G11];[.I11])" office:value-type="boolean" office:boolean-value="false" calcext:value-type="boolean">
            <text:p>БРЕХНЯ</text:p>
          </table:table-cell>
          <table:table-cell table:style-name="ce4" table:formula="of:=[.L11]&gt;MAX([.D11];[.F11];[.H11];[.J1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1]&gt;0.9" office:value-type="boolean" office:boolean-value="false" calcext:value-type="boolean">
            <text:p>БРЕХНЯ</text:p>
          </table:table-cell>
          <table:table-cell table:style-name="ce4" table:formula="of:=[.R11]&gt;0.9" office:value-type="boolean" office:boolean-value="true" calcext:value-type="boolean">
            <text:p>ІСТИНА</text:p>
          </table:table-cell>
          <table:table-cell table:style-name="ce4" table:formula="of:=[.X11]&gt;0.8" office:value-type="boolean" office:boolean-value="false" calcext:value-type="boolean">
            <text:p>БРЕХНЯ</text:p>
          </table:table-cell>
          <table:table-cell table:style-name="ce4" table:formula="of:=[.R11]&gt;0.8" office:value-type="boolean" office:boolean-value="true" calcext:value-type="boolean">
            <text:p>ІСТИНА</text:p>
          </table:table-cell>
          <table:table-cell table:style-name="ce4" table:formula="of:=[.X11]&gt;0.7" office:value-type="boolean" office:boolean-value="true" calcext:value-type="boolean">
            <text:p>ІСТИНА</text:p>
          </table:table-cell>
          <table:table-cell table:style-name="ce4" table:formula="of:=[.R1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9097865" calcext:value-type="float">
            <text:p>9,10E-01</text:p>
          </table:table-cell>
          <table:table-cell table:style-name="ce1" office:value-type="float" office:value="0.9714968" calcext:value-type="float">
            <text:p>9,71E-01</text:p>
          </table:table-cell>
          <table:table-cell table:style-name="ce1" office:value-type="float" office:value="0.9517149" calcext:value-type="float">
            <text:p>9,52E-01</text:p>
          </table:table-cell>
          <table:table-cell table:style-name="ce1" office:value-type="float" office:value="0.9761448" calcext:value-type="float">
            <text:p>9,76E-01</text:p>
          </table:table-cell>
          <table:table-cell table:style-name="ce1" office:value-type="float" office:value="0.9368055" calcext:value-type="float">
            <text:p>9,37E-01</text:p>
          </table:table-cell>
          <table:table-cell table:style-name="ce1" office:value-type="float" office:value="0.9689326" calcext:value-type="float">
            <text:p>9,69E-01</text:p>
          </table:table-cell>
          <table:table-cell table:style-name="ce1" office:value-type="float" office:value="0.9460263" calcext:value-type="float">
            <text:p>9,46E-01</text:p>
          </table:table-cell>
          <table:table-cell table:style-name="ce1" office:value-type="float" office:value="0.9891591" calcext:value-type="float">
            <text:p>9,89E-01</text:p>
          </table:table-cell>
          <table:table-cell table:style-name="ce1" office:value-type="float" office:value="0.9548162" calcext:value-type="float">
            <text:p>9,55E-01</text:p>
          </table:table-cell>
          <table:table-cell table:style-name="ce1" office:value-type="float" office:value="0.9677137" calcext:value-type="float">
            <text:p>9,68E-01</text:p>
          </table:table-cell>
          <table:table-cell/>
          <table:table-cell table:style-name="ce1" table:formula="of:=MAX([.C12];[.E12];[.G12];[.I12];[.K12])" office:value-type="float" office:value="0.9548162" calcext:value-type="float">
            <text:p>9,55E-01</text:p>
          </table:table-cell>
          <table:table-cell table:style-name="ce8" table:formula="of:=MAX([.D12];[.F12];[.H12];[.J12];[.L12])" office:value-type="float" office:value="0.9891591" calcext:value-type="float">
            <text:p>9,89E-01</text:p>
          </table:table-cell>
          <table:table-cell table:style-name="ce1"/>
          <table:table-cell table:style-name="ce1" office:value-type="float" office:value="0.9548162" calcext:value-type="float">
            <text:p>9,55E-01</text:p>
          </table:table-cell>
          <table:table-cell table:style-name="ce1" office:value-type="float" office:value="0.9891591" calcext:value-type="float">
            <text:p>9,89E-01</text:p>
          </table:table-cell>
          <table:table-cell table:style-name="ce4" table:formula="of:=[.Q12]&gt;[.N12]" office:value-type="boolean" office:boolean-value="false" calcext:value-type="boolean">
            <text:p>БРЕХНЯ</text:p>
          </table:table-cell>
          <table:table-cell table:style-name="ce4" table:formula="of:=[.R12]&gt;[.O1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548162" calcext:value-type="float">
            <text:p>9,55E-01</text:p>
          </table:table-cell>
          <table:table-cell table:style-name="ce4" table:formula="of:=[.V12]&gt;[.Q12]" office:value-type="boolean" office:boolean-value="false" calcext:value-type="boolean">
            <text:p>БРЕХНЯ</text:p>
          </table:table-cell>
          <table:table-cell table:style-name="ce1" table:formula="of:=MAX([.V12];[.Q12])" office:value-type="float" office:value="0.9548162" calcext:value-type="float">
            <text:p>9,55E-01</text:p>
          </table:table-cell>
          <table:table-cell table:style-name="ce4" table:formula="of:=[.X12]&gt;[.R1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2]&gt;[.C12]" office:value-type="boolean" office:boolean-value="true" calcext:value-type="boolean">
            <text:p>ІСТИНА</text:p>
          </table:table-cell>
          <table:table-cell table:style-name="ce4" table:formula="of:=[.F12]&gt;[.D12]" office:value-type="boolean" office:boolean-value="true" calcext:value-type="boolean">
            <text:p>ІСТИНА</text:p>
          </table:table-cell>
          <table:table-cell table:style-name="ce4" table:formula="of:=[.G12]&gt;MAX([.C12];[.E12])" office:value-type="boolean" office:boolean-value="false" calcext:value-type="boolean">
            <text:p>БРЕХНЯ</text:p>
          </table:table-cell>
          <table:table-cell table:style-name="ce4" table:formula="of:=[.H12]&gt;MAX([.D12];[.F12])" office:value-type="boolean" office:boolean-value="false" calcext:value-type="boolean">
            <text:p>БРЕХНЯ</text:p>
          </table:table-cell>
          <table:table-cell table:style-name="ce4" table:formula="of:=[.I12]&gt;MAX([.C12];[.E12];[.G12])" office:value-type="boolean" office:boolean-value="false" calcext:value-type="boolean">
            <text:p>БРЕХНЯ</text:p>
          </table:table-cell>
          <table:table-cell table:style-name="ce4" table:formula="of:=[.J12]&gt;MAX([.D12];[.F12];[.H12])" office:value-type="boolean" office:boolean-value="true" calcext:value-type="boolean">
            <text:p>ІСТИНА</text:p>
          </table:table-cell>
          <table:table-cell table:style-name="ce4" table:formula="of:=[.K12]&gt;MAX([.C12];[.E12];[.G12];[.I12])" office:value-type="boolean" office:boolean-value="true" calcext:value-type="boolean">
            <text:p>ІСТИНА</text:p>
          </table:table-cell>
          <table:table-cell table:style-name="ce4" table:formula="of:=[.L12]&gt;MAX([.D12];[.F12];[.H12];[.J12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2]&gt;0.9" office:value-type="boolean" office:boolean-value="true" calcext:value-type="boolean">
            <text:p>ІСТИНА</text:p>
          </table:table-cell>
          <table:table-cell table:style-name="ce4" table:formula="of:=[.R12]&gt;0.9" office:value-type="boolean" office:boolean-value="true" calcext:value-type="boolean">
            <text:p>ІСТИНА</text:p>
          </table:table-cell>
          <table:table-cell table:style-name="ce4" table:formula="of:=[.X12]&gt;0.8" office:value-type="boolean" office:boolean-value="true" calcext:value-type="boolean">
            <text:p>ІСТИНА</text:p>
          </table:table-cell>
          <table:table-cell table:style-name="ce4" table:formula="of:=[.R12]&gt;0.8" office:value-type="boolean" office:boolean-value="true" calcext:value-type="boolean">
            <text:p>ІСТИНА</text:p>
          </table:table-cell>
          <table:table-cell table:style-name="ce4" table:formula="of:=[.X12]&gt;0.7" office:value-type="boolean" office:boolean-value="true" calcext:value-type="boolean">
            <text:p>ІСТИНА</text:p>
          </table:table-cell>
          <table:table-cell table:style-name="ce4" table:formula="of:=[.R12]&gt;0.7" office:value-type="boolean" office:boolean-value="true" calcext:value-type="boolean">
            <text:p>ІСТИНА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9091306" calcext:value-type="float">
            <text:p>9,09E-01</text:p>
          </table:table-cell>
          <table:table-cell table:style-name="ce1" office:value-type="float" office:value="0.9573579" calcext:value-type="float">
            <text:p>9,57E-01</text:p>
          </table:table-cell>
          <table:table-cell table:style-name="ce1" office:value-type="float" office:value="0.8992948" calcext:value-type="float">
            <text:p>8,99E-01</text:p>
          </table:table-cell>
          <table:table-cell table:style-name="ce1" office:value-type="float" office:value="0.9583781" calcext:value-type="float">
            <text:p>9,58E-01</text:p>
          </table:table-cell>
          <table:table-cell table:style-name="ce1" office:value-type="float" office:value="0.8969611" calcext:value-type="float">
            <text:p>8,97E-01</text:p>
          </table:table-cell>
          <table:table-cell table:style-name="ce1" office:value-type="float" office:value="0.9498" calcext:value-type="float">
            <text:p>9,50E-01</text:p>
          </table:table-cell>
          <table:table-cell table:style-name="ce1" office:value-type="float" office:value="0.9079267" calcext:value-type="float">
            <text:p>9,08E-01</text:p>
          </table:table-cell>
          <table:table-cell table:style-name="ce1" office:value-type="float" office:value="0.9574669" calcext:value-type="float">
            <text:p>9,57E-01</text:p>
          </table:table-cell>
          <table:table-cell table:style-name="ce1" office:value-type="float" office:value="0.8913529" calcext:value-type="float">
            <text:p>8,91E-01</text:p>
          </table:table-cell>
          <table:table-cell table:style-name="ce1" office:value-type="float" office:value="0.9632654" calcext:value-type="float">
            <text:p>9,63E-01</text:p>
          </table:table-cell>
          <table:table-cell/>
          <table:table-cell table:style-name="ce1" table:formula="of:=MAX([.C13];[.E13];[.G13];[.I13];[.K13])" office:value-type="float" office:value="0.9091306" calcext:value-type="float">
            <text:p>9,09E-01</text:p>
          </table:table-cell>
          <table:table-cell table:style-name="ce8" table:formula="of:=MAX([.D13];[.F13];[.H13];[.J13];[.L13])" office:value-type="float" office:value="0.9632654" calcext:value-type="float">
            <text:p>9,63E-01</text:p>
          </table:table-cell>
          <table:table-cell table:style-name="ce1"/>
          <table:table-cell table:style-name="ce1" office:value-type="float" office:value="0.9091306" calcext:value-type="float">
            <text:p>9,09E-01</text:p>
          </table:table-cell>
          <table:table-cell table:style-name="ce1" office:value-type="float" office:value="0.9632654" calcext:value-type="float">
            <text:p>9,63E-01</text:p>
          </table:table-cell>
          <table:table-cell table:style-name="ce4" table:formula="of:=[.Q13]&gt;[.N13]" office:value-type="boolean" office:boolean-value="false" calcext:value-type="boolean">
            <text:p>БРЕХНЯ</text:p>
          </table:table-cell>
          <table:table-cell table:style-name="ce4" table:formula="of:=[.R13]&gt;[.O1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091306" calcext:value-type="float">
            <text:p>9,09E-01</text:p>
          </table:table-cell>
          <table:table-cell table:style-name="ce4" table:formula="of:=[.V13]&gt;[.Q13]" office:value-type="boolean" office:boolean-value="false" calcext:value-type="boolean">
            <text:p>БРЕХНЯ</text:p>
          </table:table-cell>
          <table:table-cell table:style-name="ce1" table:formula="of:=MAX([.V13];[.Q13])" office:value-type="float" office:value="0.9091306" calcext:value-type="float">
            <text:p>9,09E-01</text:p>
          </table:table-cell>
          <table:table-cell table:style-name="ce4" table:formula="of:=[.X13]&gt;[.R1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3]&gt;[.C13]" office:value-type="boolean" office:boolean-value="false" calcext:value-type="boolean">
            <text:p>БРЕХНЯ</text:p>
          </table:table-cell>
          <table:table-cell table:style-name="ce4" table:formula="of:=[.F13]&gt;[.D13]" office:value-type="boolean" office:boolean-value="true" calcext:value-type="boolean">
            <text:p>ІСТИНА</text:p>
          </table:table-cell>
          <table:table-cell table:style-name="ce4" table:formula="of:=[.G13]&gt;MAX([.C13];[.E13])" office:value-type="boolean" office:boolean-value="false" calcext:value-type="boolean">
            <text:p>БРЕХНЯ</text:p>
          </table:table-cell>
          <table:table-cell table:style-name="ce4" table:formula="of:=[.H13]&gt;MAX([.D13];[.F13])" office:value-type="boolean" office:boolean-value="false" calcext:value-type="boolean">
            <text:p>БРЕХНЯ</text:p>
          </table:table-cell>
          <table:table-cell table:style-name="ce4" table:formula="of:=[.I13]&gt;MAX([.C13];[.E13];[.G13])" office:value-type="boolean" office:boolean-value="false" calcext:value-type="boolean">
            <text:p>БРЕХНЯ</text:p>
          </table:table-cell>
          <table:table-cell table:style-name="ce4" table:formula="of:=[.J13]&gt;MAX([.D13];[.F13];[.H13])" office:value-type="boolean" office:boolean-value="false" calcext:value-type="boolean">
            <text:p>БРЕХНЯ</text:p>
          </table:table-cell>
          <table:table-cell table:style-name="ce4" table:formula="of:=[.K13]&gt;MAX([.C13];[.E13];[.G13];[.I13])" office:value-type="boolean" office:boolean-value="false" calcext:value-type="boolean">
            <text:p>БРЕХНЯ</text:p>
          </table:table-cell>
          <table:table-cell table:style-name="ce4" table:formula="of:=[.L13]&gt;MAX([.D13];[.F13];[.H13];[.J13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13]&gt;0.9" office:value-type="boolean" office:boolean-value="true" calcext:value-type="boolean">
            <text:p>ІСТИНА</text:p>
          </table:table-cell>
          <table:table-cell table:style-name="ce4" table:formula="of:=[.R13]&gt;0.9" office:value-type="boolean" office:boolean-value="true" calcext:value-type="boolean">
            <text:p>ІСТИНА</text:p>
          </table:table-cell>
          <table:table-cell table:style-name="ce4" table:formula="of:=[.X13]&gt;0.8" office:value-type="boolean" office:boolean-value="true" calcext:value-type="boolean">
            <text:p>ІСТИНА</text:p>
          </table:table-cell>
          <table:table-cell table:style-name="ce4" table:formula="of:=[.R13]&gt;0.8" office:value-type="boolean" office:boolean-value="true" calcext:value-type="boolean">
            <text:p>ІСТИНА</text:p>
          </table:table-cell>
          <table:table-cell table:style-name="ce4" table:formula="of:=[.X13]&gt;0.7" office:value-type="boolean" office:boolean-value="true" calcext:value-type="boolean">
            <text:p>ІСТИНА</text:p>
          </table:table-cell>
          <table:table-cell table:style-name="ce4" table:formula="of:=[.R1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7616892" calcext:value-type="float">
            <text:p>7,62E-01</text:p>
          </table:table-cell>
          <table:table-cell table:style-name="ce1" office:value-type="float" office:value="0.7296076" calcext:value-type="float">
            <text:p>7,30E-01</text:p>
          </table:table-cell>
          <table:table-cell table:style-name="ce1" office:value-type="float" office:value="0.8422587" calcext:value-type="float">
            <text:p>8,42E-01</text:p>
          </table:table-cell>
          <table:table-cell table:style-name="ce1" office:value-type="float" office:value="0.7596881" calcext:value-type="float">
            <text:p>7,60E-01</text:p>
          </table:table-cell>
          <table:table-cell table:style-name="ce1" office:value-type="float" office:value="0.756132" calcext:value-type="float">
            <text:p>7,56E-01</text:p>
          </table:table-cell>
          <table:table-cell table:style-name="ce1" office:value-type="float" office:value="0.8041865" calcext:value-type="float">
            <text:p>8,04E-01</text:p>
          </table:table-cell>
          <table:table-cell table:style-name="ce1" office:value-type="float" office:value="0.7580352" calcext:value-type="float">
            <text:p>7,58E-01</text:p>
          </table:table-cell>
          <table:table-cell table:style-name="ce1" office:value-type="float" office:value="0.8020078" calcext:value-type="float">
            <text:p>8,02E-01</text:p>
          </table:table-cell>
          <table:table-cell table:style-name="ce1" office:value-type="float" office:value="0.7605377" calcext:value-type="float">
            <text:p>7,61E-01</text:p>
          </table:table-cell>
          <table:table-cell table:style-name="ce1" office:value-type="float" office:value="0.7321858" calcext:value-type="float">
            <text:p>7,32E-01</text:p>
          </table:table-cell>
          <table:table-cell/>
          <table:table-cell table:style-name="ce1" table:formula="of:=MAX([.C14];[.E14];[.G14];[.I14];[.K14])" office:value-type="float" office:value="0.8422587" calcext:value-type="float">
            <text:p>8,42E-01</text:p>
          </table:table-cell>
          <table:table-cell table:style-name="ce8" table:formula="of:=MAX([.D14];[.F14];[.H14];[.J14];[.L14])" office:value-type="float" office:value="0.8041865" calcext:value-type="float">
            <text:p>8,04E-01</text:p>
          </table:table-cell>
          <table:table-cell table:style-name="ce1"/>
          <table:table-cell table:style-name="ce1" office:value-type="float" office:value="0.8422587" calcext:value-type="float">
            <text:p>8,42E-01</text:p>
          </table:table-cell>
          <table:table-cell table:style-name="ce1" office:value-type="float" office:value="0.8041865" calcext:value-type="float">
            <text:p>8,04E-01</text:p>
          </table:table-cell>
          <table:table-cell table:style-name="ce4" table:formula="of:=[.Q14]&gt;[.N14]" office:value-type="boolean" office:boolean-value="false" calcext:value-type="boolean">
            <text:p>БРЕХНЯ</text:p>
          </table:table-cell>
          <table:table-cell table:style-name="ce4" table:formula="of:=[.R14]&gt;[.O14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422587" calcext:value-type="float">
            <text:p>8,42E-01</text:p>
          </table:table-cell>
          <table:table-cell table:style-name="ce4" table:formula="of:=[.V14]&gt;[.Q14]" office:value-type="boolean" office:boolean-value="false" calcext:value-type="boolean">
            <text:p>БРЕХНЯ</text:p>
          </table:table-cell>
          <table:table-cell table:style-name="ce1" table:formula="of:=MAX([.V14];[.Q14])" office:value-type="float" office:value="0.8422587" calcext:value-type="float">
            <text:p>8,42E-01</text:p>
          </table:table-cell>
          <table:table-cell table:style-name="ce4" table:formula="of:=[.X14]&gt;[.R14]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E14]&gt;[.C14]" office:value-type="boolean" office:boolean-value="true" calcext:value-type="boolean">
            <text:p>ІСТИНА</text:p>
          </table:table-cell>
          <table:table-cell table:style-name="ce4" table:formula="of:=[.F14]&gt;[.D14]" office:value-type="boolean" office:boolean-value="true" calcext:value-type="boolean">
            <text:p>ІСТИНА</text:p>
          </table:table-cell>
          <table:table-cell table:style-name="ce4" table:formula="of:=[.G14]&gt;MAX([.C14];[.E14])" office:value-type="boolean" office:boolean-value="false" calcext:value-type="boolean">
            <text:p>БРЕХНЯ</text:p>
          </table:table-cell>
          <table:table-cell table:style-name="ce4" table:formula="of:=[.H14]&gt;MAX([.D14];[.F14])" office:value-type="boolean" office:boolean-value="true" calcext:value-type="boolean">
            <text:p>ІСТИНА</text:p>
          </table:table-cell>
          <table:table-cell table:style-name="ce4" table:formula="of:=[.I14]&gt;MAX([.C14];[.E14];[.G14])" office:value-type="boolean" office:boolean-value="false" calcext:value-type="boolean">
            <text:p>БРЕХНЯ</text:p>
          </table:table-cell>
          <table:table-cell table:style-name="ce4" table:formula="of:=[.J14]&gt;MAX([.D14];[.F14];[.H14])" office:value-type="boolean" office:boolean-value="false" calcext:value-type="boolean">
            <text:p>БРЕХНЯ</text:p>
          </table:table-cell>
          <table:table-cell table:style-name="ce4" table:formula="of:=[.K14]&gt;MAX([.C14];[.E14];[.G14];[.I14])" office:value-type="boolean" office:boolean-value="false" calcext:value-type="boolean">
            <text:p>БРЕХНЯ</text:p>
          </table:table-cell>
          <table:table-cell table:style-name="ce4" table:formula="of:=[.L14]&gt;MAX([.D14];[.F14];[.H14];[.J1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4]&gt;0.9" office:value-type="boolean" office:boolean-value="false" calcext:value-type="boolean">
            <text:p>БРЕХНЯ</text:p>
          </table:table-cell>
          <table:table-cell table:style-name="ce4" table:formula="of:=[.R14]&gt;0.9" office:value-type="boolean" office:boolean-value="false" calcext:value-type="boolean">
            <text:p>БРЕХНЯ</text:p>
          </table:table-cell>
          <table:table-cell table:style-name="ce4" table:formula="of:=[.X14]&gt;0.8" office:value-type="boolean" office:boolean-value="true" calcext:value-type="boolean">
            <text:p>ІСТИНА</text:p>
          </table:table-cell>
          <table:table-cell table:style-name="ce4" table:formula="of:=[.R14]&gt;0.8" office:value-type="boolean" office:boolean-value="true" calcext:value-type="boolean">
            <text:p>ІСТИНА</text:p>
          </table:table-cell>
          <table:table-cell table:style-name="ce4" table:formula="of:=[.X14]&gt;0.7" office:value-type="boolean" office:boolean-value="true" calcext:value-type="boolean">
            <text:p>ІСТИНА</text:p>
          </table:table-cell>
          <table:table-cell table:style-name="ce4" table:formula="of:=[.R1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539075" calcext:value-type="float">
            <text:p>9,54E-01</text:p>
          </table:table-cell>
          <table:table-cell table:style-name="ce1" office:value-type="float" office:value="0.9542325" calcext:value-type="float">
            <text:p>9,54E-01</text:p>
          </table:table-cell>
          <table:table-cell table:style-name="ce1" office:value-type="float" office:value="0.8601185" calcext:value-type="float">
            <text:p>8,60E-01</text:p>
          </table:table-cell>
          <table:table-cell table:style-name="ce1" office:value-type="float" office:value="0.9305143" calcext:value-type="float">
            <text:p>9,31E-01</text:p>
          </table:table-cell>
          <table:table-cell table:style-name="ce1" office:value-type="float" office:value="0.851702" calcext:value-type="float">
            <text:p>8,52E-01</text:p>
          </table:table-cell>
          <table:table-cell table:style-name="ce1" office:value-type="float" office:value="0.9561733" calcext:value-type="float">
            <text:p>9,56E-01</text:p>
          </table:table-cell>
          <table:table-cell table:style-name="ce1" office:value-type="float" office:value="0.8568444" calcext:value-type="float">
            <text:p>8,57E-01</text:p>
          </table:table-cell>
          <table:table-cell table:style-name="ce1" office:value-type="float" office:value="0.9261159" calcext:value-type="float">
            <text:p>9,26E-01</text:p>
          </table:table-cell>
          <table:table-cell table:style-name="ce1" office:value-type="float" office:value="0.8466607" calcext:value-type="float">
            <text:p>8,47E-01</text:p>
          </table:table-cell>
          <table:table-cell table:style-name="ce1" office:value-type="float" office:value="0.9516383" calcext:value-type="float">
            <text:p>9,52E-01</text:p>
          </table:table-cell>
          <table:table-cell/>
          <table:table-cell table:style-name="ce1" table:formula="of:=MAX([.C15];[.E15];[.G15];[.I15];[.K15])" office:value-type="float" office:value="0.9539075" calcext:value-type="float">
            <text:p>9,54E-01</text:p>
          </table:table-cell>
          <table:table-cell table:style-name="ce8" table:formula="of:=MAX([.D15];[.F15];[.H15];[.J15];[.L15])" office:value-type="float" office:value="0.9561733" calcext:value-type="float">
            <text:p>9,56E-01</text:p>
          </table:table-cell>
          <table:table-cell table:style-name="ce1"/>
          <table:table-cell table:style-name="ce1" office:value-type="float" office:value="0.9539075" calcext:value-type="float">
            <text:p>9,54E-01</text:p>
          </table:table-cell>
          <table:table-cell table:style-name="ce1" office:value-type="float" office:value="0.9561733" calcext:value-type="float">
            <text:p>9,56E-01</text:p>
          </table:table-cell>
          <table:table-cell table:style-name="ce4" table:formula="of:=[.Q15]&gt;[.N15]" office:value-type="boolean" office:boolean-value="false" calcext:value-type="boolean">
            <text:p>БРЕХНЯ</text:p>
          </table:table-cell>
          <table:table-cell table:style-name="ce4" table:formula="of:=[.R15]&gt;[.O1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539075" calcext:value-type="float">
            <text:p>9,54E-01</text:p>
          </table:table-cell>
          <table:table-cell table:style-name="ce4" table:formula="of:=[.V15]&gt;[.Q15]" office:value-type="boolean" office:boolean-value="false" calcext:value-type="boolean">
            <text:p>БРЕХНЯ</text:p>
          </table:table-cell>
          <table:table-cell table:style-name="ce1" table:formula="of:=MAX([.V15];[.Q15])" office:value-type="float" office:value="0.9539075" calcext:value-type="float">
            <text:p>9,54E-01</text:p>
          </table:table-cell>
          <table:table-cell table:style-name="ce4" table:formula="of:=[.X15]&gt;[.R1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5]&gt;[.C15]" office:value-type="boolean" office:boolean-value="false" calcext:value-type="boolean">
            <text:p>БРЕХНЯ</text:p>
          </table:table-cell>
          <table:table-cell table:style-name="ce4" table:formula="of:=[.F15]&gt;[.D15]" office:value-type="boolean" office:boolean-value="false" calcext:value-type="boolean">
            <text:p>БРЕХНЯ</text:p>
          </table:table-cell>
          <table:table-cell table:style-name="ce4" table:formula="of:=[.G15]&gt;MAX([.C15];[.E15])" office:value-type="boolean" office:boolean-value="false" calcext:value-type="boolean">
            <text:p>БРЕХНЯ</text:p>
          </table:table-cell>
          <table:table-cell table:style-name="ce4" table:formula="of:=[.H15]&gt;MAX([.D15];[.F15])" office:value-type="boolean" office:boolean-value="true" calcext:value-type="boolean">
            <text:p>ІСТИНА</text:p>
          </table:table-cell>
          <table:table-cell table:style-name="ce4" table:formula="of:=[.I15]&gt;MAX([.C15];[.E15];[.G15])" office:value-type="boolean" office:boolean-value="false" calcext:value-type="boolean">
            <text:p>БРЕХНЯ</text:p>
          </table:table-cell>
          <table:table-cell table:style-name="ce4" table:formula="of:=[.J15]&gt;MAX([.D15];[.F15];[.H15])" office:value-type="boolean" office:boolean-value="false" calcext:value-type="boolean">
            <text:p>БРЕХНЯ</text:p>
          </table:table-cell>
          <table:table-cell table:style-name="ce4" table:formula="of:=[.K15]&gt;MAX([.C15];[.E15];[.G15];[.I15])" office:value-type="boolean" office:boolean-value="false" calcext:value-type="boolean">
            <text:p>БРЕХНЯ</text:p>
          </table:table-cell>
          <table:table-cell table:style-name="ce4" table:formula="of:=[.L15]&gt;MAX([.D15];[.F15];[.H15];[.J1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5]&gt;0.9" office:value-type="boolean" office:boolean-value="true" calcext:value-type="boolean">
            <text:p>ІСТИНА</text:p>
          </table:table-cell>
          <table:table-cell table:style-name="ce4" table:formula="of:=[.R15]&gt;0.9" office:value-type="boolean" office:boolean-value="true" calcext:value-type="boolean">
            <text:p>ІСТИНА</text:p>
          </table:table-cell>
          <table:table-cell table:style-name="ce4" table:formula="of:=[.X15]&gt;0.8" office:value-type="boolean" office:boolean-value="true" calcext:value-type="boolean">
            <text:p>ІСТИНА</text:p>
          </table:table-cell>
          <table:table-cell table:style-name="ce4" table:formula="of:=[.R15]&gt;0.8" office:value-type="boolean" office:boolean-value="true" calcext:value-type="boolean">
            <text:p>ІСТИНА</text:p>
          </table:table-cell>
          <table:table-cell table:style-name="ce4" table:formula="of:=[.X15]&gt;0.7" office:value-type="boolean" office:boolean-value="true" calcext:value-type="boolean">
            <text:p>ІСТИНА</text:p>
          </table:table-cell>
          <table:table-cell table:style-name="ce4" table:formula="of:=[.R1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640016" calcext:value-type="float">
            <text:p>8,64E-01</text:p>
          </table:table-cell>
          <table:table-cell table:style-name="ce1" office:value-type="float" office:value="0.9665953" calcext:value-type="float">
            <text:p>9,67E-01</text:p>
          </table:table-cell>
          <table:table-cell table:style-name="ce1" office:value-type="float" office:value="0.8985566" calcext:value-type="float">
            <text:p>8,99E-01</text:p>
          </table:table-cell>
          <table:table-cell table:style-name="ce1" office:value-type="float" office:value="0.9668773" calcext:value-type="float">
            <text:p>9,67E-01</text:p>
          </table:table-cell>
          <table:table-cell table:style-name="ce1" office:value-type="float" office:value="0.8864855" calcext:value-type="float">
            <text:p>8,86E-01</text:p>
          </table:table-cell>
          <table:table-cell table:style-name="ce1" office:value-type="float" office:value="0.9697537" calcext:value-type="float">
            <text:p>9,70E-01</text:p>
          </table:table-cell>
          <table:table-cell table:style-name="ce1" office:value-type="float" office:value="0.9223709" calcext:value-type="float">
            <text:p>9,22E-01</text:p>
          </table:table-cell>
          <table:table-cell table:style-name="ce1" office:value-type="float" office:value="0.9269111" calcext:value-type="float">
            <text:p>9,27E-01</text:p>
          </table:table-cell>
          <table:table-cell table:style-name="ce1" office:value-type="float" office:value="0.8979185" calcext:value-type="float">
            <text:p>8,98E-01</text:p>
          </table:table-cell>
          <table:table-cell table:style-name="ce1" office:value-type="float" office:value="0.9525388" calcext:value-type="float">
            <text:p>9,53E-01</text:p>
          </table:table-cell>
          <table:table-cell/>
          <table:table-cell table:style-name="ce1" table:formula="of:=MAX([.C16];[.E16];[.G16];[.I16];[.K16])" office:value-type="float" office:value="0.9223709" calcext:value-type="float">
            <text:p>9,22E-01</text:p>
          </table:table-cell>
          <table:table-cell table:style-name="ce8" table:formula="of:=MAX([.D16];[.F16];[.H16];[.J16];[.L16])" office:value-type="float" office:value="0.9697537" calcext:value-type="float">
            <text:p>9,70E-01</text:p>
          </table:table-cell>
          <table:table-cell table:style-name="ce1"/>
          <table:table-cell table:style-name="ce1" office:value-type="float" office:value="0.9223709" calcext:value-type="float">
            <text:p>9,22E-01</text:p>
          </table:table-cell>
          <table:table-cell table:style-name="ce1" office:value-type="float" office:value="0.9697537" calcext:value-type="float">
            <text:p>9,70E-01</text:p>
          </table:table-cell>
          <table:table-cell table:style-name="ce4" table:formula="of:=[.Q16]&gt;[.N16]" office:value-type="boolean" office:boolean-value="false" calcext:value-type="boolean">
            <text:p>БРЕХНЯ</text:p>
          </table:table-cell>
          <table:table-cell table:style-name="ce4" table:formula="of:=[.R16]&gt;[.O1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9223709" calcext:value-type="float">
            <text:p>9,22E-01</text:p>
          </table:table-cell>
          <table:table-cell table:style-name="ce4" table:formula="of:=[.V16]&gt;[.Q16]" office:value-type="boolean" office:boolean-value="false" calcext:value-type="boolean">
            <text:p>БРЕХНЯ</text:p>
          </table:table-cell>
          <table:table-cell table:style-name="ce1" table:formula="of:=MAX([.V16];[.Q16])" office:value-type="float" office:value="0.9223709" calcext:value-type="float">
            <text:p>9,22E-01</text:p>
          </table:table-cell>
          <table:table-cell table:style-name="ce4" table:formula="of:=[.X16]&gt;[.R1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6]&gt;[.C16]" office:value-type="boolean" office:boolean-value="true" calcext:value-type="boolean">
            <text:p>ІСТИНА</text:p>
          </table:table-cell>
          <table:table-cell table:style-name="ce4" table:formula="of:=[.F16]&gt;[.D16]" office:value-type="boolean" office:boolean-value="true" calcext:value-type="boolean">
            <text:p>ІСТИНА</text:p>
          </table:table-cell>
          <table:table-cell table:style-name="ce4" table:formula="of:=[.G16]&gt;MAX([.C16];[.E16])" office:value-type="boolean" office:boolean-value="false" calcext:value-type="boolean">
            <text:p>БРЕХНЯ</text:p>
          </table:table-cell>
          <table:table-cell table:style-name="ce4" table:formula="of:=[.H16]&gt;MAX([.D16];[.F16])" office:value-type="boolean" office:boolean-value="true" calcext:value-type="boolean">
            <text:p>ІСТИНА</text:p>
          </table:table-cell>
          <table:table-cell table:style-name="ce4" table:formula="of:=[.I16]&gt;MAX([.C16];[.E16];[.G16])" office:value-type="boolean" office:boolean-value="true" calcext:value-type="boolean">
            <text:p>ІСТИНА</text:p>
          </table:table-cell>
          <table:table-cell table:style-name="ce4" table:formula="of:=[.J16]&gt;MAX([.D16];[.F16];[.H16])" office:value-type="boolean" office:boolean-value="false" calcext:value-type="boolean">
            <text:p>БРЕХНЯ</text:p>
          </table:table-cell>
          <table:table-cell table:style-name="ce4" table:formula="of:=[.K16]&gt;MAX([.C16];[.E16];[.G16];[.I16])" office:value-type="boolean" office:boolean-value="false" calcext:value-type="boolean">
            <text:p>БРЕХНЯ</text:p>
          </table:table-cell>
          <table:table-cell table:style-name="ce4" table:formula="of:=[.L16]&gt;MAX([.D16];[.F16];[.H16];[.J1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6]&gt;0.9" office:value-type="boolean" office:boolean-value="true" calcext:value-type="boolean">
            <text:p>ІСТИНА</text:p>
          </table:table-cell>
          <table:table-cell table:style-name="ce4" table:formula="of:=[.R16]&gt;0.9" office:value-type="boolean" office:boolean-value="true" calcext:value-type="boolean">
            <text:p>ІСТИНА</text:p>
          </table:table-cell>
          <table:table-cell table:style-name="ce4" table:formula="of:=[.X16]&gt;0.8" office:value-type="boolean" office:boolean-value="true" calcext:value-type="boolean">
            <text:p>ІСТИНА</text:p>
          </table:table-cell>
          <table:table-cell table:style-name="ce4" table:formula="of:=[.R16]&gt;0.8" office:value-type="boolean" office:boolean-value="true" calcext:value-type="boolean">
            <text:p>ІСТИНА</text:p>
          </table:table-cell>
          <table:table-cell table:style-name="ce4" table:formula="of:=[.X16]&gt;0.7" office:value-type="boolean" office:boolean-value="true" calcext:value-type="boolean">
            <text:p>ІСТИНА</text:p>
          </table:table-cell>
          <table:table-cell table:style-name="ce4" table:formula="of:=[.R1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4009383" calcext:value-type="float">
            <text:p>4,01E-01</text:p>
          </table:table-cell>
          <table:table-cell table:style-name="ce1" office:value-type="float" office:value="0.6987755" calcext:value-type="float">
            <text:p>6,99E-01</text:p>
          </table:table-cell>
          <table:table-cell table:style-name="ce1" office:value-type="float" office:value="0.6130634" calcext:value-type="float">
            <text:p>6,13E-01</text:p>
          </table:table-cell>
          <table:table-cell table:style-name="ce1" office:value-type="float" office:value="0.66326" calcext:value-type="float">
            <text:p>6,63E-01</text:p>
          </table:table-cell>
          <table:table-cell table:style-name="ce1" office:value-type="float" office:value="0.4002723" calcext:value-type="float">
            <text:p>4,00E-01</text:p>
          </table:table-cell>
          <table:table-cell table:style-name="ce1" office:value-type="float" office:value="0.7454165" calcext:value-type="float">
            <text:p>7,45E-01</text:p>
          </table:table-cell>
          <table:table-cell table:style-name="ce1" office:value-type="float" office:value="0.5668585" calcext:value-type="float">
            <text:p>5,67E-01</text:p>
          </table:table-cell>
          <table:table-cell table:style-name="ce1" office:value-type="float" office:value="0.7403021" calcext:value-type="float">
            <text:p>7,40E-01</text:p>
          </table:table-cell>
          <table:table-cell table:style-name="ce1" office:value-type="float" office:value="0.5692446" calcext:value-type="float">
            <text:p>5,69E-01</text:p>
          </table:table-cell>
          <table:table-cell table:style-name="ce1" office:value-type="float" office:value="0.788857" calcext:value-type="float">
            <text:p>7,89E-01</text:p>
          </table:table-cell>
          <table:table-cell/>
          <table:table-cell table:style-name="ce1" table:formula="of:=MAX([.C17];[.E17];[.G17];[.I17];[.K17])" office:value-type="float" office:value="0.6130634" calcext:value-type="float">
            <text:p>6,13E-01</text:p>
          </table:table-cell>
          <table:table-cell table:style-name="ce8" table:formula="of:=MAX([.D17];[.F17];[.H17];[.J17];[.L17])" office:value-type="float" office:value="0.788857" calcext:value-type="float">
            <text:p>7,89E-01</text:p>
          </table:table-cell>
          <table:table-cell table:style-name="ce1"/>
          <table:table-cell table:style-name="ce1" office:value-type="float" office:value="0.6130634" calcext:value-type="float">
            <text:p>6,13E-01</text:p>
          </table:table-cell>
          <table:table-cell table:style-name="ce1" office:value-type="float" office:value="0.9587041" calcext:value-type="float">
            <text:p>9,59E-01</text:p>
          </table:table-cell>
          <table:table-cell table:style-name="ce4" table:formula="of:=[.Q17]&gt;[.N17]" office:value-type="boolean" office:boolean-value="false" calcext:value-type="boolean">
            <text:p>БРЕХНЯ</text:p>
          </table:table-cell>
          <table:table-cell table:style-name="ce4" table:formula="of:=[.R17]&gt;[.O17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323457" calcext:value-type="float">
            <text:p>6,32E-01</text:p>
          </table:table-cell>
          <table:table-cell table:style-name="ce4" table:formula="of:=[.V17]&gt;[.Q17]" office:value-type="boolean" office:boolean-value="true" calcext:value-type="boolean">
            <text:p>ІСТИНА</text:p>
          </table:table-cell>
          <table:table-cell table:style-name="ce1" table:formula="of:=MAX([.V17];[.Q17])" office:value-type="float" office:value="0.6323457" calcext:value-type="float">
            <text:p>6,32E-01</text:p>
          </table:table-cell>
          <table:table-cell table:style-name="ce4" table:formula="of:=[.X17]&gt;[.R1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7]&gt;[.C17]" office:value-type="boolean" office:boolean-value="true" calcext:value-type="boolean">
            <text:p>ІСТИНА</text:p>
          </table:table-cell>
          <table:table-cell table:style-name="ce4" table:formula="of:=[.F17]&gt;[.D17]" office:value-type="boolean" office:boolean-value="false" calcext:value-type="boolean">
            <text:p>БРЕХНЯ</text:p>
          </table:table-cell>
          <table:table-cell table:style-name="ce4" table:formula="of:=[.G17]&gt;MAX([.C17];[.E17])" office:value-type="boolean" office:boolean-value="false" calcext:value-type="boolean">
            <text:p>БРЕХНЯ</text:p>
          </table:table-cell>
          <table:table-cell table:style-name="ce4" table:formula="of:=[.H17]&gt;MAX([.D17];[.F17])" office:value-type="boolean" office:boolean-value="true" calcext:value-type="boolean">
            <text:p>ІСТИНА</text:p>
          </table:table-cell>
          <table:table-cell table:style-name="ce4" table:formula="of:=[.I17]&gt;MAX([.C17];[.E17];[.G17])" office:value-type="boolean" office:boolean-value="false" calcext:value-type="boolean">
            <text:p>БРЕХНЯ</text:p>
          </table:table-cell>
          <table:table-cell table:style-name="ce4" table:formula="of:=[.J17]&gt;MAX([.D17];[.F17];[.H17])" office:value-type="boolean" office:boolean-value="false" calcext:value-type="boolean">
            <text:p>БРЕХНЯ</text:p>
          </table:table-cell>
          <table:table-cell table:style-name="ce4" table:formula="of:=[.K17]&gt;MAX([.C17];[.E17];[.G17];[.I17])" office:value-type="boolean" office:boolean-value="false" calcext:value-type="boolean">
            <text:p>БРЕХНЯ</text:p>
          </table:table-cell>
          <table:table-cell table:style-name="ce4" table:formula="of:=[.L17]&gt;MAX([.D17];[.F17];[.H17];[.J17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17]&gt;0.9" office:value-type="boolean" office:boolean-value="false" calcext:value-type="boolean">
            <text:p>БРЕХНЯ</text:p>
          </table:table-cell>
          <table:table-cell table:style-name="ce4" table:formula="of:=[.R17]&gt;0.9" office:value-type="boolean" office:boolean-value="true" calcext:value-type="boolean">
            <text:p>ІСТИНА</text:p>
          </table:table-cell>
          <table:table-cell table:style-name="ce4" table:formula="of:=[.X17]&gt;0.8" office:value-type="boolean" office:boolean-value="false" calcext:value-type="boolean">
            <text:p>БРЕХНЯ</text:p>
          </table:table-cell>
          <table:table-cell table:style-name="ce4" table:formula="of:=[.R17]&gt;0.8" office:value-type="boolean" office:boolean-value="true" calcext:value-type="boolean">
            <text:p>ІСТИНА</text:p>
          </table:table-cell>
          <table:table-cell table:style-name="ce4" table:formula="of:=[.X17]&gt;0.7" office:value-type="boolean" office:boolean-value="false" calcext:value-type="boolean">
            <text:p>БРЕХНЯ</text:p>
          </table:table-cell>
          <table:table-cell table:style-name="ce4" table:formula="of:=[.R1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6036217" calcext:value-type="float">
            <text:p>6,04E-01</text:p>
          </table:table-cell>
          <table:table-cell table:style-name="ce1" office:value-type="float" office:value="0.8884415" calcext:value-type="float">
            <text:p>8,88E-01</text:p>
          </table:table-cell>
          <table:table-cell table:style-name="ce1" office:value-type="float" office:value="0.5783522" calcext:value-type="float">
            <text:p>5,78E-01</text:p>
          </table:table-cell>
          <table:table-cell table:style-name="ce1" office:value-type="float" office:value="0.9189758" calcext:value-type="float">
            <text:p>9,19E-01</text:p>
          </table:table-cell>
          <table:table-cell table:style-name="ce1" office:value-type="float" office:value="0.6158588" calcext:value-type="float">
            <text:p>6,16E-01</text:p>
          </table:table-cell>
          <table:table-cell table:style-name="ce1" office:value-type="float" office:value="0.8964266" calcext:value-type="float">
            <text:p>8,96E-01</text:p>
          </table:table-cell>
          <table:table-cell table:style-name="ce1" office:value-type="float" office:value="0.709352" calcext:value-type="float">
            <text:p>7,09E-01</text:p>
          </table:table-cell>
          <table:table-cell table:style-name="ce1" office:value-type="float" office:value="0.8934113" calcext:value-type="float">
            <text:p>8,93E-01</text:p>
          </table:table-cell>
          <table:table-cell table:style-name="ce1" office:value-type="float" office:value="0.7096784" calcext:value-type="float">
            <text:p>7,10E-01</text:p>
          </table:table-cell>
          <table:table-cell table:style-name="ce1" office:value-type="float" office:value="0.9016372" calcext:value-type="float">
            <text:p>9,02E-01</text:p>
          </table:table-cell>
          <table:table-cell/>
          <table:table-cell table:style-name="ce1" table:formula="of:=MAX([.C18];[.E18];[.G18];[.I18];[.K18])" office:value-type="float" office:value="0.7096784" calcext:value-type="float">
            <text:p>7,10E-01</text:p>
          </table:table-cell>
          <table:table-cell table:style-name="ce8" table:formula="of:=MAX([.D18];[.F18];[.H18];[.J18];[.L18])" office:value-type="float" office:value="0.9189758" calcext:value-type="float">
            <text:p>9,19E-01</text:p>
          </table:table-cell>
          <table:table-cell table:style-name="ce1"/>
          <table:table-cell table:style-name="ce1" office:value-type="float" office:value="0.7214117" calcext:value-type="float">
            <text:p>7,21E-01</text:p>
          </table:table-cell>
          <table:table-cell table:style-name="ce1" office:value-type="float" office:value="0.9189758" calcext:value-type="float">
            <text:p>9,19E-01</text:p>
          </table:table-cell>
          <table:table-cell table:style-name="ce4" table:formula="of:=[.Q18]&gt;[.N18]" office:value-type="boolean" office:boolean-value="true" calcext:value-type="boolean">
            <text:p>ІСТИНА</text:p>
          </table:table-cell>
          <table:table-cell table:style-name="ce4" table:formula="of:=[.R18]&gt;[.O1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214117" calcext:value-type="float">
            <text:p>7,21E-01</text:p>
          </table:table-cell>
          <table:table-cell table:style-name="ce4" table:formula="of:=[.V18]&gt;[.Q18]" office:value-type="boolean" office:boolean-value="false" calcext:value-type="boolean">
            <text:p>БРЕХНЯ</text:p>
          </table:table-cell>
          <table:table-cell table:style-name="ce1" table:formula="of:=MAX([.V18];[.Q18])" office:value-type="float" office:value="0.7214117" calcext:value-type="float">
            <text:p>7,21E-01</text:p>
          </table:table-cell>
          <table:table-cell table:style-name="ce4" table:formula="of:=[.X18]&gt;[.R1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8]&gt;[.C18]" office:value-type="boolean" office:boolean-value="false" calcext:value-type="boolean">
            <text:p>БРЕХНЯ</text:p>
          </table:table-cell>
          <table:table-cell table:style-name="ce4" table:formula="of:=[.F18]&gt;[.D18]" office:value-type="boolean" office:boolean-value="true" calcext:value-type="boolean">
            <text:p>ІСТИНА</text:p>
          </table:table-cell>
          <table:table-cell table:style-name="ce4" table:formula="of:=[.G18]&gt;MAX([.C18];[.E18])" office:value-type="boolean" office:boolean-value="true" calcext:value-type="boolean">
            <text:p>ІСТИНА</text:p>
          </table:table-cell>
          <table:table-cell table:style-name="ce4" table:formula="of:=[.H18]&gt;MAX([.D18];[.F18])" office:value-type="boolean" office:boolean-value="false" calcext:value-type="boolean">
            <text:p>БРЕХНЯ</text:p>
          </table:table-cell>
          <table:table-cell table:style-name="ce4" table:formula="of:=[.I18]&gt;MAX([.C18];[.E18];[.G18])" office:value-type="boolean" office:boolean-value="true" calcext:value-type="boolean">
            <text:p>ІСТИНА</text:p>
          </table:table-cell>
          <table:table-cell table:style-name="ce4" table:formula="of:=[.J18]&gt;MAX([.D18];[.F18];[.H18])" office:value-type="boolean" office:boolean-value="false" calcext:value-type="boolean">
            <text:p>БРЕХНЯ</text:p>
          </table:table-cell>
          <table:table-cell table:style-name="ce4" table:formula="of:=[.K18]&gt;MAX([.C18];[.E18];[.G18];[.I18])" office:value-type="boolean" office:boolean-value="true" calcext:value-type="boolean">
            <text:p>ІСТИНА</text:p>
          </table:table-cell>
          <table:table-cell table:style-name="ce4" table:formula="of:=[.L18]&gt;MAX([.D18];[.F18];[.H18];[.J1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8]&gt;0.9" office:value-type="boolean" office:boolean-value="false" calcext:value-type="boolean">
            <text:p>БРЕХНЯ</text:p>
          </table:table-cell>
          <table:table-cell table:style-name="ce4" table:formula="of:=[.R18]&gt;0.9" office:value-type="boolean" office:boolean-value="true" calcext:value-type="boolean">
            <text:p>ІСТИНА</text:p>
          </table:table-cell>
          <table:table-cell table:style-name="ce4" table:formula="of:=[.X18]&gt;0.8" office:value-type="boolean" office:boolean-value="false" calcext:value-type="boolean">
            <text:p>БРЕХНЯ</text:p>
          </table:table-cell>
          <table:table-cell table:style-name="ce4" table:formula="of:=[.R18]&gt;0.8" office:value-type="boolean" office:boolean-value="true" calcext:value-type="boolean">
            <text:p>ІСТИНА</text:p>
          </table:table-cell>
          <table:table-cell table:style-name="ce4" table:formula="of:=[.X18]&gt;0.7" office:value-type="boolean" office:boolean-value="true" calcext:value-type="boolean">
            <text:p>ІСТИНА</text:p>
          </table:table-cell>
          <table:table-cell table:style-name="ce4" table:formula="of:=[.R1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3158591" calcext:value-type="float">
            <text:p>3,16E-01</text:p>
          </table:table-cell>
          <table:table-cell table:style-name="ce1" office:value-type="float" office:value="0.1434846" calcext:value-type="float">
            <text:p>1,43E-01</text:p>
          </table:table-cell>
          <table:table-cell table:style-name="ce1" office:value-type="float" office:value="0.1571235" calcext:value-type="float">
            <text:p>1,57E-01</text:p>
          </table:table-cell>
          <table:table-cell table:style-name="ce1" office:value-type="float" office:value="0.5615016" calcext:value-type="float">
            <text:p>5,62E-01</text:p>
          </table:table-cell>
          <table:table-cell table:style-name="ce1" office:value-type="float" office:value="0.2846286" calcext:value-type="float">
            <text:p>2,85E-01</text:p>
          </table:table-cell>
          <table:table-cell table:style-name="ce1" office:value-type="float" office:value="0.4137543" calcext:value-type="float">
            <text:p>4,14E-01</text:p>
          </table:table-cell>
          <table:table-cell table:style-name="ce1" office:value-type="float" office:value="0.3334076" calcext:value-type="float">
            <text:p>3,33E-01</text:p>
          </table:table-cell>
          <table:table-cell table:style-name="ce1" office:value-type="float" office:value="0.5789843" calcext:value-type="float">
            <text:p>5,79E-01</text:p>
          </table:table-cell>
          <table:table-cell table:style-name="ce1" office:value-type="float" office:value="0.4314099" calcext:value-type="float">
            <text:p>4,31E-01</text:p>
          </table:table-cell>
          <table:table-cell table:style-name="ce1" office:value-type="float" office:value="0.5727861" calcext:value-type="float">
            <text:p>5,73E-01</text:p>
          </table:table-cell>
          <table:table-cell/>
          <table:table-cell table:style-name="ce1" table:formula="of:=MAX([.C19];[.E19];[.G19];[.I19];[.K19])" office:value-type="float" office:value="0.4314099" calcext:value-type="float">
            <text:p>4,31E-01</text:p>
          </table:table-cell>
          <table:table-cell table:style-name="ce8" table:formula="of:=MAX([.D19];[.F19];[.H19];[.J19];[.L19])" office:value-type="float" office:value="0.5789843" calcext:value-type="float">
            <text:p>5,79E-01</text:p>
          </table:table-cell>
          <table:table-cell table:style-name="ce2"/>
          <table:table-cell table:style-name="ce1" office:value-type="float" office:value="0.6314321" calcext:value-type="float">
            <text:p>6,31E-01</text:p>
          </table:table-cell>
          <table:table-cell table:style-name="ce1" office:value-type="float" office:value="0.8113715" calcext:value-type="float">
            <text:p>8,11E-01</text:p>
          </table:table-cell>
          <table:table-cell table:style-name="ce4" table:formula="of:=[.Q19]&gt;[.N19]" office:value-type="boolean" office:boolean-value="true" calcext:value-type="boolean">
            <text:p>ІСТИНА</text:p>
          </table:table-cell>
          <table:table-cell table:style-name="ce4" table:formula="of:=[.R19]&gt;[.O19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7446418" calcext:value-type="float">
            <text:p>7,45E-01</text:p>
          </table:table-cell>
          <table:table-cell table:style-name="ce4" table:formula="of:=[.V19]&gt;[.Q19]" office:value-type="boolean" office:boolean-value="true" calcext:value-type="boolean">
            <text:p>ІСТИНА</text:p>
          </table:table-cell>
          <table:table-cell table:style-name="ce1" table:formula="of:=MAX([.V19];[.Q19])" office:value-type="float" office:value="0.7446418" calcext:value-type="float">
            <text:p>7,45E-01</text:p>
          </table:table-cell>
          <table:table-cell table:style-name="ce4" table:formula="of:=[.X19]&gt;[.R1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19]&gt;[.C19]" office:value-type="boolean" office:boolean-value="false" calcext:value-type="boolean">
            <text:p>БРЕХНЯ</text:p>
          </table:table-cell>
          <table:table-cell table:style-name="ce4" table:formula="of:=[.F19]&gt;[.D19]" office:value-type="boolean" office:boolean-value="true" calcext:value-type="boolean">
            <text:p>ІСТИНА</text:p>
          </table:table-cell>
          <table:table-cell table:style-name="ce4" table:formula="of:=[.G19]&gt;MAX([.C19];[.E19])" office:value-type="boolean" office:boolean-value="false" calcext:value-type="boolean">
            <text:p>БРЕХНЯ</text:p>
          </table:table-cell>
          <table:table-cell table:style-name="ce4" table:formula="of:=[.H19]&gt;MAX([.D19];[.F19])" office:value-type="boolean" office:boolean-value="false" calcext:value-type="boolean">
            <text:p>БРЕХНЯ</text:p>
          </table:table-cell>
          <table:table-cell table:style-name="ce4" table:formula="of:=[.I19]&gt;MAX([.C19];[.E19];[.G19])" office:value-type="boolean" office:boolean-value="true" calcext:value-type="boolean">
            <text:p>ІСТИНА</text:p>
          </table:table-cell>
          <table:table-cell table:style-name="ce4" table:formula="of:=[.J19]&gt;MAX([.D19];[.F19];[.H19])" office:value-type="boolean" office:boolean-value="true" calcext:value-type="boolean">
            <text:p>ІСТИНА</text:p>
          </table:table-cell>
          <table:table-cell table:style-name="ce4" table:formula="of:=[.K19]&gt;MAX([.C19];[.E19];[.G19];[.I19])" office:value-type="boolean" office:boolean-value="true" calcext:value-type="boolean">
            <text:p>ІСТИНА</text:p>
          </table:table-cell>
          <table:table-cell table:style-name="ce4" table:formula="of:=[.L19]&gt;MAX([.D19];[.F19];[.H19];[.J1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19]&gt;0.9" office:value-type="boolean" office:boolean-value="false" calcext:value-type="boolean">
            <text:p>БРЕХНЯ</text:p>
          </table:table-cell>
          <table:table-cell table:style-name="ce4" table:formula="of:=[.R19]&gt;0.9" office:value-type="boolean" office:boolean-value="false" calcext:value-type="boolean">
            <text:p>БРЕХНЯ</text:p>
          </table:table-cell>
          <table:table-cell table:style-name="ce4" table:formula="of:=[.X19]&gt;0.8" office:value-type="boolean" office:boolean-value="false" calcext:value-type="boolean">
            <text:p>БРЕХНЯ</text:p>
          </table:table-cell>
          <table:table-cell table:style-name="ce4" table:formula="of:=[.R19]&gt;0.8" office:value-type="boolean" office:boolean-value="true" calcext:value-type="boolean">
            <text:p>ІСТИНА</text:p>
          </table:table-cell>
          <table:table-cell table:style-name="ce4" table:formula="of:=[.X19]&gt;0.7" office:value-type="boolean" office:boolean-value="true" calcext:value-type="boolean">
            <text:p>ІСТИНА</text:p>
          </table:table-cell>
          <table:table-cell table:style-name="ce4" table:formula="of:=[.R1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7472674" calcext:value-type="float">
            <text:p>7,47E-01</text:p>
          </table:table-cell>
          <table:table-cell table:style-name="ce1" office:value-type="float" office:value="0.9352833" calcext:value-type="float">
            <text:p>9,35E-01</text:p>
          </table:table-cell>
          <table:table-cell table:style-name="ce1" office:value-type="float" office:value="0.7664788" calcext:value-type="float">
            <text:p>7,66E-01</text:p>
          </table:table-cell>
          <table:table-cell table:style-name="ce1" office:value-type="float" office:value="0.898388" calcext:value-type="float">
            <text:p>8,98E-01</text:p>
          </table:table-cell>
          <table:table-cell table:style-name="ce1" office:value-type="float" office:value="0.7673326" calcext:value-type="float">
            <text:p>7,67E-01</text:p>
          </table:table-cell>
          <table:table-cell table:style-name="ce1" office:value-type="float" office:value="0.8892452" calcext:value-type="float">
            <text:p>8,89E-01</text:p>
          </table:table-cell>
          <table:table-cell table:style-name="ce1" office:value-type="float" office:value="0.7705411" calcext:value-type="float">
            <text:p>7,71E-01</text:p>
          </table:table-cell>
          <table:table-cell table:style-name="ce1" office:value-type="float" office:value="0.8328629" calcext:value-type="float">
            <text:p>8,33E-01</text:p>
          </table:table-cell>
          <table:table-cell table:style-name="ce1" office:value-type="float" office:value="0.7405311" calcext:value-type="float">
            <text:p>7,41E-01</text:p>
          </table:table-cell>
          <table:table-cell table:style-name="ce1" office:value-type="float" office:value="0.9065682" calcext:value-type="float">
            <text:p>9,07E-01</text:p>
          </table:table-cell>
          <table:table-cell/>
          <table:table-cell table:style-name="ce1" table:formula="of:=MAX([.C20];[.E20];[.G20];[.I20];[.K20])" office:value-type="float" office:value="0.7705411" calcext:value-type="float">
            <text:p>7,71E-01</text:p>
          </table:table-cell>
          <table:table-cell table:style-name="ce8" table:formula="of:=MAX([.D20];[.F20];[.H20];[.J20];[.L20])" office:value-type="float" office:value="0.9352833" calcext:value-type="float">
            <text:p>9,35E-01</text:p>
          </table:table-cell>
          <table:table-cell table:style-name="ce1"/>
          <table:table-cell table:style-name="ce1" office:value-type="float" office:value="0.7908021" calcext:value-type="float">
            <text:p>7,91E-01</text:p>
          </table:table-cell>
          <table:table-cell table:style-name="ce1" office:value-type="float" office:value="0.9352833" calcext:value-type="float">
            <text:p>9,35E-01</text:p>
          </table:table-cell>
          <table:table-cell table:style-name="ce4" table:formula="of:=[.Q20]&gt;[.N20]" office:value-type="boolean" office:boolean-value="true" calcext:value-type="boolean">
            <text:p>ІСТИНА</text:p>
          </table:table-cell>
          <table:table-cell table:style-name="ce4" table:formula="of:=[.R20]&gt;[.O2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908021" calcext:value-type="float">
            <text:p>7,91E-01</text:p>
          </table:table-cell>
          <table:table-cell table:style-name="ce4" table:formula="of:=[.V20]&gt;[.Q20]" office:value-type="boolean" office:boolean-value="false" calcext:value-type="boolean">
            <text:p>БРЕХНЯ</text:p>
          </table:table-cell>
          <table:table-cell table:style-name="ce1" table:formula="of:=MAX([.V20];[.Q20])" office:value-type="float" office:value="0.7908021" calcext:value-type="float">
            <text:p>7,91E-01</text:p>
          </table:table-cell>
          <table:table-cell table:style-name="ce4" table:formula="of:=[.X20]&gt;[.R2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0]&gt;[.C20]" office:value-type="boolean" office:boolean-value="true" calcext:value-type="boolean">
            <text:p>ІСТИНА</text:p>
          </table:table-cell>
          <table:table-cell table:style-name="ce4" table:formula="of:=[.F20]&gt;[.D20]" office:value-type="boolean" office:boolean-value="false" calcext:value-type="boolean">
            <text:p>БРЕХНЯ</text:p>
          </table:table-cell>
          <table:table-cell table:style-name="ce4" table:formula="of:=[.G20]&gt;MAX([.C20];[.E20])" office:value-type="boolean" office:boolean-value="true" calcext:value-type="boolean">
            <text:p>ІСТИНА</text:p>
          </table:table-cell>
          <table:table-cell table:style-name="ce4" table:formula="of:=[.H20]&gt;MAX([.D20];[.F20])" office:value-type="boolean" office:boolean-value="false" calcext:value-type="boolean">
            <text:p>БРЕХНЯ</text:p>
          </table:table-cell>
          <table:table-cell table:style-name="ce4" table:formula="of:=[.I20]&gt;MAX([.C20];[.E20];[.G20])" office:value-type="boolean" office:boolean-value="true" calcext:value-type="boolean">
            <text:p>ІСТИНА</text:p>
          </table:table-cell>
          <table:table-cell table:style-name="ce4" table:formula="of:=[.J20]&gt;MAX([.D20];[.F20];[.H20])" office:value-type="boolean" office:boolean-value="false" calcext:value-type="boolean">
            <text:p>БРЕХНЯ</text:p>
          </table:table-cell>
          <table:table-cell table:style-name="ce4" table:formula="of:=[.K20]&gt;MAX([.C20];[.E20];[.G20];[.I20])" office:value-type="boolean" office:boolean-value="false" calcext:value-type="boolean">
            <text:p>БРЕХНЯ</text:p>
          </table:table-cell>
          <table:table-cell table:style-name="ce4" table:formula="of:=[.L20]&gt;MAX([.D20];[.F20];[.H20];[.J2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0]&gt;0.9" office:value-type="boolean" office:boolean-value="false" calcext:value-type="boolean">
            <text:p>БРЕХНЯ</text:p>
          </table:table-cell>
          <table:table-cell table:style-name="ce4" table:formula="of:=[.R20]&gt;0.9" office:value-type="boolean" office:boolean-value="true" calcext:value-type="boolean">
            <text:p>ІСТИНА</text:p>
          </table:table-cell>
          <table:table-cell table:style-name="ce4" table:formula="of:=[.X20]&gt;0.8" office:value-type="boolean" office:boolean-value="false" calcext:value-type="boolean">
            <text:p>БРЕХНЯ</text:p>
          </table:table-cell>
          <table:table-cell table:style-name="ce4" table:formula="of:=[.R20]&gt;0.8" office:value-type="boolean" office:boolean-value="true" calcext:value-type="boolean">
            <text:p>ІСТИНА</text:p>
          </table:table-cell>
          <table:table-cell table:style-name="ce4" table:formula="of:=[.X20]&gt;0.7" office:value-type="boolean" office:boolean-value="true" calcext:value-type="boolean">
            <text:p>ІСТИНА</text:p>
          </table:table-cell>
          <table:table-cell table:style-name="ce4" table:formula="of:=[.R2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7252389" calcext:value-type="float">
            <text:p>7,25E-01</text:p>
          </table:table-cell>
          <table:table-cell table:style-name="ce1" office:value-type="float" office:value="0.775262" calcext:value-type="float">
            <text:p>7,75E-01</text:p>
          </table:table-cell>
          <table:table-cell table:style-name="ce1" office:value-type="float" office:value="0.7493992" calcext:value-type="float">
            <text:p>7,49E-01</text:p>
          </table:table-cell>
          <table:table-cell table:style-name="ce1" office:value-type="float" office:value="0.8189379" calcext:value-type="float">
            <text:p>8,19E-01</text:p>
          </table:table-cell>
          <table:table-cell table:style-name="ce1" office:value-type="float" office:value="0.7385626" calcext:value-type="float">
            <text:p>7,39E-01</text:p>
          </table:table-cell>
          <table:table-cell table:style-name="ce1" office:value-type="float" office:value="0.8340742" calcext:value-type="float">
            <text:p>8,34E-01</text:p>
          </table:table-cell>
          <table:table-cell table:style-name="ce1" office:value-type="float" office:value="0.7293328" calcext:value-type="float">
            <text:p>7,29E-01</text:p>
          </table:table-cell>
          <table:table-cell table:style-name="ce1" office:value-type="float" office:value="0.8941529" calcext:value-type="float">
            <text:p>8,94E-01</text:p>
          </table:table-cell>
          <table:table-cell table:style-name="ce1" office:value-type="float" office:value="0.7274252" calcext:value-type="float">
            <text:p>7,27E-01</text:p>
          </table:table-cell>
          <table:table-cell table:style-name="ce1" office:value-type="float" office:value="0.8368119" calcext:value-type="float">
            <text:p>8,37E-01</text:p>
          </table:table-cell>
          <table:table-cell/>
          <table:table-cell table:style-name="ce1" table:formula="of:=MAX([.C21];[.E21];[.G21];[.I21];[.K21])" office:value-type="float" office:value="0.7493992" calcext:value-type="float">
            <text:p>7,49E-01</text:p>
          </table:table-cell>
          <table:table-cell table:style-name="ce8" table:formula="of:=MAX([.D21];[.F21];[.H21];[.J21];[.L21])" office:value-type="float" office:value="0.8941529" calcext:value-type="float">
            <text:p>8,94E-01</text:p>
          </table:table-cell>
          <table:table-cell table:style-name="ce1"/>
          <table:table-cell table:style-name="ce1" office:value-type="float" office:value="0.7493992" calcext:value-type="float">
            <text:p>7,49E-01</text:p>
          </table:table-cell>
          <table:table-cell table:style-name="ce1" office:value-type="float" office:value="0.8941529" calcext:value-type="float">
            <text:p>8,94E-01</text:p>
          </table:table-cell>
          <table:table-cell table:style-name="ce4" table:formula="of:=[.Q21]&gt;[.N21]" office:value-type="boolean" office:boolean-value="false" calcext:value-type="boolean">
            <text:p>БРЕХНЯ</text:p>
          </table:table-cell>
          <table:table-cell table:style-name="ce4" table:formula="of:=[.R21]&gt;[.O2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493992" calcext:value-type="float">
            <text:p>7,49E-01</text:p>
          </table:table-cell>
          <table:table-cell table:style-name="ce4" table:formula="of:=[.V21]&gt;[.Q21]" office:value-type="boolean" office:boolean-value="false" calcext:value-type="boolean">
            <text:p>БРЕХНЯ</text:p>
          </table:table-cell>
          <table:table-cell table:style-name="ce1" table:formula="of:=MAX([.V21];[.Q21])" office:value-type="float" office:value="0.7493992" calcext:value-type="float">
            <text:p>7,49E-01</text:p>
          </table:table-cell>
          <table:table-cell table:style-name="ce4" table:formula="of:=[.X21]&gt;[.R2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1]&gt;[.C21]" office:value-type="boolean" office:boolean-value="true" calcext:value-type="boolean">
            <text:p>ІСТИНА</text:p>
          </table:table-cell>
          <table:table-cell table:style-name="ce4" table:formula="of:=[.F21]&gt;[.D21]" office:value-type="boolean" office:boolean-value="true" calcext:value-type="boolean">
            <text:p>ІСТИНА</text:p>
          </table:table-cell>
          <table:table-cell table:style-name="ce4" table:formula="of:=[.G21]&gt;MAX([.C21];[.E21])" office:value-type="boolean" office:boolean-value="false" calcext:value-type="boolean">
            <text:p>БРЕХНЯ</text:p>
          </table:table-cell>
          <table:table-cell table:style-name="ce4" table:formula="of:=[.H21]&gt;MAX([.D21];[.F21])" office:value-type="boolean" office:boolean-value="true" calcext:value-type="boolean">
            <text:p>ІСТИНА</text:p>
          </table:table-cell>
          <table:table-cell table:style-name="ce4" table:formula="of:=[.I21]&gt;MAX([.C21];[.E21];[.G21])" office:value-type="boolean" office:boolean-value="false" calcext:value-type="boolean">
            <text:p>БРЕХНЯ</text:p>
          </table:table-cell>
          <table:table-cell table:style-name="ce4" table:formula="of:=[.J21]&gt;MAX([.D21];[.F21];[.H21])" office:value-type="boolean" office:boolean-value="true" calcext:value-type="boolean">
            <text:p>ІСТИНА</text:p>
          </table:table-cell>
          <table:table-cell table:style-name="ce4" table:formula="of:=[.K21]&gt;MAX([.C21];[.E21];[.G21];[.I21])" office:value-type="boolean" office:boolean-value="false" calcext:value-type="boolean">
            <text:p>БРЕХНЯ</text:p>
          </table:table-cell>
          <table:table-cell table:style-name="ce4" table:formula="of:=[.L21]&gt;MAX([.D21];[.F21];[.H21];[.J2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1]&gt;0.9" office:value-type="boolean" office:boolean-value="false" calcext:value-type="boolean">
            <text:p>БРЕХНЯ</text:p>
          </table:table-cell>
          <table:table-cell table:style-name="ce4" table:formula="of:=[.R21]&gt;0.9" office:value-type="boolean" office:boolean-value="false" calcext:value-type="boolean">
            <text:p>БРЕХНЯ</text:p>
          </table:table-cell>
          <table:table-cell table:style-name="ce4" table:formula="of:=[.X21]&gt;0.8" office:value-type="boolean" office:boolean-value="false" calcext:value-type="boolean">
            <text:p>БРЕХНЯ</text:p>
          </table:table-cell>
          <table:table-cell table:style-name="ce4" table:formula="of:=[.R21]&gt;0.8" office:value-type="boolean" office:boolean-value="true" calcext:value-type="boolean">
            <text:p>ІСТИНА</text:p>
          </table:table-cell>
          <table:table-cell table:style-name="ce4" table:formula="of:=[.X21]&gt;0.7" office:value-type="boolean" office:boolean-value="true" calcext:value-type="boolean">
            <text:p>ІСТИНА</text:p>
          </table:table-cell>
          <table:table-cell table:style-name="ce4" table:formula="of:=[.R2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6631335" calcext:value-type="float">
            <text:p>6,63E-01</text:p>
          </table:table-cell>
          <table:table-cell table:style-name="ce1" office:value-type="float" office:value="0.8612615" calcext:value-type="float">
            <text:p>8,61E-01</text:p>
          </table:table-cell>
          <table:table-cell table:style-name="ce1" office:value-type="float" office:value="0.6663493" calcext:value-type="float">
            <text:p>6,66E-01</text:p>
          </table:table-cell>
          <table:table-cell table:style-name="ce1" office:value-type="float" office:value="0.8520372" calcext:value-type="float">
            <text:p>8,52E-01</text:p>
          </table:table-cell>
          <table:table-cell table:style-name="ce1" office:value-type="float" office:value="0.6732833" calcext:value-type="float">
            <text:p>6,73E-01</text:p>
          </table:table-cell>
          <table:table-cell table:style-name="ce1" office:value-type="float" office:value="0.773979" calcext:value-type="float">
            <text:p>7,74E-01</text:p>
          </table:table-cell>
          <table:table-cell table:style-name="ce1" office:value-type="float" office:value="0.6182345" calcext:value-type="float">
            <text:p>6,18E-01</text:p>
          </table:table-cell>
          <table:table-cell table:style-name="ce1" office:value-type="float" office:value="0.8177082" calcext:value-type="float">
            <text:p>8,18E-01</text:p>
          </table:table-cell>
          <table:table-cell table:style-name="ce1" office:value-type="float" office:value="0.6302507" calcext:value-type="float">
            <text:p>6,30E-01</text:p>
          </table:table-cell>
          <table:table-cell table:style-name="ce1" office:value-type="float" office:value="0.821728" calcext:value-type="float">
            <text:p>8,22E-01</text:p>
          </table:table-cell>
          <table:table-cell/>
          <table:table-cell table:style-name="ce1" table:formula="of:=MAX([.C22];[.E22];[.G22];[.I22];[.K22])" office:value-type="float" office:value="0.6732833" calcext:value-type="float">
            <text:p>6,73E-01</text:p>
          </table:table-cell>
          <table:table-cell table:style-name="ce8" table:formula="of:=MAX([.D22];[.F22];[.H22];[.J22];[.L22])" office:value-type="float" office:value="0.8612615" calcext:value-type="float">
            <text:p>8,61E-01</text:p>
          </table:table-cell>
          <table:table-cell table:style-name="ce1"/>
          <table:table-cell table:style-name="ce1" office:value-type="float" office:value="0.7375424" calcext:value-type="float">
            <text:p>7,38E-01</text:p>
          </table:table-cell>
          <table:table-cell table:style-name="ce1" office:value-type="float" office:value="0.8612615" calcext:value-type="float">
            <text:p>8,61E-01</text:p>
          </table:table-cell>
          <table:table-cell table:style-name="ce4" table:formula="of:=[.Q22]&gt;[.N22]" office:value-type="boolean" office:boolean-value="true" calcext:value-type="boolean">
            <text:p>ІСТИНА</text:p>
          </table:table-cell>
          <table:table-cell table:style-name="ce4" table:formula="of:=[.R22]&gt;[.O2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375424" calcext:value-type="float">
            <text:p>7,38E-01</text:p>
          </table:table-cell>
          <table:table-cell table:style-name="ce4" table:formula="of:=[.V22]&gt;[.Q22]" office:value-type="boolean" office:boolean-value="false" calcext:value-type="boolean">
            <text:p>БРЕХНЯ</text:p>
          </table:table-cell>
          <table:table-cell table:style-name="ce1" table:formula="of:=MAX([.V22];[.Q22])" office:value-type="float" office:value="0.7375424" calcext:value-type="float">
            <text:p>7,38E-01</text:p>
          </table:table-cell>
          <table:table-cell table:style-name="ce4" table:formula="of:=[.X22]&gt;[.R2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2]&gt;[.C22]" office:value-type="boolean" office:boolean-value="true" calcext:value-type="boolean">
            <text:p>ІСТИНА</text:p>
          </table:table-cell>
          <table:table-cell table:style-name="ce4" table:formula="of:=[.F22]&gt;[.D22]" office:value-type="boolean" office:boolean-value="false" calcext:value-type="boolean">
            <text:p>БРЕХНЯ</text:p>
          </table:table-cell>
          <table:table-cell table:style-name="ce4" table:formula="of:=[.G22]&gt;MAX([.C22];[.E22])" office:value-type="boolean" office:boolean-value="true" calcext:value-type="boolean">
            <text:p>ІСТИНА</text:p>
          </table:table-cell>
          <table:table-cell table:style-name="ce4" table:formula="of:=[.H22]&gt;MAX([.D22];[.F22])" office:value-type="boolean" office:boolean-value="false" calcext:value-type="boolean">
            <text:p>БРЕХНЯ</text:p>
          </table:table-cell>
          <table:table-cell table:style-name="ce4" table:formula="of:=[.I22]&gt;MAX([.C22];[.E22];[.G22])" office:value-type="boolean" office:boolean-value="false" calcext:value-type="boolean">
            <text:p>БРЕХНЯ</text:p>
          </table:table-cell>
          <table:table-cell table:style-name="ce4" table:formula="of:=[.J22]&gt;MAX([.D22];[.F22];[.H22])" office:value-type="boolean" office:boolean-value="false" calcext:value-type="boolean">
            <text:p>БРЕХНЯ</text:p>
          </table:table-cell>
          <table:table-cell table:style-name="ce4" table:formula="of:=[.K22]&gt;MAX([.C22];[.E22];[.G22];[.I22])" office:value-type="boolean" office:boolean-value="false" calcext:value-type="boolean">
            <text:p>БРЕХНЯ</text:p>
          </table:table-cell>
          <table:table-cell table:style-name="ce4" table:formula="of:=[.L22]&gt;MAX([.D22];[.F22];[.H22];[.J22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2]&gt;0.9" office:value-type="boolean" office:boolean-value="false" calcext:value-type="boolean">
            <text:p>БРЕХНЯ</text:p>
          </table:table-cell>
          <table:table-cell table:style-name="ce4" table:formula="of:=[.R22]&gt;0.9" office:value-type="boolean" office:boolean-value="false" calcext:value-type="boolean">
            <text:p>БРЕХНЯ</text:p>
          </table:table-cell>
          <table:table-cell table:style-name="ce4" table:formula="of:=[.X22]&gt;0.8" office:value-type="boolean" office:boolean-value="false" calcext:value-type="boolean">
            <text:p>БРЕХНЯ</text:p>
          </table:table-cell>
          <table:table-cell table:style-name="ce4" table:formula="of:=[.R22]&gt;0.8" office:value-type="boolean" office:boolean-value="true" calcext:value-type="boolean">
            <text:p>ІСТИНА</text:p>
          </table:table-cell>
          <table:table-cell table:style-name="ce4" table:formula="of:=[.X22]&gt;0.7" office:value-type="boolean" office:boolean-value="true" calcext:value-type="boolean">
            <text:p>ІСТИНА</text:p>
          </table:table-cell>
          <table:table-cell table:style-name="ce4" table:formula="of:=[.R2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6897829" calcext:value-type="float">
            <text:p>6,90E-01</text:p>
          </table:table-cell>
          <table:table-cell table:style-name="ce1" office:value-type="float" office:value="0.9021248" calcext:value-type="float">
            <text:p>9,02E-01</text:p>
          </table:table-cell>
          <table:table-cell table:style-name="ce1" office:value-type="float" office:value="0.5738662" calcext:value-type="float">
            <text:p>5,74E-01</text:p>
          </table:table-cell>
          <table:table-cell table:style-name="ce1" office:value-type="float" office:value="0.912946" calcext:value-type="float">
            <text:p>9,13E-01</text:p>
          </table:table-cell>
          <table:table-cell table:style-name="ce1" office:value-type="float" office:value="0.6250187" calcext:value-type="float">
            <text:p>6,25E-01</text:p>
          </table:table-cell>
          <table:table-cell table:style-name="ce1" office:value-type="float" office:value="0.9056994" calcext:value-type="float">
            <text:p>9,06E-01</text:p>
          </table:table-cell>
          <table:table-cell table:style-name="ce1" office:value-type="float" office:value="0.6467441" calcext:value-type="float">
            <text:p>6,47E-01</text:p>
          </table:table-cell>
          <table:table-cell table:style-name="ce1" office:value-type="float" office:value="0.8364594" calcext:value-type="float">
            <text:p>8,36E-01</text:p>
          </table:table-cell>
          <table:table-cell table:style-name="ce1" office:value-type="float" office:value="0.6480629" calcext:value-type="float">
            <text:p>6,48E-01</text:p>
          </table:table-cell>
          <table:table-cell table:style-name="ce1" office:value-type="float" office:value="0.8353799" calcext:value-type="float">
            <text:p>8,35E-01</text:p>
          </table:table-cell>
          <table:table-cell/>
          <table:table-cell table:style-name="ce1" table:formula="of:=MAX([.C23];[.E23];[.G23];[.I23];[.K23])" office:value-type="float" office:value="0.6897829" calcext:value-type="float">
            <text:p>6,90E-01</text:p>
          </table:table-cell>
          <table:table-cell table:style-name="ce8" table:formula="of:=MAX([.D23];[.F23];[.H23];[.J23];[.L23])" office:value-type="float" office:value="0.912946" calcext:value-type="float">
            <text:p>9,13E-01</text:p>
          </table:table-cell>
          <table:table-cell table:style-name="ce1"/>
          <table:table-cell table:style-name="ce1" office:value-type="float" office:value="0.7066143" calcext:value-type="float">
            <text:p>7,07E-01</text:p>
          </table:table-cell>
          <table:table-cell table:style-name="ce1" office:value-type="float" office:value="0.912946" calcext:value-type="float">
            <text:p>9,13E-01</text:p>
          </table:table-cell>
          <table:table-cell table:style-name="ce4" table:formula="of:=[.Q23]&gt;[.N23]" office:value-type="boolean" office:boolean-value="true" calcext:value-type="boolean">
            <text:p>ІСТИНА</text:p>
          </table:table-cell>
          <table:table-cell table:style-name="ce4" table:formula="of:=[.R23]&gt;[.O2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066143" calcext:value-type="float">
            <text:p>7,07E-01</text:p>
          </table:table-cell>
          <table:table-cell table:style-name="ce4" table:formula="of:=[.V23]&gt;[.Q23]" office:value-type="boolean" office:boolean-value="false" calcext:value-type="boolean">
            <text:p>БРЕХНЯ</text:p>
          </table:table-cell>
          <table:table-cell table:style-name="ce1" table:formula="of:=MAX([.V23];[.Q23])" office:value-type="float" office:value="0.7066143" calcext:value-type="float">
            <text:p>7,07E-01</text:p>
          </table:table-cell>
          <table:table-cell table:style-name="ce4" table:formula="of:=[.X23]&gt;[.R2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3]&gt;[.C23]" office:value-type="boolean" office:boolean-value="false" calcext:value-type="boolean">
            <text:p>БРЕХНЯ</text:p>
          </table:table-cell>
          <table:table-cell table:style-name="ce4" table:formula="of:=[.F23]&gt;[.D23]" office:value-type="boolean" office:boolean-value="true" calcext:value-type="boolean">
            <text:p>ІСТИНА</text:p>
          </table:table-cell>
          <table:table-cell table:style-name="ce4" table:formula="of:=[.G23]&gt;MAX([.C23];[.E23])" office:value-type="boolean" office:boolean-value="false" calcext:value-type="boolean">
            <text:p>БРЕХНЯ</text:p>
          </table:table-cell>
          <table:table-cell table:style-name="ce4" table:formula="of:=[.H23]&gt;MAX([.D23];[.F23])" office:value-type="boolean" office:boolean-value="false" calcext:value-type="boolean">
            <text:p>БРЕХНЯ</text:p>
          </table:table-cell>
          <table:table-cell table:style-name="ce4" table:formula="of:=[.I23]&gt;MAX([.C23];[.E23];[.G23])" office:value-type="boolean" office:boolean-value="false" calcext:value-type="boolean">
            <text:p>БРЕХНЯ</text:p>
          </table:table-cell>
          <table:table-cell table:style-name="ce4" table:formula="of:=[.J23]&gt;MAX([.D23];[.F23];[.H23])" office:value-type="boolean" office:boolean-value="false" calcext:value-type="boolean">
            <text:p>БРЕХНЯ</text:p>
          </table:table-cell>
          <table:table-cell table:style-name="ce4" table:formula="of:=[.K23]&gt;MAX([.C23];[.E23];[.G23];[.I23])" office:value-type="boolean" office:boolean-value="false" calcext:value-type="boolean">
            <text:p>БРЕХНЯ</text:p>
          </table:table-cell>
          <table:table-cell table:style-name="ce4" table:formula="of:=[.L23]&gt;MAX([.D23];[.F23];[.H23];[.J2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3]&gt;0.9" office:value-type="boolean" office:boolean-value="false" calcext:value-type="boolean">
            <text:p>БРЕХНЯ</text:p>
          </table:table-cell>
          <table:table-cell table:style-name="ce4" table:formula="of:=[.R23]&gt;0.9" office:value-type="boolean" office:boolean-value="true" calcext:value-type="boolean">
            <text:p>ІСТИНА</text:p>
          </table:table-cell>
          <table:table-cell table:style-name="ce4" table:formula="of:=[.X23]&gt;0.8" office:value-type="boolean" office:boolean-value="false" calcext:value-type="boolean">
            <text:p>БРЕХНЯ</text:p>
          </table:table-cell>
          <table:table-cell table:style-name="ce4" table:formula="of:=[.R23]&gt;0.8" office:value-type="boolean" office:boolean-value="true" calcext:value-type="boolean">
            <text:p>ІСТИНА</text:p>
          </table:table-cell>
          <table:table-cell table:style-name="ce4" table:formula="of:=[.X23]&gt;0.7" office:value-type="boolean" office:boolean-value="true" calcext:value-type="boolean">
            <text:p>ІСТИНА</text:p>
          </table:table-cell>
          <table:table-cell table:style-name="ce4" table:formula="of:=[.R2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2065802" calcext:value-type="float">
            <text:p>2,07E-01</text:p>
          </table:table-cell>
          <table:table-cell table:style-name="ce1" office:value-type="float" office:value="0.2629917" calcext:value-type="float">
            <text:p>2,63E-01</text:p>
          </table:table-cell>
          <table:table-cell table:style-name="ce1" office:value-type="float" office:value="0.3147465" calcext:value-type="float">
            <text:p>3,15E-01</text:p>
          </table:table-cell>
          <table:table-cell table:style-name="ce1" office:value-type="float" office:value="0.295677" calcext:value-type="float">
            <text:p>2,96E-01</text:p>
          </table:table-cell>
          <table:table-cell table:style-name="ce1" office:value-type="float" office:value="0.2726557" calcext:value-type="float">
            <text:p>2,73E-01</text:p>
          </table:table-cell>
          <table:table-cell table:style-name="ce1" office:value-type="float" office:value="0.3793983" calcext:value-type="float">
            <text:p>3,79E-01</text:p>
          </table:table-cell>
          <table:table-cell table:style-name="ce1" office:value-type="float" office:value="0.2452233" calcext:value-type="float">
            <text:p>2,45E-01</text:p>
          </table:table-cell>
          <table:table-cell table:style-name="ce1" office:value-type="float" office:value="0.5456889" calcext:value-type="float">
            <text:p>5,46E-01</text:p>
          </table:table-cell>
          <table:table-cell table:style-name="ce1" office:value-type="float" office:value="0.1582593" calcext:value-type="float">
            <text:p>1,58E-01</text:p>
          </table:table-cell>
          <table:table-cell table:style-name="ce1" office:value-type="float" office:value="0.2687177" calcext:value-type="float">
            <text:p>2,69E-01</text:p>
          </table:table-cell>
          <table:table-cell/>
          <table:table-cell table:style-name="ce1" table:formula="of:=MAX([.C24];[.E24];[.G24];[.I24];[.K24])" office:value-type="float" office:value="0.3147465" calcext:value-type="float">
            <text:p>3,15E-01</text:p>
          </table:table-cell>
          <table:table-cell table:style-name="ce8" table:formula="of:=MAX([.D24];[.F24];[.H24];[.J24];[.L24])" office:value-type="float" office:value="0.5456889" calcext:value-type="float">
            <text:p>5,46E-01</text:p>
          </table:table-cell>
          <table:table-cell table:style-name="ce2"/>
          <table:table-cell table:style-name="ce1" office:value-type="float" office:value="0.498366" calcext:value-type="float">
            <text:p>4,98E-01</text:p>
          </table:table-cell>
          <table:table-cell table:style-name="ce1" office:value-type="float" office:value="0.8093912" calcext:value-type="float">
            <text:p>8,09E-01</text:p>
          </table:table-cell>
          <table:table-cell table:style-name="ce4" table:formula="of:=[.Q24]&gt;[.N24]" office:value-type="boolean" office:boolean-value="true" calcext:value-type="boolean">
            <text:p>ІСТИНА</text:p>
          </table:table-cell>
          <table:table-cell table:style-name="ce4" table:formula="of:=[.R24]&gt;[.O24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557444" calcext:value-type="float">
            <text:p>6,56E-01</text:p>
          </table:table-cell>
          <table:table-cell table:style-name="ce4" table:formula="of:=[.V24]&gt;[.Q24]" office:value-type="boolean" office:boolean-value="true" calcext:value-type="boolean">
            <text:p>ІСТИНА</text:p>
          </table:table-cell>
          <table:table-cell table:style-name="ce1" table:formula="of:=MAX([.V24];[.Q24])" office:value-type="float" office:value="0.6557444" calcext:value-type="float">
            <text:p>6,56E-01</text:p>
          </table:table-cell>
          <table:table-cell table:style-name="ce4" table:formula="of:=[.X24]&gt;[.R2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4]&gt;[.C24]" office:value-type="boolean" office:boolean-value="true" calcext:value-type="boolean">
            <text:p>ІСТИНА</text:p>
          </table:table-cell>
          <table:table-cell table:style-name="ce4" table:formula="of:=[.F24]&gt;[.D24]" office:value-type="boolean" office:boolean-value="true" calcext:value-type="boolean">
            <text:p>ІСТИНА</text:p>
          </table:table-cell>
          <table:table-cell table:style-name="ce4" table:formula="of:=[.G24]&gt;MAX([.C24];[.E24])" office:value-type="boolean" office:boolean-value="false" calcext:value-type="boolean">
            <text:p>БРЕХНЯ</text:p>
          </table:table-cell>
          <table:table-cell table:style-name="ce4" table:formula="of:=[.H24]&gt;MAX([.D24];[.F24])" office:value-type="boolean" office:boolean-value="true" calcext:value-type="boolean">
            <text:p>ІСТИНА</text:p>
          </table:table-cell>
          <table:table-cell table:style-name="ce4" table:formula="of:=[.I24]&gt;MAX([.C24];[.E24];[.G24])" office:value-type="boolean" office:boolean-value="false" calcext:value-type="boolean">
            <text:p>БРЕХНЯ</text:p>
          </table:table-cell>
          <table:table-cell table:style-name="ce4" table:formula="of:=[.J24]&gt;MAX([.D24];[.F24];[.H24])" office:value-type="boolean" office:boolean-value="true" calcext:value-type="boolean">
            <text:p>ІСТИНА</text:p>
          </table:table-cell>
          <table:table-cell table:style-name="ce4" table:formula="of:=[.K24]&gt;MAX([.C24];[.E24];[.G24];[.I24])" office:value-type="boolean" office:boolean-value="false" calcext:value-type="boolean">
            <text:p>БРЕХНЯ</text:p>
          </table:table-cell>
          <table:table-cell table:style-name="ce4" table:formula="of:=[.L24]&gt;MAX([.D24];[.F24];[.H24];[.J2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4]&gt;0.9" office:value-type="boolean" office:boolean-value="false" calcext:value-type="boolean">
            <text:p>БРЕХНЯ</text:p>
          </table:table-cell>
          <table:table-cell table:style-name="ce4" table:formula="of:=[.R24]&gt;0.9" office:value-type="boolean" office:boolean-value="false" calcext:value-type="boolean">
            <text:p>БРЕХНЯ</text:p>
          </table:table-cell>
          <table:table-cell table:style-name="ce4" table:formula="of:=[.X24]&gt;0.8" office:value-type="boolean" office:boolean-value="false" calcext:value-type="boolean">
            <text:p>БРЕХНЯ</text:p>
          </table:table-cell>
          <table:table-cell table:style-name="ce4" table:formula="of:=[.R24]&gt;0.8" office:value-type="boolean" office:boolean-value="true" calcext:value-type="boolean">
            <text:p>ІСТИНА</text:p>
          </table:table-cell>
          <table:table-cell table:style-name="ce4" table:formula="of:=[.X24]&gt;0.7" office:value-type="boolean" office:boolean-value="false" calcext:value-type="boolean">
            <text:p>БРЕХНЯ</text:p>
          </table:table-cell>
          <table:table-cell table:style-name="ce4" table:formula="of:=[.R2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6830607" calcext:value-type="float">
            <text:p>6,83E-01</text:p>
          </table:table-cell>
          <table:table-cell table:style-name="ce1" office:value-type="float" office:value="0.8790621" calcext:value-type="float">
            <text:p>8,79E-01</text:p>
          </table:table-cell>
          <table:table-cell table:style-name="ce1" office:value-type="float" office:value="0.6698363" calcext:value-type="float">
            <text:p>6,70E-01</text:p>
          </table:table-cell>
          <table:table-cell table:style-name="ce1" office:value-type="float" office:value="0.8162069" calcext:value-type="float">
            <text:p>8,16E-01</text:p>
          </table:table-cell>
          <table:table-cell table:style-name="ce1" office:value-type="float" office:value="0.6704792" calcext:value-type="float">
            <text:p>6,70E-01</text:p>
          </table:table-cell>
          <table:table-cell table:style-name="ce1" office:value-type="float" office:value="0.8233844" calcext:value-type="float">
            <text:p>8,23E-01</text:p>
          </table:table-cell>
          <table:table-cell table:style-name="ce1" office:value-type="float" office:value="0.6260967" calcext:value-type="float">
            <text:p>6,26E-01</text:p>
          </table:table-cell>
          <table:table-cell table:style-name="ce1" office:value-type="float" office:value="0.8803953" calcext:value-type="float">
            <text:p>8,80E-01</text:p>
          </table:table-cell>
          <table:table-cell table:style-name="ce1" office:value-type="float" office:value="0.6892446" calcext:value-type="float">
            <text:p>6,89E-01</text:p>
          </table:table-cell>
          <table:table-cell table:style-name="ce1" office:value-type="float" office:value="0.9110601" calcext:value-type="float">
            <text:p>9,11E-01</text:p>
          </table:table-cell>
          <table:table-cell/>
          <table:table-cell table:style-name="ce1" table:formula="of:=MAX([.C25];[.E25];[.G25];[.I25];[.K25])" office:value-type="float" office:value="0.6892446" calcext:value-type="float">
            <text:p>6,89E-01</text:p>
          </table:table-cell>
          <table:table-cell table:style-name="ce8" table:formula="of:=MAX([.D25];[.F25];[.H25];[.J25];[.L25])" office:value-type="float" office:value="0.9110601" calcext:value-type="float">
            <text:p>9,11E-01</text:p>
          </table:table-cell>
          <table:table-cell table:style-name="ce1"/>
          <table:table-cell table:style-name="ce1" office:value-type="float" office:value="0.6892446" calcext:value-type="float">
            <text:p>6,89E-01</text:p>
          </table:table-cell>
          <table:table-cell table:style-name="ce1" office:value-type="float" office:value="0.9110601" calcext:value-type="float">
            <text:p>9,11E-01</text:p>
          </table:table-cell>
          <table:table-cell table:style-name="ce4" table:formula="of:=[.Q25]&gt;[.N25]" office:value-type="boolean" office:boolean-value="false" calcext:value-type="boolean">
            <text:p>БРЕХНЯ</text:p>
          </table:table-cell>
          <table:table-cell table:style-name="ce4" table:formula="of:=[.R25]&gt;[.O2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6975133" calcext:value-type="float">
            <text:p>6,98E-01</text:p>
          </table:table-cell>
          <table:table-cell table:style-name="ce4" table:formula="of:=[.V25]&gt;[.Q25]" office:value-type="boolean" office:boolean-value="true" calcext:value-type="boolean">
            <text:p>ІСТИНА</text:p>
          </table:table-cell>
          <table:table-cell table:style-name="ce1" table:formula="of:=MAX([.V25];[.Q25])" office:value-type="float" office:value="0.6975133" calcext:value-type="float">
            <text:p>6,98E-01</text:p>
          </table:table-cell>
          <table:table-cell table:style-name="ce4" table:formula="of:=[.X25]&gt;[.R2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5]&gt;[.C25]" office:value-type="boolean" office:boolean-value="false" calcext:value-type="boolean">
            <text:p>БРЕХНЯ</text:p>
          </table:table-cell>
          <table:table-cell table:style-name="ce4" table:formula="of:=[.F25]&gt;[.D25]" office:value-type="boolean" office:boolean-value="false" calcext:value-type="boolean">
            <text:p>БРЕХНЯ</text:p>
          </table:table-cell>
          <table:table-cell table:style-name="ce4" table:formula="of:=[.G25]&gt;MAX([.C25];[.E25])" office:value-type="boolean" office:boolean-value="false" calcext:value-type="boolean">
            <text:p>БРЕХНЯ</text:p>
          </table:table-cell>
          <table:table-cell table:style-name="ce4" table:formula="of:=[.H25]&gt;MAX([.D25];[.F25])" office:value-type="boolean" office:boolean-value="false" calcext:value-type="boolean">
            <text:p>БРЕХНЯ</text:p>
          </table:table-cell>
          <table:table-cell table:style-name="ce4" table:formula="of:=[.I25]&gt;MAX([.C25];[.E25];[.G25])" office:value-type="boolean" office:boolean-value="false" calcext:value-type="boolean">
            <text:p>БРЕХНЯ</text:p>
          </table:table-cell>
          <table:table-cell table:style-name="ce4" table:formula="of:=[.J25]&gt;MAX([.D25];[.F25];[.H25])" office:value-type="boolean" office:boolean-value="true" calcext:value-type="boolean">
            <text:p>ІСТИНА</text:p>
          </table:table-cell>
          <table:table-cell table:style-name="ce4" table:formula="of:=[.K25]&gt;MAX([.C25];[.E25];[.G25];[.I25])" office:value-type="boolean" office:boolean-value="true" calcext:value-type="boolean">
            <text:p>ІСТИНА</text:p>
          </table:table-cell>
          <table:table-cell table:style-name="ce4" table:formula="of:=[.L25]&gt;MAX([.D25];[.F25];[.H25];[.J25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25]&gt;0.9" office:value-type="boolean" office:boolean-value="false" calcext:value-type="boolean">
            <text:p>БРЕХНЯ</text:p>
          </table:table-cell>
          <table:table-cell table:style-name="ce4" table:formula="of:=[.R25]&gt;0.9" office:value-type="boolean" office:boolean-value="true" calcext:value-type="boolean">
            <text:p>ІСТИНА</text:p>
          </table:table-cell>
          <table:table-cell table:style-name="ce4" table:formula="of:=[.X25]&gt;0.8" office:value-type="boolean" office:boolean-value="false" calcext:value-type="boolean">
            <text:p>БРЕХНЯ</text:p>
          </table:table-cell>
          <table:table-cell table:style-name="ce4" table:formula="of:=[.R25]&gt;0.8" office:value-type="boolean" office:boolean-value="true" calcext:value-type="boolean">
            <text:p>ІСТИНА</text:p>
          </table:table-cell>
          <table:table-cell table:style-name="ce4" table:formula="of:=[.X25]&gt;0.7" office:value-type="boolean" office:boolean-value="false" calcext:value-type="boolean">
            <text:p>БРЕХНЯ</text:p>
          </table:table-cell>
          <table:table-cell table:style-name="ce4" table:formula="of:=[.R2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6137255" calcext:value-type="float">
            <text:p>6,14E-01</text:p>
          </table:table-cell>
          <table:table-cell table:style-name="ce1" office:value-type="float" office:value="0.8309197" calcext:value-type="float">
            <text:p>8,31E-01</text:p>
          </table:table-cell>
          <table:table-cell table:style-name="ce1" office:value-type="float" office:value="0.6368304" calcext:value-type="float">
            <text:p>6,37E-01</text:p>
          </table:table-cell>
          <table:table-cell table:style-name="ce1" office:value-type="float" office:value="0.9301049" calcext:value-type="float">
            <text:p>9,30E-01</text:p>
          </table:table-cell>
          <table:table-cell table:style-name="ce1" office:value-type="float" office:value="0.6422879" calcext:value-type="float">
            <text:p>6,42E-01</text:p>
          </table:table-cell>
          <table:table-cell table:style-name="ce1" office:value-type="float" office:value="0.8545909" calcext:value-type="float">
            <text:p>8,55E-01</text:p>
          </table:table-cell>
          <table:table-cell table:style-name="ce1" office:value-type="float" office:value="0.6857246" calcext:value-type="float">
            <text:p>6,86E-01</text:p>
          </table:table-cell>
          <table:table-cell table:style-name="ce1" office:value-type="float" office:value="0.8736787" calcext:value-type="float">
            <text:p>8,74E-01</text:p>
          </table:table-cell>
          <table:table-cell table:style-name="ce1" office:value-type="float" office:value="0.6759646" calcext:value-type="float">
            <text:p>6,76E-01</text:p>
          </table:table-cell>
          <table:table-cell table:style-name="ce1" office:value-type="float" office:value="0.6646495" calcext:value-type="float">
            <text:p>6,65E-01</text:p>
          </table:table-cell>
          <table:table-cell/>
          <table:table-cell table:style-name="ce1" table:formula="of:=MAX([.C26];[.E26];[.G26];[.I26];[.K26])" office:value-type="float" office:value="0.6857246" calcext:value-type="float">
            <text:p>6,86E-01</text:p>
          </table:table-cell>
          <table:table-cell table:style-name="ce8" table:formula="of:=MAX([.D26];[.F26];[.H26];[.J26];[.L26])" office:value-type="float" office:value="0.9301049" calcext:value-type="float">
            <text:p>9,30E-01</text:p>
          </table:table-cell>
          <table:table-cell table:style-name="ce1"/>
          <table:table-cell table:style-name="ce1" office:value-type="float" office:value="0.6857246" calcext:value-type="float">
            <text:p>6,86E-01</text:p>
          </table:table-cell>
          <table:table-cell table:style-name="ce1" office:value-type="float" office:value="0.9301049" calcext:value-type="float">
            <text:p>9,30E-01</text:p>
          </table:table-cell>
          <table:table-cell table:style-name="ce4" table:formula="of:=[.Q26]&gt;[.N26]" office:value-type="boolean" office:boolean-value="false" calcext:value-type="boolean">
            <text:p>БРЕХНЯ</text:p>
          </table:table-cell>
          <table:table-cell table:style-name="ce4" table:formula="of:=[.R26]&gt;[.O2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6857246" calcext:value-type="float">
            <text:p>6,86E-01</text:p>
          </table:table-cell>
          <table:table-cell table:style-name="ce4" table:formula="of:=[.V26]&gt;[.Q26]" office:value-type="boolean" office:boolean-value="false" calcext:value-type="boolean">
            <text:p>БРЕХНЯ</text:p>
          </table:table-cell>
          <table:table-cell table:style-name="ce1" table:formula="of:=MAX([.V26];[.Q26])" office:value-type="float" office:value="0.6857246" calcext:value-type="float">
            <text:p>6,86E-01</text:p>
          </table:table-cell>
          <table:table-cell table:style-name="ce4" table:formula="of:=[.X26]&gt;[.R2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6]&gt;[.C26]" office:value-type="boolean" office:boolean-value="true" calcext:value-type="boolean">
            <text:p>ІСТИНА</text:p>
          </table:table-cell>
          <table:table-cell table:style-name="ce4" table:formula="of:=[.F26]&gt;[.D26]" office:value-type="boolean" office:boolean-value="true" calcext:value-type="boolean">
            <text:p>ІСТИНА</text:p>
          </table:table-cell>
          <table:table-cell table:style-name="ce4" table:formula="of:=[.G26]&gt;MAX([.C26];[.E26])" office:value-type="boolean" office:boolean-value="true" calcext:value-type="boolean">
            <text:p>ІСТИНА</text:p>
          </table:table-cell>
          <table:table-cell table:style-name="ce4" table:formula="of:=[.H26]&gt;MAX([.D26];[.F26])" office:value-type="boolean" office:boolean-value="false" calcext:value-type="boolean">
            <text:p>БРЕХНЯ</text:p>
          </table:table-cell>
          <table:table-cell table:style-name="ce4" table:formula="of:=[.I26]&gt;MAX([.C26];[.E26];[.G26])" office:value-type="boolean" office:boolean-value="true" calcext:value-type="boolean">
            <text:p>ІСТИНА</text:p>
          </table:table-cell>
          <table:table-cell table:style-name="ce4" table:formula="of:=[.J26]&gt;MAX([.D26];[.F26];[.H26])" office:value-type="boolean" office:boolean-value="false" calcext:value-type="boolean">
            <text:p>БРЕХНЯ</text:p>
          </table:table-cell>
          <table:table-cell table:style-name="ce4" table:formula="of:=[.K26]&gt;MAX([.C26];[.E26];[.G26];[.I26])" office:value-type="boolean" office:boolean-value="false" calcext:value-type="boolean">
            <text:p>БРЕХНЯ</text:p>
          </table:table-cell>
          <table:table-cell table:style-name="ce4" table:formula="of:=[.L26]&gt;MAX([.D26];[.F26];[.H26];[.J2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6]&gt;0.9" office:value-type="boolean" office:boolean-value="false" calcext:value-type="boolean">
            <text:p>БРЕХНЯ</text:p>
          </table:table-cell>
          <table:table-cell table:style-name="ce4" table:formula="of:=[.R26]&gt;0.9" office:value-type="boolean" office:boolean-value="true" calcext:value-type="boolean">
            <text:p>ІСТИНА</text:p>
          </table:table-cell>
          <table:table-cell table:style-name="ce4" table:formula="of:=[.X26]&gt;0.8" office:value-type="boolean" office:boolean-value="false" calcext:value-type="boolean">
            <text:p>БРЕХНЯ</text:p>
          </table:table-cell>
          <table:table-cell table:style-name="ce4" table:formula="of:=[.R26]&gt;0.8" office:value-type="boolean" office:boolean-value="true" calcext:value-type="boolean">
            <text:p>ІСТИНА</text:p>
          </table:table-cell>
          <table:table-cell table:style-name="ce4" table:formula="of:=[.X26]&gt;0.7" office:value-type="boolean" office:boolean-value="false" calcext:value-type="boolean">
            <text:p>БРЕХНЯ</text:p>
          </table:table-cell>
          <table:table-cell table:style-name="ce4" table:formula="of:=[.R2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7197278" calcext:value-type="float">
            <text:p>7,20E-01</text:p>
          </table:table-cell>
          <table:table-cell table:style-name="ce1" office:value-type="float" office:value="0.8862722" calcext:value-type="float">
            <text:p>8,86E-01</text:p>
          </table:table-cell>
          <table:table-cell table:style-name="ce1" office:value-type="float" office:value="0.6703584" calcext:value-type="float">
            <text:p>6,70E-01</text:p>
          </table:table-cell>
          <table:table-cell table:style-name="ce1" office:value-type="float" office:value="0.8768577" calcext:value-type="float">
            <text:p>8,77E-01</text:p>
          </table:table-cell>
          <table:table-cell table:style-name="ce1" office:value-type="float" office:value="0.7206928" calcext:value-type="float">
            <text:p>7,21E-01</text:p>
          </table:table-cell>
          <table:table-cell table:style-name="ce1" office:value-type="float" office:value="0.8456907" calcext:value-type="float">
            <text:p>8,46E-01</text:p>
          </table:table-cell>
          <table:table-cell table:style-name="ce1" office:value-type="float" office:value="0.7364154" calcext:value-type="float">
            <text:p>7,36E-01</text:p>
          </table:table-cell>
          <table:table-cell table:style-name="ce1" office:value-type="float" office:value="0.8664667" calcext:value-type="float">
            <text:p>8,66E-01</text:p>
          </table:table-cell>
          <table:table-cell table:style-name="ce1" office:value-type="float" office:value="0.7429845" calcext:value-type="float">
            <text:p>7,43E-01</text:p>
          </table:table-cell>
          <table:table-cell table:style-name="ce1" office:value-type="float" office:value="0.8641699" calcext:value-type="float">
            <text:p>8,64E-01</text:p>
          </table:table-cell>
          <table:table-cell/>
          <table:table-cell table:style-name="ce1" table:formula="of:=MAX([.C27];[.E27];[.G27];[.I27];[.K27])" office:value-type="float" office:value="0.7429845" calcext:value-type="float">
            <text:p>7,43E-01</text:p>
          </table:table-cell>
          <table:table-cell table:style-name="ce8" table:formula="of:=MAX([.D27];[.F27];[.H27];[.J27];[.L27])" office:value-type="float" office:value="0.8862722" calcext:value-type="float">
            <text:p>8,86E-01</text:p>
          </table:table-cell>
          <table:table-cell table:style-name="ce1"/>
          <table:table-cell table:style-name="ce1" office:value-type="float" office:value="0.7587283" calcext:value-type="float">
            <text:p>7,59E-01</text:p>
          </table:table-cell>
          <table:table-cell table:style-name="ce1" office:value-type="float" office:value="0.8862722" calcext:value-type="float">
            <text:p>8,86E-01</text:p>
          </table:table-cell>
          <table:table-cell table:style-name="ce4" table:formula="of:=[.Q27]&gt;[.N27]" office:value-type="boolean" office:boolean-value="true" calcext:value-type="boolean">
            <text:p>ІСТИНА</text:p>
          </table:table-cell>
          <table:table-cell table:style-name="ce4" table:formula="of:=[.R27]&gt;[.O2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87283" calcext:value-type="float">
            <text:p>7,59E-01</text:p>
          </table:table-cell>
          <table:table-cell table:style-name="ce4" table:formula="of:=[.V27]&gt;[.Q27]" office:value-type="boolean" office:boolean-value="false" calcext:value-type="boolean">
            <text:p>БРЕХНЯ</text:p>
          </table:table-cell>
          <table:table-cell table:style-name="ce1" table:formula="of:=MAX([.V27];[.Q27])" office:value-type="float" office:value="0.7587283" calcext:value-type="float">
            <text:p>7,59E-01</text:p>
          </table:table-cell>
          <table:table-cell table:style-name="ce4" table:formula="of:=[.X27]&gt;[.R2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7]&gt;[.C27]" office:value-type="boolean" office:boolean-value="false" calcext:value-type="boolean">
            <text:p>БРЕХНЯ</text:p>
          </table:table-cell>
          <table:table-cell table:style-name="ce4" table:formula="of:=[.F27]&gt;[.D27]" office:value-type="boolean" office:boolean-value="false" calcext:value-type="boolean">
            <text:p>БРЕХНЯ</text:p>
          </table:table-cell>
          <table:table-cell table:style-name="ce4" table:formula="of:=[.G27]&gt;MAX([.C27];[.E27])" office:value-type="boolean" office:boolean-value="true" calcext:value-type="boolean">
            <text:p>ІСТИНА</text:p>
          </table:table-cell>
          <table:table-cell table:style-name="ce4" table:formula="of:=[.H27]&gt;MAX([.D27];[.F27])" office:value-type="boolean" office:boolean-value="false" calcext:value-type="boolean">
            <text:p>БРЕХНЯ</text:p>
          </table:table-cell>
          <table:table-cell table:style-name="ce4" table:formula="of:=[.I27]&gt;MAX([.C27];[.E27];[.G27])" office:value-type="boolean" office:boolean-value="true" calcext:value-type="boolean">
            <text:p>ІСТИНА</text:p>
          </table:table-cell>
          <table:table-cell table:style-name="ce4" table:formula="of:=[.J27]&gt;MAX([.D27];[.F27];[.H27])" office:value-type="boolean" office:boolean-value="false" calcext:value-type="boolean">
            <text:p>БРЕХНЯ</text:p>
          </table:table-cell>
          <table:table-cell table:style-name="ce4" table:formula="of:=[.K27]&gt;MAX([.C27];[.E27];[.G27];[.I27])" office:value-type="boolean" office:boolean-value="true" calcext:value-type="boolean">
            <text:p>ІСТИНА</text:p>
          </table:table-cell>
          <table:table-cell table:style-name="ce4" table:formula="of:=[.L27]&gt;MAX([.D27];[.F27];[.H27];[.J27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7]&gt;0.9" office:value-type="boolean" office:boolean-value="false" calcext:value-type="boolean">
            <text:p>БРЕХНЯ</text:p>
          </table:table-cell>
          <table:table-cell table:style-name="ce4" table:formula="of:=[.R27]&gt;0.9" office:value-type="boolean" office:boolean-value="false" calcext:value-type="boolean">
            <text:p>БРЕХНЯ</text:p>
          </table:table-cell>
          <table:table-cell table:style-name="ce4" table:formula="of:=[.X27]&gt;0.8" office:value-type="boolean" office:boolean-value="false" calcext:value-type="boolean">
            <text:p>БРЕХНЯ</text:p>
          </table:table-cell>
          <table:table-cell table:style-name="ce4" table:formula="of:=[.R27]&gt;0.8" office:value-type="boolean" office:boolean-value="true" calcext:value-type="boolean">
            <text:p>ІСТИНА</text:p>
          </table:table-cell>
          <table:table-cell table:style-name="ce4" table:formula="of:=[.X27]&gt;0.7" office:value-type="boolean" office:boolean-value="true" calcext:value-type="boolean">
            <text:p>ІСТИНА</text:p>
          </table:table-cell>
          <table:table-cell table:style-name="ce4" table:formula="of:=[.R2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6061047" calcext:value-type="float">
            <text:p>6,06E-01</text:p>
          </table:table-cell>
          <table:table-cell table:style-name="ce1" office:value-type="float" office:value="0.7646001" calcext:value-type="float">
            <text:p>7,65E-01</text:p>
          </table:table-cell>
          <table:table-cell table:style-name="ce1" office:value-type="float" office:value="0.734393" calcext:value-type="float">
            <text:p>7,34E-01</text:p>
          </table:table-cell>
          <table:table-cell table:style-name="ce1" office:value-type="float" office:value="0.8166767" calcext:value-type="float">
            <text:p>8,17E-01</text:p>
          </table:table-cell>
          <table:table-cell table:style-name="ce1" office:value-type="float" office:value="0.6445125" calcext:value-type="float">
            <text:p>6,45E-01</text:p>
          </table:table-cell>
          <table:table-cell table:style-name="ce1" office:value-type="float" office:value="0.7611764" calcext:value-type="float">
            <text:p>7,61E-01</text:p>
          </table:table-cell>
          <table:table-cell table:style-name="ce1" office:value-type="float" office:value="0.672023" calcext:value-type="float">
            <text:p>6,72E-01</text:p>
          </table:table-cell>
          <table:table-cell table:style-name="ce1" office:value-type="float" office:value="0.853976" calcext:value-type="float">
            <text:p>8,54E-01</text:p>
          </table:table-cell>
          <table:table-cell table:style-name="ce1" office:value-type="float" office:value="0.6437824" calcext:value-type="float">
            <text:p>6,44E-01</text:p>
          </table:table-cell>
          <table:table-cell table:style-name="ce1" office:value-type="float" office:value="0.8250675" calcext:value-type="float">
            <text:p>8,25E-01</text:p>
          </table:table-cell>
          <table:table-cell/>
          <table:table-cell table:style-name="ce1" table:formula="of:=MAX([.C28];[.E28];[.G28];[.I28];[.K28])" office:value-type="float" office:value="0.734393" calcext:value-type="float">
            <text:p>7,34E-01</text:p>
          </table:table-cell>
          <table:table-cell table:style-name="ce8" table:formula="of:=MAX([.D28];[.F28];[.H28];[.J28];[.L28])" office:value-type="float" office:value="0.853976" calcext:value-type="float">
            <text:p>8,54E-01</text:p>
          </table:table-cell>
          <table:table-cell table:style-name="ce1"/>
          <table:table-cell table:style-name="ce1" office:value-type="float" office:value="0.7369353" calcext:value-type="float">
            <text:p>7,37E-01</text:p>
          </table:table-cell>
          <table:table-cell table:style-name="ce1" office:value-type="float" office:value="0.853976" calcext:value-type="float">
            <text:p>8,54E-01</text:p>
          </table:table-cell>
          <table:table-cell table:style-name="ce4" table:formula="of:=[.Q28]&gt;[.N28]" office:value-type="boolean" office:boolean-value="true" calcext:value-type="boolean">
            <text:p>ІСТИНА</text:p>
          </table:table-cell>
          <table:table-cell table:style-name="ce4" table:formula="of:=[.R28]&gt;[.O2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70953" calcext:value-type="float">
            <text:p>7,87E-01</text:p>
          </table:table-cell>
          <table:table-cell table:style-name="ce4" table:formula="of:=[.V28]&gt;[.Q28]" office:value-type="boolean" office:boolean-value="true" calcext:value-type="boolean">
            <text:p>ІСТИНА</text:p>
          </table:table-cell>
          <table:table-cell table:style-name="ce1" table:formula="of:=MAX([.V28];[.Q28])" office:value-type="float" office:value="0.7870953" calcext:value-type="float">
            <text:p>7,87E-01</text:p>
          </table:table-cell>
          <table:table-cell table:style-name="ce4" table:formula="of:=[.X28]&gt;[.R2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8]&gt;[.C28]" office:value-type="boolean" office:boolean-value="true" calcext:value-type="boolean">
            <text:p>ІСТИНА</text:p>
          </table:table-cell>
          <table:table-cell table:style-name="ce4" table:formula="of:=[.F28]&gt;[.D28]" office:value-type="boolean" office:boolean-value="true" calcext:value-type="boolean">
            <text:p>ІСТИНА</text:p>
          </table:table-cell>
          <table:table-cell table:style-name="ce4" table:formula="of:=[.G28]&gt;MAX([.C28];[.E28])" office:value-type="boolean" office:boolean-value="false" calcext:value-type="boolean">
            <text:p>БРЕХНЯ</text:p>
          </table:table-cell>
          <table:table-cell table:style-name="ce4" table:formula="of:=[.H28]&gt;MAX([.D28];[.F28])" office:value-type="boolean" office:boolean-value="false" calcext:value-type="boolean">
            <text:p>БРЕХНЯ</text:p>
          </table:table-cell>
          <table:table-cell table:style-name="ce4" table:formula="of:=[.I28]&gt;MAX([.C28];[.E28];[.G28])" office:value-type="boolean" office:boolean-value="false" calcext:value-type="boolean">
            <text:p>БРЕХНЯ</text:p>
          </table:table-cell>
          <table:table-cell table:style-name="ce4" table:formula="of:=[.J28]&gt;MAX([.D28];[.F28];[.H28])" office:value-type="boolean" office:boolean-value="true" calcext:value-type="boolean">
            <text:p>ІСТИНА</text:p>
          </table:table-cell>
          <table:table-cell table:style-name="ce4" table:formula="of:=[.K28]&gt;MAX([.C28];[.E28];[.G28];[.I28])" office:value-type="boolean" office:boolean-value="false" calcext:value-type="boolean">
            <text:p>БРЕХНЯ</text:p>
          </table:table-cell>
          <table:table-cell table:style-name="ce4" table:formula="of:=[.L28]&gt;MAX([.D28];[.F28];[.H28];[.J2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28]&gt;0.9" office:value-type="boolean" office:boolean-value="false" calcext:value-type="boolean">
            <text:p>БРЕХНЯ</text:p>
          </table:table-cell>
          <table:table-cell table:style-name="ce4" table:formula="of:=[.R28]&gt;0.9" office:value-type="boolean" office:boolean-value="false" calcext:value-type="boolean">
            <text:p>БРЕХНЯ</text:p>
          </table:table-cell>
          <table:table-cell table:style-name="ce4" table:formula="of:=[.X28]&gt;0.8" office:value-type="boolean" office:boolean-value="false" calcext:value-type="boolean">
            <text:p>БРЕХНЯ</text:p>
          </table:table-cell>
          <table:table-cell table:style-name="ce4" table:formula="of:=[.R28]&gt;0.8" office:value-type="boolean" office:boolean-value="true" calcext:value-type="boolean">
            <text:p>ІСТИНА</text:p>
          </table:table-cell>
          <table:table-cell table:style-name="ce4" table:formula="of:=[.X28]&gt;0.7" office:value-type="boolean" office:boolean-value="true" calcext:value-type="boolean">
            <text:p>ІСТИНА</text:p>
          </table:table-cell>
          <table:table-cell table:style-name="ce4" table:formula="of:=[.R2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203466" calcext:value-type="float">
            <text:p>2,03E-01</text:p>
          </table:table-cell>
          <table:table-cell table:style-name="ce1" office:value-type="float" office:value="0.2098971" calcext:value-type="float">
            <text:p>2,10E-01</text:p>
          </table:table-cell>
          <table:table-cell table:style-name="ce1" office:value-type="float" office:value="0.2389748" calcext:value-type="float">
            <text:p>2,39E-01</text:p>
          </table:table-cell>
          <table:table-cell table:style-name="ce1" office:value-type="float" office:value="0.2915861" calcext:value-type="float">
            <text:p>2,92E-01</text:p>
          </table:table-cell>
          <table:table-cell table:style-name="ce1" office:value-type="float" office:value="0.3821808" calcext:value-type="float">
            <text:p>3,82E-01</text:p>
          </table:table-cell>
          <table:table-cell table:style-name="ce1" office:value-type="float" office:value="0.1591308" calcext:value-type="float">
            <text:p>1,59E-01</text:p>
          </table:table-cell>
          <table:table-cell table:style-name="ce1" office:value-type="float" office:value="0.171001" calcext:value-type="float">
            <text:p>1,71E-01</text:p>
          </table:table-cell>
          <table:table-cell table:style-name="ce1" office:value-type="float" office:value="0.4207315" calcext:value-type="float">
            <text:p>4,21E-01</text:p>
          </table:table-cell>
          <table:table-cell table:style-name="ce1" office:value-type="float" office:value="0.2105495" calcext:value-type="float">
            <text:p>2,11E-01</text:p>
          </table:table-cell>
          <table:table-cell table:style-name="ce1" office:value-type="float" office:value="0.4777166" calcext:value-type="float">
            <text:p>4,78E-01</text:p>
          </table:table-cell>
          <table:table-cell/>
          <table:table-cell table:style-name="ce1" table:formula="of:=MAX([.C29];[.E29];[.G29];[.I29];[.K29])" office:value-type="float" office:value="0.3821808" calcext:value-type="float">
            <text:p>3,82E-01</text:p>
          </table:table-cell>
          <table:table-cell table:style-name="ce8" table:formula="of:=MAX([.D29];[.F29];[.H29];[.J29];[.L29])" office:value-type="float" office:value="0.4777166" calcext:value-type="float">
            <text:p>4,78E-01</text:p>
          </table:table-cell>
          <table:table-cell table:style-name="ce2"/>
          <table:table-cell table:style-name="ce1" office:value-type="float" office:value="0.4981708" calcext:value-type="float">
            <text:p>4,98E-01</text:p>
          </table:table-cell>
          <table:table-cell table:style-name="ce1" office:value-type="float" office:value="0.7022606" calcext:value-type="float">
            <text:p>7,02E-01</text:p>
          </table:table-cell>
          <table:table-cell table:style-name="ce4" table:formula="of:=[.Q29]&gt;[.N29]" office:value-type="boolean" office:boolean-value="true" calcext:value-type="boolean">
            <text:p>ІСТИНА</text:p>
          </table:table-cell>
          <table:table-cell table:style-name="ce4" table:formula="of:=[.R29]&gt;[.O29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384039" calcext:value-type="float">
            <text:p>6,38E-01</text:p>
          </table:table-cell>
          <table:table-cell table:style-name="ce4" table:formula="of:=[.V29]&gt;[.Q29]" office:value-type="boolean" office:boolean-value="true" calcext:value-type="boolean">
            <text:p>ІСТИНА</text:p>
          </table:table-cell>
          <table:table-cell table:style-name="ce1" table:formula="of:=MAX([.V29];[.Q29])" office:value-type="float" office:value="0.6384039" calcext:value-type="float">
            <text:p>6,38E-01</text:p>
          </table:table-cell>
          <table:table-cell table:style-name="ce4" table:formula="of:=[.X29]&gt;[.R2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29]&gt;[.C29]" office:value-type="boolean" office:boolean-value="true" calcext:value-type="boolean">
            <text:p>ІСТИНА</text:p>
          </table:table-cell>
          <table:table-cell table:style-name="ce4" table:formula="of:=[.F29]&gt;[.D29]" office:value-type="boolean" office:boolean-value="true" calcext:value-type="boolean">
            <text:p>ІСТИНА</text:p>
          </table:table-cell>
          <table:table-cell table:style-name="ce4" table:formula="of:=[.G29]&gt;MAX([.C29];[.E29])" office:value-type="boolean" office:boolean-value="true" calcext:value-type="boolean">
            <text:p>ІСТИНА</text:p>
          </table:table-cell>
          <table:table-cell table:style-name="ce4" table:formula="of:=[.H29]&gt;MAX([.D29];[.F29])" office:value-type="boolean" office:boolean-value="false" calcext:value-type="boolean">
            <text:p>БРЕХНЯ</text:p>
          </table:table-cell>
          <table:table-cell table:style-name="ce4" table:formula="of:=[.I29]&gt;MAX([.C29];[.E29];[.G29])" office:value-type="boolean" office:boolean-value="false" calcext:value-type="boolean">
            <text:p>БРЕХНЯ</text:p>
          </table:table-cell>
          <table:table-cell table:style-name="ce4" table:formula="of:=[.J29]&gt;MAX([.D29];[.F29];[.H29])" office:value-type="boolean" office:boolean-value="true" calcext:value-type="boolean">
            <text:p>ІСТИНА</text:p>
          </table:table-cell>
          <table:table-cell table:style-name="ce4" table:formula="of:=[.K29]&gt;MAX([.C29];[.E29];[.G29];[.I29])" office:value-type="boolean" office:boolean-value="false" calcext:value-type="boolean">
            <text:p>БРЕХНЯ</text:p>
          </table:table-cell>
          <table:table-cell table:style-name="ce4" table:formula="of:=[.L29]&gt;MAX([.D29];[.F29];[.H29];[.J29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29]&gt;0.9" office:value-type="boolean" office:boolean-value="false" calcext:value-type="boolean">
            <text:p>БРЕХНЯ</text:p>
          </table:table-cell>
          <table:table-cell table:style-name="ce4" table:formula="of:=[.R29]&gt;0.9" office:value-type="boolean" office:boolean-value="false" calcext:value-type="boolean">
            <text:p>БРЕХНЯ</text:p>
          </table:table-cell>
          <table:table-cell table:style-name="ce4" table:formula="of:=[.X29]&gt;0.8" office:value-type="boolean" office:boolean-value="false" calcext:value-type="boolean">
            <text:p>БРЕХНЯ</text:p>
          </table:table-cell>
          <table:table-cell table:style-name="ce4" table:formula="of:=[.R29]&gt;0.8" office:value-type="boolean" office:boolean-value="false" calcext:value-type="boolean">
            <text:p>БРЕХНЯ</text:p>
          </table:table-cell>
          <table:table-cell table:style-name="ce4" table:formula="of:=[.X29]&gt;0.7" office:value-type="boolean" office:boolean-value="false" calcext:value-type="boolean">
            <text:p>БРЕХНЯ</text:p>
          </table:table-cell>
          <table:table-cell table:style-name="ce4" table:formula="of:=[.R2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.7136671" calcext:value-type="float">
            <text:p>7,14E-01</text:p>
          </table:table-cell>
          <table:table-cell table:style-name="ce1" office:value-type="float" office:value="0.8268672" calcext:value-type="float">
            <text:p>8,27E-01</text:p>
          </table:table-cell>
          <table:table-cell table:style-name="ce1" office:value-type="float" office:value="0.7241067" calcext:value-type="float">
            <text:p>7,24E-01</text:p>
          </table:table-cell>
          <table:table-cell table:style-name="ce1" office:value-type="float" office:value="0.8422897" calcext:value-type="float">
            <text:p>8,42E-01</text:p>
          </table:table-cell>
          <table:table-cell table:style-name="ce1" office:value-type="float" office:value="0.6916432" calcext:value-type="float">
            <text:p>6,92E-01</text:p>
          </table:table-cell>
          <table:table-cell table:style-name="ce1" office:value-type="float" office:value="0.8755012" calcext:value-type="float">
            <text:p>8,76E-01</text:p>
          </table:table-cell>
          <table:table-cell table:style-name="ce1" office:value-type="float" office:value="0.7406322" calcext:value-type="float">
            <text:p>7,41E-01</text:p>
          </table:table-cell>
          <table:table-cell table:style-name="ce1" office:value-type="float" office:value="0.8493776" calcext:value-type="float">
            <text:p>8,49E-01</text:p>
          </table:table-cell>
          <table:table-cell table:style-name="ce1" office:value-type="float" office:value="0.7249671" calcext:value-type="float">
            <text:p>7,25E-01</text:p>
          </table:table-cell>
          <table:table-cell table:style-name="ce1" office:value-type="float" office:value="0.8618321" calcext:value-type="float">
            <text:p>8,62E-01</text:p>
          </table:table-cell>
          <table:table-cell/>
          <table:table-cell table:style-name="ce1" table:formula="of:=MAX([.C30];[.E30];[.G30];[.I30];[.K30])" office:value-type="float" office:value="0.7406322" calcext:value-type="float">
            <text:p>7,41E-01</text:p>
          </table:table-cell>
          <table:table-cell table:style-name="ce8" table:formula="of:=MAX([.D30];[.F30];[.H30];[.J30];[.L30])" office:value-type="float" office:value="0.8755012" calcext:value-type="float">
            <text:p>8,76E-01</text:p>
          </table:table-cell>
          <table:table-cell table:style-name="ce1"/>
          <table:table-cell table:style-name="ce1" office:value-type="float" office:value="0.7406322" calcext:value-type="float">
            <text:p>7,41E-01</text:p>
          </table:table-cell>
          <table:table-cell table:style-name="ce1" office:value-type="float" office:value="0.8755012" calcext:value-type="float">
            <text:p>8,76E-01</text:p>
          </table:table-cell>
          <table:table-cell table:style-name="ce4" table:formula="of:=[.Q30]&gt;[.N30]" office:value-type="boolean" office:boolean-value="false" calcext:value-type="boolean">
            <text:p>БРЕХНЯ</text:p>
          </table:table-cell>
          <table:table-cell table:style-name="ce4" table:formula="of:=[.R30]&gt;[.O3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406322" calcext:value-type="float">
            <text:p>7,41E-01</text:p>
          </table:table-cell>
          <table:table-cell table:style-name="ce4" table:formula="of:=[.V30]&gt;[.Q30]" office:value-type="boolean" office:boolean-value="false" calcext:value-type="boolean">
            <text:p>БРЕХНЯ</text:p>
          </table:table-cell>
          <table:table-cell table:style-name="ce1" table:formula="of:=MAX([.V30];[.Q30])" office:value-type="float" office:value="0.7406322" calcext:value-type="float">
            <text:p>7,41E-01</text:p>
          </table:table-cell>
          <table:table-cell table:style-name="ce4" table:formula="of:=[.X30]&gt;[.R3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0]&gt;[.C30]" office:value-type="boolean" office:boolean-value="true" calcext:value-type="boolean">
            <text:p>ІСТИНА</text:p>
          </table:table-cell>
          <table:table-cell table:style-name="ce4" table:formula="of:=[.F30]&gt;[.D30]" office:value-type="boolean" office:boolean-value="true" calcext:value-type="boolean">
            <text:p>ІСТИНА</text:p>
          </table:table-cell>
          <table:table-cell table:style-name="ce4" table:formula="of:=[.G30]&gt;MAX([.C30];[.E30])" office:value-type="boolean" office:boolean-value="false" calcext:value-type="boolean">
            <text:p>БРЕХНЯ</text:p>
          </table:table-cell>
          <table:table-cell table:style-name="ce4" table:formula="of:=[.H30]&gt;MAX([.D30];[.F30])" office:value-type="boolean" office:boolean-value="true" calcext:value-type="boolean">
            <text:p>ІСТИНА</text:p>
          </table:table-cell>
          <table:table-cell table:style-name="ce4" table:formula="of:=[.I30]&gt;MAX([.C30];[.E30];[.G30])" office:value-type="boolean" office:boolean-value="true" calcext:value-type="boolean">
            <text:p>ІСТИНА</text:p>
          </table:table-cell>
          <table:table-cell table:style-name="ce4" table:formula="of:=[.J30]&gt;MAX([.D30];[.F30];[.H30])" office:value-type="boolean" office:boolean-value="false" calcext:value-type="boolean">
            <text:p>БРЕХНЯ</text:p>
          </table:table-cell>
          <table:table-cell table:style-name="ce4" table:formula="of:=[.K30]&gt;MAX([.C30];[.E30];[.G30];[.I30])" office:value-type="boolean" office:boolean-value="false" calcext:value-type="boolean">
            <text:p>БРЕХНЯ</text:p>
          </table:table-cell>
          <table:table-cell table:style-name="ce4" table:formula="of:=[.L30]&gt;MAX([.D30];[.F30];[.H30];[.J3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0]&gt;0.9" office:value-type="boolean" office:boolean-value="false" calcext:value-type="boolean">
            <text:p>БРЕХНЯ</text:p>
          </table:table-cell>
          <table:table-cell table:style-name="ce4" table:formula="of:=[.R30]&gt;0.9" office:value-type="boolean" office:boolean-value="false" calcext:value-type="boolean">
            <text:p>БРЕХНЯ</text:p>
          </table:table-cell>
          <table:table-cell table:style-name="ce4" table:formula="of:=[.X30]&gt;0.8" office:value-type="boolean" office:boolean-value="false" calcext:value-type="boolean">
            <text:p>БРЕХНЯ</text:p>
          </table:table-cell>
          <table:table-cell table:style-name="ce4" table:formula="of:=[.R30]&gt;0.8" office:value-type="boolean" office:boolean-value="true" calcext:value-type="boolean">
            <text:p>ІСТИНА</text:p>
          </table:table-cell>
          <table:table-cell table:style-name="ce4" table:formula="of:=[.X30]&gt;0.7" office:value-type="boolean" office:boolean-value="true" calcext:value-type="boolean">
            <text:p>ІСТИНА</text:p>
          </table:table-cell>
          <table:table-cell table:style-name="ce4" table:formula="of:=[.R3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.6075413" calcext:value-type="float">
            <text:p>6,08E-01</text:p>
          </table:table-cell>
          <table:table-cell table:style-name="ce1" office:value-type="float" office:value="0.8927943" calcext:value-type="float">
            <text:p>8,93E-01</text:p>
          </table:table-cell>
          <table:table-cell table:style-name="ce1" office:value-type="float" office:value="0.6622616" calcext:value-type="float">
            <text:p>6,62E-01</text:p>
          </table:table-cell>
          <table:table-cell table:style-name="ce1" office:value-type="float" office:value="0.8772243" calcext:value-type="float">
            <text:p>8,77E-01</text:p>
          </table:table-cell>
          <table:table-cell table:style-name="ce1" office:value-type="float" office:value="0.647964" calcext:value-type="float">
            <text:p>6,48E-01</text:p>
          </table:table-cell>
          <table:table-cell table:style-name="ce1" office:value-type="float" office:value="0.8650193" calcext:value-type="float">
            <text:p>8,65E-01</text:p>
          </table:table-cell>
          <table:table-cell table:style-name="ce1" office:value-type="float" office:value="0.6124794" calcext:value-type="float">
            <text:p>6,12E-01</text:p>
          </table:table-cell>
          <table:table-cell table:style-name="ce1" office:value-type="float" office:value="0.8384945" calcext:value-type="float">
            <text:p>8,38E-01</text:p>
          </table:table-cell>
          <table:table-cell table:style-name="ce1" office:value-type="float" office:value="0.6305016" calcext:value-type="float">
            <text:p>6,31E-01</text:p>
          </table:table-cell>
          <table:table-cell table:style-name="ce1" office:value-type="float" office:value="0.8732137" calcext:value-type="float">
            <text:p>8,73E-01</text:p>
          </table:table-cell>
          <table:table-cell/>
          <table:table-cell table:style-name="ce1" table:formula="of:=MAX([.C31];[.E31];[.G31];[.I31];[.K31])" office:value-type="float" office:value="0.6622616" calcext:value-type="float">
            <text:p>6,62E-01</text:p>
          </table:table-cell>
          <table:table-cell table:style-name="ce8" table:formula="of:=MAX([.D31];[.F31];[.H31];[.J31];[.L31])" office:value-type="float" office:value="0.8927943" calcext:value-type="float">
            <text:p>8,93E-01</text:p>
          </table:table-cell>
          <table:table-cell table:style-name="ce1"/>
          <table:table-cell table:style-name="ce1" office:value-type="float" office:value="0.6712702" calcext:value-type="float">
            <text:p>6,71E-01</text:p>
          </table:table-cell>
          <table:table-cell table:style-name="ce1" office:value-type="float" office:value="0.8927943" calcext:value-type="float">
            <text:p>8,93E-01</text:p>
          </table:table-cell>
          <table:table-cell table:style-name="ce4" table:formula="of:=[.Q31]&gt;[.N31]" office:value-type="boolean" office:boolean-value="true" calcext:value-type="boolean">
            <text:p>ІСТИНА</text:p>
          </table:table-cell>
          <table:table-cell table:style-name="ce4" table:formula="of:=[.R31]&gt;[.O3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6928124" calcext:value-type="float">
            <text:p>6,93E-01</text:p>
          </table:table-cell>
          <table:table-cell table:style-name="ce4" table:formula="of:=[.V31]&gt;[.Q31]" office:value-type="boolean" office:boolean-value="true" calcext:value-type="boolean">
            <text:p>ІСТИНА</text:p>
          </table:table-cell>
          <table:table-cell table:style-name="ce1" table:formula="of:=MAX([.V31];[.Q31])" office:value-type="float" office:value="0.6928124" calcext:value-type="float">
            <text:p>6,93E-01</text:p>
          </table:table-cell>
          <table:table-cell table:style-name="ce4" table:formula="of:=[.X31]&gt;[.R3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1]&gt;[.C31]" office:value-type="boolean" office:boolean-value="true" calcext:value-type="boolean">
            <text:p>ІСТИНА</text:p>
          </table:table-cell>
          <table:table-cell table:style-name="ce4" table:formula="of:=[.F31]&gt;[.D31]" office:value-type="boolean" office:boolean-value="false" calcext:value-type="boolean">
            <text:p>БРЕХНЯ</text:p>
          </table:table-cell>
          <table:table-cell table:style-name="ce4" table:formula="of:=[.G31]&gt;MAX([.C31];[.E31])" office:value-type="boolean" office:boolean-value="false" calcext:value-type="boolean">
            <text:p>БРЕХНЯ</text:p>
          </table:table-cell>
          <table:table-cell table:style-name="ce4" table:formula="of:=[.H31]&gt;MAX([.D31];[.F31])" office:value-type="boolean" office:boolean-value="false" calcext:value-type="boolean">
            <text:p>БРЕХНЯ</text:p>
          </table:table-cell>
          <table:table-cell table:style-name="ce4" table:formula="of:=[.I31]&gt;MAX([.C31];[.E31];[.G31])" office:value-type="boolean" office:boolean-value="false" calcext:value-type="boolean">
            <text:p>БРЕХНЯ</text:p>
          </table:table-cell>
          <table:table-cell table:style-name="ce4" table:formula="of:=[.J31]&gt;MAX([.D31];[.F31];[.H31])" office:value-type="boolean" office:boolean-value="false" calcext:value-type="boolean">
            <text:p>БРЕХНЯ</text:p>
          </table:table-cell>
          <table:table-cell table:style-name="ce4" table:formula="of:=[.K31]&gt;MAX([.C31];[.E31];[.G31];[.I31])" office:value-type="boolean" office:boolean-value="false" calcext:value-type="boolean">
            <text:p>БРЕХНЯ</text:p>
          </table:table-cell>
          <table:table-cell table:style-name="ce4" table:formula="of:=[.L31]&gt;MAX([.D31];[.F31];[.H31];[.J3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1]&gt;0.9" office:value-type="boolean" office:boolean-value="false" calcext:value-type="boolean">
            <text:p>БРЕХНЯ</text:p>
          </table:table-cell>
          <table:table-cell table:style-name="ce4" table:formula="of:=[.R31]&gt;0.9" office:value-type="boolean" office:boolean-value="false" calcext:value-type="boolean">
            <text:p>БРЕХНЯ</text:p>
          </table:table-cell>
          <table:table-cell table:style-name="ce4" table:formula="of:=[.X31]&gt;0.8" office:value-type="boolean" office:boolean-value="false" calcext:value-type="boolean">
            <text:p>БРЕХНЯ</text:p>
          </table:table-cell>
          <table:table-cell table:style-name="ce4" table:formula="of:=[.R31]&gt;0.8" office:value-type="boolean" office:boolean-value="true" calcext:value-type="boolean">
            <text:p>ІСТИНА</text:p>
          </table:table-cell>
          <table:table-cell table:style-name="ce4" table:formula="of:=[.X31]&gt;0.7" office:value-type="boolean" office:boolean-value="false" calcext:value-type="boolean">
            <text:p>БРЕХНЯ</text:p>
          </table:table-cell>
          <table:table-cell table:style-name="ce4" table:formula="of:=[.R3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.7653698" calcext:value-type="float">
            <text:p>7,65E-01</text:p>
          </table:table-cell>
          <table:table-cell table:style-name="ce1" office:value-type="float" office:value="0.8808671" calcext:value-type="float">
            <text:p>8,81E-01</text:p>
          </table:table-cell>
          <table:table-cell table:style-name="ce1" office:value-type="float" office:value="0.7607144" calcext:value-type="float">
            <text:p>7,61E-01</text:p>
          </table:table-cell>
          <table:table-cell table:style-name="ce1" office:value-type="float" office:value="0.9163145" calcext:value-type="float">
            <text:p>9,16E-01</text:p>
          </table:table-cell>
          <table:table-cell table:style-name="ce1" office:value-type="float" office:value="0.7407116" calcext:value-type="float">
            <text:p>7,41E-01</text:p>
          </table:table-cell>
          <table:table-cell table:style-name="ce1" office:value-type="float" office:value="0.9294078" calcext:value-type="float">
            <text:p>9,29E-01</text:p>
          </table:table-cell>
          <table:table-cell table:style-name="ce1" office:value-type="float" office:value="0.6986275" calcext:value-type="float">
            <text:p>6,99E-01</text:p>
          </table:table-cell>
          <table:table-cell table:style-name="ce1" office:value-type="float" office:value="0.8856739" calcext:value-type="float">
            <text:p>8,86E-01</text:p>
          </table:table-cell>
          <table:table-cell table:style-name="ce1" office:value-type="float" office:value="0.7101841" calcext:value-type="float">
            <text:p>7,10E-01</text:p>
          </table:table-cell>
          <table:table-cell table:style-name="ce1" office:value-type="float" office:value="0.9191898" calcext:value-type="float">
            <text:p>9,19E-01</text:p>
          </table:table-cell>
          <table:table-cell/>
          <table:table-cell table:style-name="ce1" table:formula="of:=MAX([.C32];[.E32];[.G32];[.I32];[.K32])" office:value-type="float" office:value="0.7653698" calcext:value-type="float">
            <text:p>7,65E-01</text:p>
          </table:table-cell>
          <table:table-cell table:style-name="ce8" table:formula="of:=MAX([.D32];[.F32];[.H32];[.J32];[.L32])" office:value-type="float" office:value="0.9294078" calcext:value-type="float">
            <text:p>9,29E-01</text:p>
          </table:table-cell>
          <table:table-cell table:style-name="ce1"/>
          <table:table-cell table:style-name="ce1" office:value-type="float" office:value="0.7808908" calcext:value-type="float">
            <text:p>7,81E-01</text:p>
          </table:table-cell>
          <table:table-cell table:style-name="ce1" office:value-type="float" office:value="0.9294078" calcext:value-type="float">
            <text:p>9,29E-01</text:p>
          </table:table-cell>
          <table:table-cell table:style-name="ce4" table:formula="of:=[.Q32]&gt;[.N32]" office:value-type="boolean" office:boolean-value="true" calcext:value-type="boolean">
            <text:p>ІСТИНА</text:p>
          </table:table-cell>
          <table:table-cell table:style-name="ce4" table:formula="of:=[.R32]&gt;[.O3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61792" calcext:value-type="float">
            <text:p>7,86E-01</text:p>
          </table:table-cell>
          <table:table-cell table:style-name="ce4" table:formula="of:=[.V32]&gt;[.Q32]" office:value-type="boolean" office:boolean-value="true" calcext:value-type="boolean">
            <text:p>ІСТИНА</text:p>
          </table:table-cell>
          <table:table-cell table:style-name="ce1" table:formula="of:=MAX([.V32];[.Q32])" office:value-type="float" office:value="0.7861792" calcext:value-type="float">
            <text:p>7,86E-01</text:p>
          </table:table-cell>
          <table:table-cell table:style-name="ce4" table:formula="of:=[.X32]&gt;[.R3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2]&gt;[.C32]" office:value-type="boolean" office:boolean-value="false" calcext:value-type="boolean">
            <text:p>БРЕХНЯ</text:p>
          </table:table-cell>
          <table:table-cell table:style-name="ce4" table:formula="of:=[.F32]&gt;[.D32]" office:value-type="boolean" office:boolean-value="true" calcext:value-type="boolean">
            <text:p>ІСТИНА</text:p>
          </table:table-cell>
          <table:table-cell table:style-name="ce4" table:formula="of:=[.G32]&gt;MAX([.C32];[.E32])" office:value-type="boolean" office:boolean-value="false" calcext:value-type="boolean">
            <text:p>БРЕХНЯ</text:p>
          </table:table-cell>
          <table:table-cell table:style-name="ce4" table:formula="of:=[.H32]&gt;MAX([.D32];[.F32])" office:value-type="boolean" office:boolean-value="true" calcext:value-type="boolean">
            <text:p>ІСТИНА</text:p>
          </table:table-cell>
          <table:table-cell table:style-name="ce4" table:formula="of:=[.I32]&gt;MAX([.C32];[.E32];[.G32])" office:value-type="boolean" office:boolean-value="false" calcext:value-type="boolean">
            <text:p>БРЕХНЯ</text:p>
          </table:table-cell>
          <table:table-cell table:style-name="ce4" table:formula="of:=[.J32]&gt;MAX([.D32];[.F32];[.H32])" office:value-type="boolean" office:boolean-value="false" calcext:value-type="boolean">
            <text:p>БРЕХНЯ</text:p>
          </table:table-cell>
          <table:table-cell table:style-name="ce4" table:formula="of:=[.K32]&gt;MAX([.C32];[.E32];[.G32];[.I32])" office:value-type="boolean" office:boolean-value="false" calcext:value-type="boolean">
            <text:p>БРЕХНЯ</text:p>
          </table:table-cell>
          <table:table-cell table:style-name="ce4" table:formula="of:=[.L32]&gt;MAX([.D32];[.F32];[.H32];[.J32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2]&gt;0.9" office:value-type="boolean" office:boolean-value="false" calcext:value-type="boolean">
            <text:p>БРЕХНЯ</text:p>
          </table:table-cell>
          <table:table-cell table:style-name="ce4" table:formula="of:=[.R32]&gt;0.9" office:value-type="boolean" office:boolean-value="true" calcext:value-type="boolean">
            <text:p>ІСТИНА</text:p>
          </table:table-cell>
          <table:table-cell table:style-name="ce4" table:formula="of:=[.X32]&gt;0.8" office:value-type="boolean" office:boolean-value="false" calcext:value-type="boolean">
            <text:p>БРЕХНЯ</text:p>
          </table:table-cell>
          <table:table-cell table:style-name="ce4" table:formula="of:=[.R32]&gt;0.8" office:value-type="boolean" office:boolean-value="true" calcext:value-type="boolean">
            <text:p>ІСТИНА</text:p>
          </table:table-cell>
          <table:table-cell table:style-name="ce4" table:formula="of:=[.X32]&gt;0.7" office:value-type="boolean" office:boolean-value="true" calcext:value-type="boolean">
            <text:p>ІСТИНА</text:p>
          </table:table-cell>
          <table:table-cell table:style-name="ce4" table:formula="of:=[.R3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7270594" calcext:value-type="float">
            <text:p>7,27E-01</text:p>
          </table:table-cell>
          <table:table-cell table:style-name="ce1" office:value-type="float" office:value="0.8565946" calcext:value-type="float">
            <text:p>8,57E-01</text:p>
          </table:table-cell>
          <table:table-cell table:style-name="ce1" office:value-type="float" office:value="0.7580012" calcext:value-type="float">
            <text:p>7,58E-01</text:p>
          </table:table-cell>
          <table:table-cell table:style-name="ce1" office:value-type="float" office:value="0.8498998" calcext:value-type="float">
            <text:p>8,50E-01</text:p>
          </table:table-cell>
          <table:table-cell table:style-name="ce1" office:value-type="float" office:value="0.7218616" calcext:value-type="float">
            <text:p>7,22E-01</text:p>
          </table:table-cell>
          <table:table-cell table:style-name="ce1" office:value-type="float" office:value="0.8814152" calcext:value-type="float">
            <text:p>8,81E-01</text:p>
          </table:table-cell>
          <table:table-cell/>
          <table:table-cell table:style-name="ce1" office:value-type="float" office:value="0.899448" calcext:value-type="float">
            <text:p>8,99E-01</text:p>
          </table:table-cell>
          <table:table-cell table:style-name="ce1" office:value-type="float" office:value="0.7713025" calcext:value-type="float">
            <text:p>7,71E-01</text:p>
          </table:table-cell>
          <table:table-cell table:style-name="ce1" office:value-type="float" office:value="0.8429116" calcext:value-type="float">
            <text:p>8,43E-01</text:p>
          </table:table-cell>
          <table:table-cell/>
          <table:table-cell table:style-name="ce1" table:formula="of:=MAX([.C33];[.E33];[.G33];[.I33];[.K33])" office:value-type="float" office:value="0.7713025" calcext:value-type="float">
            <text:p>7,71E-01</text:p>
          </table:table-cell>
          <table:table-cell table:style-name="ce8" table:formula="of:=MAX([.D33];[.F33];[.H33];[.J33];[.L33])" office:value-type="float" office:value="0.899448" calcext:value-type="float">
            <text:p>8,99E-01</text:p>
          </table:table-cell>
          <table:table-cell table:style-name="ce1"/>
          <table:table-cell table:style-name="ce1" office:value-type="float" office:value="0.7713025" calcext:value-type="float">
            <text:p>7,71E-01</text:p>
          </table:table-cell>
          <table:table-cell table:style-name="ce1" office:value-type="float" office:value="0.899448" calcext:value-type="float">
            <text:p>8,99E-01</text:p>
          </table:table-cell>
          <table:table-cell table:style-name="ce4" table:formula="of:=[.Q33]&gt;[.N33]" office:value-type="boolean" office:boolean-value="false" calcext:value-type="boolean">
            <text:p>БРЕХНЯ</text:p>
          </table:table-cell>
          <table:table-cell table:style-name="ce4" table:formula="of:=[.R33]&gt;[.O3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713025" calcext:value-type="float">
            <text:p>7,71E-01</text:p>
          </table:table-cell>
          <table:table-cell table:style-name="ce4" table:formula="of:=[.V33]&gt;[.Q33]" office:value-type="boolean" office:boolean-value="false" calcext:value-type="boolean">
            <text:p>БРЕХНЯ</text:p>
          </table:table-cell>
          <table:table-cell table:style-name="ce1" table:formula="of:=MAX([.V33];[.Q33])" office:value-type="float" office:value="0.7713025" calcext:value-type="float">
            <text:p>7,71E-01</text:p>
          </table:table-cell>
          <table:table-cell table:style-name="ce4" table:formula="of:=[.X33]&gt;[.R3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3]&gt;[.C33]" office:value-type="boolean" office:boolean-value="true" calcext:value-type="boolean">
            <text:p>ІСТИНА</text:p>
          </table:table-cell>
          <table:table-cell table:style-name="ce4" table:formula="of:=[.F33]&gt;[.D33]" office:value-type="boolean" office:boolean-value="false" calcext:value-type="boolean">
            <text:p>БРЕХНЯ</text:p>
          </table:table-cell>
          <table:table-cell table:style-name="ce4" table:formula="of:=[.G33]&gt;MAX([.C33];[.E33])" office:value-type="boolean" office:boolean-value="false" calcext:value-type="boolean">
            <text:p>БРЕХНЯ</text:p>
          </table:table-cell>
          <table:table-cell table:style-name="ce4" table:formula="of:=[.H33]&gt;MAX([.D33];[.F33])" office:value-type="boolean" office:boolean-value="true" calcext:value-type="boolean">
            <text:p>ІСТИНА</text:p>
          </table:table-cell>
          <table:table-cell table:style-name="ce4" table:formula="of:=[.I33]&gt;MAX([.C33];[.E33];[.G33])" office:value-type="boolean" office:boolean-value="false" calcext:value-type="boolean">
            <text:p>БРЕХНЯ</text:p>
          </table:table-cell>
          <table:table-cell table:style-name="ce4" table:formula="of:=[.J33]&gt;MAX([.D33];[.F33];[.H33])" office:value-type="boolean" office:boolean-value="true" calcext:value-type="boolean">
            <text:p>ІСТИНА</text:p>
          </table:table-cell>
          <table:table-cell table:style-name="ce4" table:formula="of:=[.K33]&gt;MAX([.C33];[.E33];[.G33];[.I33])" office:value-type="boolean" office:boolean-value="true" calcext:value-type="boolean">
            <text:p>ІСТИНА</text:p>
          </table:table-cell>
          <table:table-cell table:style-name="ce4" table:formula="of:=[.L33]&gt;MAX([.D33];[.F33];[.H33];[.J3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3]&gt;0.9" office:value-type="boolean" office:boolean-value="false" calcext:value-type="boolean">
            <text:p>БРЕХНЯ</text:p>
          </table:table-cell>
          <table:table-cell table:style-name="ce4" table:formula="of:=[.R33]&gt;0.9" office:value-type="boolean" office:boolean-value="false" calcext:value-type="boolean">
            <text:p>БРЕХНЯ</text:p>
          </table:table-cell>
          <table:table-cell table:style-name="ce4" table:formula="of:=[.X33]&gt;0.8" office:value-type="boolean" office:boolean-value="false" calcext:value-type="boolean">
            <text:p>БРЕХНЯ</text:p>
          </table:table-cell>
          <table:table-cell table:style-name="ce4" table:formula="of:=[.R33]&gt;0.8" office:value-type="boolean" office:boolean-value="true" calcext:value-type="boolean">
            <text:p>ІСТИНА</text:p>
          </table:table-cell>
          <table:table-cell table:style-name="ce4" table:formula="of:=[.X33]&gt;0.7" office:value-type="boolean" office:boolean-value="true" calcext:value-type="boolean">
            <text:p>ІСТИНА</text:p>
          </table:table-cell>
          <table:table-cell table:style-name="ce4" table:formula="of:=[.R3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.2948038" calcext:value-type="float">
            <text:p>2,95E-01</text:p>
          </table:table-cell>
          <table:table-cell table:style-name="ce1" office:value-type="float" office:value="0.1702566" calcext:value-type="float">
            <text:p>1,70E-01</text:p>
          </table:table-cell>
          <table:table-cell table:style-name="ce1" office:value-type="float" office:value="0.2181009" calcext:value-type="float">
            <text:p>2,18E-01</text:p>
          </table:table-cell>
          <table:table-cell table:style-name="ce1" office:value-type="float" office:value="0.1685665" calcext:value-type="float">
            <text:p>1,69E-01</text:p>
          </table:table-cell>
          <table:table-cell table:style-name="ce1" office:value-type="float" office:value="0.2386357" calcext:value-type="float">
            <text:p>2,39E-01</text:p>
          </table:table-cell>
          <table:table-cell table:style-name="ce1" office:value-type="float" office:value="0.3722694" calcext:value-type="float">
            <text:p>3,72E-01</text:p>
          </table:table-cell>
          <table:table-cell table:style-name="ce1" office:value-type="float" office:value="0.3187662" calcext:value-type="float">
            <text:p>3,19E-01</text:p>
          </table:table-cell>
          <table:table-cell table:style-name="ce1" office:value-type="float" office:value="0.4658513" calcext:value-type="float">
            <text:p>4,66E-01</text:p>
          </table:table-cell>
          <table:table-cell table:style-name="ce1" office:value-type="float" office:value="0.2239106" calcext:value-type="float">
            <text:p>2,24E-01</text:p>
          </table:table-cell>
          <table:table-cell table:style-name="ce1" office:value-type="float" office:value="0.5452046" calcext:value-type="float">
            <text:p>5,45E-01</text:p>
          </table:table-cell>
          <table:table-cell/>
          <table:table-cell table:style-name="ce1" table:formula="of:=MAX([.C34];[.E34];[.G34];[.I34];[.K34])" office:value-type="float" office:value="0.3187662" calcext:value-type="float">
            <text:p>3,19E-01</text:p>
          </table:table-cell>
          <table:table-cell table:style-name="ce8" table:formula="of:=MAX([.D34];[.F34];[.H34];[.J34];[.L34])" office:value-type="float" office:value="0.5452046" calcext:value-type="float">
            <text:p>5,45E-01</text:p>
          </table:table-cell>
          <table:table-cell table:style-name="ce2"/>
          <table:table-cell table:style-name="ce1" office:value-type="float" office:value="0.6279274" calcext:value-type="float">
            <text:p>6,28E-01</text:p>
          </table:table-cell>
          <table:table-cell table:style-name="ce1" office:value-type="float" office:value="0.7646378" calcext:value-type="float">
            <text:p>7,65E-01</text:p>
          </table:table-cell>
          <table:table-cell table:style-name="ce4" table:formula="of:=[.Q34]&gt;[.N34]" office:value-type="boolean" office:boolean-value="true" calcext:value-type="boolean">
            <text:p>ІСТИНА</text:p>
          </table:table-cell>
          <table:table-cell table:style-name="ce4" table:formula="of:=[.R34]&gt;[.O34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716645" calcext:value-type="float">
            <text:p>6,72E-01</text:p>
          </table:table-cell>
          <table:table-cell table:style-name="ce4" table:formula="of:=[.V34]&gt;[.Q34]" office:value-type="boolean" office:boolean-value="true" calcext:value-type="boolean">
            <text:p>ІСТИНА</text:p>
          </table:table-cell>
          <table:table-cell table:style-name="ce1" table:formula="of:=MAX([.V34];[.Q34])" office:value-type="float" office:value="0.6716645" calcext:value-type="float">
            <text:p>6,72E-01</text:p>
          </table:table-cell>
          <table:table-cell table:style-name="ce4" table:formula="of:=[.X34]&gt;[.R3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4]&gt;[.C34]" office:value-type="boolean" office:boolean-value="false" calcext:value-type="boolean">
            <text:p>БРЕХНЯ</text:p>
          </table:table-cell>
          <table:table-cell table:style-name="ce4" table:formula="of:=[.F34]&gt;[.D34]" office:value-type="boolean" office:boolean-value="false" calcext:value-type="boolean">
            <text:p>БРЕХНЯ</text:p>
          </table:table-cell>
          <table:table-cell table:style-name="ce4" table:formula="of:=[.G34]&gt;MAX([.C34];[.E34])" office:value-type="boolean" office:boolean-value="false" calcext:value-type="boolean">
            <text:p>БРЕХНЯ</text:p>
          </table:table-cell>
          <table:table-cell table:style-name="ce4" table:formula="of:=[.H34]&gt;MAX([.D34];[.F34])" office:value-type="boolean" office:boolean-value="true" calcext:value-type="boolean">
            <text:p>ІСТИНА</text:p>
          </table:table-cell>
          <table:table-cell table:style-name="ce4" table:formula="of:=[.I34]&gt;MAX([.C34];[.E34];[.G34])" office:value-type="boolean" office:boolean-value="true" calcext:value-type="boolean">
            <text:p>ІСТИНА</text:p>
          </table:table-cell>
          <table:table-cell table:style-name="ce4" table:formula="of:=[.J34]&gt;MAX([.D34];[.F34];[.H34])" office:value-type="boolean" office:boolean-value="true" calcext:value-type="boolean">
            <text:p>ІСТИНА</text:p>
          </table:table-cell>
          <table:table-cell table:style-name="ce4" table:formula="of:=[.K34]&gt;MAX([.C34];[.E34];[.G34];[.I34])" office:value-type="boolean" office:boolean-value="false" calcext:value-type="boolean">
            <text:p>БРЕХНЯ</text:p>
          </table:table-cell>
          <table:table-cell table:style-name="ce4" table:formula="of:=[.L34]&gt;MAX([.D34];[.F34];[.H34];[.J34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34]&gt;0.9" office:value-type="boolean" office:boolean-value="false" calcext:value-type="boolean">
            <text:p>БРЕХНЯ</text:p>
          </table:table-cell>
          <table:table-cell table:style-name="ce4" table:formula="of:=[.R34]&gt;0.9" office:value-type="boolean" office:boolean-value="false" calcext:value-type="boolean">
            <text:p>БРЕХНЯ</text:p>
          </table:table-cell>
          <table:table-cell table:style-name="ce4" table:formula="of:=[.X34]&gt;0.8" office:value-type="boolean" office:boolean-value="false" calcext:value-type="boolean">
            <text:p>БРЕХНЯ</text:p>
          </table:table-cell>
          <table:table-cell table:style-name="ce4" table:formula="of:=[.R34]&gt;0.8" office:value-type="boolean" office:boolean-value="false" calcext:value-type="boolean">
            <text:p>БРЕХНЯ</text:p>
          </table:table-cell>
          <table:table-cell table:style-name="ce4" table:formula="of:=[.X34]&gt;0.7" office:value-type="boolean" office:boolean-value="false" calcext:value-type="boolean">
            <text:p>БРЕХНЯ</text:p>
          </table:table-cell>
          <table:table-cell table:style-name="ce4" table:formula="of:=[.R3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.7467517" calcext:value-type="float">
            <text:p>7,47E-01</text:p>
          </table:table-cell>
          <table:table-cell table:style-name="ce1" office:value-type="float" office:value="0.8227246" calcext:value-type="float">
            <text:p>8,23E-01</text:p>
          </table:table-cell>
          <table:table-cell table:style-name="ce1" office:value-type="float" office:value="0.7379855" calcext:value-type="float">
            <text:p>7,38E-01</text:p>
          </table:table-cell>
          <table:table-cell table:style-name="ce1" office:value-type="float" office:value="0.8312436" calcext:value-type="float">
            <text:p>8,31E-01</text:p>
          </table:table-cell>
          <table:table-cell table:style-name="ce1" office:value-type="float" office:value="0.7063024" calcext:value-type="float">
            <text:p>7,06E-01</text:p>
          </table:table-cell>
          <table:table-cell table:style-name="ce1" office:value-type="float" office:value="0.8108356" calcext:value-type="float">
            <text:p>8,11E-01</text:p>
          </table:table-cell>
          <table:table-cell table:style-name="ce1" office:value-type="float" office:value="0.7253821" calcext:value-type="float">
            <text:p>7,25E-01</text:p>
          </table:table-cell>
          <table:table-cell table:style-name="ce1" office:value-type="float" office:value="0.79252" calcext:value-type="float">
            <text:p>7,93E-01</text:p>
          </table:table-cell>
          <table:table-cell table:style-name="ce1" office:value-type="float" office:value="0.7537545" calcext:value-type="float">
            <text:p>7,54E-01</text:p>
          </table:table-cell>
          <table:table-cell table:style-name="ce1" office:value-type="float" office:value="0.7935381" calcext:value-type="float">
            <text:p>7,94E-01</text:p>
          </table:table-cell>
          <table:table-cell/>
          <table:table-cell table:style-name="ce1" table:formula="of:=MAX([.C35];[.E35];[.G35];[.I35];[.K35])" office:value-type="float" office:value="0.7537545" calcext:value-type="float">
            <text:p>7,54E-01</text:p>
          </table:table-cell>
          <table:table-cell table:style-name="ce8" table:formula="of:=MAX([.D35];[.F35];[.H35];[.J35];[.L35])" office:value-type="float" office:value="0.8312436" calcext:value-type="float">
            <text:p>8,31E-01</text:p>
          </table:table-cell>
          <table:table-cell table:style-name="ce1"/>
          <table:table-cell table:style-name="ce1" office:value-type="float" office:value="0.7537545" calcext:value-type="float">
            <text:p>7,54E-01</text:p>
          </table:table-cell>
          <table:table-cell table:style-name="ce1" office:value-type="float" office:value="0.8312436" calcext:value-type="float">
            <text:p>8,31E-01</text:p>
          </table:table-cell>
          <table:table-cell table:style-name="ce4" table:formula="of:=[.Q35]&gt;[.N35]" office:value-type="boolean" office:boolean-value="false" calcext:value-type="boolean">
            <text:p>БРЕХНЯ</text:p>
          </table:table-cell>
          <table:table-cell table:style-name="ce4" table:formula="of:=[.R35]&gt;[.O3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49104" calcext:value-type="float">
            <text:p>7,55E-01</text:p>
          </table:table-cell>
          <table:table-cell table:style-name="ce4" table:formula="of:=[.V35]&gt;[.Q35]" office:value-type="boolean" office:boolean-value="true" calcext:value-type="boolean">
            <text:p>ІСТИНА</text:p>
          </table:table-cell>
          <table:table-cell table:style-name="ce1" table:formula="of:=MAX([.V35];[.Q35])" office:value-type="float" office:value="0.7549104" calcext:value-type="float">
            <text:p>7,55E-01</text:p>
          </table:table-cell>
          <table:table-cell table:style-name="ce4" table:formula="of:=[.X35]&gt;[.R3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5]&gt;[.C35]" office:value-type="boolean" office:boolean-value="false" calcext:value-type="boolean">
            <text:p>БРЕХНЯ</text:p>
          </table:table-cell>
          <table:table-cell table:style-name="ce4" table:formula="of:=[.F35]&gt;[.D35]" office:value-type="boolean" office:boolean-value="true" calcext:value-type="boolean">
            <text:p>ІСТИНА</text:p>
          </table:table-cell>
          <table:table-cell table:style-name="ce4" table:formula="of:=[.G35]&gt;MAX([.C35];[.E35])" office:value-type="boolean" office:boolean-value="false" calcext:value-type="boolean">
            <text:p>БРЕХНЯ</text:p>
          </table:table-cell>
          <table:table-cell table:style-name="ce4" table:formula="of:=[.H35]&gt;MAX([.D35];[.F35])" office:value-type="boolean" office:boolean-value="false" calcext:value-type="boolean">
            <text:p>БРЕХНЯ</text:p>
          </table:table-cell>
          <table:table-cell table:style-name="ce4" table:formula="of:=[.I35]&gt;MAX([.C35];[.E35];[.G35])" office:value-type="boolean" office:boolean-value="false" calcext:value-type="boolean">
            <text:p>БРЕХНЯ</text:p>
          </table:table-cell>
          <table:table-cell table:style-name="ce4" table:formula="of:=[.J35]&gt;MAX([.D35];[.F35];[.H35])" office:value-type="boolean" office:boolean-value="false" calcext:value-type="boolean">
            <text:p>БРЕХНЯ</text:p>
          </table:table-cell>
          <table:table-cell table:style-name="ce4" table:formula="of:=[.K35]&gt;MAX([.C35];[.E35];[.G35];[.I35])" office:value-type="boolean" office:boolean-value="true" calcext:value-type="boolean">
            <text:p>ІСТИНА</text:p>
          </table:table-cell>
          <table:table-cell table:style-name="ce4" table:formula="of:=[.L35]&gt;MAX([.D35];[.F35];[.H35];[.J3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5]&gt;0.9" office:value-type="boolean" office:boolean-value="false" calcext:value-type="boolean">
            <text:p>БРЕХНЯ</text:p>
          </table:table-cell>
          <table:table-cell table:style-name="ce4" table:formula="of:=[.R35]&gt;0.9" office:value-type="boolean" office:boolean-value="false" calcext:value-type="boolean">
            <text:p>БРЕХНЯ</text:p>
          </table:table-cell>
          <table:table-cell table:style-name="ce4" table:formula="of:=[.X35]&gt;0.8" office:value-type="boolean" office:boolean-value="false" calcext:value-type="boolean">
            <text:p>БРЕХНЯ</text:p>
          </table:table-cell>
          <table:table-cell table:style-name="ce4" table:formula="of:=[.R35]&gt;0.8" office:value-type="boolean" office:boolean-value="true" calcext:value-type="boolean">
            <text:p>ІСТИНА</text:p>
          </table:table-cell>
          <table:table-cell table:style-name="ce4" table:formula="of:=[.X35]&gt;0.7" office:value-type="boolean" office:boolean-value="true" calcext:value-type="boolean">
            <text:p>ІСТИНА</text:p>
          </table:table-cell>
          <table:table-cell table:style-name="ce4" table:formula="of:=[.R3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.7672851" calcext:value-type="float">
            <text:p>7,67E-01</text:p>
          </table:table-cell>
          <table:table-cell table:style-name="ce1" office:value-type="float" office:value="0.8072436" calcext:value-type="float">
            <text:p>8,07E-01</text:p>
          </table:table-cell>
          <table:table-cell table:style-name="ce1" office:value-type="float" office:value="0.665131" calcext:value-type="float">
            <text:p>6,65E-01</text:p>
          </table:table-cell>
          <table:table-cell table:style-name="ce1" office:value-type="float" office:value="0.8961958" calcext:value-type="float">
            <text:p>8,96E-01</text:p>
          </table:table-cell>
          <table:table-cell table:style-name="ce1" office:value-type="float" office:value="0.7581364" calcext:value-type="float">
            <text:p>7,58E-01</text:p>
          </table:table-cell>
          <table:table-cell table:style-name="ce1" office:value-type="float" office:value="0.8642932" calcext:value-type="float">
            <text:p>8,64E-01</text:p>
          </table:table-cell>
          <table:table-cell table:style-name="ce1" office:value-type="float" office:value="0.8115594" calcext:value-type="float">
            <text:p>8,12E-01</text:p>
          </table:table-cell>
          <table:table-cell table:style-name="ce1" office:value-type="float" office:value="0.7319221" calcext:value-type="float">
            <text:p>7,32E-01</text:p>
          </table:table-cell>
          <table:table-cell table:style-name="ce1" office:value-type="float" office:value="0.7476309" calcext:value-type="float">
            <text:p>7,48E-01</text:p>
          </table:table-cell>
          <table:table-cell table:style-name="ce1" office:value-type="float" office:value="0.8534204" calcext:value-type="float">
            <text:p>8,53E-01</text:p>
          </table:table-cell>
          <table:table-cell/>
          <table:table-cell table:style-name="ce1" table:formula="of:=MAX([.C36];[.E36];[.G36];[.I36];[.K36])" office:value-type="float" office:value="0.8115594" calcext:value-type="float">
            <text:p>8,12E-01</text:p>
          </table:table-cell>
          <table:table-cell table:style-name="ce8" table:formula="of:=MAX([.D36];[.F36];[.H36];[.J36];[.L36])" office:value-type="float" office:value="0.8961958" calcext:value-type="float">
            <text:p>8,96E-01</text:p>
          </table:table-cell>
          <table:table-cell table:style-name="ce1"/>
          <table:table-cell table:style-name="ce1" office:value-type="float" office:value="0.8115594" calcext:value-type="float">
            <text:p>8,12E-01</text:p>
          </table:table-cell>
          <table:table-cell table:style-name="ce1" office:value-type="float" office:value="0.8961958" calcext:value-type="float">
            <text:p>8,96E-01</text:p>
          </table:table-cell>
          <table:table-cell table:style-name="ce4" table:formula="of:=[.Q36]&gt;[.N36]" office:value-type="boolean" office:boolean-value="false" calcext:value-type="boolean">
            <text:p>БРЕХНЯ</text:p>
          </table:table-cell>
          <table:table-cell table:style-name="ce4" table:formula="of:=[.R36]&gt;[.O3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8115594" calcext:value-type="float">
            <text:p>8,12E-01</text:p>
          </table:table-cell>
          <table:table-cell table:style-name="ce4" table:formula="of:=[.V36]&gt;[.Q36]" office:value-type="boolean" office:boolean-value="false" calcext:value-type="boolean">
            <text:p>БРЕХНЯ</text:p>
          </table:table-cell>
          <table:table-cell table:style-name="ce1" table:formula="of:=MAX([.V36];[.Q36])" office:value-type="float" office:value="0.8115594" calcext:value-type="float">
            <text:p>8,12E-01</text:p>
          </table:table-cell>
          <table:table-cell table:style-name="ce4" table:formula="of:=[.X36]&gt;[.R3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6]&gt;[.C36]" office:value-type="boolean" office:boolean-value="false" calcext:value-type="boolean">
            <text:p>БРЕХНЯ</text:p>
          </table:table-cell>
          <table:table-cell table:style-name="ce4" table:formula="of:=[.F36]&gt;[.D36]" office:value-type="boolean" office:boolean-value="true" calcext:value-type="boolean">
            <text:p>ІСТИНА</text:p>
          </table:table-cell>
          <table:table-cell table:style-name="ce4" table:formula="of:=[.G36]&gt;MAX([.C36];[.E36])" office:value-type="boolean" office:boolean-value="false" calcext:value-type="boolean">
            <text:p>БРЕХНЯ</text:p>
          </table:table-cell>
          <table:table-cell table:style-name="ce4" table:formula="of:=[.H36]&gt;MAX([.D36];[.F36])" office:value-type="boolean" office:boolean-value="false" calcext:value-type="boolean">
            <text:p>БРЕХНЯ</text:p>
          </table:table-cell>
          <table:table-cell table:style-name="ce4" table:formula="of:=[.I36]&gt;MAX([.C36];[.E36];[.G36])" office:value-type="boolean" office:boolean-value="true" calcext:value-type="boolean">
            <text:p>ІСТИНА</text:p>
          </table:table-cell>
          <table:table-cell table:style-name="ce4" table:formula="of:=[.J36]&gt;MAX([.D36];[.F36];[.H36])" office:value-type="boolean" office:boolean-value="false" calcext:value-type="boolean">
            <text:p>БРЕХНЯ</text:p>
          </table:table-cell>
          <table:table-cell table:style-name="ce4" table:formula="of:=[.K36]&gt;MAX([.C36];[.E36];[.G36];[.I36])" office:value-type="boolean" office:boolean-value="false" calcext:value-type="boolean">
            <text:p>БРЕХНЯ</text:p>
          </table:table-cell>
          <table:table-cell table:style-name="ce4" table:formula="of:=[.L36]&gt;MAX([.D36];[.F36];[.H36];[.J3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6]&gt;0.9" office:value-type="boolean" office:boolean-value="false" calcext:value-type="boolean">
            <text:p>БРЕХНЯ</text:p>
          </table:table-cell>
          <table:table-cell table:style-name="ce4" table:formula="of:=[.R36]&gt;0.9" office:value-type="boolean" office:boolean-value="false" calcext:value-type="boolean">
            <text:p>БРЕХНЯ</text:p>
          </table:table-cell>
          <table:table-cell table:style-name="ce4" table:formula="of:=[.X36]&gt;0.8" office:value-type="boolean" office:boolean-value="true" calcext:value-type="boolean">
            <text:p>ІСТИНА</text:p>
          </table:table-cell>
          <table:table-cell table:style-name="ce4" table:formula="of:=[.R36]&gt;0.8" office:value-type="boolean" office:boolean-value="true" calcext:value-type="boolean">
            <text:p>ІСТИНА</text:p>
          </table:table-cell>
          <table:table-cell table:style-name="ce4" table:formula="of:=[.X36]&gt;0.7" office:value-type="boolean" office:boolean-value="true" calcext:value-type="boolean">
            <text:p>ІСТИНА</text:p>
          </table:table-cell>
          <table:table-cell table:style-name="ce4" table:formula="of:=[.R3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0.7834816" calcext:value-type="float">
            <text:p>7,83E-01</text:p>
          </table:table-cell>
          <table:table-cell table:style-name="ce1" office:value-type="float" office:value="0.8893351" calcext:value-type="float">
            <text:p>8,89E-01</text:p>
          </table:table-cell>
          <table:table-cell table:style-name="ce1" office:value-type="float" office:value="0.7373135" calcext:value-type="float">
            <text:p>7,37E-01</text:p>
          </table:table-cell>
          <table:table-cell table:style-name="ce1" office:value-type="float" office:value="0.9001049" calcext:value-type="float">
            <text:p>9,00E-01</text:p>
          </table:table-cell>
          <table:table-cell table:style-name="ce1" office:value-type="float" office:value="0.7341257" calcext:value-type="float">
            <text:p>7,34E-01</text:p>
          </table:table-cell>
          <table:table-cell table:style-name="ce1" office:value-type="float" office:value="0.9114446" calcext:value-type="float">
            <text:p>9,11E-01</text:p>
          </table:table-cell>
          <table:table-cell table:style-name="ce1" office:value-type="float" office:value="0.7454873" calcext:value-type="float">
            <text:p>7,45E-01</text:p>
          </table:table-cell>
          <table:table-cell table:style-name="ce1" office:value-type="float" office:value="0.9252455" calcext:value-type="float">
            <text:p>9,25E-01</text:p>
          </table:table-cell>
          <table:table-cell table:style-name="ce1" office:value-type="float" office:value="0.7163471" calcext:value-type="float">
            <text:p>7,16E-01</text:p>
          </table:table-cell>
          <table:table-cell table:style-name="ce1" office:value-type="float" office:value="0.8384577" calcext:value-type="float">
            <text:p>8,38E-01</text:p>
          </table:table-cell>
          <table:table-cell/>
          <table:table-cell table:style-name="ce1" table:formula="of:=MAX([.C37];[.E37];[.G37];[.I37];[.K37])" office:value-type="float" office:value="0.7834816" calcext:value-type="float">
            <text:p>7,83E-01</text:p>
          </table:table-cell>
          <table:table-cell table:style-name="ce8" table:formula="of:=MAX([.D37];[.F37];[.H37];[.J37];[.L37])" office:value-type="float" office:value="0.9252455" calcext:value-type="float">
            <text:p>9,25E-01</text:p>
          </table:table-cell>
          <table:table-cell table:style-name="ce1"/>
          <table:table-cell table:style-name="ce1" office:value-type="float" office:value="0.7935005" calcext:value-type="float">
            <text:p>7,94E-01</text:p>
          </table:table-cell>
          <table:table-cell table:style-name="ce1" office:value-type="float" office:value="0.9252455" calcext:value-type="float">
            <text:p>9,25E-01</text:p>
          </table:table-cell>
          <table:table-cell table:style-name="ce4" table:formula="of:=[.Q37]&gt;[.N37]" office:value-type="boolean" office:boolean-value="true" calcext:value-type="boolean">
            <text:p>ІСТИНА</text:p>
          </table:table-cell>
          <table:table-cell table:style-name="ce4" table:formula="of:=[.R37]&gt;[.O3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935005" calcext:value-type="float">
            <text:p>7,94E-01</text:p>
          </table:table-cell>
          <table:table-cell table:style-name="ce4" table:formula="of:=[.V37]&gt;[.Q37]" office:value-type="boolean" office:boolean-value="false" calcext:value-type="boolean">
            <text:p>БРЕХНЯ</text:p>
          </table:table-cell>
          <table:table-cell table:style-name="ce1" table:formula="of:=MAX([.V37];[.Q37])" office:value-type="float" office:value="0.7935005" calcext:value-type="float">
            <text:p>7,94E-01</text:p>
          </table:table-cell>
          <table:table-cell table:style-name="ce4" table:formula="of:=[.X37]&gt;[.R3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7]&gt;[.C37]" office:value-type="boolean" office:boolean-value="false" calcext:value-type="boolean">
            <text:p>БРЕХНЯ</text:p>
          </table:table-cell>
          <table:table-cell table:style-name="ce4" table:formula="of:=[.F37]&gt;[.D37]" office:value-type="boolean" office:boolean-value="true" calcext:value-type="boolean">
            <text:p>ІСТИНА</text:p>
          </table:table-cell>
          <table:table-cell table:style-name="ce4" table:formula="of:=[.G37]&gt;MAX([.C37];[.E37])" office:value-type="boolean" office:boolean-value="false" calcext:value-type="boolean">
            <text:p>БРЕХНЯ</text:p>
          </table:table-cell>
          <table:table-cell table:style-name="ce4" table:formula="of:=[.H37]&gt;MAX([.D37];[.F37])" office:value-type="boolean" office:boolean-value="true" calcext:value-type="boolean">
            <text:p>ІСТИНА</text:p>
          </table:table-cell>
          <table:table-cell table:style-name="ce4" table:formula="of:=[.I37]&gt;MAX([.C37];[.E37];[.G37])" office:value-type="boolean" office:boolean-value="false" calcext:value-type="boolean">
            <text:p>БРЕХНЯ</text:p>
          </table:table-cell>
          <table:table-cell table:style-name="ce4" table:formula="of:=[.J37]&gt;MAX([.D37];[.F37];[.H37])" office:value-type="boolean" office:boolean-value="true" calcext:value-type="boolean">
            <text:p>ІСТИНА</text:p>
          </table:table-cell>
          <table:table-cell table:style-name="ce4" table:formula="of:=[.K37]&gt;MAX([.C37];[.E37];[.G37];[.I37])" office:value-type="boolean" office:boolean-value="false" calcext:value-type="boolean">
            <text:p>БРЕХНЯ</text:p>
          </table:table-cell>
          <table:table-cell table:style-name="ce4" table:formula="of:=[.L37]&gt;MAX([.D37];[.F37];[.H37];[.J37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7]&gt;0.9" office:value-type="boolean" office:boolean-value="false" calcext:value-type="boolean">
            <text:p>БРЕХНЯ</text:p>
          </table:table-cell>
          <table:table-cell table:style-name="ce4" table:formula="of:=[.R37]&gt;0.9" office:value-type="boolean" office:boolean-value="true" calcext:value-type="boolean">
            <text:p>ІСТИНА</text:p>
          </table:table-cell>
          <table:table-cell table:style-name="ce4" table:formula="of:=[.X37]&gt;0.8" office:value-type="boolean" office:boolean-value="false" calcext:value-type="boolean">
            <text:p>БРЕХНЯ</text:p>
          </table:table-cell>
          <table:table-cell table:style-name="ce4" table:formula="of:=[.R37]&gt;0.8" office:value-type="boolean" office:boolean-value="true" calcext:value-type="boolean">
            <text:p>ІСТИНА</text:p>
          </table:table-cell>
          <table:table-cell table:style-name="ce4" table:formula="of:=[.X37]&gt;0.7" office:value-type="boolean" office:boolean-value="true" calcext:value-type="boolean">
            <text:p>ІСТИНА</text:p>
          </table:table-cell>
          <table:table-cell table:style-name="ce4" table:formula="of:=[.R3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0.646415" calcext:value-type="float">
            <text:p>6,46E-01</text:p>
          </table:table-cell>
          <table:table-cell table:style-name="ce1" office:value-type="float" office:value="0.8289239" calcext:value-type="float">
            <text:p>8,29E-01</text:p>
          </table:table-cell>
          <table:table-cell table:style-name="ce1" office:value-type="float" office:value="0.6568702" calcext:value-type="float">
            <text:p>6,57E-01</text:p>
          </table:table-cell>
          <table:table-cell table:style-name="ce1" office:value-type="float" office:value="0.9166739" calcext:value-type="float">
            <text:p>9,17E-01</text:p>
          </table:table-cell>
          <table:table-cell table:style-name="ce1" office:value-type="float" office:value="0.6707907" calcext:value-type="float">
            <text:p>6,71E-01</text:p>
          </table:table-cell>
          <table:table-cell table:style-name="ce1" office:value-type="float" office:value="0.8552806" calcext:value-type="float">
            <text:p>8,55E-01</text:p>
          </table:table-cell>
          <table:table-cell table:style-name="ce1" office:value-type="float" office:value="0.7148879" calcext:value-type="float">
            <text:p>7,15E-01</text:p>
          </table:table-cell>
          <table:table-cell table:style-name="ce1" office:value-type="float" office:value="0.823812" calcext:value-type="float">
            <text:p>8,24E-01</text:p>
          </table:table-cell>
          <table:table-cell table:style-name="ce1" office:value-type="float" office:value="0.7220796" calcext:value-type="float">
            <text:p>7,22E-01</text:p>
          </table:table-cell>
          <table:table-cell table:style-name="ce1" office:value-type="float" office:value="0.8907584" calcext:value-type="float">
            <text:p>8,91E-01</text:p>
          </table:table-cell>
          <table:table-cell/>
          <table:table-cell table:style-name="ce1" table:formula="of:=MAX([.C38];[.E38];[.G38];[.I38];[.K38])" office:value-type="float" office:value="0.7220796" calcext:value-type="float">
            <text:p>7,22E-01</text:p>
          </table:table-cell>
          <table:table-cell table:style-name="ce8" table:formula="of:=MAX([.D38];[.F38];[.H38];[.J38];[.L38])" office:value-type="float" office:value="0.9166739" calcext:value-type="float">
            <text:p>9,17E-01</text:p>
          </table:table-cell>
          <table:table-cell table:style-name="ce1"/>
          <table:table-cell table:style-name="ce1" office:value-type="float" office:value="0.7423828" calcext:value-type="float">
            <text:p>7,42E-01</text:p>
          </table:table-cell>
          <table:table-cell table:style-name="ce1" office:value-type="float" office:value="0.9166739" calcext:value-type="float">
            <text:p>9,17E-01</text:p>
          </table:table-cell>
          <table:table-cell table:style-name="ce4" table:formula="of:=[.Q38]&gt;[.N38]" office:value-type="boolean" office:boolean-value="true" calcext:value-type="boolean">
            <text:p>ІСТИНА</text:p>
          </table:table-cell>
          <table:table-cell table:style-name="ce4" table:formula="of:=[.R38]&gt;[.O3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423828" calcext:value-type="float">
            <text:p>7,42E-01</text:p>
          </table:table-cell>
          <table:table-cell table:style-name="ce4" table:formula="of:=[.V38]&gt;[.Q38]" office:value-type="boolean" office:boolean-value="false" calcext:value-type="boolean">
            <text:p>БРЕХНЯ</text:p>
          </table:table-cell>
          <table:table-cell table:style-name="ce1" table:formula="of:=MAX([.V38];[.Q38])" office:value-type="float" office:value="0.7423828" calcext:value-type="float">
            <text:p>7,42E-01</text:p>
          </table:table-cell>
          <table:table-cell table:style-name="ce4" table:formula="of:=[.X38]&gt;[.R3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8]&gt;[.C38]" office:value-type="boolean" office:boolean-value="true" calcext:value-type="boolean">
            <text:p>ІСТИНА</text:p>
          </table:table-cell>
          <table:table-cell table:style-name="ce4" table:formula="of:=[.F38]&gt;[.D38]" office:value-type="boolean" office:boolean-value="true" calcext:value-type="boolean">
            <text:p>ІСТИНА</text:p>
          </table:table-cell>
          <table:table-cell table:style-name="ce4" table:formula="of:=[.G38]&gt;MAX([.C38];[.E38])" office:value-type="boolean" office:boolean-value="true" calcext:value-type="boolean">
            <text:p>ІСТИНА</text:p>
          </table:table-cell>
          <table:table-cell table:style-name="ce4" table:formula="of:=[.H38]&gt;MAX([.D38];[.F38])" office:value-type="boolean" office:boolean-value="false" calcext:value-type="boolean">
            <text:p>БРЕХНЯ</text:p>
          </table:table-cell>
          <table:table-cell table:style-name="ce4" table:formula="of:=[.I38]&gt;MAX([.C38];[.E38];[.G38])" office:value-type="boolean" office:boolean-value="true" calcext:value-type="boolean">
            <text:p>ІСТИНА</text:p>
          </table:table-cell>
          <table:table-cell table:style-name="ce4" table:formula="of:=[.J38]&gt;MAX([.D38];[.F38];[.H38])" office:value-type="boolean" office:boolean-value="false" calcext:value-type="boolean">
            <text:p>БРЕХНЯ</text:p>
          </table:table-cell>
          <table:table-cell table:style-name="ce4" table:formula="of:=[.K38]&gt;MAX([.C38];[.E38];[.G38];[.I38])" office:value-type="boolean" office:boolean-value="true" calcext:value-type="boolean">
            <text:p>ІСТИНА</text:p>
          </table:table-cell>
          <table:table-cell table:style-name="ce4" table:formula="of:=[.L38]&gt;MAX([.D38];[.F38];[.H38];[.J3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8]&gt;0.9" office:value-type="boolean" office:boolean-value="false" calcext:value-type="boolean">
            <text:p>БРЕХНЯ</text:p>
          </table:table-cell>
          <table:table-cell table:style-name="ce4" table:formula="of:=[.R38]&gt;0.9" office:value-type="boolean" office:boolean-value="true" calcext:value-type="boolean">
            <text:p>ІСТИНА</text:p>
          </table:table-cell>
          <table:table-cell table:style-name="ce4" table:formula="of:=[.X38]&gt;0.8" office:value-type="boolean" office:boolean-value="false" calcext:value-type="boolean">
            <text:p>БРЕХНЯ</text:p>
          </table:table-cell>
          <table:table-cell table:style-name="ce4" table:formula="of:=[.R38]&gt;0.8" office:value-type="boolean" office:boolean-value="true" calcext:value-type="boolean">
            <text:p>ІСТИНА</text:p>
          </table:table-cell>
          <table:table-cell table:style-name="ce4" table:formula="of:=[.X38]&gt;0.7" office:value-type="boolean" office:boolean-value="true" calcext:value-type="boolean">
            <text:p>ІСТИНА</text:p>
          </table:table-cell>
          <table:table-cell table:style-name="ce4" table:formula="of:=[.R3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.1881395" calcext:value-type="float">
            <text:p>1,88E-01</text:p>
          </table:table-cell>
          <table:table-cell table:style-name="ce1" office:value-type="float" office:value="0.4665473" calcext:value-type="float">
            <text:p>4,67E-01</text:p>
          </table:table-cell>
          <table:table-cell table:style-name="ce1" office:value-type="float" office:value="0.2555611" calcext:value-type="float">
            <text:p>2,56E-01</text:p>
          </table:table-cell>
          <table:table-cell table:style-name="ce1" office:value-type="float" office:value="0.5467707" calcext:value-type="float">
            <text:p>5,47E-01</text:p>
          </table:table-cell>
          <table:table-cell table:style-name="ce1" office:value-type="float" office:value="0.232875" calcext:value-type="float">
            <text:p>2,33E-01</text:p>
          </table:table-cell>
          <table:table-cell table:style-name="ce1" office:value-type="float" office:value="0.4662531" calcext:value-type="float">
            <text:p>4,66E-01</text:p>
          </table:table-cell>
          <table:table-cell table:style-name="ce1" office:value-type="float" office:value="0.300946" calcext:value-type="float">
            <text:p>3,01E-01</text:p>
          </table:table-cell>
          <table:table-cell table:style-name="ce1" office:value-type="float" office:value="0.3214905" calcext:value-type="float">
            <text:p>3,21E-01</text:p>
          </table:table-cell>
          <table:table-cell table:style-name="ce1" office:value-type="float" office:value="0.1418497" calcext:value-type="float">
            <text:p>1,42E-01</text:p>
          </table:table-cell>
          <table:table-cell table:style-name="ce1" office:value-type="float" office:value="0.3942641" calcext:value-type="float">
            <text:p>3,94E-01</text:p>
          </table:table-cell>
          <table:table-cell/>
          <table:table-cell table:style-name="ce1" table:formula="of:=MAX([.C39];[.E39];[.G39];[.I39];[.K39])" office:value-type="float" office:value="0.300946" calcext:value-type="float">
            <text:p>3,01E-01</text:p>
          </table:table-cell>
          <table:table-cell table:style-name="ce8" table:formula="of:=MAX([.D39];[.F39];[.H39];[.J39];[.L39])" office:value-type="float" office:value="0.5467707" calcext:value-type="float">
            <text:p>5,47E-01</text:p>
          </table:table-cell>
          <table:table-cell table:style-name="ce2"/>
          <table:table-cell table:style-name="ce1" office:value-type="float" office:value="0.562031" calcext:value-type="float">
            <text:p>5,62E-01</text:p>
          </table:table-cell>
          <table:table-cell table:style-name="ce1" office:value-type="float" office:value="0.8377249" calcext:value-type="float">
            <text:p>8,38E-01</text:p>
          </table:table-cell>
          <table:table-cell table:style-name="ce4" table:formula="of:=[.Q39]&gt;[.N39]" office:value-type="boolean" office:boolean-value="true" calcext:value-type="boolean">
            <text:p>ІСТИНА</text:p>
          </table:table-cell>
          <table:table-cell table:style-name="ce4" table:formula="of:=[.R39]&gt;[.O39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985377" calcext:value-type="float">
            <text:p>6,99E-01</text:p>
          </table:table-cell>
          <table:table-cell table:style-name="ce4" table:formula="of:=[.V39]&gt;[.Q39]" office:value-type="boolean" office:boolean-value="true" calcext:value-type="boolean">
            <text:p>ІСТИНА</text:p>
          </table:table-cell>
          <table:table-cell table:style-name="ce1" table:formula="of:=MAX([.V39];[.Q39])" office:value-type="float" office:value="0.6985377" calcext:value-type="float">
            <text:p>6,99E-01</text:p>
          </table:table-cell>
          <table:table-cell table:style-name="ce4" table:formula="of:=[.X39]&gt;[.R3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39]&gt;[.C39]" office:value-type="boolean" office:boolean-value="true" calcext:value-type="boolean">
            <text:p>ІСТИНА</text:p>
          </table:table-cell>
          <table:table-cell table:style-name="ce4" table:formula="of:=[.F39]&gt;[.D39]" office:value-type="boolean" office:boolean-value="true" calcext:value-type="boolean">
            <text:p>ІСТИНА</text:p>
          </table:table-cell>
          <table:table-cell table:style-name="ce4" table:formula="of:=[.G39]&gt;MAX([.C39];[.E39])" office:value-type="boolean" office:boolean-value="false" calcext:value-type="boolean">
            <text:p>БРЕХНЯ</text:p>
          </table:table-cell>
          <table:table-cell table:style-name="ce4" table:formula="of:=[.H39]&gt;MAX([.D39];[.F39])" office:value-type="boolean" office:boolean-value="false" calcext:value-type="boolean">
            <text:p>БРЕХНЯ</text:p>
          </table:table-cell>
          <table:table-cell table:style-name="ce4" table:formula="of:=[.I39]&gt;MAX([.C39];[.E39];[.G39])" office:value-type="boolean" office:boolean-value="true" calcext:value-type="boolean">
            <text:p>ІСТИНА</text:p>
          </table:table-cell>
          <table:table-cell table:style-name="ce4" table:formula="of:=[.J39]&gt;MAX([.D39];[.F39];[.H39])" office:value-type="boolean" office:boolean-value="false" calcext:value-type="boolean">
            <text:p>БРЕХНЯ</text:p>
          </table:table-cell>
          <table:table-cell table:style-name="ce4" table:formula="of:=[.K39]&gt;MAX([.C39];[.E39];[.G39];[.I39])" office:value-type="boolean" office:boolean-value="false" calcext:value-type="boolean">
            <text:p>БРЕХНЯ</text:p>
          </table:table-cell>
          <table:table-cell table:style-name="ce4" table:formula="of:=[.L39]&gt;MAX([.D39];[.F39];[.H39];[.J3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39]&gt;0.9" office:value-type="boolean" office:boolean-value="false" calcext:value-type="boolean">
            <text:p>БРЕХНЯ</text:p>
          </table:table-cell>
          <table:table-cell table:style-name="ce4" table:formula="of:=[.R39]&gt;0.9" office:value-type="boolean" office:boolean-value="false" calcext:value-type="boolean">
            <text:p>БРЕХНЯ</text:p>
          </table:table-cell>
          <table:table-cell table:style-name="ce4" table:formula="of:=[.X39]&gt;0.8" office:value-type="boolean" office:boolean-value="false" calcext:value-type="boolean">
            <text:p>БРЕХНЯ</text:p>
          </table:table-cell>
          <table:table-cell table:style-name="ce4" table:formula="of:=[.R39]&gt;0.8" office:value-type="boolean" office:boolean-value="true" calcext:value-type="boolean">
            <text:p>ІСТИНА</text:p>
          </table:table-cell>
          <table:table-cell table:style-name="ce4" table:formula="of:=[.X39]&gt;0.7" office:value-type="boolean" office:boolean-value="false" calcext:value-type="boolean">
            <text:p>БРЕХНЯ</text:p>
          </table:table-cell>
          <table:table-cell table:style-name="ce4" table:formula="of:=[.R3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.7653399" calcext:value-type="float">
            <text:p>7,65E-01</text:p>
          </table:table-cell>
          <table:table-cell table:style-name="ce1" office:value-type="float" office:value="0.7900111" calcext:value-type="float">
            <text:p>7,90E-01</text:p>
          </table:table-cell>
          <table:table-cell table:style-name="ce1" office:value-type="float" office:value="0.770782" calcext:value-type="float">
            <text:p>7,71E-01</text:p>
          </table:table-cell>
          <table:table-cell table:style-name="ce1" office:value-type="float" office:value="0.8150292" calcext:value-type="float">
            <text:p>8,15E-01</text:p>
          </table:table-cell>
          <table:table-cell table:style-name="ce1" office:value-type="float" office:value="0.674032" calcext:value-type="float">
            <text:p>6,74E-01</text:p>
          </table:table-cell>
          <table:table-cell table:style-name="ce1" office:value-type="float" office:value="0.747319" calcext:value-type="float">
            <text:p>7,47E-01</text:p>
          </table:table-cell>
          <table:table-cell table:style-name="ce1" office:value-type="float" office:value="0.746869" calcext:value-type="float">
            <text:p>7,47E-01</text:p>
          </table:table-cell>
          <table:table-cell table:style-name="ce1" office:value-type="float" office:value="0.8118358" calcext:value-type="float">
            <text:p>8,12E-01</text:p>
          </table:table-cell>
          <table:table-cell table:style-name="ce1" office:value-type="float" office:value="0.722634" calcext:value-type="float">
            <text:p>7,23E-01</text:p>
          </table:table-cell>
          <table:table-cell table:style-name="ce1" office:value-type="float" office:value="0.8599129" calcext:value-type="float">
            <text:p>8,60E-01</text:p>
          </table:table-cell>
          <table:table-cell/>
          <table:table-cell table:style-name="ce1" table:formula="of:=MAX([.C40];[.E40];[.G40];[.I40];[.K40])" office:value-type="float" office:value="0.770782" calcext:value-type="float">
            <text:p>7,71E-01</text:p>
          </table:table-cell>
          <table:table-cell table:style-name="ce8" table:formula="of:=MAX([.D40];[.F40];[.H40];[.J40];[.L40])" office:value-type="float" office:value="0.8599129" calcext:value-type="float">
            <text:p>8,60E-01</text:p>
          </table:table-cell>
          <table:table-cell table:style-name="ce1"/>
          <table:table-cell table:style-name="ce1" office:value-type="float" office:value="0.789824" calcext:value-type="float">
            <text:p>7,90E-01</text:p>
          </table:table-cell>
          <table:table-cell table:style-name="ce1" office:value-type="float" office:value="0.8599129" calcext:value-type="float">
            <text:p>8,60E-01</text:p>
          </table:table-cell>
          <table:table-cell table:style-name="ce4" table:formula="of:=[.Q40]&gt;[.N40]" office:value-type="boolean" office:boolean-value="true" calcext:value-type="boolean">
            <text:p>ІСТИНА</text:p>
          </table:table-cell>
          <table:table-cell table:style-name="ce4" table:formula="of:=[.R40]&gt;[.O4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9824" calcext:value-type="float">
            <text:p>7,90E-01</text:p>
          </table:table-cell>
          <table:table-cell table:style-name="ce4" table:formula="of:=[.V40]&gt;[.Q40]" office:value-type="boolean" office:boolean-value="false" calcext:value-type="boolean">
            <text:p>БРЕХНЯ</text:p>
          </table:table-cell>
          <table:table-cell table:style-name="ce1" table:formula="of:=MAX([.V40];[.Q40])" office:value-type="float" office:value="0.789824" calcext:value-type="float">
            <text:p>7,90E-01</text:p>
          </table:table-cell>
          <table:table-cell table:style-name="ce4" table:formula="of:=[.X40]&gt;[.R4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0]&gt;[.C40]" office:value-type="boolean" office:boolean-value="true" calcext:value-type="boolean">
            <text:p>ІСТИНА</text:p>
          </table:table-cell>
          <table:table-cell table:style-name="ce4" table:formula="of:=[.F40]&gt;[.D40]" office:value-type="boolean" office:boolean-value="true" calcext:value-type="boolean">
            <text:p>ІСТИНА</text:p>
          </table:table-cell>
          <table:table-cell table:style-name="ce4" table:formula="of:=[.G40]&gt;MAX([.C40];[.E40])" office:value-type="boolean" office:boolean-value="false" calcext:value-type="boolean">
            <text:p>БРЕХНЯ</text:p>
          </table:table-cell>
          <table:table-cell table:style-name="ce4" table:formula="of:=[.H40]&gt;MAX([.D40];[.F40])" office:value-type="boolean" office:boolean-value="false" calcext:value-type="boolean">
            <text:p>БРЕХНЯ</text:p>
          </table:table-cell>
          <table:table-cell table:style-name="ce4" table:formula="of:=[.I40]&gt;MAX([.C40];[.E40];[.G40])" office:value-type="boolean" office:boolean-value="false" calcext:value-type="boolean">
            <text:p>БРЕХНЯ</text:p>
          </table:table-cell>
          <table:table-cell table:style-name="ce4" table:formula="of:=[.J40]&gt;MAX([.D40];[.F40];[.H40])" office:value-type="boolean" office:boolean-value="false" calcext:value-type="boolean">
            <text:p>БРЕХНЯ</text:p>
          </table:table-cell>
          <table:table-cell table:style-name="ce4" table:formula="of:=[.K40]&gt;MAX([.C40];[.E40];[.G40];[.I40])" office:value-type="boolean" office:boolean-value="false" calcext:value-type="boolean">
            <text:p>БРЕХНЯ</text:p>
          </table:table-cell>
          <table:table-cell table:style-name="ce4" table:formula="of:=[.L40]&gt;MAX([.D40];[.F40];[.H40];[.J40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0]&gt;0.9" office:value-type="boolean" office:boolean-value="false" calcext:value-type="boolean">
            <text:p>БРЕХНЯ</text:p>
          </table:table-cell>
          <table:table-cell table:style-name="ce4" table:formula="of:=[.R40]&gt;0.9" office:value-type="boolean" office:boolean-value="false" calcext:value-type="boolean">
            <text:p>БРЕХНЯ</text:p>
          </table:table-cell>
          <table:table-cell table:style-name="ce4" table:formula="of:=[.X40]&gt;0.8" office:value-type="boolean" office:boolean-value="false" calcext:value-type="boolean">
            <text:p>БРЕХНЯ</text:p>
          </table:table-cell>
          <table:table-cell table:style-name="ce4" table:formula="of:=[.R40]&gt;0.8" office:value-type="boolean" office:boolean-value="true" calcext:value-type="boolean">
            <text:p>ІСТИНА</text:p>
          </table:table-cell>
          <table:table-cell table:style-name="ce4" table:formula="of:=[.X40]&gt;0.7" office:value-type="boolean" office:boolean-value="true" calcext:value-type="boolean">
            <text:p>ІСТИНА</text:p>
          </table:table-cell>
          <table:table-cell table:style-name="ce4" table:formula="of:=[.R4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0.7468414" calcext:value-type="float">
            <text:p>7,47E-01</text:p>
          </table:table-cell>
          <table:table-cell table:style-name="ce1" office:value-type="float" office:value="0.8745216" calcext:value-type="float">
            <text:p>8,75E-01</text:p>
          </table:table-cell>
          <table:table-cell table:style-name="ce1" office:value-type="float" office:value="0.7380181" calcext:value-type="float">
            <text:p>7,38E-01</text:p>
          </table:table-cell>
          <table:table-cell table:style-name="ce1" office:value-type="float" office:value="0.806497" calcext:value-type="float">
            <text:p>8,06E-01</text:p>
          </table:table-cell>
          <table:table-cell table:style-name="ce1" office:value-type="float" office:value="0.7398696" calcext:value-type="float">
            <text:p>7,40E-01</text:p>
          </table:table-cell>
          <table:table-cell table:style-name="ce1" office:value-type="float" office:value="0.828494" calcext:value-type="float">
            <text:p>8,28E-01</text:p>
          </table:table-cell>
          <table:table-cell table:style-name="ce1" office:value-type="float" office:value="0.643703" calcext:value-type="float">
            <text:p>6,44E-01</text:p>
          </table:table-cell>
          <table:table-cell table:style-name="ce1" office:value-type="float" office:value="0.7931444" calcext:value-type="float">
            <text:p>7,93E-01</text:p>
          </table:table-cell>
          <table:table-cell table:style-name="ce1" office:value-type="float" office:value="0.7496865" calcext:value-type="float">
            <text:p>7,50E-01</text:p>
          </table:table-cell>
          <table:table-cell table:style-name="ce1" office:value-type="float" office:value="0.8791323" calcext:value-type="float">
            <text:p>8,79E-01</text:p>
          </table:table-cell>
          <table:table-cell/>
          <table:table-cell table:style-name="ce1" table:formula="of:=MAX([.C41];[.E41];[.G41];[.I41];[.K41])" office:value-type="float" office:value="0.7496865" calcext:value-type="float">
            <text:p>7,50E-01</text:p>
          </table:table-cell>
          <table:table-cell table:style-name="ce8" table:formula="of:=MAX([.D41];[.F41];[.H41];[.J41];[.L41])" office:value-type="float" office:value="0.8791323" calcext:value-type="float">
            <text:p>8,79E-01</text:p>
          </table:table-cell>
          <table:table-cell table:style-name="ce1"/>
          <table:table-cell table:style-name="ce1" office:value-type="float" office:value="0.7864519" calcext:value-type="float">
            <text:p>7,86E-01</text:p>
          </table:table-cell>
          <table:table-cell table:style-name="ce1" office:value-type="float" office:value="0.8791323" calcext:value-type="float">
            <text:p>8,79E-01</text:p>
          </table:table-cell>
          <table:table-cell table:style-name="ce4" table:formula="of:=[.Q41]&gt;[.N41]" office:value-type="boolean" office:boolean-value="true" calcext:value-type="boolean">
            <text:p>ІСТИНА</text:p>
          </table:table-cell>
          <table:table-cell table:style-name="ce4" table:formula="of:=[.R41]&gt;[.O4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64519" calcext:value-type="float">
            <text:p>7,86E-01</text:p>
          </table:table-cell>
          <table:table-cell table:style-name="ce4" table:formula="of:=[.V41]&gt;[.Q41]" office:value-type="boolean" office:boolean-value="false" calcext:value-type="boolean">
            <text:p>БРЕХНЯ</text:p>
          </table:table-cell>
          <table:table-cell table:style-name="ce1" table:formula="of:=MAX([.V41];[.Q41])" office:value-type="float" office:value="0.7864519" calcext:value-type="float">
            <text:p>7,86E-01</text:p>
          </table:table-cell>
          <table:table-cell table:style-name="ce4" table:formula="of:=[.X41]&gt;[.R4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1]&gt;[.C41]" office:value-type="boolean" office:boolean-value="false" calcext:value-type="boolean">
            <text:p>БРЕХНЯ</text:p>
          </table:table-cell>
          <table:table-cell table:style-name="ce4" table:formula="of:=[.F41]&gt;[.D41]" office:value-type="boolean" office:boolean-value="false" calcext:value-type="boolean">
            <text:p>БРЕХНЯ</text:p>
          </table:table-cell>
          <table:table-cell table:style-name="ce4" table:formula="of:=[.G41]&gt;MAX([.C41];[.E41])" office:value-type="boolean" office:boolean-value="false" calcext:value-type="boolean">
            <text:p>БРЕХНЯ</text:p>
          </table:table-cell>
          <table:table-cell table:style-name="ce4" table:formula="of:=[.H41]&gt;MAX([.D41];[.F41])" office:value-type="boolean" office:boolean-value="false" calcext:value-type="boolean">
            <text:p>БРЕХНЯ</text:p>
          </table:table-cell>
          <table:table-cell table:style-name="ce4" table:formula="of:=[.I41]&gt;MAX([.C41];[.E41];[.G41])" office:value-type="boolean" office:boolean-value="false" calcext:value-type="boolean">
            <text:p>БРЕХНЯ</text:p>
          </table:table-cell>
          <table:table-cell table:style-name="ce4" table:formula="of:=[.J41]&gt;MAX([.D41];[.F41];[.H41])" office:value-type="boolean" office:boolean-value="false" calcext:value-type="boolean">
            <text:p>БРЕХНЯ</text:p>
          </table:table-cell>
          <table:table-cell table:style-name="ce4" table:formula="of:=[.K41]&gt;MAX([.C41];[.E41];[.G41];[.I41])" office:value-type="boolean" office:boolean-value="true" calcext:value-type="boolean">
            <text:p>ІСТИНА</text:p>
          </table:table-cell>
          <table:table-cell table:style-name="ce4" table:formula="of:=[.L41]&gt;MAX([.D41];[.F41];[.H41];[.J41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1]&gt;0.9" office:value-type="boolean" office:boolean-value="false" calcext:value-type="boolean">
            <text:p>БРЕХНЯ</text:p>
          </table:table-cell>
          <table:table-cell table:style-name="ce4" table:formula="of:=[.R41]&gt;0.9" office:value-type="boolean" office:boolean-value="false" calcext:value-type="boolean">
            <text:p>БРЕХНЯ</text:p>
          </table:table-cell>
          <table:table-cell table:style-name="ce4" table:formula="of:=[.X41]&gt;0.8" office:value-type="boolean" office:boolean-value="false" calcext:value-type="boolean">
            <text:p>БРЕХНЯ</text:p>
          </table:table-cell>
          <table:table-cell table:style-name="ce4" table:formula="of:=[.R41]&gt;0.8" office:value-type="boolean" office:boolean-value="true" calcext:value-type="boolean">
            <text:p>ІСТИНА</text:p>
          </table:table-cell>
          <table:table-cell table:style-name="ce4" table:formula="of:=[.X41]&gt;0.7" office:value-type="boolean" office:boolean-value="true" calcext:value-type="boolean">
            <text:p>ІСТИНА</text:p>
          </table:table-cell>
          <table:table-cell table:style-name="ce4" table:formula="of:=[.R4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.7054703" calcext:value-type="float">
            <text:p>7,05E-01</text:p>
          </table:table-cell>
          <table:table-cell table:style-name="ce1" office:value-type="float" office:value="0.8687441" calcext:value-type="float">
            <text:p>8,69E-01</text:p>
          </table:table-cell>
          <table:table-cell table:style-name="ce1" office:value-type="float" office:value="0.6963075" calcext:value-type="float">
            <text:p>6,96E-01</text:p>
          </table:table-cell>
          <table:table-cell table:style-name="ce1" office:value-type="float" office:value="0.8395274" calcext:value-type="float">
            <text:p>8,40E-01</text:p>
          </table:table-cell>
          <table:table-cell table:style-name="ce1" office:value-type="float" office:value="0.7296874" calcext:value-type="float">
            <text:p>7,30E-01</text:p>
          </table:table-cell>
          <table:table-cell table:style-name="ce1" office:value-type="float" office:value="0.86567" calcext:value-type="float">
            <text:p>8,66E-01</text:p>
          </table:table-cell>
          <table:table-cell table:style-name="ce1" office:value-type="float" office:value="0.719287" calcext:value-type="float">
            <text:p>7,19E-01</text:p>
          </table:table-cell>
          <table:table-cell table:style-name="ce1" office:value-type="float" office:value="0.8522013" calcext:value-type="float">
            <text:p>8,52E-01</text:p>
          </table:table-cell>
          <table:table-cell table:style-name="ce1" office:value-type="float" office:value="0.6970886" calcext:value-type="float">
            <text:p>6,97E-01</text:p>
          </table:table-cell>
          <table:table-cell table:style-name="ce1" office:value-type="float" office:value="0.894398" calcext:value-type="float">
            <text:p>8,94E-01</text:p>
          </table:table-cell>
          <table:table-cell/>
          <table:table-cell table:style-name="ce1" table:formula="of:=MAX([.C42];[.E42];[.G42];[.I42];[.K42])" office:value-type="float" office:value="0.7296874" calcext:value-type="float">
            <text:p>7,30E-01</text:p>
          </table:table-cell>
          <table:table-cell table:style-name="ce8" table:formula="of:=MAX([.D42];[.F42];[.H42];[.J42];[.L42])" office:value-type="float" office:value="0.894398" calcext:value-type="float">
            <text:p>8,94E-01</text:p>
          </table:table-cell>
          <table:table-cell table:style-name="ce1"/>
          <table:table-cell table:style-name="ce1" office:value-type="float" office:value="0.7299691" calcext:value-type="float">
            <text:p>7,30E-01</text:p>
          </table:table-cell>
          <table:table-cell table:style-name="ce1" office:value-type="float" office:value="0.894398" calcext:value-type="float">
            <text:p>8,94E-01</text:p>
          </table:table-cell>
          <table:table-cell table:style-name="ce4" table:formula="of:=[.Q42]&gt;[.N42]" office:value-type="boolean" office:boolean-value="true" calcext:value-type="boolean">
            <text:p>ІСТИНА</text:p>
          </table:table-cell>
          <table:table-cell table:style-name="ce4" table:formula="of:=[.R42]&gt;[.O4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299691" calcext:value-type="float">
            <text:p>7,30E-01</text:p>
          </table:table-cell>
          <table:table-cell table:style-name="ce4" table:formula="of:=[.V42]&gt;[.Q42]" office:value-type="boolean" office:boolean-value="false" calcext:value-type="boolean">
            <text:p>БРЕХНЯ</text:p>
          </table:table-cell>
          <table:table-cell table:style-name="ce1" table:formula="of:=MAX([.V42];[.Q42])" office:value-type="float" office:value="0.7299691" calcext:value-type="float">
            <text:p>7,30E-01</text:p>
          </table:table-cell>
          <table:table-cell table:style-name="ce4" table:formula="of:=[.X42]&gt;[.R4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2]&gt;[.C42]" office:value-type="boolean" office:boolean-value="false" calcext:value-type="boolean">
            <text:p>БРЕХНЯ</text:p>
          </table:table-cell>
          <table:table-cell table:style-name="ce4" table:formula="of:=[.F42]&gt;[.D42]" office:value-type="boolean" office:boolean-value="false" calcext:value-type="boolean">
            <text:p>БРЕХНЯ</text:p>
          </table:table-cell>
          <table:table-cell table:style-name="ce4" table:formula="of:=[.G42]&gt;MAX([.C42];[.E42])" office:value-type="boolean" office:boolean-value="true" calcext:value-type="boolean">
            <text:p>ІСТИНА</text:p>
          </table:table-cell>
          <table:table-cell table:style-name="ce4" table:formula="of:=[.H42]&gt;MAX([.D42];[.F42])" office:value-type="boolean" office:boolean-value="false" calcext:value-type="boolean">
            <text:p>БРЕХНЯ</text:p>
          </table:table-cell>
          <table:table-cell table:style-name="ce4" table:formula="of:=[.I42]&gt;MAX([.C42];[.E42];[.G42])" office:value-type="boolean" office:boolean-value="false" calcext:value-type="boolean">
            <text:p>БРЕХНЯ</text:p>
          </table:table-cell>
          <table:table-cell table:style-name="ce4" table:formula="of:=[.J42]&gt;MAX([.D42];[.F42];[.H42])" office:value-type="boolean" office:boolean-value="false" calcext:value-type="boolean">
            <text:p>БРЕХНЯ</text:p>
          </table:table-cell>
          <table:table-cell table:style-name="ce4" table:formula="of:=[.K42]&gt;MAX([.C42];[.E42];[.G42];[.I42])" office:value-type="boolean" office:boolean-value="false" calcext:value-type="boolean">
            <text:p>БРЕХНЯ</text:p>
          </table:table-cell>
          <table:table-cell table:style-name="ce4" table:formula="of:=[.L42]&gt;MAX([.D42];[.F42];[.H42];[.J42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2]&gt;0.9" office:value-type="boolean" office:boolean-value="false" calcext:value-type="boolean">
            <text:p>БРЕХНЯ</text:p>
          </table:table-cell>
          <table:table-cell table:style-name="ce4" table:formula="of:=[.R42]&gt;0.9" office:value-type="boolean" office:boolean-value="false" calcext:value-type="boolean">
            <text:p>БРЕХНЯ</text:p>
          </table:table-cell>
          <table:table-cell table:style-name="ce4" table:formula="of:=[.X42]&gt;0.8" office:value-type="boolean" office:boolean-value="false" calcext:value-type="boolean">
            <text:p>БРЕХНЯ</text:p>
          </table:table-cell>
          <table:table-cell table:style-name="ce4" table:formula="of:=[.R42]&gt;0.8" office:value-type="boolean" office:boolean-value="true" calcext:value-type="boolean">
            <text:p>ІСТИНА</text:p>
          </table:table-cell>
          <table:table-cell table:style-name="ce4" table:formula="of:=[.X42]&gt;0.7" office:value-type="boolean" office:boolean-value="true" calcext:value-type="boolean">
            <text:p>ІСТИНА</text:p>
          </table:table-cell>
          <table:table-cell table:style-name="ce4" table:formula="of:=[.R4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0.7441562" calcext:value-type="float">
            <text:p>7,44E-01</text:p>
          </table:table-cell>
          <table:table-cell table:style-name="ce1" office:value-type="float" office:value="0.9032663" calcext:value-type="float">
            <text:p>9,03E-01</text:p>
          </table:table-cell>
          <table:table-cell table:style-name="ce1" office:value-type="float" office:value="0.6448392" calcext:value-type="float">
            <text:p>6,45E-01</text:p>
          </table:table-cell>
          <table:table-cell table:style-name="ce1" office:value-type="float" office:value="0.813501" calcext:value-type="float">
            <text:p>8,14E-01</text:p>
          </table:table-cell>
          <table:table-cell table:style-name="ce1" office:value-type="float" office:value="0.7014732" calcext:value-type="float">
            <text:p>7,01E-01</text:p>
          </table:table-cell>
          <table:table-cell table:style-name="ce1" office:value-type="float" office:value="0.8874924" calcext:value-type="float">
            <text:p>8,87E-01</text:p>
          </table:table-cell>
          <table:table-cell table:style-name="ce1" office:value-type="float" office:value="0.6370319" calcext:value-type="float">
            <text:p>6,37E-01</text:p>
          </table:table-cell>
          <table:table-cell table:style-name="ce1" office:value-type="float" office:value="0.8198551" calcext:value-type="float">
            <text:p>8,20E-01</text:p>
          </table:table-cell>
          <table:table-cell table:style-name="ce1" office:value-type="float" office:value="0.6695683" calcext:value-type="float">
            <text:p>6,70E-01</text:p>
          </table:table-cell>
          <table:table-cell table:style-name="ce1" office:value-type="float" office:value="0.8915518" calcext:value-type="float">
            <text:p>8,92E-01</text:p>
          </table:table-cell>
          <table:table-cell/>
          <table:table-cell table:style-name="ce1" table:formula="of:=MAX([.C43];[.E43];[.G43];[.I43];[.K43])" office:value-type="float" office:value="0.7441562" calcext:value-type="float">
            <text:p>7,44E-01</text:p>
          </table:table-cell>
          <table:table-cell table:style-name="ce8" table:formula="of:=MAX([.D43];[.F43];[.H43];[.J43];[.L43])" office:value-type="float" office:value="0.9032663" calcext:value-type="float">
            <text:p>9,03E-01</text:p>
          </table:table-cell>
          <table:table-cell table:style-name="ce1"/>
          <table:table-cell table:style-name="ce1" office:value-type="float" office:value="0.7441562" calcext:value-type="float">
            <text:p>7,44E-01</text:p>
          </table:table-cell>
          <table:table-cell table:style-name="ce1" office:value-type="float" office:value="0.9032663" calcext:value-type="float">
            <text:p>9,03E-01</text:p>
          </table:table-cell>
          <table:table-cell table:style-name="ce4" table:formula="of:=[.Q43]&gt;[.N43]" office:value-type="boolean" office:boolean-value="false" calcext:value-type="boolean">
            <text:p>БРЕХНЯ</text:p>
          </table:table-cell>
          <table:table-cell table:style-name="ce4" table:formula="of:=[.R43]&gt;[.O4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441562" calcext:value-type="float">
            <text:p>7,44E-01</text:p>
          </table:table-cell>
          <table:table-cell table:style-name="ce4" table:formula="of:=[.V43]&gt;[.Q43]" office:value-type="boolean" office:boolean-value="false" calcext:value-type="boolean">
            <text:p>БРЕХНЯ</text:p>
          </table:table-cell>
          <table:table-cell table:style-name="ce1" table:formula="of:=MAX([.V43];[.Q43])" office:value-type="float" office:value="0.7441562" calcext:value-type="float">
            <text:p>7,44E-01</text:p>
          </table:table-cell>
          <table:table-cell table:style-name="ce4" table:formula="of:=[.X43]&gt;[.R4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3]&gt;[.C43]" office:value-type="boolean" office:boolean-value="false" calcext:value-type="boolean">
            <text:p>БРЕХНЯ</text:p>
          </table:table-cell>
          <table:table-cell table:style-name="ce4" table:formula="of:=[.F43]&gt;[.D43]" office:value-type="boolean" office:boolean-value="false" calcext:value-type="boolean">
            <text:p>БРЕХНЯ</text:p>
          </table:table-cell>
          <table:table-cell table:style-name="ce4" table:formula="of:=[.G43]&gt;MAX([.C43];[.E43])" office:value-type="boolean" office:boolean-value="false" calcext:value-type="boolean">
            <text:p>БРЕХНЯ</text:p>
          </table:table-cell>
          <table:table-cell table:style-name="ce4" table:formula="of:=[.H43]&gt;MAX([.D43];[.F43])" office:value-type="boolean" office:boolean-value="false" calcext:value-type="boolean">
            <text:p>БРЕХНЯ</text:p>
          </table:table-cell>
          <table:table-cell table:style-name="ce4" table:formula="of:=[.I43]&gt;MAX([.C43];[.E43];[.G43])" office:value-type="boolean" office:boolean-value="false" calcext:value-type="boolean">
            <text:p>БРЕХНЯ</text:p>
          </table:table-cell>
          <table:table-cell table:style-name="ce4" table:formula="of:=[.J43]&gt;MAX([.D43];[.F43];[.H43])" office:value-type="boolean" office:boolean-value="false" calcext:value-type="boolean">
            <text:p>БРЕХНЯ</text:p>
          </table:table-cell>
          <table:table-cell table:style-name="ce4" table:formula="of:=[.K43]&gt;MAX([.C43];[.E43];[.G43];[.I43])" office:value-type="boolean" office:boolean-value="false" calcext:value-type="boolean">
            <text:p>БРЕХНЯ</text:p>
          </table:table-cell>
          <table:table-cell table:style-name="ce4" table:formula="of:=[.L43]&gt;MAX([.D43];[.F43];[.H43];[.J4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3]&gt;0.9" office:value-type="boolean" office:boolean-value="false" calcext:value-type="boolean">
            <text:p>БРЕХНЯ</text:p>
          </table:table-cell>
          <table:table-cell table:style-name="ce4" table:formula="of:=[.R43]&gt;0.9" office:value-type="boolean" office:boolean-value="true" calcext:value-type="boolean">
            <text:p>ІСТИНА</text:p>
          </table:table-cell>
          <table:table-cell table:style-name="ce4" table:formula="of:=[.X43]&gt;0.8" office:value-type="boolean" office:boolean-value="false" calcext:value-type="boolean">
            <text:p>БРЕХНЯ</text:p>
          </table:table-cell>
          <table:table-cell table:style-name="ce4" table:formula="of:=[.R43]&gt;0.8" office:value-type="boolean" office:boolean-value="true" calcext:value-type="boolean">
            <text:p>ІСТИНА</text:p>
          </table:table-cell>
          <table:table-cell table:style-name="ce4" table:formula="of:=[.X43]&gt;0.7" office:value-type="boolean" office:boolean-value="true" calcext:value-type="boolean">
            <text:p>ІСТИНА</text:p>
          </table:table-cell>
          <table:table-cell table:style-name="ce4" table:formula="of:=[.R4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14021" calcext:value-type="float">
            <text:p>1,40E-01</text:p>
          </table:table-cell>
          <table:table-cell table:style-name="ce1" office:value-type="float" office:value="0.2739913" calcext:value-type="float">
            <text:p>2,74E-01</text:p>
          </table:table-cell>
          <table:table-cell table:style-name="ce1" office:value-type="float" office:value="-0.02177993" calcext:value-type="float">
            <text:p>-2,18E-02</text:p>
          </table:table-cell>
          <table:table-cell table:style-name="ce1" office:value-type="float" office:value="0.2034895" calcext:value-type="float">
            <text:p>2,03E-01</text:p>
          </table:table-cell>
          <table:table-cell table:style-name="ce1" office:value-type="float" office:value="0.02801423" calcext:value-type="float">
            <text:p>2,80E-02</text:p>
          </table:table-cell>
          <table:table-cell table:style-name="ce1" office:value-type="float" office:value="0.3736991" calcext:value-type="float">
            <text:p>3,74E-01</text:p>
          </table:table-cell>
          <table:table-cell table:style-name="ce1" office:value-type="float" office:value="0.1828788" calcext:value-type="float">
            <text:p>1,83E-01</text:p>
          </table:table-cell>
          <table:table-cell table:style-name="ce1" office:value-type="float" office:value="0.1378246" calcext:value-type="float">
            <text:p>1,38E-01</text:p>
          </table:table-cell>
          <table:table-cell table:style-name="ce1" office:value-type="float" office:value="0.1042449" calcext:value-type="float">
            <text:p>1,04E-01</text:p>
          </table:table-cell>
          <table:table-cell table:style-name="ce1" office:value-type="float" office:value="0.3410204" calcext:value-type="float">
            <text:p>3,41E-01</text:p>
          </table:table-cell>
          <table:table-cell/>
          <table:table-cell table:style-name="ce1" table:formula="of:=MAX([.C44];[.E44];[.G44];[.I44];[.K44])" office:value-type="float" office:value="0.1828788" calcext:value-type="float">
            <text:p>1,83E-01</text:p>
          </table:table-cell>
          <table:table-cell table:style-name="ce8" table:formula="of:=MAX([.D44];[.F44];[.H44];[.J44];[.L44])" office:value-type="float" office:value="0.3736991" calcext:value-type="float">
            <text:p>3,74E-01</text:p>
          </table:table-cell>
          <table:table-cell table:style-name="ce2"/>
          <table:table-cell table:style-name="ce1" office:value-type="float" office:value="0.5901918" calcext:value-type="float">
            <text:p>5,90E-01</text:p>
          </table:table-cell>
          <table:table-cell table:style-name="ce1" office:value-type="float" office:value="0.7623065" calcext:value-type="float">
            <text:p>7,62E-01</text:p>
          </table:table-cell>
          <table:table-cell table:style-name="ce4" table:formula="of:=[.Q44]&gt;[.N44]" office:value-type="boolean" office:boolean-value="true" calcext:value-type="boolean">
            <text:p>ІСТИНА</text:p>
          </table:table-cell>
          <table:table-cell table:style-name="ce4" table:formula="of:=[.R44]&gt;[.O44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113045" calcext:value-type="float">
            <text:p>6,11E-01</text:p>
          </table:table-cell>
          <table:table-cell table:style-name="ce4" table:formula="of:=[.V44]&gt;[.Q44]" office:value-type="boolean" office:boolean-value="true" calcext:value-type="boolean">
            <text:p>ІСТИНА</text:p>
          </table:table-cell>
          <table:table-cell table:style-name="ce1" table:formula="of:=MAX([.V44];[.Q44])" office:value-type="float" office:value="0.6113045" calcext:value-type="float">
            <text:p>6,11E-01</text:p>
          </table:table-cell>
          <table:table-cell table:style-name="ce4" table:formula="of:=[.X44]&gt;[.R4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4]&gt;[.C44]" office:value-type="boolean" office:boolean-value="false" calcext:value-type="boolean">
            <text:p>БРЕХНЯ</text:p>
          </table:table-cell>
          <table:table-cell table:style-name="ce4" table:formula="of:=[.F44]&gt;[.D44]" office:value-type="boolean" office:boolean-value="false" calcext:value-type="boolean">
            <text:p>БРЕХНЯ</text:p>
          </table:table-cell>
          <table:table-cell table:style-name="ce4" table:formula="of:=[.G44]&gt;MAX([.C44];[.E44])" office:value-type="boolean" office:boolean-value="false" calcext:value-type="boolean">
            <text:p>БРЕХНЯ</text:p>
          </table:table-cell>
          <table:table-cell table:style-name="ce4" table:formula="of:=[.H44]&gt;MAX([.D44];[.F44])" office:value-type="boolean" office:boolean-value="true" calcext:value-type="boolean">
            <text:p>ІСТИНА</text:p>
          </table:table-cell>
          <table:table-cell table:style-name="ce4" table:formula="of:=[.I44]&gt;MAX([.C44];[.E44];[.G44])" office:value-type="boolean" office:boolean-value="true" calcext:value-type="boolean">
            <text:p>ІСТИНА</text:p>
          </table:table-cell>
          <table:table-cell table:style-name="ce4" table:formula="of:=[.J44]&gt;MAX([.D44];[.F44];[.H44])" office:value-type="boolean" office:boolean-value="false" calcext:value-type="boolean">
            <text:p>БРЕХНЯ</text:p>
          </table:table-cell>
          <table:table-cell table:style-name="ce4" table:formula="of:=[.K44]&gt;MAX([.C44];[.E44];[.G44];[.I44])" office:value-type="boolean" office:boolean-value="false" calcext:value-type="boolean">
            <text:p>БРЕХНЯ</text:p>
          </table:table-cell>
          <table:table-cell table:style-name="ce4" table:formula="of:=[.L44]&gt;MAX([.D44];[.F44];[.H44];[.J4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4]&gt;0.9" office:value-type="boolean" office:boolean-value="false" calcext:value-type="boolean">
            <text:p>БРЕХНЯ</text:p>
          </table:table-cell>
          <table:table-cell table:style-name="ce4" table:formula="of:=[.R44]&gt;0.9" office:value-type="boolean" office:boolean-value="false" calcext:value-type="boolean">
            <text:p>БРЕХНЯ</text:p>
          </table:table-cell>
          <table:table-cell table:style-name="ce4" table:formula="of:=[.X44]&gt;0.8" office:value-type="boolean" office:boolean-value="false" calcext:value-type="boolean">
            <text:p>БРЕХНЯ</text:p>
          </table:table-cell>
          <table:table-cell table:style-name="ce4" table:formula="of:=[.R44]&gt;0.8" office:value-type="boolean" office:boolean-value="false" calcext:value-type="boolean">
            <text:p>БРЕХНЯ</text:p>
          </table:table-cell>
          <table:table-cell table:style-name="ce4" table:formula="of:=[.X44]&gt;0.7" office:value-type="boolean" office:boolean-value="false" calcext:value-type="boolean">
            <text:p>БРЕХНЯ</text:p>
          </table:table-cell>
          <table:table-cell table:style-name="ce4" table:formula="of:=[.R4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0.7489133" calcext:value-type="float">
            <text:p>7,49E-01</text:p>
          </table:table-cell>
          <table:table-cell table:style-name="ce1" office:value-type="float" office:value="0.790346" calcext:value-type="float">
            <text:p>7,90E-01</text:p>
          </table:table-cell>
          <table:table-cell table:style-name="ce1" office:value-type="float" office:value="0.7306905" calcext:value-type="float">
            <text:p>7,31E-01</text:p>
          </table:table-cell>
          <table:table-cell table:style-name="ce1" office:value-type="float" office:value="0.7996468" calcext:value-type="float">
            <text:p>8,00E-01</text:p>
          </table:table-cell>
          <table:table-cell table:style-name="ce1" office:value-type="float" office:value="0.6656981" calcext:value-type="float">
            <text:p>6,66E-01</text:p>
          </table:table-cell>
          <table:table-cell table:style-name="ce1" office:value-type="float" office:value="0.7590905" calcext:value-type="float">
            <text:p>7,59E-01</text:p>
          </table:table-cell>
          <table:table-cell table:style-name="ce1" office:value-type="float" office:value="0.6433177" calcext:value-type="float">
            <text:p>6,43E-01</text:p>
          </table:table-cell>
          <table:table-cell table:style-name="ce1" office:value-type="float" office:value="0.8266671" calcext:value-type="float">
            <text:p>8,27E-01</text:p>
          </table:table-cell>
          <table:table-cell table:style-name="ce1" office:value-type="float" office:value="0.6201633" calcext:value-type="float">
            <text:p>6,20E-01</text:p>
          </table:table-cell>
          <table:table-cell table:style-name="ce1" office:value-type="float" office:value="0.8298437" calcext:value-type="float">
            <text:p>8,30E-01</text:p>
          </table:table-cell>
          <table:table-cell/>
          <table:table-cell table:style-name="ce1" table:formula="of:=MAX([.C45];[.E45];[.G45];[.I45];[.K45])" office:value-type="float" office:value="0.7489133" calcext:value-type="float">
            <text:p>7,49E-01</text:p>
          </table:table-cell>
          <table:table-cell table:style-name="ce8" table:formula="of:=MAX([.D45];[.F45];[.H45];[.J45];[.L45])" office:value-type="float" office:value="0.8298437" calcext:value-type="float">
            <text:p>8,30E-01</text:p>
          </table:table-cell>
          <table:table-cell table:style-name="ce1"/>
          <table:table-cell table:style-name="ce1" office:value-type="float" office:value="0.7489133" calcext:value-type="float">
            <text:p>7,49E-01</text:p>
          </table:table-cell>
          <table:table-cell table:style-name="ce1" office:value-type="float" office:value="0.8298437" calcext:value-type="float">
            <text:p>8,30E-01</text:p>
          </table:table-cell>
          <table:table-cell table:style-name="ce4" table:formula="of:=[.Q45]&gt;[.N45]" office:value-type="boolean" office:boolean-value="false" calcext:value-type="boolean">
            <text:p>БРЕХНЯ</text:p>
          </table:table-cell>
          <table:table-cell table:style-name="ce4" table:formula="of:=[.R45]&gt;[.O4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489133" calcext:value-type="float">
            <text:p>7,49E-01</text:p>
          </table:table-cell>
          <table:table-cell table:style-name="ce4" table:formula="of:=[.V45]&gt;[.Q45]" office:value-type="boolean" office:boolean-value="false" calcext:value-type="boolean">
            <text:p>БРЕХНЯ</text:p>
          </table:table-cell>
          <table:table-cell table:style-name="ce1" table:formula="of:=MAX([.V45];[.Q45])" office:value-type="float" office:value="0.7489133" calcext:value-type="float">
            <text:p>7,49E-01</text:p>
          </table:table-cell>
          <table:table-cell table:style-name="ce4" table:formula="of:=[.X45]&gt;[.R4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5]&gt;[.C45]" office:value-type="boolean" office:boolean-value="false" calcext:value-type="boolean">
            <text:p>БРЕХНЯ</text:p>
          </table:table-cell>
          <table:table-cell table:style-name="ce4" table:formula="of:=[.F45]&gt;[.D45]" office:value-type="boolean" office:boolean-value="true" calcext:value-type="boolean">
            <text:p>ІСТИНА</text:p>
          </table:table-cell>
          <table:table-cell table:style-name="ce4" table:formula="of:=[.G45]&gt;MAX([.C45];[.E45])" office:value-type="boolean" office:boolean-value="false" calcext:value-type="boolean">
            <text:p>БРЕХНЯ</text:p>
          </table:table-cell>
          <table:table-cell table:style-name="ce4" table:formula="of:=[.H45]&gt;MAX([.D45];[.F45])" office:value-type="boolean" office:boolean-value="false" calcext:value-type="boolean">
            <text:p>БРЕХНЯ</text:p>
          </table:table-cell>
          <table:table-cell table:style-name="ce4" table:formula="of:=[.I45]&gt;MAX([.C45];[.E45];[.G45])" office:value-type="boolean" office:boolean-value="false" calcext:value-type="boolean">
            <text:p>БРЕХНЯ</text:p>
          </table:table-cell>
          <table:table-cell table:style-name="ce4" table:formula="of:=[.J45]&gt;MAX([.D45];[.F45];[.H45])" office:value-type="boolean" office:boolean-value="true" calcext:value-type="boolean">
            <text:p>ІСТИНА</text:p>
          </table:table-cell>
          <table:table-cell table:style-name="ce4" table:formula="of:=[.K45]&gt;MAX([.C45];[.E45];[.G45];[.I45])" office:value-type="boolean" office:boolean-value="false" calcext:value-type="boolean">
            <text:p>БРЕХНЯ</text:p>
          </table:table-cell>
          <table:table-cell table:style-name="ce4" table:formula="of:=[.L45]&gt;MAX([.D45];[.F45];[.H45];[.J45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5]&gt;0.9" office:value-type="boolean" office:boolean-value="false" calcext:value-type="boolean">
            <text:p>БРЕХНЯ</text:p>
          </table:table-cell>
          <table:table-cell table:style-name="ce4" table:formula="of:=[.R45]&gt;0.9" office:value-type="boolean" office:boolean-value="false" calcext:value-type="boolean">
            <text:p>БРЕХНЯ</text:p>
          </table:table-cell>
          <table:table-cell table:style-name="ce4" table:formula="of:=[.X45]&gt;0.8" office:value-type="boolean" office:boolean-value="false" calcext:value-type="boolean">
            <text:p>БРЕХНЯ</text:p>
          </table:table-cell>
          <table:table-cell table:style-name="ce4" table:formula="of:=[.R45]&gt;0.8" office:value-type="boolean" office:boolean-value="true" calcext:value-type="boolean">
            <text:p>ІСТИНА</text:p>
          </table:table-cell>
          <table:table-cell table:style-name="ce4" table:formula="of:=[.X45]&gt;0.7" office:value-type="boolean" office:boolean-value="true" calcext:value-type="boolean">
            <text:p>ІСТИНА</text:p>
          </table:table-cell>
          <table:table-cell table:style-name="ce4" table:formula="of:=[.R4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.7316322" calcext:value-type="float">
            <text:p>7,32E-01</text:p>
          </table:table-cell>
          <table:table-cell table:style-name="ce1" office:value-type="float" office:value="0.7494677" calcext:value-type="float">
            <text:p>7,49E-01</text:p>
          </table:table-cell>
          <table:table-cell table:style-name="ce1" office:value-type="float" office:value="0.7190042" calcext:value-type="float">
            <text:p>7,19E-01</text:p>
          </table:table-cell>
          <table:table-cell table:style-name="ce1" office:value-type="float" office:value="0.8374892" calcext:value-type="float">
            <text:p>8,37E-01</text:p>
          </table:table-cell>
          <table:table-cell table:style-name="ce1" office:value-type="float" office:value="0.6992528" calcext:value-type="float">
            <text:p>6,99E-01</text:p>
          </table:table-cell>
          <table:table-cell table:style-name="ce1" office:value-type="float" office:value="0.7435211" calcext:value-type="float">
            <text:p>7,44E-01</text:p>
          </table:table-cell>
          <table:table-cell table:style-name="ce1" office:value-type="float" office:value="0.7719072" calcext:value-type="float">
            <text:p>7,72E-01</text:p>
          </table:table-cell>
          <table:table-cell table:style-name="ce1" office:value-type="float" office:value="0.8347335" calcext:value-type="float">
            <text:p>8,35E-01</text:p>
          </table:table-cell>
          <table:table-cell table:style-name="ce1" office:value-type="float" office:value="0.7414708" calcext:value-type="float">
            <text:p>7,41E-01</text:p>
          </table:table-cell>
          <table:table-cell table:style-name="ce1" office:value-type="float" office:value="0.8499194" calcext:value-type="float">
            <text:p>8,50E-01</text:p>
          </table:table-cell>
          <table:table-cell/>
          <table:table-cell table:style-name="ce1" table:formula="of:=MAX([.C46];[.E46];[.G46];[.I46];[.K46])" office:value-type="float" office:value="0.7719072" calcext:value-type="float">
            <text:p>7,72E-01</text:p>
          </table:table-cell>
          <table:table-cell table:style-name="ce8" table:formula="of:=MAX([.D46];[.F46];[.H46];[.J46];[.L46])" office:value-type="float" office:value="0.8499194" calcext:value-type="float">
            <text:p>8,50E-01</text:p>
          </table:table-cell>
          <table:table-cell table:style-name="ce1"/>
          <table:table-cell table:style-name="ce1" office:value-type="float" office:value="0.7719072" calcext:value-type="float">
            <text:p>7,72E-01</text:p>
          </table:table-cell>
          <table:table-cell table:style-name="ce1" office:value-type="float" office:value="0.8499194" calcext:value-type="float">
            <text:p>8,50E-01</text:p>
          </table:table-cell>
          <table:table-cell table:style-name="ce4" table:formula="of:=[.Q46]&gt;[.N46]" office:value-type="boolean" office:boolean-value="false" calcext:value-type="boolean">
            <text:p>БРЕХНЯ</text:p>
          </table:table-cell>
          <table:table-cell table:style-name="ce4" table:formula="of:=[.R46]&gt;[.O4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719072" calcext:value-type="float">
            <text:p>7,72E-01</text:p>
          </table:table-cell>
          <table:table-cell table:style-name="ce4" table:formula="of:=[.V46]&gt;[.Q46]" office:value-type="boolean" office:boolean-value="false" calcext:value-type="boolean">
            <text:p>БРЕХНЯ</text:p>
          </table:table-cell>
          <table:table-cell table:style-name="ce1" table:formula="of:=MAX([.V46];[.Q46])" office:value-type="float" office:value="0.7719072" calcext:value-type="float">
            <text:p>7,72E-01</text:p>
          </table:table-cell>
          <table:table-cell table:style-name="ce4" table:formula="of:=[.X46]&gt;[.R4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6]&gt;[.C46]" office:value-type="boolean" office:boolean-value="false" calcext:value-type="boolean">
            <text:p>БРЕХНЯ</text:p>
          </table:table-cell>
          <table:table-cell table:style-name="ce4" table:formula="of:=[.F46]&gt;[.D46]" office:value-type="boolean" office:boolean-value="true" calcext:value-type="boolean">
            <text:p>ІСТИНА</text:p>
          </table:table-cell>
          <table:table-cell table:style-name="ce4" table:formula="of:=[.G46]&gt;MAX([.C46];[.E46])" office:value-type="boolean" office:boolean-value="false" calcext:value-type="boolean">
            <text:p>БРЕХНЯ</text:p>
          </table:table-cell>
          <table:table-cell table:style-name="ce4" table:formula="of:=[.H46]&gt;MAX([.D46];[.F46])" office:value-type="boolean" office:boolean-value="false" calcext:value-type="boolean">
            <text:p>БРЕХНЯ</text:p>
          </table:table-cell>
          <table:table-cell table:style-name="ce4" table:formula="of:=[.I46]&gt;MAX([.C46];[.E46];[.G46])" office:value-type="boolean" office:boolean-value="true" calcext:value-type="boolean">
            <text:p>ІСТИНА</text:p>
          </table:table-cell>
          <table:table-cell table:style-name="ce4" table:formula="of:=[.J46]&gt;MAX([.D46];[.F46];[.H46])" office:value-type="boolean" office:boolean-value="false" calcext:value-type="boolean">
            <text:p>БРЕХНЯ</text:p>
          </table:table-cell>
          <table:table-cell table:style-name="ce4" table:formula="of:=[.K46]&gt;MAX([.C46];[.E46];[.G46];[.I46])" office:value-type="boolean" office:boolean-value="false" calcext:value-type="boolean">
            <text:p>БРЕХНЯ</text:p>
          </table:table-cell>
          <table:table-cell table:style-name="ce4" table:formula="of:=[.L46]&gt;MAX([.D46];[.F46];[.H46];[.J46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6]&gt;0.9" office:value-type="boolean" office:boolean-value="false" calcext:value-type="boolean">
            <text:p>БРЕХНЯ</text:p>
          </table:table-cell>
          <table:table-cell table:style-name="ce4" table:formula="of:=[.R46]&gt;0.9" office:value-type="boolean" office:boolean-value="false" calcext:value-type="boolean">
            <text:p>БРЕХНЯ</text:p>
          </table:table-cell>
          <table:table-cell table:style-name="ce4" table:formula="of:=[.X46]&gt;0.8" office:value-type="boolean" office:boolean-value="false" calcext:value-type="boolean">
            <text:p>БРЕХНЯ</text:p>
          </table:table-cell>
          <table:table-cell table:style-name="ce4" table:formula="of:=[.R46]&gt;0.8" office:value-type="boolean" office:boolean-value="true" calcext:value-type="boolean">
            <text:p>ІСТИНА</text:p>
          </table:table-cell>
          <table:table-cell table:style-name="ce4" table:formula="of:=[.X46]&gt;0.7" office:value-type="boolean" office:boolean-value="true" calcext:value-type="boolean">
            <text:p>ІСТИНА</text:p>
          </table:table-cell>
          <table:table-cell table:style-name="ce4" table:formula="of:=[.R4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0.7367764" calcext:value-type="float">
            <text:p>7,37E-01</text:p>
          </table:table-cell>
          <table:table-cell table:style-name="ce1" office:value-type="float" office:value="0.8508792" calcext:value-type="float">
            <text:p>8,51E-01</text:p>
          </table:table-cell>
          <table:table-cell table:style-name="ce1" office:value-type="float" office:value="0.7064585" calcext:value-type="float">
            <text:p>7,06E-01</text:p>
          </table:table-cell>
          <table:table-cell table:style-name="ce1" office:value-type="float" office:value="0.8563419" calcext:value-type="float">
            <text:p>8,56E-01</text:p>
          </table:table-cell>
          <table:table-cell table:style-name="ce1" office:value-type="float" office:value="0.7458171" calcext:value-type="float">
            <text:p>7,46E-01</text:p>
          </table:table-cell>
          <table:table-cell table:style-name="ce1" office:value-type="float" office:value="0.8165165" calcext:value-type="float">
            <text:p>8,17E-01</text:p>
          </table:table-cell>
          <table:table-cell table:style-name="ce1" office:value-type="float" office:value="0.785433" calcext:value-type="float">
            <text:p>7,85E-01</text:p>
          </table:table-cell>
          <table:table-cell table:style-name="ce1" office:value-type="float" office:value="0.8838579" calcext:value-type="float">
            <text:p>8,84E-01</text:p>
          </table:table-cell>
          <table:table-cell table:style-name="ce1" office:value-type="float" office:value="0.6945814" calcext:value-type="float">
            <text:p>6,95E-01</text:p>
          </table:table-cell>
          <table:table-cell table:style-name="ce1" office:value-type="float" office:value="0.8935297" calcext:value-type="float">
            <text:p>8,94E-01</text:p>
          </table:table-cell>
          <table:table-cell/>
          <table:table-cell table:style-name="ce1" table:formula="of:=MAX([.C47];[.E47];[.G47];[.I47];[.K47])" office:value-type="float" office:value="0.785433" calcext:value-type="float">
            <text:p>7,85E-01</text:p>
          </table:table-cell>
          <table:table-cell table:style-name="ce8" table:formula="of:=MAX([.D47];[.F47];[.H47];[.J47];[.L47])" office:value-type="float" office:value="0.8935297" calcext:value-type="float">
            <text:p>8,94E-01</text:p>
          </table:table-cell>
          <table:table-cell table:style-name="ce1"/>
          <table:table-cell table:style-name="ce1" office:value-type="float" office:value="0.785433" calcext:value-type="float">
            <text:p>7,85E-01</text:p>
          </table:table-cell>
          <table:table-cell table:style-name="ce1" office:value-type="float" office:value="0.8935297" calcext:value-type="float">
            <text:p>8,94E-01</text:p>
          </table:table-cell>
          <table:table-cell table:style-name="ce4" table:formula="of:=[.Q47]&gt;[.N47]" office:value-type="boolean" office:boolean-value="false" calcext:value-type="boolean">
            <text:p>БРЕХНЯ</text:p>
          </table:table-cell>
          <table:table-cell table:style-name="ce4" table:formula="of:=[.R47]&gt;[.O4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5433" calcext:value-type="float">
            <text:p>7,85E-01</text:p>
          </table:table-cell>
          <table:table-cell table:style-name="ce4" table:formula="of:=[.V47]&gt;[.Q47]" office:value-type="boolean" office:boolean-value="false" calcext:value-type="boolean">
            <text:p>БРЕХНЯ</text:p>
          </table:table-cell>
          <table:table-cell table:style-name="ce1" table:formula="of:=MAX([.V47];[.Q47])" office:value-type="float" office:value="0.785433" calcext:value-type="float">
            <text:p>7,85E-01</text:p>
          </table:table-cell>
          <table:table-cell table:style-name="ce4" table:formula="of:=[.X47]&gt;[.R4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7]&gt;[.C47]" office:value-type="boolean" office:boolean-value="false" calcext:value-type="boolean">
            <text:p>БРЕХНЯ</text:p>
          </table:table-cell>
          <table:table-cell table:style-name="ce4" table:formula="of:=[.F47]&gt;[.D47]" office:value-type="boolean" office:boolean-value="true" calcext:value-type="boolean">
            <text:p>ІСТИНА</text:p>
          </table:table-cell>
          <table:table-cell table:style-name="ce4" table:formula="of:=[.G47]&gt;MAX([.C47];[.E47])" office:value-type="boolean" office:boolean-value="true" calcext:value-type="boolean">
            <text:p>ІСТИНА</text:p>
          </table:table-cell>
          <table:table-cell table:style-name="ce4" table:formula="of:=[.H47]&gt;MAX([.D47];[.F47])" office:value-type="boolean" office:boolean-value="false" calcext:value-type="boolean">
            <text:p>БРЕХНЯ</text:p>
          </table:table-cell>
          <table:table-cell table:style-name="ce4" table:formula="of:=[.I47]&gt;MAX([.C47];[.E47];[.G47])" office:value-type="boolean" office:boolean-value="true" calcext:value-type="boolean">
            <text:p>ІСТИНА</text:p>
          </table:table-cell>
          <table:table-cell table:style-name="ce4" table:formula="of:=[.J47]&gt;MAX([.D47];[.F47];[.H47])" office:value-type="boolean" office:boolean-value="true" calcext:value-type="boolean">
            <text:p>ІСТИНА</text:p>
          </table:table-cell>
          <table:table-cell table:style-name="ce4" table:formula="of:=[.K47]&gt;MAX([.C47];[.E47];[.G47];[.I47])" office:value-type="boolean" office:boolean-value="false" calcext:value-type="boolean">
            <text:p>БРЕХНЯ</text:p>
          </table:table-cell>
          <table:table-cell table:style-name="ce4" table:formula="of:=[.L47]&gt;MAX([.D47];[.F47];[.H47];[.J47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47]&gt;0.9" office:value-type="boolean" office:boolean-value="false" calcext:value-type="boolean">
            <text:p>БРЕХНЯ</text:p>
          </table:table-cell>
          <table:table-cell table:style-name="ce4" table:formula="of:=[.R47]&gt;0.9" office:value-type="boolean" office:boolean-value="false" calcext:value-type="boolean">
            <text:p>БРЕХНЯ</text:p>
          </table:table-cell>
          <table:table-cell table:style-name="ce4" table:formula="of:=[.X47]&gt;0.8" office:value-type="boolean" office:boolean-value="false" calcext:value-type="boolean">
            <text:p>БРЕХНЯ</text:p>
          </table:table-cell>
          <table:table-cell table:style-name="ce4" table:formula="of:=[.R47]&gt;0.8" office:value-type="boolean" office:boolean-value="true" calcext:value-type="boolean">
            <text:p>ІСТИНА</text:p>
          </table:table-cell>
          <table:table-cell table:style-name="ce4" table:formula="of:=[.X47]&gt;0.7" office:value-type="boolean" office:boolean-value="true" calcext:value-type="boolean">
            <text:p>ІСТИНА</text:p>
          </table:table-cell>
          <table:table-cell table:style-name="ce4" table:formula="of:=[.R4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.6829503" calcext:value-type="float">
            <text:p>6,83E-01</text:p>
          </table:table-cell>
          <table:table-cell table:style-name="ce1" office:value-type="float" office:value="0.8514988" calcext:value-type="float">
            <text:p>8,51E-01</text:p>
          </table:table-cell>
          <table:table-cell table:style-name="ce1" office:value-type="float" office:value="0.6623799" calcext:value-type="float">
            <text:p>6,62E-01</text:p>
          </table:table-cell>
          <table:table-cell table:style-name="ce1" office:value-type="float" office:value="0.9117015" calcext:value-type="float">
            <text:p>9,12E-01</text:p>
          </table:table-cell>
          <table:table-cell table:style-name="ce1" office:value-type="float" office:value="0.6757511" calcext:value-type="float">
            <text:p>6,76E-01</text:p>
          </table:table-cell>
          <table:table-cell table:style-name="ce1" office:value-type="float" office:value="0.8555528" calcext:value-type="float">
            <text:p>8,56E-01</text:p>
          </table:table-cell>
          <table:table-cell table:style-name="ce1" office:value-type="float" office:value="0.7366243" calcext:value-type="float">
            <text:p>7,37E-01</text:p>
          </table:table-cell>
          <table:table-cell table:style-name="ce1" office:value-type="float" office:value="0.9040742" calcext:value-type="float">
            <text:p>9,04E-01</text:p>
          </table:table-cell>
          <table:table-cell table:style-name="ce1" office:value-type="float" office:value="0.7252018" calcext:value-type="float">
            <text:p>7,25E-01</text:p>
          </table:table-cell>
          <table:table-cell table:style-name="ce1" office:value-type="float" office:value="0.8840686" calcext:value-type="float">
            <text:p>8,84E-01</text:p>
          </table:table-cell>
          <table:table-cell/>
          <table:table-cell table:style-name="ce1" table:formula="of:=MAX([.C48];[.E48];[.G48];[.I48];[.K48])" office:value-type="float" office:value="0.7366243" calcext:value-type="float">
            <text:p>7,37E-01</text:p>
          </table:table-cell>
          <table:table-cell table:style-name="ce8" table:formula="of:=MAX([.D48];[.F48];[.H48];[.J48];[.L48])" office:value-type="float" office:value="0.9117015" calcext:value-type="float">
            <text:p>9,12E-01</text:p>
          </table:table-cell>
          <table:table-cell table:style-name="ce1"/>
          <table:table-cell table:style-name="ce1" office:value-type="float" office:value="0.7595362" calcext:value-type="float">
            <text:p>7,60E-01</text:p>
          </table:table-cell>
          <table:table-cell table:style-name="ce1" office:value-type="float" office:value="0.9117015" calcext:value-type="float">
            <text:p>9,12E-01</text:p>
          </table:table-cell>
          <table:table-cell table:style-name="ce4" table:formula="of:=[.Q48]&gt;[.N48]" office:value-type="boolean" office:boolean-value="true" calcext:value-type="boolean">
            <text:p>ІСТИНА</text:p>
          </table:table-cell>
          <table:table-cell table:style-name="ce4" table:formula="of:=[.R48]&gt;[.O4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95362" calcext:value-type="float">
            <text:p>7,60E-01</text:p>
          </table:table-cell>
          <table:table-cell table:style-name="ce4" table:formula="of:=[.V48]&gt;[.Q48]" office:value-type="boolean" office:boolean-value="false" calcext:value-type="boolean">
            <text:p>БРЕХНЯ</text:p>
          </table:table-cell>
          <table:table-cell table:style-name="ce1" table:formula="of:=MAX([.V48];[.Q48])" office:value-type="float" office:value="0.7595362" calcext:value-type="float">
            <text:p>7,60E-01</text:p>
          </table:table-cell>
          <table:table-cell table:style-name="ce4" table:formula="of:=[.X48]&gt;[.R4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8]&gt;[.C48]" office:value-type="boolean" office:boolean-value="false" calcext:value-type="boolean">
            <text:p>БРЕХНЯ</text:p>
          </table:table-cell>
          <table:table-cell table:style-name="ce4" table:formula="of:=[.F48]&gt;[.D48]" office:value-type="boolean" office:boolean-value="true" calcext:value-type="boolean">
            <text:p>ІСТИНА</text:p>
          </table:table-cell>
          <table:table-cell table:style-name="ce4" table:formula="of:=[.G48]&gt;MAX([.C48];[.E48])" office:value-type="boolean" office:boolean-value="false" calcext:value-type="boolean">
            <text:p>БРЕХНЯ</text:p>
          </table:table-cell>
          <table:table-cell table:style-name="ce4" table:formula="of:=[.H48]&gt;MAX([.D48];[.F48])" office:value-type="boolean" office:boolean-value="false" calcext:value-type="boolean">
            <text:p>БРЕХНЯ</text:p>
          </table:table-cell>
          <table:table-cell table:style-name="ce4" table:formula="of:=[.I48]&gt;MAX([.C48];[.E48];[.G48])" office:value-type="boolean" office:boolean-value="true" calcext:value-type="boolean">
            <text:p>ІСТИНА</text:p>
          </table:table-cell>
          <table:table-cell table:style-name="ce4" table:formula="of:=[.J48]&gt;MAX([.D48];[.F48];[.H48])" office:value-type="boolean" office:boolean-value="false" calcext:value-type="boolean">
            <text:p>БРЕХНЯ</text:p>
          </table:table-cell>
          <table:table-cell table:style-name="ce4" table:formula="of:=[.K48]&gt;MAX([.C48];[.E48];[.G48];[.I48])" office:value-type="boolean" office:boolean-value="false" calcext:value-type="boolean">
            <text:p>БРЕХНЯ</text:p>
          </table:table-cell>
          <table:table-cell table:style-name="ce4" table:formula="of:=[.L48]&gt;MAX([.D48];[.F48];[.H48];[.J4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8]&gt;0.9" office:value-type="boolean" office:boolean-value="false" calcext:value-type="boolean">
            <text:p>БРЕХНЯ</text:p>
          </table:table-cell>
          <table:table-cell table:style-name="ce4" table:formula="of:=[.R48]&gt;0.9" office:value-type="boolean" office:boolean-value="true" calcext:value-type="boolean">
            <text:p>ІСТИНА</text:p>
          </table:table-cell>
          <table:table-cell table:style-name="ce4" table:formula="of:=[.X48]&gt;0.8" office:value-type="boolean" office:boolean-value="false" calcext:value-type="boolean">
            <text:p>БРЕХНЯ</text:p>
          </table:table-cell>
          <table:table-cell table:style-name="ce4" table:formula="of:=[.R48]&gt;0.8" office:value-type="boolean" office:boolean-value="true" calcext:value-type="boolean">
            <text:p>ІСТИНА</text:p>
          </table:table-cell>
          <table:table-cell table:style-name="ce4" table:formula="of:=[.X48]&gt;0.7" office:value-type="boolean" office:boolean-value="true" calcext:value-type="boolean">
            <text:p>ІСТИНА</text:p>
          </table:table-cell>
          <table:table-cell table:style-name="ce4" table:formula="of:=[.R4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.1400885" calcext:value-type="float">
            <text:p>1,40E-01</text:p>
          </table:table-cell>
          <table:table-cell table:style-name="ce1" office:value-type="float" office:value="0.09462753" calcext:value-type="float">
            <text:p>9,46E-02</text:p>
          </table:table-cell>
          <table:table-cell table:style-name="ce1" office:value-type="float" office:value="0.07152061" calcext:value-type="float">
            <text:p>7,15E-02</text:p>
          </table:table-cell>
          <table:table-cell table:style-name="ce1" office:value-type="float" office:value="0.4145721" calcext:value-type="float">
            <text:p>4,15E-01</text:p>
          </table:table-cell>
          <table:table-cell table:style-name="ce1" office:value-type="float" office:value="-0.01800567" calcext:value-type="float">
            <text:p>-1,80E-02</text:p>
          </table:table-cell>
          <table:table-cell table:style-name="ce1" office:value-type="float" office:value="0.3263543" calcext:value-type="float">
            <text:p>3,26E-01</text:p>
          </table:table-cell>
          <table:table-cell table:style-name="ce1" office:value-type="float" office:value="-0.02367167" calcext:value-type="float">
            <text:p>-2,37E-02</text:p>
          </table:table-cell>
          <table:table-cell table:style-name="ce1" office:value-type="float" office:value="0.4617934" calcext:value-type="float">
            <text:p>4,62E-01</text:p>
          </table:table-cell>
          <table:table-cell table:style-name="ce1" office:value-type="float" office:value="0.1244653" calcext:value-type="float">
            <text:p>1,24E-01</text:p>
          </table:table-cell>
          <table:table-cell table:style-name="ce1" office:value-type="float" office:value="0.2416642" calcext:value-type="float">
            <text:p>2,42E-01</text:p>
          </table:table-cell>
          <table:table-cell/>
          <table:table-cell table:style-name="ce1" table:formula="of:=MAX([.C49];[.E49];[.G49];[.I49];[.K49])" office:value-type="float" office:value="0.1400885" calcext:value-type="float">
            <text:p>1,40E-01</text:p>
          </table:table-cell>
          <table:table-cell table:style-name="ce8" table:formula="of:=MAX([.D49];[.F49];[.H49];[.J49];[.L49])" office:value-type="float" office:value="0.4617934" calcext:value-type="float">
            <text:p>4,62E-01</text:p>
          </table:table-cell>
          <table:table-cell table:style-name="ce2"/>
          <table:table-cell table:style-name="ce1" office:value-type="float" office:value="0.5534678" calcext:value-type="float">
            <text:p>5,53E-01</text:p>
          </table:table-cell>
          <table:table-cell table:style-name="ce1" office:value-type="float" office:value="0.6991602" calcext:value-type="float">
            <text:p>6,99E-01</text:p>
          </table:table-cell>
          <table:table-cell table:style-name="ce4" table:formula="of:=[.Q49]&gt;[.N49]" office:value-type="boolean" office:boolean-value="true" calcext:value-type="boolean">
            <text:p>ІСТИНА</text:p>
          </table:table-cell>
          <table:table-cell table:style-name="ce4" table:formula="of:=[.R49]&gt;[.O49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631807" calcext:value-type="float">
            <text:p>6,63E-01</text:p>
          </table:table-cell>
          <table:table-cell table:style-name="ce4" table:formula="of:=[.V49]&gt;[.Q49]" office:value-type="boolean" office:boolean-value="true" calcext:value-type="boolean">
            <text:p>ІСТИНА</text:p>
          </table:table-cell>
          <table:table-cell table:style-name="ce1" table:formula="of:=MAX([.V49];[.Q49])" office:value-type="float" office:value="0.6631807" calcext:value-type="float">
            <text:p>6,63E-01</text:p>
          </table:table-cell>
          <table:table-cell table:style-name="ce4" table:formula="of:=[.X49]&gt;[.R4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49]&gt;[.C49]" office:value-type="boolean" office:boolean-value="false" calcext:value-type="boolean">
            <text:p>БРЕХНЯ</text:p>
          </table:table-cell>
          <table:table-cell table:style-name="ce4" table:formula="of:=[.F49]&gt;[.D49]" office:value-type="boolean" office:boolean-value="true" calcext:value-type="boolean">
            <text:p>ІСТИНА</text:p>
          </table:table-cell>
          <table:table-cell table:style-name="ce4" table:formula="of:=[.G49]&gt;MAX([.C49];[.E49])" office:value-type="boolean" office:boolean-value="false" calcext:value-type="boolean">
            <text:p>БРЕХНЯ</text:p>
          </table:table-cell>
          <table:table-cell table:style-name="ce4" table:formula="of:=[.H49]&gt;MAX([.D49];[.F49])" office:value-type="boolean" office:boolean-value="false" calcext:value-type="boolean">
            <text:p>БРЕХНЯ</text:p>
          </table:table-cell>
          <table:table-cell table:style-name="ce4" table:formula="of:=[.I49]&gt;MAX([.C49];[.E49];[.G49])" office:value-type="boolean" office:boolean-value="false" calcext:value-type="boolean">
            <text:p>БРЕХНЯ</text:p>
          </table:table-cell>
          <table:table-cell table:style-name="ce4" table:formula="of:=[.J49]&gt;MAX([.D49];[.F49];[.H49])" office:value-type="boolean" office:boolean-value="true" calcext:value-type="boolean">
            <text:p>ІСТИНА</text:p>
          </table:table-cell>
          <table:table-cell table:style-name="ce4" table:formula="of:=[.K49]&gt;MAX([.C49];[.E49];[.G49];[.I49])" office:value-type="boolean" office:boolean-value="false" calcext:value-type="boolean">
            <text:p>БРЕХНЯ</text:p>
          </table:table-cell>
          <table:table-cell table:style-name="ce4" table:formula="of:=[.L49]&gt;MAX([.D49];[.F49];[.H49];[.J4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49]&gt;0.9" office:value-type="boolean" office:boolean-value="false" calcext:value-type="boolean">
            <text:p>БРЕХНЯ</text:p>
          </table:table-cell>
          <table:table-cell table:style-name="ce4" table:formula="of:=[.R49]&gt;0.9" office:value-type="boolean" office:boolean-value="false" calcext:value-type="boolean">
            <text:p>БРЕХНЯ</text:p>
          </table:table-cell>
          <table:table-cell table:style-name="ce4" table:formula="of:=[.X49]&gt;0.8" office:value-type="boolean" office:boolean-value="false" calcext:value-type="boolean">
            <text:p>БРЕХНЯ</text:p>
          </table:table-cell>
          <table:table-cell table:style-name="ce4" table:formula="of:=[.R49]&gt;0.8" office:value-type="boolean" office:boolean-value="false" calcext:value-type="boolean">
            <text:p>БРЕХНЯ</text:p>
          </table:table-cell>
          <table:table-cell table:style-name="ce4" table:formula="of:=[.X49]&gt;0.7" office:value-type="boolean" office:boolean-value="false" calcext:value-type="boolean">
            <text:p>БРЕХНЯ</text:p>
          </table:table-cell>
          <table:table-cell table:style-name="ce4" table:formula="of:=[.R49]&gt;0.7" office:value-type="boolean" office:boolean-value="false" calcext:value-type="boolean">
            <text:p>БРЕХН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0.7210916" calcext:value-type="float">
            <text:p>7,21E-01</text:p>
          </table:table-cell>
          <table:table-cell table:style-name="ce1" office:value-type="float" office:value="0.8030219" calcext:value-type="float">
            <text:p>8,03E-01</text:p>
          </table:table-cell>
          <table:table-cell table:style-name="ce1" office:value-type="float" office:value="0.7357856" calcext:value-type="float">
            <text:p>7,36E-01</text:p>
          </table:table-cell>
          <table:table-cell table:style-name="ce1" office:value-type="float" office:value="0.834639" calcext:value-type="float">
            <text:p>8,35E-01</text:p>
          </table:table-cell>
          <table:table-cell table:style-name="ce1" office:value-type="float" office:value="0.7250885" calcext:value-type="float">
            <text:p>7,25E-01</text:p>
          </table:table-cell>
          <table:table-cell table:style-name="ce1" office:value-type="float" office:value="0.8191231" calcext:value-type="float">
            <text:p>8,19E-01</text:p>
          </table:table-cell>
          <table:table-cell table:style-name="ce1" office:value-type="float" office:value="0.6670393" calcext:value-type="float">
            <text:p>6,67E-01</text:p>
          </table:table-cell>
          <table:table-cell table:style-name="ce1" office:value-type="float" office:value="0.7819827" calcext:value-type="float">
            <text:p>7,82E-01</text:p>
          </table:table-cell>
          <table:table-cell table:style-name="ce1" office:value-type="float" office:value="0.7200441" calcext:value-type="float">
            <text:p>7,20E-01</text:p>
          </table:table-cell>
          <table:table-cell table:style-name="ce1" office:value-type="float" office:value="0.8542804" calcext:value-type="float">
            <text:p>8,54E-01</text:p>
          </table:table-cell>
          <table:table-cell/>
          <table:table-cell table:style-name="ce1" table:formula="of:=MAX([.C50];[.E50];[.G50];[.I50];[.K50])" office:value-type="float" office:value="0.7357856" calcext:value-type="float">
            <text:p>7,36E-01</text:p>
          </table:table-cell>
          <table:table-cell table:style-name="ce8" table:formula="of:=MAX([.D50];[.F50];[.H50];[.J50];[.L50])" office:value-type="float" office:value="0.8542804" calcext:value-type="float">
            <text:p>8,54E-01</text:p>
          </table:table-cell>
          <table:table-cell table:style-name="ce1"/>
          <table:table-cell table:style-name="ce1" office:value-type="float" office:value="0.7357856" calcext:value-type="float">
            <text:p>7,36E-01</text:p>
          </table:table-cell>
          <table:table-cell table:style-name="ce1" office:value-type="float" office:value="0.8542804" calcext:value-type="float">
            <text:p>8,54E-01</text:p>
          </table:table-cell>
          <table:table-cell table:style-name="ce4" table:formula="of:=[.Q50]&gt;[.N50]" office:value-type="boolean" office:boolean-value="false" calcext:value-type="boolean">
            <text:p>БРЕХНЯ</text:p>
          </table:table-cell>
          <table:table-cell table:style-name="ce4" table:formula="of:=[.R50]&gt;[.O5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357856" calcext:value-type="float">
            <text:p>7,36E-01</text:p>
          </table:table-cell>
          <table:table-cell table:style-name="ce4" table:formula="of:=[.V50]&gt;[.Q50]" office:value-type="boolean" office:boolean-value="false" calcext:value-type="boolean">
            <text:p>БРЕХНЯ</text:p>
          </table:table-cell>
          <table:table-cell table:style-name="ce1" table:formula="of:=MAX([.V50];[.Q50])" office:value-type="float" office:value="0.7357856" calcext:value-type="float">
            <text:p>7,36E-01</text:p>
          </table:table-cell>
          <table:table-cell table:style-name="ce4" table:formula="of:=[.X50]&gt;[.R5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0]&gt;[.C50]" office:value-type="boolean" office:boolean-value="true" calcext:value-type="boolean">
            <text:p>ІСТИНА</text:p>
          </table:table-cell>
          <table:table-cell table:style-name="ce4" table:formula="of:=[.F50]&gt;[.D50]" office:value-type="boolean" office:boolean-value="true" calcext:value-type="boolean">
            <text:p>ІСТИНА</text:p>
          </table:table-cell>
          <table:table-cell table:style-name="ce4" table:formula="of:=[.G50]&gt;MAX([.C50];[.E50])" office:value-type="boolean" office:boolean-value="false" calcext:value-type="boolean">
            <text:p>БРЕХНЯ</text:p>
          </table:table-cell>
          <table:table-cell table:style-name="ce4" table:formula="of:=[.H50]&gt;MAX([.D50];[.F50])" office:value-type="boolean" office:boolean-value="false" calcext:value-type="boolean">
            <text:p>БРЕХНЯ</text:p>
          </table:table-cell>
          <table:table-cell table:style-name="ce4" table:formula="of:=[.I50]&gt;MAX([.C50];[.E50];[.G50])" office:value-type="boolean" office:boolean-value="false" calcext:value-type="boolean">
            <text:p>БРЕХНЯ</text:p>
          </table:table-cell>
          <table:table-cell table:style-name="ce4" table:formula="of:=[.J50]&gt;MAX([.D50];[.F50];[.H50])" office:value-type="boolean" office:boolean-value="false" calcext:value-type="boolean">
            <text:p>БРЕХНЯ</text:p>
          </table:table-cell>
          <table:table-cell table:style-name="ce4" table:formula="of:=[.K50]&gt;MAX([.C50];[.E50];[.G50];[.I50])" office:value-type="boolean" office:boolean-value="false" calcext:value-type="boolean">
            <text:p>БРЕХНЯ</text:p>
          </table:table-cell>
          <table:table-cell table:style-name="ce4" table:formula="of:=[.L50]&gt;MAX([.D50];[.F50];[.H50];[.J50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50]&gt;0.9" office:value-type="boolean" office:boolean-value="false" calcext:value-type="boolean">
            <text:p>БРЕХНЯ</text:p>
          </table:table-cell>
          <table:table-cell table:style-name="ce4" table:formula="of:=[.R50]&gt;0.9" office:value-type="boolean" office:boolean-value="false" calcext:value-type="boolean">
            <text:p>БРЕХНЯ</text:p>
          </table:table-cell>
          <table:table-cell table:style-name="ce4" table:formula="of:=[.X50]&gt;0.8" office:value-type="boolean" office:boolean-value="false" calcext:value-type="boolean">
            <text:p>БРЕХНЯ</text:p>
          </table:table-cell>
          <table:table-cell table:style-name="ce4" table:formula="of:=[.R50]&gt;0.8" office:value-type="boolean" office:boolean-value="true" calcext:value-type="boolean">
            <text:p>ІСТИНА</text:p>
          </table:table-cell>
          <table:table-cell table:style-name="ce4" table:formula="of:=[.X50]&gt;0.7" office:value-type="boolean" office:boolean-value="true" calcext:value-type="boolean">
            <text:p>ІСТИНА</text:p>
          </table:table-cell>
          <table:table-cell table:style-name="ce4" table:formula="of:=[.R5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0.7873237" calcext:value-type="float">
            <text:p>7,87E-01</text:p>
          </table:table-cell>
          <table:table-cell table:style-name="ce1" office:value-type="float" office:value="0.8672908" calcext:value-type="float">
            <text:p>8,67E-01</text:p>
          </table:table-cell>
          <table:table-cell table:style-name="ce1" office:value-type="float" office:value="0.6718839" calcext:value-type="float">
            <text:p>6,72E-01</text:p>
          </table:table-cell>
          <table:table-cell table:style-name="ce1" office:value-type="float" office:value="0.8910263" calcext:value-type="float">
            <text:p>8,91E-01</text:p>
          </table:table-cell>
          <table:table-cell table:style-name="ce1" office:value-type="float" office:value="0.7728082" calcext:value-type="float">
            <text:p>7,73E-01</text:p>
          </table:table-cell>
          <table:table-cell table:style-name="ce1" office:value-type="float" office:value="0.9007543" calcext:value-type="float">
            <text:p>9,01E-01</text:p>
          </table:table-cell>
          <table:table-cell table:style-name="ce1" office:value-type="float" office:value="0.7134044" calcext:value-type="float">
            <text:p>7,13E-01</text:p>
          </table:table-cell>
          <table:table-cell table:style-name="ce1" office:value-type="float" office:value="0.7882901" calcext:value-type="float">
            <text:p>7,88E-01</text:p>
          </table:table-cell>
          <table:table-cell table:style-name="ce1" office:value-type="float" office:value="0.747904" calcext:value-type="float">
            <text:p>7,48E-01</text:p>
          </table:table-cell>
          <table:table-cell table:style-name="ce1" office:value-type="float" office:value="0.8471508" calcext:value-type="float">
            <text:p>8,47E-01</text:p>
          </table:table-cell>
          <table:table-cell/>
          <table:table-cell table:style-name="ce1" table:formula="of:=MAX([.C51];[.E51];[.G51];[.I51];[.K51])" office:value-type="float" office:value="0.7873237" calcext:value-type="float">
            <text:p>7,87E-01</text:p>
          </table:table-cell>
          <table:table-cell table:style-name="ce8" table:formula="of:=MAX([.D51];[.F51];[.H51];[.J51];[.L51])" office:value-type="float" office:value="0.9007543" calcext:value-type="float">
            <text:p>9,01E-01</text:p>
          </table:table-cell>
          <table:table-cell table:style-name="ce1"/>
          <table:table-cell table:style-name="ce1" office:value-type="float" office:value="0.7873237" calcext:value-type="float">
            <text:p>7,87E-01</text:p>
          </table:table-cell>
          <table:table-cell table:style-name="ce1" office:value-type="float" office:value="0.9007543" calcext:value-type="float">
            <text:p>9,01E-01</text:p>
          </table:table-cell>
          <table:table-cell table:style-name="ce4" table:formula="of:=[.Q51]&gt;[.N51]" office:value-type="boolean" office:boolean-value="false" calcext:value-type="boolean">
            <text:p>БРЕХНЯ</text:p>
          </table:table-cell>
          <table:table-cell table:style-name="ce4" table:formula="of:=[.R51]&gt;[.O5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873237" calcext:value-type="float">
            <text:p>7,87E-01</text:p>
          </table:table-cell>
          <table:table-cell table:style-name="ce4" table:formula="of:=[.V51]&gt;[.Q51]" office:value-type="boolean" office:boolean-value="false" calcext:value-type="boolean">
            <text:p>БРЕХНЯ</text:p>
          </table:table-cell>
          <table:table-cell table:style-name="ce1" table:formula="of:=MAX([.V51];[.Q51])" office:value-type="float" office:value="0.7873237" calcext:value-type="float">
            <text:p>7,87E-01</text:p>
          </table:table-cell>
          <table:table-cell table:style-name="ce4" table:formula="of:=[.X51]&gt;[.R5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1]&gt;[.C51]" office:value-type="boolean" office:boolean-value="false" calcext:value-type="boolean">
            <text:p>БРЕХНЯ</text:p>
          </table:table-cell>
          <table:table-cell table:style-name="ce4" table:formula="of:=[.F51]&gt;[.D51]" office:value-type="boolean" office:boolean-value="true" calcext:value-type="boolean">
            <text:p>ІСТИНА</text:p>
          </table:table-cell>
          <table:table-cell table:style-name="ce4" table:formula="of:=[.G51]&gt;MAX([.C51];[.E51])" office:value-type="boolean" office:boolean-value="false" calcext:value-type="boolean">
            <text:p>БРЕХНЯ</text:p>
          </table:table-cell>
          <table:table-cell table:style-name="ce4" table:formula="of:=[.H51]&gt;MAX([.D51];[.F51])" office:value-type="boolean" office:boolean-value="true" calcext:value-type="boolean">
            <text:p>ІСТИНА</text:p>
          </table:table-cell>
          <table:table-cell table:style-name="ce4" table:formula="of:=[.I51]&gt;MAX([.C51];[.E51];[.G51])" office:value-type="boolean" office:boolean-value="false" calcext:value-type="boolean">
            <text:p>БРЕХНЯ</text:p>
          </table:table-cell>
          <table:table-cell table:style-name="ce4" table:formula="of:=[.J51]&gt;MAX([.D51];[.F51];[.H51])" office:value-type="boolean" office:boolean-value="false" calcext:value-type="boolean">
            <text:p>БРЕХНЯ</text:p>
          </table:table-cell>
          <table:table-cell table:style-name="ce4" table:formula="of:=[.K51]&gt;MAX([.C51];[.E51];[.G51];[.I51])" office:value-type="boolean" office:boolean-value="false" calcext:value-type="boolean">
            <text:p>БРЕХНЯ</text:p>
          </table:table-cell>
          <table:table-cell table:style-name="ce4" table:formula="of:=[.L51]&gt;MAX([.D51];[.F51];[.H51];[.J5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1]&gt;0.9" office:value-type="boolean" office:boolean-value="false" calcext:value-type="boolean">
            <text:p>БРЕХНЯ</text:p>
          </table:table-cell>
          <table:table-cell table:style-name="ce4" table:formula="of:=[.R51]&gt;0.9" office:value-type="boolean" office:boolean-value="true" calcext:value-type="boolean">
            <text:p>ІСТИНА</text:p>
          </table:table-cell>
          <table:table-cell table:style-name="ce4" table:formula="of:=[.X51]&gt;0.8" office:value-type="boolean" office:boolean-value="false" calcext:value-type="boolean">
            <text:p>БРЕХНЯ</text:p>
          </table:table-cell>
          <table:table-cell table:style-name="ce4" table:formula="of:=[.R51]&gt;0.8" office:value-type="boolean" office:boolean-value="true" calcext:value-type="boolean">
            <text:p>ІСТИНА</text:p>
          </table:table-cell>
          <table:table-cell table:style-name="ce4" table:formula="of:=[.X51]&gt;0.7" office:value-type="boolean" office:boolean-value="true" calcext:value-type="boolean">
            <text:p>ІСТИНА</text:p>
          </table:table-cell>
          <table:table-cell table:style-name="ce4" table:formula="of:=[.R5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.7347474" calcext:value-type="float">
            <text:p>7,35E-01</text:p>
          </table:table-cell>
          <table:table-cell table:style-name="ce1" office:value-type="float" office:value="0.8808876" calcext:value-type="float">
            <text:p>8,81E-01</text:p>
          </table:table-cell>
          <table:table-cell table:style-name="ce1" office:value-type="float" office:value="0.7312411" calcext:value-type="float">
            <text:p>7,31E-01</text:p>
          </table:table-cell>
          <table:table-cell table:style-name="ce1" office:value-type="float" office:value="0.8147939" calcext:value-type="float">
            <text:p>8,15E-01</text:p>
          </table:table-cell>
          <table:table-cell table:style-name="ce1" office:value-type="float" office:value="0.6901604" calcext:value-type="float">
            <text:p>6,90E-01</text:p>
          </table:table-cell>
          <table:table-cell table:style-name="ce1" office:value-type="float" office:value="0.7954413" calcext:value-type="float">
            <text:p>7,95E-01</text:p>
          </table:table-cell>
          <table:table-cell table:style-name="ce1" office:value-type="float" office:value="0.7431548" calcext:value-type="float">
            <text:p>7,43E-01</text:p>
          </table:table-cell>
          <table:table-cell table:style-name="ce1" office:value-type="float" office:value="0.8483479" calcext:value-type="float">
            <text:p>8,48E-01</text:p>
          </table:table-cell>
          <table:table-cell table:style-name="ce1" office:value-type="float" office:value="0.7480527" calcext:value-type="float">
            <text:p>7,48E-01</text:p>
          </table:table-cell>
          <table:table-cell table:style-name="ce1" office:value-type="float" office:value="0.8905374" calcext:value-type="float">
            <text:p>8,91E-01</text:p>
          </table:table-cell>
          <table:table-cell/>
          <table:table-cell table:style-name="ce1" table:formula="of:=MAX([.C52];[.E52];[.G52];[.I52];[.K52])" office:value-type="float" office:value="0.7480527" calcext:value-type="float">
            <text:p>7,48E-01</text:p>
          </table:table-cell>
          <table:table-cell table:style-name="ce8" table:formula="of:=MAX([.D52];[.F52];[.H52];[.J52];[.L52])" office:value-type="float" office:value="0.8905374" calcext:value-type="float">
            <text:p>8,91E-01</text:p>
          </table:table-cell>
          <table:table-cell table:style-name="ce1"/>
          <table:table-cell table:style-name="ce1" office:value-type="float" office:value="0.7480527" calcext:value-type="float">
            <text:p>7,48E-01</text:p>
          </table:table-cell>
          <table:table-cell table:style-name="ce1" office:value-type="float" office:value="0.8905374" calcext:value-type="float">
            <text:p>8,91E-01</text:p>
          </table:table-cell>
          <table:table-cell table:style-name="ce4" table:formula="of:=[.Q52]&gt;[.N52]" office:value-type="boolean" office:boolean-value="false" calcext:value-type="boolean">
            <text:p>БРЕХНЯ</text:p>
          </table:table-cell>
          <table:table-cell table:style-name="ce4" table:formula="of:=[.R52]&gt;[.O5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480527" calcext:value-type="float">
            <text:p>7,48E-01</text:p>
          </table:table-cell>
          <table:table-cell table:style-name="ce4" table:formula="of:=[.V52]&gt;[.Q52]" office:value-type="boolean" office:boolean-value="false" calcext:value-type="boolean">
            <text:p>БРЕХНЯ</text:p>
          </table:table-cell>
          <table:table-cell table:style-name="ce1" table:formula="of:=MAX([.V52];[.Q52])" office:value-type="float" office:value="0.7480527" calcext:value-type="float">
            <text:p>7,48E-01</text:p>
          </table:table-cell>
          <table:table-cell table:style-name="ce4" table:formula="of:=[.X52]&gt;[.R5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2]&gt;[.C52]" office:value-type="boolean" office:boolean-value="false" calcext:value-type="boolean">
            <text:p>БРЕХНЯ</text:p>
          </table:table-cell>
          <table:table-cell table:style-name="ce4" table:formula="of:=[.F52]&gt;[.D52]" office:value-type="boolean" office:boolean-value="false" calcext:value-type="boolean">
            <text:p>БРЕХНЯ</text:p>
          </table:table-cell>
          <table:table-cell table:style-name="ce4" table:formula="of:=[.G52]&gt;MAX([.C52];[.E52])" office:value-type="boolean" office:boolean-value="false" calcext:value-type="boolean">
            <text:p>БРЕХНЯ</text:p>
          </table:table-cell>
          <table:table-cell table:style-name="ce4" table:formula="of:=[.H52]&gt;MAX([.D52];[.F52])" office:value-type="boolean" office:boolean-value="false" calcext:value-type="boolean">
            <text:p>БРЕХНЯ</text:p>
          </table:table-cell>
          <table:table-cell table:style-name="ce4" table:formula="of:=[.I52]&gt;MAX([.C52];[.E52];[.G52])" office:value-type="boolean" office:boolean-value="true" calcext:value-type="boolean">
            <text:p>ІСТИНА</text:p>
          </table:table-cell>
          <table:table-cell table:style-name="ce4" table:formula="of:=[.J52]&gt;MAX([.D52];[.F52];[.H52])" office:value-type="boolean" office:boolean-value="false" calcext:value-type="boolean">
            <text:p>БРЕХНЯ</text:p>
          </table:table-cell>
          <table:table-cell table:style-name="ce4" table:formula="of:=[.K52]&gt;MAX([.C52];[.E52];[.G52];[.I52])" office:value-type="boolean" office:boolean-value="true" calcext:value-type="boolean">
            <text:p>ІСТИНА</text:p>
          </table:table-cell>
          <table:table-cell table:style-name="ce4" table:formula="of:=[.L52]&gt;MAX([.D52];[.F52];[.H52];[.J52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52]&gt;0.9" office:value-type="boolean" office:boolean-value="false" calcext:value-type="boolean">
            <text:p>БРЕХНЯ</text:p>
          </table:table-cell>
          <table:table-cell table:style-name="ce4" table:formula="of:=[.R52]&gt;0.9" office:value-type="boolean" office:boolean-value="false" calcext:value-type="boolean">
            <text:p>БРЕХНЯ</text:p>
          </table:table-cell>
          <table:table-cell table:style-name="ce4" table:formula="of:=[.X52]&gt;0.8" office:value-type="boolean" office:boolean-value="false" calcext:value-type="boolean">
            <text:p>БРЕХНЯ</text:p>
          </table:table-cell>
          <table:table-cell table:style-name="ce4" table:formula="of:=[.R52]&gt;0.8" office:value-type="boolean" office:boolean-value="true" calcext:value-type="boolean">
            <text:p>ІСТИНА</text:p>
          </table:table-cell>
          <table:table-cell table:style-name="ce4" table:formula="of:=[.X52]&gt;0.7" office:value-type="boolean" office:boolean-value="true" calcext:value-type="boolean">
            <text:p>ІСТИНА</text:p>
          </table:table-cell>
          <table:table-cell table:style-name="ce4" table:formula="of:=[.R5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0.6840795" calcext:value-type="float">
            <text:p>6,84E-01</text:p>
          </table:table-cell>
          <table:table-cell table:style-name="ce1" office:value-type="float" office:value="0.8847798" calcext:value-type="float">
            <text:p>8,85E-01</text:p>
          </table:table-cell>
          <table:table-cell table:style-name="ce1" office:value-type="float" office:value="0.6701825" calcext:value-type="float">
            <text:p>6,70E-01</text:p>
          </table:table-cell>
          <table:table-cell table:style-name="ce1" office:value-type="float" office:value="0.7613285" calcext:value-type="float">
            <text:p>7,61E-01</text:p>
          </table:table-cell>
          <table:table-cell table:style-name="ce1" office:value-type="float" office:value="0.6916753" calcext:value-type="float">
            <text:p>6,92E-01</text:p>
          </table:table-cell>
          <table:table-cell table:style-name="ce1" office:value-type="float" office:value="0.877149" calcext:value-type="float">
            <text:p>8,77E-01</text:p>
          </table:table-cell>
          <table:table-cell table:style-name="ce1" office:value-type="float" office:value="0.6697651" calcext:value-type="float">
            <text:p>6,70E-01</text:p>
          </table:table-cell>
          <table:table-cell table:style-name="ce1" office:value-type="float" office:value="0.8911085" calcext:value-type="float">
            <text:p>8,91E-01</text:p>
          </table:table-cell>
          <table:table-cell table:style-name="ce1" office:value-type="float" office:value="0.6994159" calcext:value-type="float">
            <text:p>6,99E-01</text:p>
          </table:table-cell>
          <table:table-cell table:style-name="ce1" office:value-type="float" office:value="0.8567222" calcext:value-type="float">
            <text:p>8,57E-01</text:p>
          </table:table-cell>
          <table:table-cell/>
          <table:table-cell table:style-name="ce1" table:formula="of:=MAX([.C53];[.E53];[.G53];[.I53];[.K53])" office:value-type="float" office:value="0.6994159" calcext:value-type="float">
            <text:p>6,99E-01</text:p>
          </table:table-cell>
          <table:table-cell table:style-name="ce8" table:formula="of:=MAX([.D53];[.F53];[.H53];[.J53];[.L53])" office:value-type="float" office:value="0.8911085" calcext:value-type="float">
            <text:p>8,91E-01</text:p>
          </table:table-cell>
          <table:table-cell table:style-name="ce1"/>
          <table:table-cell table:style-name="ce1" office:value-type="float" office:value="0.7130136" calcext:value-type="float">
            <text:p>7,13E-01</text:p>
          </table:table-cell>
          <table:table-cell table:style-name="ce1" office:value-type="float" office:value="0.8911085" calcext:value-type="float">
            <text:p>8,91E-01</text:p>
          </table:table-cell>
          <table:table-cell table:style-name="ce4" table:formula="of:=[.Q53]&gt;[.N53]" office:value-type="boolean" office:boolean-value="true" calcext:value-type="boolean">
            <text:p>ІСТИНА</text:p>
          </table:table-cell>
          <table:table-cell table:style-name="ce4" table:formula="of:=[.R53]&gt;[.O5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130136" calcext:value-type="float">
            <text:p>7,13E-01</text:p>
          </table:table-cell>
          <table:table-cell table:style-name="ce4" table:formula="of:=[.V53]&gt;[.Q53]" office:value-type="boolean" office:boolean-value="false" calcext:value-type="boolean">
            <text:p>БРЕХНЯ</text:p>
          </table:table-cell>
          <table:table-cell table:style-name="ce1" table:formula="of:=MAX([.V53];[.Q53])" office:value-type="float" office:value="0.7130136" calcext:value-type="float">
            <text:p>7,13E-01</text:p>
          </table:table-cell>
          <table:table-cell table:style-name="ce4" table:formula="of:=[.X53]&gt;[.R5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3]&gt;[.C53]" office:value-type="boolean" office:boolean-value="false" calcext:value-type="boolean">
            <text:p>БРЕХНЯ</text:p>
          </table:table-cell>
          <table:table-cell table:style-name="ce4" table:formula="of:=[.F53]&gt;[.D53]" office:value-type="boolean" office:boolean-value="false" calcext:value-type="boolean">
            <text:p>БРЕХНЯ</text:p>
          </table:table-cell>
          <table:table-cell table:style-name="ce4" table:formula="of:=[.G53]&gt;MAX([.C53];[.E53])" office:value-type="boolean" office:boolean-value="true" calcext:value-type="boolean">
            <text:p>ІСТИНА</text:p>
          </table:table-cell>
          <table:table-cell table:style-name="ce4" table:formula="of:=[.H53]&gt;MAX([.D53];[.F53])" office:value-type="boolean" office:boolean-value="false" calcext:value-type="boolean">
            <text:p>БРЕХНЯ</text:p>
          </table:table-cell>
          <table:table-cell table:style-name="ce4" table:formula="of:=[.I53]&gt;MAX([.C53];[.E53];[.G53])" office:value-type="boolean" office:boolean-value="false" calcext:value-type="boolean">
            <text:p>БРЕХНЯ</text:p>
          </table:table-cell>
          <table:table-cell table:style-name="ce4" table:formula="of:=[.J53]&gt;MAX([.D53];[.F53];[.H53])" office:value-type="boolean" office:boolean-value="true" calcext:value-type="boolean">
            <text:p>ІСТИНА</text:p>
          </table:table-cell>
          <table:table-cell table:style-name="ce4" table:formula="of:=[.K53]&gt;MAX([.C53];[.E53];[.G53];[.I53])" office:value-type="boolean" office:boolean-value="true" calcext:value-type="boolean">
            <text:p>ІСТИНА</text:p>
          </table:table-cell>
          <table:table-cell table:style-name="ce4" table:formula="of:=[.L53]&gt;MAX([.D53];[.F53];[.H53];[.J5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3]&gt;0.9" office:value-type="boolean" office:boolean-value="false" calcext:value-type="boolean">
            <text:p>БРЕХНЯ</text:p>
          </table:table-cell>
          <table:table-cell table:style-name="ce4" table:formula="of:=[.R53]&gt;0.9" office:value-type="boolean" office:boolean-value="false" calcext:value-type="boolean">
            <text:p>БРЕХНЯ</text:p>
          </table:table-cell>
          <table:table-cell table:style-name="ce4" table:formula="of:=[.X53]&gt;0.8" office:value-type="boolean" office:boolean-value="false" calcext:value-type="boolean">
            <text:p>БРЕХНЯ</text:p>
          </table:table-cell>
          <table:table-cell table:style-name="ce4" table:formula="of:=[.R53]&gt;0.8" office:value-type="boolean" office:boolean-value="true" calcext:value-type="boolean">
            <text:p>ІСТИНА</text:p>
          </table:table-cell>
          <table:table-cell table:style-name="ce4" table:formula="of:=[.X53]&gt;0.7" office:value-type="boolean" office:boolean-value="true" calcext:value-type="boolean">
            <text:p>ІСТИНА</text:p>
          </table:table-cell>
          <table:table-cell table:style-name="ce4" table:formula="of:=[.R5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.01985203" calcext:value-type="float">
            <text:p>1,99E-02</text:p>
          </table:table-cell>
          <table:table-cell table:style-name="ce1" office:value-type="float" office:value="0.02152041" calcext:value-type="float">
            <text:p>2,15E-02</text:p>
          </table:table-cell>
          <table:table-cell table:style-name="ce1" office:value-type="float" office:value="0.05883725" calcext:value-type="float">
            <text:p>5,88E-02</text:p>
          </table:table-cell>
          <table:table-cell table:style-name="ce1" office:value-type="float" office:value="0.2197621" calcext:value-type="float">
            <text:p>2,20E-01</text:p>
          </table:table-cell>
          <table:table-cell table:style-name="ce1" office:value-type="float" office:value="-0.004760432" calcext:value-type="float">
            <text:p>-4,76E-03</text:p>
          </table:table-cell>
          <table:table-cell table:style-name="ce1" office:value-type="float" office:value="0.2177099" calcext:value-type="float">
            <text:p>2,18E-01</text:p>
          </table:table-cell>
          <table:table-cell table:style-name="ce1" office:value-type="float" office:value="0.0884662" calcext:value-type="float">
            <text:p>8,85E-02</text:p>
          </table:table-cell>
          <table:table-cell table:style-name="ce1" office:value-type="float" office:value="0.05160207" calcext:value-type="float">
            <text:p>5,16E-02</text:p>
          </table:table-cell>
          <table:table-cell table:style-name="ce1" office:value-type="float" office:value="0.1016166" calcext:value-type="float">
            <text:p>1,02E-01</text:p>
          </table:table-cell>
          <table:table-cell table:style-name="ce1" office:value-type="float" office:value="0.2423197" calcext:value-type="float">
            <text:p>2,42E-01</text:p>
          </table:table-cell>
          <table:table-cell/>
          <table:table-cell table:style-name="ce1" table:formula="of:=MAX([.C54];[.E54];[.G54];[.I54];[.K54])" office:value-type="float" office:value="0.1016166" calcext:value-type="float">
            <text:p>1,02E-01</text:p>
          </table:table-cell>
          <table:table-cell table:style-name="ce8" table:formula="of:=MAX([.D54];[.F54];[.H54];[.J54];[.L54])" office:value-type="float" office:value="0.2423197" calcext:value-type="float">
            <text:p>2,42E-01</text:p>
          </table:table-cell>
          <table:table-cell table:style-name="ce2"/>
          <table:table-cell table:style-name="ce1" office:value-type="float" office:value="0.565248" calcext:value-type="float">
            <text:p>5,65E-01</text:p>
          </table:table-cell>
          <table:table-cell table:style-name="ce1" office:value-type="float" office:value="0.7260433" calcext:value-type="float">
            <text:p>7,26E-01</text:p>
          </table:table-cell>
          <table:table-cell table:style-name="ce4" table:formula="of:=[.Q54]&gt;[.N54]" office:value-type="boolean" office:boolean-value="true" calcext:value-type="boolean">
            <text:p>ІСТИНА</text:p>
          </table:table-cell>
          <table:table-cell table:style-name="ce4" table:formula="of:=[.R54]&gt;[.O54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5962879" calcext:value-type="float">
            <text:p>5,96E-01</text:p>
          </table:table-cell>
          <table:table-cell table:style-name="ce4" table:formula="of:=[.V54]&gt;[.Q54]" office:value-type="boolean" office:boolean-value="true" calcext:value-type="boolean">
            <text:p>ІСТИНА</text:p>
          </table:table-cell>
          <table:table-cell table:style-name="ce1" table:formula="of:=MAX([.V54];[.Q54])" office:value-type="float" office:value="0.5962879" calcext:value-type="float">
            <text:p>5,96E-01</text:p>
          </table:table-cell>
          <table:table-cell table:style-name="ce4" table:formula="of:=[.X54]&gt;[.R5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4]&gt;[.C54]" office:value-type="boolean" office:boolean-value="true" calcext:value-type="boolean">
            <text:p>ІСТИНА</text:p>
          </table:table-cell>
          <table:table-cell table:style-name="ce4" table:formula="of:=[.F54]&gt;[.D54]" office:value-type="boolean" office:boolean-value="true" calcext:value-type="boolean">
            <text:p>ІСТИНА</text:p>
          </table:table-cell>
          <table:table-cell table:style-name="ce4" table:formula="of:=[.G54]&gt;MAX([.C54];[.E54])" office:value-type="boolean" office:boolean-value="false" calcext:value-type="boolean">
            <text:p>БРЕХНЯ</text:p>
          </table:table-cell>
          <table:table-cell table:style-name="ce4" table:formula="of:=[.H54]&gt;MAX([.D54];[.F54])" office:value-type="boolean" office:boolean-value="false" calcext:value-type="boolean">
            <text:p>БРЕХНЯ</text:p>
          </table:table-cell>
          <table:table-cell table:style-name="ce4" table:formula="of:=[.I54]&gt;MAX([.C54];[.E54];[.G54])" office:value-type="boolean" office:boolean-value="true" calcext:value-type="boolean">
            <text:p>ІСТИНА</text:p>
          </table:table-cell>
          <table:table-cell table:style-name="ce4" table:formula="of:=[.J54]&gt;MAX([.D54];[.F54];[.H54])" office:value-type="boolean" office:boolean-value="false" calcext:value-type="boolean">
            <text:p>БРЕХНЯ</text:p>
          </table:table-cell>
          <table:table-cell table:style-name="ce4" table:formula="of:=[.K54]&gt;MAX([.C54];[.E54];[.G54];[.I54])" office:value-type="boolean" office:boolean-value="true" calcext:value-type="boolean">
            <text:p>ІСТИНА</text:p>
          </table:table-cell>
          <table:table-cell table:style-name="ce4" table:formula="of:=[.L54]&gt;MAX([.D54];[.F54];[.H54];[.J54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54]&gt;0.9" office:value-type="boolean" office:boolean-value="false" calcext:value-type="boolean">
            <text:p>БРЕХНЯ</text:p>
          </table:table-cell>
          <table:table-cell table:style-name="ce4" table:formula="of:=[.R54]&gt;0.9" office:value-type="boolean" office:boolean-value="false" calcext:value-type="boolean">
            <text:p>БРЕХНЯ</text:p>
          </table:table-cell>
          <table:table-cell table:style-name="ce4" table:formula="of:=[.X54]&gt;0.8" office:value-type="boolean" office:boolean-value="false" calcext:value-type="boolean">
            <text:p>БРЕХНЯ</text:p>
          </table:table-cell>
          <table:table-cell table:style-name="ce4" table:formula="of:=[.R54]&gt;0.8" office:value-type="boolean" office:boolean-value="false" calcext:value-type="boolean">
            <text:p>БРЕХНЯ</text:p>
          </table:table-cell>
          <table:table-cell table:style-name="ce4" table:formula="of:=[.X54]&gt;0.7" office:value-type="boolean" office:boolean-value="false" calcext:value-type="boolean">
            <text:p>БРЕХНЯ</text:p>
          </table:table-cell>
          <table:table-cell table:style-name="ce4" table:formula="of:=[.R5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.6470759" calcext:value-type="float">
            <text:p>6,47E-01</text:p>
          </table:table-cell>
          <table:table-cell table:style-name="ce1" office:value-type="float" office:value="0.7727015" calcext:value-type="float">
            <text:p>7,73E-01</text:p>
          </table:table-cell>
          <table:table-cell table:style-name="ce1" office:value-type="float" office:value="0.6841436" calcext:value-type="float">
            <text:p>6,84E-01</text:p>
          </table:table-cell>
          <table:table-cell table:style-name="ce1" office:value-type="float" office:value="0.8181673" calcext:value-type="float">
            <text:p>8,18E-01</text:p>
          </table:table-cell>
          <table:table-cell table:style-name="ce1" office:value-type="float" office:value="0.6576188" calcext:value-type="float">
            <text:p>6,58E-01</text:p>
          </table:table-cell>
          <table:table-cell table:style-name="ce1" office:value-type="float" office:value="0.8202526" calcext:value-type="float">
            <text:p>8,20E-01</text:p>
          </table:table-cell>
          <table:table-cell table:style-name="ce1" office:value-type="float" office:value="0.6589717" calcext:value-type="float">
            <text:p>6,59E-01</text:p>
          </table:table-cell>
          <table:table-cell table:style-name="ce1" office:value-type="float" office:value="0.8070222" calcext:value-type="float">
            <text:p>8,07E-01</text:p>
          </table:table-cell>
          <table:table-cell table:style-name="ce1" office:value-type="float" office:value="0.6849026" calcext:value-type="float">
            <text:p>6,85E-01</text:p>
          </table:table-cell>
          <table:table-cell table:style-name="ce1" office:value-type="float" office:value="0.8055584" calcext:value-type="float">
            <text:p>8,06E-01</text:p>
          </table:table-cell>
          <table:table-cell/>
          <table:table-cell table:style-name="ce1" table:formula="of:=MAX([.C55];[.E55];[.G55];[.I55];[.K55])" office:value-type="float" office:value="0.6849026" calcext:value-type="float">
            <text:p>6,85E-01</text:p>
          </table:table-cell>
          <table:table-cell table:style-name="ce8" table:formula="of:=MAX([.D55];[.F55];[.H55];[.J55];[.L55])" office:value-type="float" office:value="0.8202526" calcext:value-type="float">
            <text:p>8,20E-01</text:p>
          </table:table-cell>
          <table:table-cell table:style-name="ce1"/>
          <table:table-cell table:style-name="ce1" office:value-type="float" office:value="0.7314846" calcext:value-type="float">
            <text:p>7,31E-01</text:p>
          </table:table-cell>
          <table:table-cell table:style-name="ce1" office:value-type="float" office:value="0.8202526" calcext:value-type="float">
            <text:p>8,20E-01</text:p>
          </table:table-cell>
          <table:table-cell table:style-name="ce4" table:formula="of:=[.Q55]&gt;[.N55]" office:value-type="boolean" office:boolean-value="true" calcext:value-type="boolean">
            <text:p>ІСТИНА</text:p>
          </table:table-cell>
          <table:table-cell table:style-name="ce4" table:formula="of:=[.R55]&gt;[.O5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314846" calcext:value-type="float">
            <text:p>7,31E-01</text:p>
          </table:table-cell>
          <table:table-cell table:style-name="ce4" table:formula="of:=[.V55]&gt;[.Q55]" office:value-type="boolean" office:boolean-value="false" calcext:value-type="boolean">
            <text:p>БРЕХНЯ</text:p>
          </table:table-cell>
          <table:table-cell table:style-name="ce1" table:formula="of:=MAX([.V55];[.Q55])" office:value-type="float" office:value="0.7314846" calcext:value-type="float">
            <text:p>7,31E-01</text:p>
          </table:table-cell>
          <table:table-cell table:style-name="ce4" table:formula="of:=[.X55]&gt;[.R5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5]&gt;[.C55]" office:value-type="boolean" office:boolean-value="true" calcext:value-type="boolean">
            <text:p>ІСТИНА</text:p>
          </table:table-cell>
          <table:table-cell table:style-name="ce4" table:formula="of:=[.F55]&gt;[.D55]" office:value-type="boolean" office:boolean-value="true" calcext:value-type="boolean">
            <text:p>ІСТИНА</text:p>
          </table:table-cell>
          <table:table-cell table:style-name="ce4" table:formula="of:=[.G55]&gt;MAX([.C55];[.E55])" office:value-type="boolean" office:boolean-value="false" calcext:value-type="boolean">
            <text:p>БРЕХНЯ</text:p>
          </table:table-cell>
          <table:table-cell table:style-name="ce4" table:formula="of:=[.H55]&gt;MAX([.D55];[.F55])" office:value-type="boolean" office:boolean-value="true" calcext:value-type="boolean">
            <text:p>ІСТИНА</text:p>
          </table:table-cell>
          <table:table-cell table:style-name="ce4" table:formula="of:=[.I55]&gt;MAX([.C55];[.E55];[.G55])" office:value-type="boolean" office:boolean-value="false" calcext:value-type="boolean">
            <text:p>БРЕХНЯ</text:p>
          </table:table-cell>
          <table:table-cell table:style-name="ce4" table:formula="of:=[.J55]&gt;MAX([.D55];[.F55];[.H55])" office:value-type="boolean" office:boolean-value="false" calcext:value-type="boolean">
            <text:p>БРЕХНЯ</text:p>
          </table:table-cell>
          <table:table-cell table:style-name="ce4" table:formula="of:=[.K55]&gt;MAX([.C55];[.E55];[.G55];[.I55])" office:value-type="boolean" office:boolean-value="true" calcext:value-type="boolean">
            <text:p>ІСТИНА</text:p>
          </table:table-cell>
          <table:table-cell table:style-name="ce4" table:formula="of:=[.L55]&gt;MAX([.D55];[.F55];[.H55];[.J5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5]&gt;0.9" office:value-type="boolean" office:boolean-value="false" calcext:value-type="boolean">
            <text:p>БРЕХНЯ</text:p>
          </table:table-cell>
          <table:table-cell table:style-name="ce4" table:formula="of:=[.R55]&gt;0.9" office:value-type="boolean" office:boolean-value="false" calcext:value-type="boolean">
            <text:p>БРЕХНЯ</text:p>
          </table:table-cell>
          <table:table-cell table:style-name="ce4" table:formula="of:=[.X55]&gt;0.8" office:value-type="boolean" office:boolean-value="false" calcext:value-type="boolean">
            <text:p>БРЕХНЯ</text:p>
          </table:table-cell>
          <table:table-cell table:style-name="ce4" table:formula="of:=[.R55]&gt;0.8" office:value-type="boolean" office:boolean-value="true" calcext:value-type="boolean">
            <text:p>ІСТИНА</text:p>
          </table:table-cell>
          <table:table-cell table:style-name="ce4" table:formula="of:=[.X55]&gt;0.7" office:value-type="boolean" office:boolean-value="true" calcext:value-type="boolean">
            <text:p>ІСТИНА</text:p>
          </table:table-cell>
          <table:table-cell table:style-name="ce4" table:formula="of:=[.R5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0.7345454" calcext:value-type="float">
            <text:p>7,35E-01</text:p>
          </table:table-cell>
          <table:table-cell table:style-name="ce1" office:value-type="float" office:value="0.8115261" calcext:value-type="float">
            <text:p>8,12E-01</text:p>
          </table:table-cell>
          <table:table-cell table:style-name="ce1" office:value-type="float" office:value="0.6393802" calcext:value-type="float">
            <text:p>6,39E-01</text:p>
          </table:table-cell>
          <table:table-cell table:style-name="ce1" office:value-type="float" office:value="0.7851306" calcext:value-type="float">
            <text:p>7,85E-01</text:p>
          </table:table-cell>
          <table:table-cell table:style-name="ce1" office:value-type="float" office:value="0.6876262" calcext:value-type="float">
            <text:p>6,88E-01</text:p>
          </table:table-cell>
          <table:table-cell table:style-name="ce1" office:value-type="float" office:value="0.83077" calcext:value-type="float">
            <text:p>8,31E-01</text:p>
          </table:table-cell>
          <table:table-cell table:style-name="ce1" office:value-type="float" office:value="0.7164146" calcext:value-type="float">
            <text:p>7,16E-01</text:p>
          </table:table-cell>
          <table:table-cell table:style-name="ce1" office:value-type="float" office:value="0.7947085" calcext:value-type="float">
            <text:p>7,95E-01</text:p>
          </table:table-cell>
          <table:table-cell table:style-name="ce1" office:value-type="float" office:value="0.6720336" calcext:value-type="float">
            <text:p>6,72E-01</text:p>
          </table:table-cell>
          <table:table-cell table:style-name="ce1" office:value-type="float" office:value="0.8279342" calcext:value-type="float">
            <text:p>8,28E-01</text:p>
          </table:table-cell>
          <table:table-cell/>
          <table:table-cell table:style-name="ce1" table:formula="of:=MAX([.C56];[.E56];[.G56];[.I56];[.K56])" office:value-type="float" office:value="0.7345454" calcext:value-type="float">
            <text:p>7,35E-01</text:p>
          </table:table-cell>
          <table:table-cell table:style-name="ce8" table:formula="of:=MAX([.D56];[.F56];[.H56];[.J56];[.L56])" office:value-type="float" office:value="0.83077" calcext:value-type="float">
            <text:p>8,31E-01</text:p>
          </table:table-cell>
          <table:table-cell table:style-name="ce1"/>
          <table:table-cell table:style-name="ce1" office:value-type="float" office:value="0.7345454" calcext:value-type="float">
            <text:p>7,35E-01</text:p>
          </table:table-cell>
          <table:table-cell table:style-name="ce1" office:value-type="float" office:value="0.83077" calcext:value-type="float">
            <text:p>8,31E-01</text:p>
          </table:table-cell>
          <table:table-cell table:style-name="ce4" table:formula="of:=[.Q56]&gt;[.N56]" office:value-type="boolean" office:boolean-value="false" calcext:value-type="boolean">
            <text:p>БРЕХНЯ</text:p>
          </table:table-cell>
          <table:table-cell table:style-name="ce4" table:formula="of:=[.R56]&gt;[.O5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345454" calcext:value-type="float">
            <text:p>7,35E-01</text:p>
          </table:table-cell>
          <table:table-cell table:style-name="ce4" table:formula="of:=[.V56]&gt;[.Q56]" office:value-type="boolean" office:boolean-value="false" calcext:value-type="boolean">
            <text:p>БРЕХНЯ</text:p>
          </table:table-cell>
          <table:table-cell table:style-name="ce1" table:formula="of:=MAX([.V56];[.Q56])" office:value-type="float" office:value="0.7345454" calcext:value-type="float">
            <text:p>7,35E-01</text:p>
          </table:table-cell>
          <table:table-cell table:style-name="ce4" table:formula="of:=[.X56]&gt;[.R5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6]&gt;[.C56]" office:value-type="boolean" office:boolean-value="false" calcext:value-type="boolean">
            <text:p>БРЕХНЯ</text:p>
          </table:table-cell>
          <table:table-cell table:style-name="ce4" table:formula="of:=[.F56]&gt;[.D56]" office:value-type="boolean" office:boolean-value="false" calcext:value-type="boolean">
            <text:p>БРЕХНЯ</text:p>
          </table:table-cell>
          <table:table-cell table:style-name="ce4" table:formula="of:=[.G56]&gt;MAX([.C56];[.E56])" office:value-type="boolean" office:boolean-value="false" calcext:value-type="boolean">
            <text:p>БРЕХНЯ</text:p>
          </table:table-cell>
          <table:table-cell table:style-name="ce4" table:formula="of:=[.H56]&gt;MAX([.D56];[.F56])" office:value-type="boolean" office:boolean-value="true" calcext:value-type="boolean">
            <text:p>ІСТИНА</text:p>
          </table:table-cell>
          <table:table-cell table:style-name="ce4" table:formula="of:=[.I56]&gt;MAX([.C56];[.E56];[.G56])" office:value-type="boolean" office:boolean-value="false" calcext:value-type="boolean">
            <text:p>БРЕХНЯ</text:p>
          </table:table-cell>
          <table:table-cell table:style-name="ce4" table:formula="of:=[.J56]&gt;MAX([.D56];[.F56];[.H56])" office:value-type="boolean" office:boolean-value="false" calcext:value-type="boolean">
            <text:p>БРЕХНЯ</text:p>
          </table:table-cell>
          <table:table-cell table:style-name="ce4" table:formula="of:=[.K56]&gt;MAX([.C56];[.E56];[.G56];[.I56])" office:value-type="boolean" office:boolean-value="false" calcext:value-type="boolean">
            <text:p>БРЕХНЯ</text:p>
          </table:table-cell>
          <table:table-cell table:style-name="ce4" table:formula="of:=[.L56]&gt;MAX([.D56];[.F56];[.H56];[.J5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6]&gt;0.9" office:value-type="boolean" office:boolean-value="false" calcext:value-type="boolean">
            <text:p>БРЕХНЯ</text:p>
          </table:table-cell>
          <table:table-cell table:style-name="ce4" table:formula="of:=[.R56]&gt;0.9" office:value-type="boolean" office:boolean-value="false" calcext:value-type="boolean">
            <text:p>БРЕХНЯ</text:p>
          </table:table-cell>
          <table:table-cell table:style-name="ce4" table:formula="of:=[.X56]&gt;0.8" office:value-type="boolean" office:boolean-value="false" calcext:value-type="boolean">
            <text:p>БРЕХНЯ</text:p>
          </table:table-cell>
          <table:table-cell table:style-name="ce4" table:formula="of:=[.R56]&gt;0.8" office:value-type="boolean" office:boolean-value="true" calcext:value-type="boolean">
            <text:p>ІСТИНА</text:p>
          </table:table-cell>
          <table:table-cell table:style-name="ce4" table:formula="of:=[.X56]&gt;0.7" office:value-type="boolean" office:boolean-value="true" calcext:value-type="boolean">
            <text:p>ІСТИНА</text:p>
          </table:table-cell>
          <table:table-cell table:style-name="ce4" table:formula="of:=[.R5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.7584347" calcext:value-type="float">
            <text:p>7,58E-01</text:p>
          </table:table-cell>
          <table:table-cell table:style-name="ce1" office:value-type="float" office:value="0.885242" calcext:value-type="float">
            <text:p>8,85E-01</text:p>
          </table:table-cell>
          <table:table-cell table:style-name="ce1" office:value-type="float" office:value="0.6570565" calcext:value-type="float">
            <text:p>6,57E-01</text:p>
          </table:table-cell>
          <table:table-cell table:style-name="ce1" office:value-type="float" office:value="0.8477362" calcext:value-type="float">
            <text:p>8,48E-01</text:p>
          </table:table-cell>
          <table:table-cell table:style-name="ce1" office:value-type="float" office:value="0.7008322" calcext:value-type="float">
            <text:p>7,01E-01</text:p>
          </table:table-cell>
          <table:table-cell table:style-name="ce1" office:value-type="float" office:value="0.8918194" calcext:value-type="float">
            <text:p>8,92E-01</text:p>
          </table:table-cell>
          <table:table-cell table:style-name="ce1" office:value-type="float" office:value="0.7122281" calcext:value-type="float">
            <text:p>7,12E-01</text:p>
          </table:table-cell>
          <table:table-cell table:style-name="ce1" office:value-type="float" office:value="0.8969488" calcext:value-type="float">
            <text:p>8,97E-01</text:p>
          </table:table-cell>
          <table:table-cell table:style-name="ce1" office:value-type="float" office:value="0.7279866" calcext:value-type="float">
            <text:p>7,28E-01</text:p>
          </table:table-cell>
          <table:table-cell table:style-name="ce1" office:value-type="float" office:value="0.8969176" calcext:value-type="float">
            <text:p>8,97E-01</text:p>
          </table:table-cell>
          <table:table-cell/>
          <table:table-cell table:style-name="ce1" table:formula="of:=MAX([.C57];[.E57];[.G57];[.I57];[.K57])" office:value-type="float" office:value="0.7584347" calcext:value-type="float">
            <text:p>7,58E-01</text:p>
          </table:table-cell>
          <table:table-cell table:style-name="ce8" table:formula="of:=MAX([.D57];[.F57];[.H57];[.J57];[.L57])" office:value-type="float" office:value="0.8969488" calcext:value-type="float">
            <text:p>8,97E-01</text:p>
          </table:table-cell>
          <table:table-cell table:style-name="ce1"/>
          <table:table-cell table:style-name="ce1" office:value-type="float" office:value="0.7584347" calcext:value-type="float">
            <text:p>7,58E-01</text:p>
          </table:table-cell>
          <table:table-cell table:style-name="ce1" office:value-type="float" office:value="0.8969488" calcext:value-type="float">
            <text:p>8,97E-01</text:p>
          </table:table-cell>
          <table:table-cell table:style-name="ce4" table:formula="of:=[.Q57]&gt;[.N57]" office:value-type="boolean" office:boolean-value="false" calcext:value-type="boolean">
            <text:p>БРЕХНЯ</text:p>
          </table:table-cell>
          <table:table-cell table:style-name="ce4" table:formula="of:=[.R57]&gt;[.O5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84347" calcext:value-type="float">
            <text:p>7,58E-01</text:p>
          </table:table-cell>
          <table:table-cell table:style-name="ce4" table:formula="of:=[.V57]&gt;[.Q57]" office:value-type="boolean" office:boolean-value="false" calcext:value-type="boolean">
            <text:p>БРЕХНЯ</text:p>
          </table:table-cell>
          <table:table-cell table:style-name="ce1" table:formula="of:=MAX([.V57];[.Q57])" office:value-type="float" office:value="0.7584347" calcext:value-type="float">
            <text:p>7,58E-01</text:p>
          </table:table-cell>
          <table:table-cell table:style-name="ce4" table:formula="of:=[.X57]&gt;[.R5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7]&gt;[.C57]" office:value-type="boolean" office:boolean-value="false" calcext:value-type="boolean">
            <text:p>БРЕХНЯ</text:p>
          </table:table-cell>
          <table:table-cell table:style-name="ce4" table:formula="of:=[.F57]&gt;[.D57]" office:value-type="boolean" office:boolean-value="false" calcext:value-type="boolean">
            <text:p>БРЕХНЯ</text:p>
          </table:table-cell>
          <table:table-cell table:style-name="ce4" table:formula="of:=[.G57]&gt;MAX([.C57];[.E57])" office:value-type="boolean" office:boolean-value="false" calcext:value-type="boolean">
            <text:p>БРЕХНЯ</text:p>
          </table:table-cell>
          <table:table-cell table:style-name="ce4" table:formula="of:=[.H57]&gt;MAX([.D57];[.F57])" office:value-type="boolean" office:boolean-value="true" calcext:value-type="boolean">
            <text:p>ІСТИНА</text:p>
          </table:table-cell>
          <table:table-cell table:style-name="ce4" table:formula="of:=[.I57]&gt;MAX([.C57];[.E57];[.G57])" office:value-type="boolean" office:boolean-value="false" calcext:value-type="boolean">
            <text:p>БРЕХНЯ</text:p>
          </table:table-cell>
          <table:table-cell table:style-name="ce4" table:formula="of:=[.J57]&gt;MAX([.D57];[.F57];[.H57])" office:value-type="boolean" office:boolean-value="true" calcext:value-type="boolean">
            <text:p>ІСТИНА</text:p>
          </table:table-cell>
          <table:table-cell table:style-name="ce4" table:formula="of:=[.K57]&gt;MAX([.C57];[.E57];[.G57];[.I57])" office:value-type="boolean" office:boolean-value="false" calcext:value-type="boolean">
            <text:p>БРЕХНЯ</text:p>
          </table:table-cell>
          <table:table-cell table:style-name="ce4" table:formula="of:=[.L57]&gt;MAX([.D57];[.F57];[.H57];[.J57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7]&gt;0.9" office:value-type="boolean" office:boolean-value="false" calcext:value-type="boolean">
            <text:p>БРЕХНЯ</text:p>
          </table:table-cell>
          <table:table-cell table:style-name="ce4" table:formula="of:=[.R57]&gt;0.9" office:value-type="boolean" office:boolean-value="false" calcext:value-type="boolean">
            <text:p>БРЕХНЯ</text:p>
          </table:table-cell>
          <table:table-cell table:style-name="ce4" table:formula="of:=[.X57]&gt;0.8" office:value-type="boolean" office:boolean-value="false" calcext:value-type="boolean">
            <text:p>БРЕХНЯ</text:p>
          </table:table-cell>
          <table:table-cell table:style-name="ce4" table:formula="of:=[.R57]&gt;0.8" office:value-type="boolean" office:boolean-value="true" calcext:value-type="boolean">
            <text:p>ІСТИНА</text:p>
          </table:table-cell>
          <table:table-cell table:style-name="ce4" table:formula="of:=[.X57]&gt;0.7" office:value-type="boolean" office:boolean-value="true" calcext:value-type="boolean">
            <text:p>ІСТИНА</text:p>
          </table:table-cell>
          <table:table-cell table:style-name="ce4" table:formula="of:=[.R5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0.6924049" calcext:value-type="float">
            <text:p>6,92E-01</text:p>
          </table:table-cell>
          <table:table-cell table:style-name="ce1" office:value-type="float" office:value="0.849512" calcext:value-type="float">
            <text:p>8,50E-01</text:p>
          </table:table-cell>
          <table:table-cell table:style-name="ce1" office:value-type="float" office:value="0.6409216" calcext:value-type="float">
            <text:p>6,41E-01</text:p>
          </table:table-cell>
          <table:table-cell table:style-name="ce1" office:value-type="float" office:value="0.8931232" calcext:value-type="float">
            <text:p>8,93E-01</text:p>
          </table:table-cell>
          <table:table-cell table:style-name="ce1" office:value-type="float" office:value="0.7361727" calcext:value-type="float">
            <text:p>7,36E-01</text:p>
          </table:table-cell>
          <table:table-cell table:style-name="ce1" office:value-type="float" office:value="0.8641761" calcext:value-type="float">
            <text:p>8,64E-01</text:p>
          </table:table-cell>
          <table:table-cell table:style-name="ce1" office:value-type="float" office:value="0.602021" calcext:value-type="float">
            <text:p>6,02E-01</text:p>
          </table:table-cell>
          <table:table-cell table:style-name="ce1" office:value-type="float" office:value="0.8257321" calcext:value-type="float">
            <text:p>8,26E-01</text:p>
          </table:table-cell>
          <table:table-cell table:style-name="ce1" office:value-type="float" office:value="0.6450848" calcext:value-type="float">
            <text:p>6,45E-01</text:p>
          </table:table-cell>
          <table:table-cell table:style-name="ce1" office:value-type="float" office:value="0.8062431" calcext:value-type="float">
            <text:p>8,06E-01</text:p>
          </table:table-cell>
          <table:table-cell/>
          <table:table-cell table:style-name="ce1" table:formula="of:=MAX([.C58];[.E58];[.G58];[.I58];[.K58])" office:value-type="float" office:value="0.7361727" calcext:value-type="float">
            <text:p>7,36E-01</text:p>
          </table:table-cell>
          <table:table-cell table:style-name="ce8" table:formula="of:=MAX([.D58];[.F58];[.H58];[.J58];[.L58])" office:value-type="float" office:value="0.8931232" calcext:value-type="float">
            <text:p>8,93E-01</text:p>
          </table:table-cell>
          <table:table-cell table:style-name="ce1"/>
          <table:table-cell table:style-name="ce1" office:value-type="float" office:value="0.7361727" calcext:value-type="float">
            <text:p>7,36E-01</text:p>
          </table:table-cell>
          <table:table-cell table:style-name="ce1" office:value-type="float" office:value="0.8931232" calcext:value-type="float">
            <text:p>8,93E-01</text:p>
          </table:table-cell>
          <table:table-cell table:style-name="ce4" table:formula="of:=[.Q58]&gt;[.N58]" office:value-type="boolean" office:boolean-value="false" calcext:value-type="boolean">
            <text:p>БРЕХНЯ</text:p>
          </table:table-cell>
          <table:table-cell table:style-name="ce4" table:formula="of:=[.R58]&gt;[.O5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361727" calcext:value-type="float">
            <text:p>7,36E-01</text:p>
          </table:table-cell>
          <table:table-cell table:style-name="ce4" table:formula="of:=[.V58]&gt;[.Q58]" office:value-type="boolean" office:boolean-value="false" calcext:value-type="boolean">
            <text:p>БРЕХНЯ</text:p>
          </table:table-cell>
          <table:table-cell table:style-name="ce1" table:formula="of:=MAX([.V58];[.Q58])" office:value-type="float" office:value="0.7361727" calcext:value-type="float">
            <text:p>7,36E-01</text:p>
          </table:table-cell>
          <table:table-cell table:style-name="ce4" table:formula="of:=[.X58]&gt;[.R5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8]&gt;[.C58]" office:value-type="boolean" office:boolean-value="false" calcext:value-type="boolean">
            <text:p>БРЕХНЯ</text:p>
          </table:table-cell>
          <table:table-cell table:style-name="ce4" table:formula="of:=[.F58]&gt;[.D58]" office:value-type="boolean" office:boolean-value="true" calcext:value-type="boolean">
            <text:p>ІСТИНА</text:p>
          </table:table-cell>
          <table:table-cell table:style-name="ce4" table:formula="of:=[.G58]&gt;MAX([.C58];[.E58])" office:value-type="boolean" office:boolean-value="true" calcext:value-type="boolean">
            <text:p>ІСТИНА</text:p>
          </table:table-cell>
          <table:table-cell table:style-name="ce4" table:formula="of:=[.H58]&gt;MAX([.D58];[.F58])" office:value-type="boolean" office:boolean-value="false" calcext:value-type="boolean">
            <text:p>БРЕХНЯ</text:p>
          </table:table-cell>
          <table:table-cell table:style-name="ce4" table:formula="of:=[.I58]&gt;MAX([.C58];[.E58];[.G58])" office:value-type="boolean" office:boolean-value="false" calcext:value-type="boolean">
            <text:p>БРЕХНЯ</text:p>
          </table:table-cell>
          <table:table-cell table:style-name="ce4" table:formula="of:=[.J58]&gt;MAX([.D58];[.F58];[.H58])" office:value-type="boolean" office:boolean-value="false" calcext:value-type="boolean">
            <text:p>БРЕХНЯ</text:p>
          </table:table-cell>
          <table:table-cell table:style-name="ce4" table:formula="of:=[.K58]&gt;MAX([.C58];[.E58];[.G58];[.I58])" office:value-type="boolean" office:boolean-value="false" calcext:value-type="boolean">
            <text:p>БРЕХНЯ</text:p>
          </table:table-cell>
          <table:table-cell table:style-name="ce4" table:formula="of:=[.L58]&gt;MAX([.D58];[.F58];[.H58];[.J58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8]&gt;0.9" office:value-type="boolean" office:boolean-value="false" calcext:value-type="boolean">
            <text:p>БРЕХНЯ</text:p>
          </table:table-cell>
          <table:table-cell table:style-name="ce4" table:formula="of:=[.R58]&gt;0.9" office:value-type="boolean" office:boolean-value="false" calcext:value-type="boolean">
            <text:p>БРЕХНЯ</text:p>
          </table:table-cell>
          <table:table-cell table:style-name="ce4" table:formula="of:=[.X58]&gt;0.8" office:value-type="boolean" office:boolean-value="false" calcext:value-type="boolean">
            <text:p>БРЕХНЯ</text:p>
          </table:table-cell>
          <table:table-cell table:style-name="ce4" table:formula="of:=[.R58]&gt;0.8" office:value-type="boolean" office:boolean-value="true" calcext:value-type="boolean">
            <text:p>ІСТИНА</text:p>
          </table:table-cell>
          <table:table-cell table:style-name="ce4" table:formula="of:=[.X58]&gt;0.7" office:value-type="boolean" office:boolean-value="true" calcext:value-type="boolean">
            <text:p>ІСТИНА</text:p>
          </table:table-cell>
          <table:table-cell table:style-name="ce4" table:formula="of:=[.R5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0.02557837" calcext:value-type="float">
            <text:p>2,56E-02</text:p>
          </table:table-cell>
          <table:table-cell table:style-name="ce1" office:value-type="float" office:value="0.3408097" calcext:value-type="float">
            <text:p>3,41E-01</text:p>
          </table:table-cell>
          <table:table-cell table:style-name="ce1" office:value-type="float" office:value="0.05108407" calcext:value-type="float">
            <text:p>5,11E-02</text:p>
          </table:table-cell>
          <table:table-cell table:style-name="ce1" office:value-type="float" office:value="0.03890354" calcext:value-type="float">
            <text:p>3,89E-02</text:p>
          </table:table-cell>
          <table:table-cell table:style-name="ce1" office:value-type="float" office:value="0.03843105" calcext:value-type="float">
            <text:p>3,84E-02</text:p>
          </table:table-cell>
          <table:table-cell table:style-name="ce1" office:value-type="float" office:value="0.1651055" calcext:value-type="float">
            <text:p>1,65E-01</text:p>
          </table:table-cell>
          <table:table-cell table:style-name="ce1" office:value-type="float" office:value="-0.1169964" calcext:value-type="float">
            <text:p>-1,17E-01</text:p>
          </table:table-cell>
          <table:table-cell table:style-name="ce1" office:value-type="float" office:value="0.2801589" calcext:value-type="float">
            <text:p>2,80E-01</text:p>
          </table:table-cell>
          <table:table-cell table:style-name="ce1" office:value-type="float" office:value="-0.09829545" calcext:value-type="float">
            <text:p>-9,83E-02</text:p>
          </table:table-cell>
          <table:table-cell table:style-name="ce1" office:value-type="float" office:value="0.311798" calcext:value-type="float">
            <text:p>3,12E-01</text:p>
          </table:table-cell>
          <table:table-cell/>
          <table:table-cell table:style-name="ce1" table:formula="of:=MAX([.C59];[.E59];[.G59];[.I59];[.K59])" office:value-type="float" office:value="0.05108407" calcext:value-type="float">
            <text:p>5,11E-02</text:p>
          </table:table-cell>
          <table:table-cell table:style-name="ce8" table:formula="of:=MAX([.D59];[.F59];[.H59];[.J59];[.L59])" office:value-type="float" office:value="0.3408097" calcext:value-type="float">
            <text:p>3,41E-01</text:p>
          </table:table-cell>
          <table:table-cell table:style-name="ce2"/>
          <table:table-cell table:style-name="ce1" office:value-type="float" office:value="0.4563622" calcext:value-type="float">
            <text:p>4,56E-01</text:p>
          </table:table-cell>
          <table:table-cell table:style-name="ce1" office:value-type="float" office:value="0.7060246" calcext:value-type="float">
            <text:p>7,06E-01</text:p>
          </table:table-cell>
          <table:table-cell table:style-name="ce4" table:formula="of:=[.Q59]&gt;[.N59]" office:value-type="boolean" office:boolean-value="true" calcext:value-type="boolean">
            <text:p>ІСТИНА</text:p>
          </table:table-cell>
          <table:table-cell table:style-name="ce4" table:formula="of:=[.R59]&gt;[.O59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5799485" calcext:value-type="float">
            <text:p>5,80E-01</text:p>
          </table:table-cell>
          <table:table-cell table:style-name="ce4" table:formula="of:=[.V59]&gt;[.Q59]" office:value-type="boolean" office:boolean-value="true" calcext:value-type="boolean">
            <text:p>ІСТИНА</text:p>
          </table:table-cell>
          <table:table-cell table:style-name="ce1" table:formula="of:=MAX([.V59];[.Q59])" office:value-type="float" office:value="0.5799485" calcext:value-type="float">
            <text:p>5,80E-01</text:p>
          </table:table-cell>
          <table:table-cell table:style-name="ce4" table:formula="of:=[.X59]&gt;[.R5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59]&gt;[.C59]" office:value-type="boolean" office:boolean-value="true" calcext:value-type="boolean">
            <text:p>ІСТИНА</text:p>
          </table:table-cell>
          <table:table-cell table:style-name="ce4" table:formula="of:=[.F59]&gt;[.D59]" office:value-type="boolean" office:boolean-value="false" calcext:value-type="boolean">
            <text:p>БРЕХНЯ</text:p>
          </table:table-cell>
          <table:table-cell table:style-name="ce4" table:formula="of:=[.G59]&gt;MAX([.C59];[.E59])" office:value-type="boolean" office:boolean-value="false" calcext:value-type="boolean">
            <text:p>БРЕХНЯ</text:p>
          </table:table-cell>
          <table:table-cell table:style-name="ce4" table:formula="of:=[.H59]&gt;MAX([.D59];[.F59])" office:value-type="boolean" office:boolean-value="false" calcext:value-type="boolean">
            <text:p>БРЕХНЯ</text:p>
          </table:table-cell>
          <table:table-cell table:style-name="ce4" table:formula="of:=[.I59]&gt;MAX([.C59];[.E59];[.G59])" office:value-type="boolean" office:boolean-value="false" calcext:value-type="boolean">
            <text:p>БРЕХНЯ</text:p>
          </table:table-cell>
          <table:table-cell table:style-name="ce4" table:formula="of:=[.J59]&gt;MAX([.D59];[.F59];[.H59])" office:value-type="boolean" office:boolean-value="false" calcext:value-type="boolean">
            <text:p>БРЕХНЯ</text:p>
          </table:table-cell>
          <table:table-cell table:style-name="ce4" table:formula="of:=[.K59]&gt;MAX([.C59];[.E59];[.G59];[.I59])" office:value-type="boolean" office:boolean-value="false" calcext:value-type="boolean">
            <text:p>БРЕХНЯ</text:p>
          </table:table-cell>
          <table:table-cell table:style-name="ce4" table:formula="of:=[.L59]&gt;MAX([.D59];[.F59];[.H59];[.J5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59]&gt;0.9" office:value-type="boolean" office:boolean-value="false" calcext:value-type="boolean">
            <text:p>БРЕХНЯ</text:p>
          </table:table-cell>
          <table:table-cell table:style-name="ce4" table:formula="of:=[.R59]&gt;0.9" office:value-type="boolean" office:boolean-value="false" calcext:value-type="boolean">
            <text:p>БРЕХНЯ</text:p>
          </table:table-cell>
          <table:table-cell table:style-name="ce4" table:formula="of:=[.X59]&gt;0.8" office:value-type="boolean" office:boolean-value="false" calcext:value-type="boolean">
            <text:p>БРЕХНЯ</text:p>
          </table:table-cell>
          <table:table-cell table:style-name="ce4" table:formula="of:=[.R59]&gt;0.8" office:value-type="boolean" office:boolean-value="false" calcext:value-type="boolean">
            <text:p>БРЕХНЯ</text:p>
          </table:table-cell>
          <table:table-cell table:style-name="ce4" table:formula="of:=[.X59]&gt;0.7" office:value-type="boolean" office:boolean-value="false" calcext:value-type="boolean">
            <text:p>БРЕХНЯ</text:p>
          </table:table-cell>
          <table:table-cell table:style-name="ce4" table:formula="of:=[.R5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0.6536297" calcext:value-type="float">
            <text:p>6,54E-01</text:p>
          </table:table-cell>
          <table:table-cell table:style-name="ce1" office:value-type="float" office:value="0.7662587" calcext:value-type="float">
            <text:p>7,66E-01</text:p>
          </table:table-cell>
          <table:table-cell table:style-name="ce1" office:value-type="float" office:value="0.6904747" calcext:value-type="float">
            <text:p>6,90E-01</text:p>
          </table:table-cell>
          <table:table-cell table:style-name="ce1" office:value-type="float" office:value="0.7389374" calcext:value-type="float">
            <text:p>7,39E-01</text:p>
          </table:table-cell>
          <table:table-cell table:style-name="ce1" office:value-type="float" office:value="0.6916046" calcext:value-type="float">
            <text:p>6,92E-01</text:p>
          </table:table-cell>
          <table:table-cell table:style-name="ce1" office:value-type="float" office:value="0.7160404" calcext:value-type="float">
            <text:p>7,16E-01</text:p>
          </table:table-cell>
          <table:table-cell table:style-name="ce1" office:value-type="float" office:value="0.7174249" calcext:value-type="float">
            <text:p>7,17E-01</text:p>
          </table:table-cell>
          <table:table-cell table:style-name="ce1" office:value-type="float" office:value="0.7527552" calcext:value-type="float">
            <text:p>7,53E-01</text:p>
          </table:table-cell>
          <table:table-cell table:style-name="ce1" office:value-type="float" office:value="0.6569214" calcext:value-type="float">
            <text:p>6,57E-01</text:p>
          </table:table-cell>
          <table:table-cell table:style-name="ce1" office:value-type="float" office:value="0.7262441" calcext:value-type="float">
            <text:p>7,26E-01</text:p>
          </table:table-cell>
          <table:table-cell/>
          <table:table-cell table:style-name="ce1" table:formula="of:=MAX([.C60];[.E60];[.G60];[.I60];[.K60])" office:value-type="float" office:value="0.7174249" calcext:value-type="float">
            <text:p>7,17E-01</text:p>
          </table:table-cell>
          <table:table-cell table:style-name="ce8" table:formula="of:=MAX([.D60];[.F60];[.H60];[.J60];[.L60])" office:value-type="float" office:value="0.7662587" calcext:value-type="float">
            <text:p>7,66E-01</text:p>
          </table:table-cell>
          <table:table-cell table:style-name="ce1"/>
          <table:table-cell table:style-name="ce1" office:value-type="float" office:value="0.7913595" calcext:value-type="float">
            <text:p>7,91E-01</text:p>
          </table:table-cell>
          <table:table-cell table:style-name="ce1" office:value-type="float" office:value="0.934683" calcext:value-type="float">
            <text:p>9,35E-01</text:p>
          </table:table-cell>
          <table:table-cell table:style-name="ce4" table:formula="of:=[.Q60]&gt;[.N60]" office:value-type="boolean" office:boolean-value="true" calcext:value-type="boolean">
            <text:p>ІСТИНА</text:p>
          </table:table-cell>
          <table:table-cell table:style-name="ce4" table:formula="of:=[.R60]&gt;[.O60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7913595" calcext:value-type="float">
            <text:p>7,91E-01</text:p>
          </table:table-cell>
          <table:table-cell table:style-name="ce4" table:formula="of:=[.V60]&gt;[.Q60]" office:value-type="boolean" office:boolean-value="false" calcext:value-type="boolean">
            <text:p>БРЕХНЯ</text:p>
          </table:table-cell>
          <table:table-cell table:style-name="ce1" table:formula="of:=MAX([.V60];[.Q60])" office:value-type="float" office:value="0.7913595" calcext:value-type="float">
            <text:p>7,91E-01</text:p>
          </table:table-cell>
          <table:table-cell table:style-name="ce4" table:formula="of:=[.X60]&gt;[.R6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0]&gt;[.C60]" office:value-type="boolean" office:boolean-value="true" calcext:value-type="boolean">
            <text:p>ІСТИНА</text:p>
          </table:table-cell>
          <table:table-cell table:style-name="ce4" table:formula="of:=[.F60]&gt;[.D60]" office:value-type="boolean" office:boolean-value="false" calcext:value-type="boolean">
            <text:p>БРЕХНЯ</text:p>
          </table:table-cell>
          <table:table-cell table:style-name="ce4" table:formula="of:=[.G60]&gt;MAX([.C60];[.E60])" office:value-type="boolean" office:boolean-value="true" calcext:value-type="boolean">
            <text:p>ІСТИНА</text:p>
          </table:table-cell>
          <table:table-cell table:style-name="ce4" table:formula="of:=[.H60]&gt;MAX([.D60];[.F60])" office:value-type="boolean" office:boolean-value="false" calcext:value-type="boolean">
            <text:p>БРЕХНЯ</text:p>
          </table:table-cell>
          <table:table-cell table:style-name="ce4" table:formula="of:=[.I60]&gt;MAX([.C60];[.E60];[.G60])" office:value-type="boolean" office:boolean-value="true" calcext:value-type="boolean">
            <text:p>ІСТИНА</text:p>
          </table:table-cell>
          <table:table-cell table:style-name="ce4" table:formula="of:=[.J60]&gt;MAX([.D60];[.F60];[.H60])" office:value-type="boolean" office:boolean-value="false" calcext:value-type="boolean">
            <text:p>БРЕХНЯ</text:p>
          </table:table-cell>
          <table:table-cell table:style-name="ce4" table:formula="of:=[.K60]&gt;MAX([.C60];[.E60];[.G60];[.I60])" office:value-type="boolean" office:boolean-value="false" calcext:value-type="boolean">
            <text:p>БРЕХНЯ</text:p>
          </table:table-cell>
          <table:table-cell table:style-name="ce4" table:formula="of:=[.L60]&gt;MAX([.D60];[.F60];[.H60];[.J6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0]&gt;0.9" office:value-type="boolean" office:boolean-value="false" calcext:value-type="boolean">
            <text:p>БРЕХНЯ</text:p>
          </table:table-cell>
          <table:table-cell table:style-name="ce4" table:formula="of:=[.R60]&gt;0.9" office:value-type="boolean" office:boolean-value="true" calcext:value-type="boolean">
            <text:p>ІСТИНА</text:p>
          </table:table-cell>
          <table:table-cell table:style-name="ce4" table:formula="of:=[.X60]&gt;0.8" office:value-type="boolean" office:boolean-value="false" calcext:value-type="boolean">
            <text:p>БРЕХНЯ</text:p>
          </table:table-cell>
          <table:table-cell table:style-name="ce4" table:formula="of:=[.R60]&gt;0.8" office:value-type="boolean" office:boolean-value="true" calcext:value-type="boolean">
            <text:p>ІСТИНА</text:p>
          </table:table-cell>
          <table:table-cell table:style-name="ce4" table:formula="of:=[.X60]&gt;0.7" office:value-type="boolean" office:boolean-value="true" calcext:value-type="boolean">
            <text:p>ІСТИНА</text:p>
          </table:table-cell>
          <table:table-cell table:style-name="ce4" table:formula="of:=[.R6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.6909687" calcext:value-type="float">
            <text:p>6,91E-01</text:p>
          </table:table-cell>
          <table:table-cell table:style-name="ce1" office:value-type="float" office:value="0.833772" calcext:value-type="float">
            <text:p>8,34E-01</text:p>
          </table:table-cell>
          <table:table-cell table:style-name="ce1" office:value-type="float" office:value="0.6713885" calcext:value-type="float">
            <text:p>6,71E-01</text:p>
          </table:table-cell>
          <table:table-cell table:style-name="ce1" office:value-type="float" office:value="0.8382089" calcext:value-type="float">
            <text:p>8,38E-01</text:p>
          </table:table-cell>
          <table:table-cell table:style-name="ce1" office:value-type="float" office:value="0.7034552" calcext:value-type="float">
            <text:p>7,03E-01</text:p>
          </table:table-cell>
          <table:table-cell table:style-name="ce1" office:value-type="float" office:value="0.8099194" calcext:value-type="float">
            <text:p>8,10E-01</text:p>
          </table:table-cell>
          <table:table-cell table:style-name="ce1" office:value-type="float" office:value="0.7187816" calcext:value-type="float">
            <text:p>7,19E-01</text:p>
          </table:table-cell>
          <table:table-cell table:style-name="ce1" office:value-type="float" office:value="0.8343808" calcext:value-type="float">
            <text:p>8,34E-01</text:p>
          </table:table-cell>
          <table:table-cell table:style-name="ce1" office:value-type="float" office:value="0.7515407" calcext:value-type="float">
            <text:p>7,52E-01</text:p>
          </table:table-cell>
          <table:table-cell table:style-name="ce1" office:value-type="float" office:value="0.8159873" calcext:value-type="float">
            <text:p>8,16E-01</text:p>
          </table:table-cell>
          <table:table-cell/>
          <table:table-cell table:style-name="ce1" table:formula="of:=MAX([.C61];[.E61];[.G61];[.I61];[.K61])" office:value-type="float" office:value="0.7515407" calcext:value-type="float">
            <text:p>7,52E-01</text:p>
          </table:table-cell>
          <table:table-cell table:style-name="ce8" table:formula="of:=MAX([.D61];[.F61];[.H61];[.J61];[.L61])" office:value-type="float" office:value="0.8382089" calcext:value-type="float">
            <text:p>8,38E-01</text:p>
          </table:table-cell>
          <table:table-cell table:style-name="ce1"/>
          <table:table-cell table:style-name="ce1" office:value-type="float" office:value="0.7515407" calcext:value-type="float">
            <text:p>7,52E-01</text:p>
          </table:table-cell>
          <table:table-cell table:style-name="ce1" office:value-type="float" office:value="0.8382089" calcext:value-type="float">
            <text:p>8,38E-01</text:p>
          </table:table-cell>
          <table:table-cell table:style-name="ce4" table:formula="of:=[.Q61]&gt;[.N61]" office:value-type="boolean" office:boolean-value="false" calcext:value-type="boolean">
            <text:p>БРЕХНЯ</text:p>
          </table:table-cell>
          <table:table-cell table:style-name="ce4" table:formula="of:=[.R61]&gt;[.O6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15407" calcext:value-type="float">
            <text:p>7,52E-01</text:p>
          </table:table-cell>
          <table:table-cell table:style-name="ce4" table:formula="of:=[.V61]&gt;[.Q61]" office:value-type="boolean" office:boolean-value="false" calcext:value-type="boolean">
            <text:p>БРЕХНЯ</text:p>
          </table:table-cell>
          <table:table-cell table:style-name="ce1" table:formula="of:=MAX([.V61];[.Q61])" office:value-type="float" office:value="0.7515407" calcext:value-type="float">
            <text:p>7,52E-01</text:p>
          </table:table-cell>
          <table:table-cell table:style-name="ce4" table:formula="of:=[.X61]&gt;[.R6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1]&gt;[.C61]" office:value-type="boolean" office:boolean-value="false" calcext:value-type="boolean">
            <text:p>БРЕХНЯ</text:p>
          </table:table-cell>
          <table:table-cell table:style-name="ce4" table:formula="of:=[.F61]&gt;[.D61]" office:value-type="boolean" office:boolean-value="true" calcext:value-type="boolean">
            <text:p>ІСТИНА</text:p>
          </table:table-cell>
          <table:table-cell table:style-name="ce4" table:formula="of:=[.G61]&gt;MAX([.C61];[.E61])" office:value-type="boolean" office:boolean-value="true" calcext:value-type="boolean">
            <text:p>ІСТИНА</text:p>
          </table:table-cell>
          <table:table-cell table:style-name="ce4" table:formula="of:=[.H61]&gt;MAX([.D61];[.F61])" office:value-type="boolean" office:boolean-value="false" calcext:value-type="boolean">
            <text:p>БРЕХНЯ</text:p>
          </table:table-cell>
          <table:table-cell table:style-name="ce4" table:formula="of:=[.I61]&gt;MAX([.C61];[.E61];[.G61])" office:value-type="boolean" office:boolean-value="true" calcext:value-type="boolean">
            <text:p>ІСТИНА</text:p>
          </table:table-cell>
          <table:table-cell table:style-name="ce4" table:formula="of:=[.J61]&gt;MAX([.D61];[.F61];[.H61])" office:value-type="boolean" office:boolean-value="false" calcext:value-type="boolean">
            <text:p>БРЕХНЯ</text:p>
          </table:table-cell>
          <table:table-cell table:style-name="ce4" table:formula="of:=[.K61]&gt;MAX([.C61];[.E61];[.G61];[.I61])" office:value-type="boolean" office:boolean-value="true" calcext:value-type="boolean">
            <text:p>ІСТИНА</text:p>
          </table:table-cell>
          <table:table-cell table:style-name="ce4" table:formula="of:=[.L61]&gt;MAX([.D61];[.F61];[.H61];[.J6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1]&gt;0.9" office:value-type="boolean" office:boolean-value="false" calcext:value-type="boolean">
            <text:p>БРЕХНЯ</text:p>
          </table:table-cell>
          <table:table-cell table:style-name="ce4" table:formula="of:=[.R61]&gt;0.9" office:value-type="boolean" office:boolean-value="false" calcext:value-type="boolean">
            <text:p>БРЕХНЯ</text:p>
          </table:table-cell>
          <table:table-cell table:style-name="ce4" table:formula="of:=[.X61]&gt;0.8" office:value-type="boolean" office:boolean-value="false" calcext:value-type="boolean">
            <text:p>БРЕХНЯ</text:p>
          </table:table-cell>
          <table:table-cell table:style-name="ce4" table:formula="of:=[.R61]&gt;0.8" office:value-type="boolean" office:boolean-value="true" calcext:value-type="boolean">
            <text:p>ІСТИНА</text:p>
          </table:table-cell>
          <table:table-cell table:style-name="ce4" table:formula="of:=[.X61]&gt;0.7" office:value-type="boolean" office:boolean-value="true" calcext:value-type="boolean">
            <text:p>ІСТИНА</text:p>
          </table:table-cell>
          <table:table-cell table:style-name="ce4" table:formula="of:=[.R6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7695397" calcext:value-type="float">
            <text:p>7,70E-01</text:p>
          </table:table-cell>
          <table:table-cell table:style-name="ce1" office:value-type="float" office:value="0.8655501" calcext:value-type="float">
            <text:p>8,66E-01</text:p>
          </table:table-cell>
          <table:table-cell table:style-name="ce1" office:value-type="float" office:value="0.7058589" calcext:value-type="float">
            <text:p>7,06E-01</text:p>
          </table:table-cell>
          <table:table-cell table:style-name="ce1" office:value-type="float" office:value="0.8316717" calcext:value-type="float">
            <text:p>8,32E-01</text:p>
          </table:table-cell>
          <table:table-cell table:style-name="ce1" office:value-type="float" office:value="0.6047672" calcext:value-type="float">
            <text:p>6,05E-01</text:p>
          </table:table-cell>
          <table:table-cell table:style-name="ce1" office:value-type="float" office:value="0.9151414" calcext:value-type="float">
            <text:p>9,15E-01</text:p>
          </table:table-cell>
          <table:table-cell table:style-name="ce1" office:value-type="float" office:value="0.7116843" calcext:value-type="float">
            <text:p>7,12E-01</text:p>
          </table:table-cell>
          <table:table-cell table:style-name="ce1" office:value-type="float" office:value="0.855372" calcext:value-type="float">
            <text:p>8,55E-01</text:p>
          </table:table-cell>
          <table:table-cell table:style-name="ce1" office:value-type="float" office:value="0.7690757" calcext:value-type="float">
            <text:p>7,69E-01</text:p>
          </table:table-cell>
          <table:table-cell table:style-name="ce1" office:value-type="float" office:value="0.7684815" calcext:value-type="float">
            <text:p>7,68E-01</text:p>
          </table:table-cell>
          <table:table-cell/>
          <table:table-cell table:style-name="ce1" table:formula="of:=MAX([.C62];[.E62];[.G62];[.I62];[.K62])" office:value-type="float" office:value="0.7695397" calcext:value-type="float">
            <text:p>7,70E-01</text:p>
          </table:table-cell>
          <table:table-cell table:style-name="ce8" table:formula="of:=MAX([.D62];[.F62];[.H62];[.J62];[.L62])" office:value-type="float" office:value="0.9151414" calcext:value-type="float">
            <text:p>9,15E-01</text:p>
          </table:table-cell>
          <table:table-cell table:style-name="ce1"/>
          <table:table-cell table:style-name="ce1" office:value-type="float" office:value="0.7695397" calcext:value-type="float">
            <text:p>7,70E-01</text:p>
          </table:table-cell>
          <table:table-cell table:style-name="ce1" office:value-type="float" office:value="0.9151414" calcext:value-type="float">
            <text:p>9,15E-01</text:p>
          </table:table-cell>
          <table:table-cell table:style-name="ce4" table:formula="of:=[.Q62]&gt;[.N62]" office:value-type="boolean" office:boolean-value="false" calcext:value-type="boolean">
            <text:p>БРЕХНЯ</text:p>
          </table:table-cell>
          <table:table-cell table:style-name="ce4" table:formula="of:=[.R62]&gt;[.O6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695397" calcext:value-type="float">
            <text:p>7,70E-01</text:p>
          </table:table-cell>
          <table:table-cell table:style-name="ce4" table:formula="of:=[.V62]&gt;[.Q62]" office:value-type="boolean" office:boolean-value="false" calcext:value-type="boolean">
            <text:p>БРЕХНЯ</text:p>
          </table:table-cell>
          <table:table-cell table:style-name="ce1" table:formula="of:=MAX([.V62];[.Q62])" office:value-type="float" office:value="0.7695397" calcext:value-type="float">
            <text:p>7,70E-01</text:p>
          </table:table-cell>
          <table:table-cell table:style-name="ce4" table:formula="of:=[.X62]&gt;[.R6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2]&gt;[.C62]" office:value-type="boolean" office:boolean-value="false" calcext:value-type="boolean">
            <text:p>БРЕХНЯ</text:p>
          </table:table-cell>
          <table:table-cell table:style-name="ce4" table:formula="of:=[.F62]&gt;[.D62]" office:value-type="boolean" office:boolean-value="false" calcext:value-type="boolean">
            <text:p>БРЕХНЯ</text:p>
          </table:table-cell>
          <table:table-cell table:style-name="ce4" table:formula="of:=[.G62]&gt;MAX([.C62];[.E62])" office:value-type="boolean" office:boolean-value="false" calcext:value-type="boolean">
            <text:p>БРЕХНЯ</text:p>
          </table:table-cell>
          <table:table-cell table:style-name="ce4" table:formula="of:=[.H62]&gt;MAX([.D62];[.F62])" office:value-type="boolean" office:boolean-value="true" calcext:value-type="boolean">
            <text:p>ІСТИНА</text:p>
          </table:table-cell>
          <table:table-cell table:style-name="ce4" table:formula="of:=[.I62]&gt;MAX([.C62];[.E62];[.G62])" office:value-type="boolean" office:boolean-value="false" calcext:value-type="boolean">
            <text:p>БРЕХНЯ</text:p>
          </table:table-cell>
          <table:table-cell table:style-name="ce4" table:formula="of:=[.J62]&gt;MAX([.D62];[.F62];[.H62])" office:value-type="boolean" office:boolean-value="false" calcext:value-type="boolean">
            <text:p>БРЕХНЯ</text:p>
          </table:table-cell>
          <table:table-cell table:style-name="ce4" table:formula="of:=[.K62]&gt;MAX([.C62];[.E62];[.G62];[.I62])" office:value-type="boolean" office:boolean-value="false" calcext:value-type="boolean">
            <text:p>БРЕХНЯ</text:p>
          </table:table-cell>
          <table:table-cell table:style-name="ce4" table:formula="of:=[.L62]&gt;MAX([.D62];[.F62];[.H62];[.J62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2]&gt;0.9" office:value-type="boolean" office:boolean-value="false" calcext:value-type="boolean">
            <text:p>БРЕХНЯ</text:p>
          </table:table-cell>
          <table:table-cell table:style-name="ce4" table:formula="of:=[.R62]&gt;0.9" office:value-type="boolean" office:boolean-value="true" calcext:value-type="boolean">
            <text:p>ІСТИНА</text:p>
          </table:table-cell>
          <table:table-cell table:style-name="ce4" table:formula="of:=[.X62]&gt;0.8" office:value-type="boolean" office:boolean-value="false" calcext:value-type="boolean">
            <text:p>БРЕХНЯ</text:p>
          </table:table-cell>
          <table:table-cell table:style-name="ce4" table:formula="of:=[.R62]&gt;0.8" office:value-type="boolean" office:boolean-value="true" calcext:value-type="boolean">
            <text:p>ІСТИНА</text:p>
          </table:table-cell>
          <table:table-cell table:style-name="ce4" table:formula="of:=[.X62]&gt;0.7" office:value-type="boolean" office:boolean-value="true" calcext:value-type="boolean">
            <text:p>ІСТИНА</text:p>
          </table:table-cell>
          <table:table-cell table:style-name="ce4" table:formula="of:=[.R6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0.7054304" calcext:value-type="float">
            <text:p>7,05E-01</text:p>
          </table:table-cell>
          <table:table-cell table:style-name="ce1" office:value-type="float" office:value="0.8288078" calcext:value-type="float">
            <text:p>8,29E-01</text:p>
          </table:table-cell>
          <table:table-cell table:style-name="ce1" office:value-type="float" office:value="0.6474839" calcext:value-type="float">
            <text:p>6,47E-01</text:p>
          </table:table-cell>
          <table:table-cell table:style-name="ce1" office:value-type="float" office:value="0.8345068" calcext:value-type="float">
            <text:p>8,35E-01</text:p>
          </table:table-cell>
          <table:table-cell table:style-name="ce1" office:value-type="float" office:value="0.6699103" calcext:value-type="float">
            <text:p>6,70E-01</text:p>
          </table:table-cell>
          <table:table-cell table:style-name="ce1" office:value-type="float" office:value="0.772826" calcext:value-type="float">
            <text:p>7,73E-01</text:p>
          </table:table-cell>
          <table:table-cell table:style-name="ce1" office:value-type="float" office:value="0.6491209" calcext:value-type="float">
            <text:p>6,49E-01</text:p>
          </table:table-cell>
          <table:table-cell table:style-name="ce1" office:value-type="float" office:value="0.8272876" calcext:value-type="float">
            <text:p>8,27E-01</text:p>
          </table:table-cell>
          <table:table-cell table:style-name="ce1" office:value-type="float" office:value="0.6610819" calcext:value-type="float">
            <text:p>6,61E-01</text:p>
          </table:table-cell>
          <table:table-cell table:style-name="ce1" office:value-type="float" office:value="0.7827169" calcext:value-type="float">
            <text:p>7,83E-01</text:p>
          </table:table-cell>
          <table:table-cell/>
          <table:table-cell table:style-name="ce1" table:formula="of:=MAX([.C63];[.E63];[.G63];[.I63];[.K63])" office:value-type="float" office:value="0.7054304" calcext:value-type="float">
            <text:p>7,05E-01</text:p>
          </table:table-cell>
          <table:table-cell table:style-name="ce8" table:formula="of:=MAX([.D63];[.F63];[.H63];[.J63];[.L63])" office:value-type="float" office:value="0.8345068" calcext:value-type="float">
            <text:p>8,35E-01</text:p>
          </table:table-cell>
          <table:table-cell table:style-name="ce1"/>
          <table:table-cell table:style-name="ce1" office:value-type="float" office:value="0.7054304" calcext:value-type="float">
            <text:p>7,05E-01</text:p>
          </table:table-cell>
          <table:table-cell table:style-name="ce1" office:value-type="float" office:value="0.8345068" calcext:value-type="float">
            <text:p>8,35E-01</text:p>
          </table:table-cell>
          <table:table-cell table:style-name="ce4" table:formula="of:=[.Q63]&gt;[.N63]" office:value-type="boolean" office:boolean-value="false" calcext:value-type="boolean">
            <text:p>БРЕХНЯ</text:p>
          </table:table-cell>
          <table:table-cell table:style-name="ce4" table:formula="of:=[.R63]&gt;[.O63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123142" calcext:value-type="float">
            <text:p>7,12E-01</text:p>
          </table:table-cell>
          <table:table-cell table:style-name="ce4" table:formula="of:=[.V63]&gt;[.Q63]" office:value-type="boolean" office:boolean-value="true" calcext:value-type="boolean">
            <text:p>ІСТИНА</text:p>
          </table:table-cell>
          <table:table-cell table:style-name="ce1" table:formula="of:=MAX([.V63];[.Q63])" office:value-type="float" office:value="0.7123142" calcext:value-type="float">
            <text:p>7,12E-01</text:p>
          </table:table-cell>
          <table:table-cell table:style-name="ce4" table:formula="of:=[.X63]&gt;[.R6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3]&gt;[.C63]" office:value-type="boolean" office:boolean-value="false" calcext:value-type="boolean">
            <text:p>БРЕХНЯ</text:p>
          </table:table-cell>
          <table:table-cell table:style-name="ce4" table:formula="of:=[.F63]&gt;[.D63]" office:value-type="boolean" office:boolean-value="true" calcext:value-type="boolean">
            <text:p>ІСТИНА</text:p>
          </table:table-cell>
          <table:table-cell table:style-name="ce4" table:formula="of:=[.G63]&gt;MAX([.C63];[.E63])" office:value-type="boolean" office:boolean-value="false" calcext:value-type="boolean">
            <text:p>БРЕХНЯ</text:p>
          </table:table-cell>
          <table:table-cell table:style-name="ce4" table:formula="of:=[.H63]&gt;MAX([.D63];[.F63])" office:value-type="boolean" office:boolean-value="false" calcext:value-type="boolean">
            <text:p>БРЕХНЯ</text:p>
          </table:table-cell>
          <table:table-cell table:style-name="ce4" table:formula="of:=[.I63]&gt;MAX([.C63];[.E63];[.G63])" office:value-type="boolean" office:boolean-value="false" calcext:value-type="boolean">
            <text:p>БРЕХНЯ</text:p>
          </table:table-cell>
          <table:table-cell table:style-name="ce4" table:formula="of:=[.J63]&gt;MAX([.D63];[.F63];[.H63])" office:value-type="boolean" office:boolean-value="false" calcext:value-type="boolean">
            <text:p>БРЕХНЯ</text:p>
          </table:table-cell>
          <table:table-cell table:style-name="ce4" table:formula="of:=[.K63]&gt;MAX([.C63];[.E63];[.G63];[.I63])" office:value-type="boolean" office:boolean-value="false" calcext:value-type="boolean">
            <text:p>БРЕХНЯ</text:p>
          </table:table-cell>
          <table:table-cell table:style-name="ce4" table:formula="of:=[.L63]&gt;MAX([.D63];[.F63];[.H63];[.J63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3]&gt;0.9" office:value-type="boolean" office:boolean-value="false" calcext:value-type="boolean">
            <text:p>БРЕХНЯ</text:p>
          </table:table-cell>
          <table:table-cell table:style-name="ce4" table:formula="of:=[.R63]&gt;0.9" office:value-type="boolean" office:boolean-value="false" calcext:value-type="boolean">
            <text:p>БРЕХНЯ</text:p>
          </table:table-cell>
          <table:table-cell table:style-name="ce4" table:formula="of:=[.X63]&gt;0.8" office:value-type="boolean" office:boolean-value="false" calcext:value-type="boolean">
            <text:p>БРЕХНЯ</text:p>
          </table:table-cell>
          <table:table-cell table:style-name="ce4" table:formula="of:=[.R63]&gt;0.8" office:value-type="boolean" office:boolean-value="true" calcext:value-type="boolean">
            <text:p>ІСТИНА</text:p>
          </table:table-cell>
          <table:table-cell table:style-name="ce4" table:formula="of:=[.X63]&gt;0.7" office:value-type="boolean" office:boolean-value="true" calcext:value-type="boolean">
            <text:p>ІСТИНА</text:p>
          </table:table-cell>
          <table:table-cell table:style-name="ce4" table:formula="of:=[.R6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-0.130302" calcext:value-type="float">
            <text:p>-1,30E-01</text:p>
          </table:table-cell>
          <table:table-cell table:style-name="ce1" office:value-type="float" office:value="0.250796" calcext:value-type="float">
            <text:p>2,51E-01</text:p>
          </table:table-cell>
          <table:table-cell table:style-name="ce1" office:value-type="float" office:value="-0.05124853" calcext:value-type="float">
            <text:p>-5,12E-02</text:p>
          </table:table-cell>
          <table:table-cell table:style-name="ce1" office:value-type="float" office:value="0.2459747" calcext:value-type="float">
            <text:p>2,46E-01</text:p>
          </table:table-cell>
          <table:table-cell table:style-name="ce1" office:value-type="float" office:value="-0.07062683" calcext:value-type="float">
            <text:p>-7,06E-02</text:p>
          </table:table-cell>
          <table:table-cell table:style-name="ce1" office:value-type="float" office:value="0.3278392" calcext:value-type="float">
            <text:p>3,28E-01</text:p>
          </table:table-cell>
          <table:table-cell table:style-name="ce1" office:value-type="float" office:value="-0.05437796" calcext:value-type="float">
            <text:p>-5,44E-02</text:p>
          </table:table-cell>
          <table:table-cell table:style-name="ce1" office:value-type="float" office:value="0.4525303" calcext:value-type="float">
            <text:p>4,53E-01</text:p>
          </table:table-cell>
          <table:table-cell table:style-name="ce1" office:value-type="float" office:value="-0.1252903" calcext:value-type="float">
            <text:p>-1,25E-01</text:p>
          </table:table-cell>
          <table:table-cell table:style-name="ce1" office:value-type="float" office:value="0.3645872" calcext:value-type="float">
            <text:p>3,65E-01</text:p>
          </table:table-cell>
          <table:table-cell/>
          <table:table-cell table:style-name="ce1" table:formula="of:=MAX([.C64];[.E64];[.G64];[.I64];[.K64])" office:value-type="float" office:value="-0.05124853" calcext:value-type="float">
            <text:p>-5,12E-02</text:p>
          </table:table-cell>
          <table:table-cell table:style-name="ce8" table:formula="of:=MAX([.D64];[.F64];[.H64];[.J64];[.L64])" office:value-type="float" office:value="0.4525303" calcext:value-type="float">
            <text:p>4,53E-01</text:p>
          </table:table-cell>
          <table:table-cell table:style-name="ce2"/>
          <table:table-cell table:style-name="ce1" office:value-type="float" office:value="0.527187" calcext:value-type="float">
            <text:p>5,27E-01</text:p>
          </table:table-cell>
          <table:table-cell table:style-name="ce1" office:value-type="float" office:value="0.7705811" calcext:value-type="float">
            <text:p>7,71E-01</text:p>
          </table:table-cell>
          <table:table-cell table:style-name="ce4" table:formula="of:=[.Q64]&gt;[.N64]" office:value-type="boolean" office:boolean-value="true" calcext:value-type="boolean">
            <text:p>ІСТИНА</text:p>
          </table:table-cell>
          <table:table-cell table:style-name="ce4" table:formula="of:=[.R64]&gt;[.O64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558045" calcext:value-type="float">
            <text:p>6,56E-01</text:p>
          </table:table-cell>
          <table:table-cell table:style-name="ce4" table:formula="of:=[.V64]&gt;[.Q64]" office:value-type="boolean" office:boolean-value="true" calcext:value-type="boolean">
            <text:p>ІСТИНА</text:p>
          </table:table-cell>
          <table:table-cell table:style-name="ce1" table:formula="of:=MAX([.V64];[.Q64])" office:value-type="float" office:value="0.6558045" calcext:value-type="float">
            <text:p>6,56E-01</text:p>
          </table:table-cell>
          <table:table-cell table:style-name="ce4" table:formula="of:=[.X64]&gt;[.R6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4]&gt;[.C64]" office:value-type="boolean" office:boolean-value="true" calcext:value-type="boolean">
            <text:p>ІСТИНА</text:p>
          </table:table-cell>
          <table:table-cell table:style-name="ce4" table:formula="of:=[.F64]&gt;[.D64]" office:value-type="boolean" office:boolean-value="false" calcext:value-type="boolean">
            <text:p>БРЕХНЯ</text:p>
          </table:table-cell>
          <table:table-cell table:style-name="ce4" table:formula="of:=[.G64]&gt;MAX([.C64];[.E64])" office:value-type="boolean" office:boolean-value="false" calcext:value-type="boolean">
            <text:p>БРЕХНЯ</text:p>
          </table:table-cell>
          <table:table-cell table:style-name="ce4" table:formula="of:=[.H64]&gt;MAX([.D64];[.F64])" office:value-type="boolean" office:boolean-value="true" calcext:value-type="boolean">
            <text:p>ІСТИНА</text:p>
          </table:table-cell>
          <table:table-cell table:style-name="ce4" table:formula="of:=[.I64]&gt;MAX([.C64];[.E64];[.G64])" office:value-type="boolean" office:boolean-value="false" calcext:value-type="boolean">
            <text:p>БРЕХНЯ</text:p>
          </table:table-cell>
          <table:table-cell table:style-name="ce4" table:formula="of:=[.J64]&gt;MAX([.D64];[.F64];[.H64])" office:value-type="boolean" office:boolean-value="true" calcext:value-type="boolean">
            <text:p>ІСТИНА</text:p>
          </table:table-cell>
          <table:table-cell table:style-name="ce4" table:formula="of:=[.K64]&gt;MAX([.C64];[.E64];[.G64];[.I64])" office:value-type="boolean" office:boolean-value="false" calcext:value-type="boolean">
            <text:p>БРЕХНЯ</text:p>
          </table:table-cell>
          <table:table-cell table:style-name="ce4" table:formula="of:=[.L64]&gt;MAX([.D64];[.F64];[.H64];[.J6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4]&gt;0.9" office:value-type="boolean" office:boolean-value="false" calcext:value-type="boolean">
            <text:p>БРЕХНЯ</text:p>
          </table:table-cell>
          <table:table-cell table:style-name="ce4" table:formula="of:=[.R64]&gt;0.9" office:value-type="boolean" office:boolean-value="false" calcext:value-type="boolean">
            <text:p>БРЕХНЯ</text:p>
          </table:table-cell>
          <table:table-cell table:style-name="ce4" table:formula="of:=[.X64]&gt;0.8" office:value-type="boolean" office:boolean-value="false" calcext:value-type="boolean">
            <text:p>БРЕХНЯ</text:p>
          </table:table-cell>
          <table:table-cell table:style-name="ce4" table:formula="of:=[.R64]&gt;0.8" office:value-type="boolean" office:boolean-value="false" calcext:value-type="boolean">
            <text:p>БРЕХНЯ</text:p>
          </table:table-cell>
          <table:table-cell table:style-name="ce4" table:formula="of:=[.X64]&gt;0.7" office:value-type="boolean" office:boolean-value="false" calcext:value-type="boolean">
            <text:p>БРЕХНЯ</text:p>
          </table:table-cell>
          <table:table-cell table:style-name="ce4" table:formula="of:=[.R64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0.6711014" calcext:value-type="float">
            <text:p>6,71E-01</text:p>
          </table:table-cell>
          <table:table-cell table:style-name="ce1" office:value-type="float" office:value="0.7580026" calcext:value-type="float">
            <text:p>7,58E-01</text:p>
          </table:table-cell>
          <table:table-cell table:style-name="ce1" office:value-type="float" office:value="0.6423548" calcext:value-type="float">
            <text:p>6,42E-01</text:p>
          </table:table-cell>
          <table:table-cell table:style-name="ce1" office:value-type="float" office:value="0.7994896" calcext:value-type="float">
            <text:p>7,99E-01</text:p>
          </table:table-cell>
          <table:table-cell table:style-name="ce1" office:value-type="float" office:value="0.6636061" calcext:value-type="float">
            <text:p>6,64E-01</text:p>
          </table:table-cell>
          <table:table-cell table:style-name="ce1" office:value-type="float" office:value="0.7681081" calcext:value-type="float">
            <text:p>7,68E-01</text:p>
          </table:table-cell>
          <table:table-cell table:style-name="ce1" office:value-type="float" office:value="0.627271" calcext:value-type="float">
            <text:p>6,27E-01</text:p>
          </table:table-cell>
          <table:table-cell table:style-name="ce1" office:value-type="float" office:value="0.7166919" calcext:value-type="float">
            <text:p>7,17E-01</text:p>
          </table:table-cell>
          <table:table-cell table:style-name="ce1" office:value-type="float" office:value="0.6728365" calcext:value-type="float">
            <text:p>6,73E-01</text:p>
          </table:table-cell>
          <table:table-cell table:style-name="ce1" office:value-type="float" office:value="0.7550023" calcext:value-type="float">
            <text:p>7,55E-01</text:p>
          </table:table-cell>
          <table:table-cell/>
          <table:table-cell table:style-name="ce1" table:formula="of:=MAX([.C65];[.E65];[.G65];[.I65];[.K65])" office:value-type="float" office:value="0.6728365" calcext:value-type="float">
            <text:p>6,73E-01</text:p>
          </table:table-cell>
          <table:table-cell table:style-name="ce8" table:formula="of:=MAX([.D65];[.F65];[.H65];[.J65];[.L65])" office:value-type="float" office:value="0.7994896" calcext:value-type="float">
            <text:p>7,99E-01</text:p>
          </table:table-cell>
          <table:table-cell table:style-name="ce1"/>
          <table:table-cell table:style-name="ce1" office:value-type="float" office:value="0.6728365" calcext:value-type="float">
            <text:p>6,73E-01</text:p>
          </table:table-cell>
          <table:table-cell table:style-name="ce1" office:value-type="float" office:value="0.9311919" calcext:value-type="float">
            <text:p>9,31E-01</text:p>
          </table:table-cell>
          <table:table-cell table:style-name="ce4" table:formula="of:=[.Q65]&gt;[.N65]" office:value-type="boolean" office:boolean-value="false" calcext:value-type="boolean">
            <text:p>БРЕХНЯ</text:p>
          </table:table-cell>
          <table:table-cell table:style-name="ce4" table:formula="of:=[.R65]&gt;[.O65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7146504" calcext:value-type="float">
            <text:p>7,15E-01</text:p>
          </table:table-cell>
          <table:table-cell table:style-name="ce4" table:formula="of:=[.V65]&gt;[.Q65]" office:value-type="boolean" office:boolean-value="true" calcext:value-type="boolean">
            <text:p>ІСТИНА</text:p>
          </table:table-cell>
          <table:table-cell table:style-name="ce1" table:formula="of:=MAX([.V65];[.Q65])" office:value-type="float" office:value="0.7146504" calcext:value-type="float">
            <text:p>7,15E-01</text:p>
          </table:table-cell>
          <table:table-cell table:style-name="ce4" table:formula="of:=[.X65]&gt;[.R6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5]&gt;[.C65]" office:value-type="boolean" office:boolean-value="false" calcext:value-type="boolean">
            <text:p>БРЕХНЯ</text:p>
          </table:table-cell>
          <table:table-cell table:style-name="ce4" table:formula="of:=[.F65]&gt;[.D65]" office:value-type="boolean" office:boolean-value="true" calcext:value-type="boolean">
            <text:p>ІСТИНА</text:p>
          </table:table-cell>
          <table:table-cell table:style-name="ce4" table:formula="of:=[.G65]&gt;MAX([.C65];[.E65])" office:value-type="boolean" office:boolean-value="false" calcext:value-type="boolean">
            <text:p>БРЕХНЯ</text:p>
          </table:table-cell>
          <table:table-cell table:style-name="ce4" table:formula="of:=[.H65]&gt;MAX([.D65];[.F65])" office:value-type="boolean" office:boolean-value="false" calcext:value-type="boolean">
            <text:p>БРЕХНЯ</text:p>
          </table:table-cell>
          <table:table-cell table:style-name="ce4" table:formula="of:=[.I65]&gt;MAX([.C65];[.E65];[.G65])" office:value-type="boolean" office:boolean-value="false" calcext:value-type="boolean">
            <text:p>БРЕХНЯ</text:p>
          </table:table-cell>
          <table:table-cell table:style-name="ce4" table:formula="of:=[.J65]&gt;MAX([.D65];[.F65];[.H65])" office:value-type="boolean" office:boolean-value="false" calcext:value-type="boolean">
            <text:p>БРЕХНЯ</text:p>
          </table:table-cell>
          <table:table-cell table:style-name="ce4" table:formula="of:=[.K65]&gt;MAX([.C65];[.E65];[.G65];[.I65])" office:value-type="boolean" office:boolean-value="true" calcext:value-type="boolean">
            <text:p>ІСТИНА</text:p>
          </table:table-cell>
          <table:table-cell table:style-name="ce4" table:formula="of:=[.L65]&gt;MAX([.D65];[.F65];[.H65];[.J65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5]&gt;0.9" office:value-type="boolean" office:boolean-value="false" calcext:value-type="boolean">
            <text:p>БРЕХНЯ</text:p>
          </table:table-cell>
          <table:table-cell table:style-name="ce4" table:formula="of:=[.R65]&gt;0.9" office:value-type="boolean" office:boolean-value="true" calcext:value-type="boolean">
            <text:p>ІСТИНА</text:p>
          </table:table-cell>
          <table:table-cell table:style-name="ce4" table:formula="of:=[.X65]&gt;0.8" office:value-type="boolean" office:boolean-value="false" calcext:value-type="boolean">
            <text:p>БРЕХНЯ</text:p>
          </table:table-cell>
          <table:table-cell table:style-name="ce4" table:formula="of:=[.R65]&gt;0.8" office:value-type="boolean" office:boolean-value="true" calcext:value-type="boolean">
            <text:p>ІСТИНА</text:p>
          </table:table-cell>
          <table:table-cell table:style-name="ce4" table:formula="of:=[.X65]&gt;0.7" office:value-type="boolean" office:boolean-value="true" calcext:value-type="boolean">
            <text:p>ІСТИНА</text:p>
          </table:table-cell>
          <table:table-cell table:style-name="ce4" table:formula="of:=[.R6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0.6613605" calcext:value-type="float">
            <text:p>6,61E-01</text:p>
          </table:table-cell>
          <table:table-cell table:style-name="ce1" office:value-type="float" office:value="0.7674995" calcext:value-type="float">
            <text:p>7,67E-01</text:p>
          </table:table-cell>
          <table:table-cell table:style-name="ce1" office:value-type="float" office:value="0.6027431" calcext:value-type="float">
            <text:p>6,03E-01</text:p>
          </table:table-cell>
          <table:table-cell table:style-name="ce1" office:value-type="float" office:value="0.8715884" calcext:value-type="float">
            <text:p>8,72E-01</text:p>
          </table:table-cell>
          <table:table-cell table:style-name="ce1" office:value-type="float" office:value="0.6821354" calcext:value-type="float">
            <text:p>6,82E-01</text:p>
          </table:table-cell>
          <table:table-cell table:style-name="ce1" office:value-type="float" office:value="0.8582685" calcext:value-type="float">
            <text:p>8,58E-01</text:p>
          </table:table-cell>
          <table:table-cell table:style-name="ce1" office:value-type="float" office:value="0.6607353" calcext:value-type="float">
            <text:p>6,61E-01</text:p>
          </table:table-cell>
          <table:table-cell table:style-name="ce1" office:value-type="float" office:value="0.7867521" calcext:value-type="float">
            <text:p>7,87E-01</text:p>
          </table:table-cell>
          <table:table-cell table:style-name="ce1" office:value-type="float" office:value="0.6858656" calcext:value-type="float">
            <text:p>6,86E-01</text:p>
          </table:table-cell>
          <table:table-cell table:style-name="ce1" office:value-type="float" office:value="0.7937766" calcext:value-type="float">
            <text:p>7,94E-01</text:p>
          </table:table-cell>
          <table:table-cell/>
          <table:table-cell table:style-name="ce1" table:formula="of:=MAX([.C66];[.E66];[.G66];[.I66];[.K66])" office:value-type="float" office:value="0.6858656" calcext:value-type="float">
            <text:p>6,86E-01</text:p>
          </table:table-cell>
          <table:table-cell table:style-name="ce8" table:formula="of:=MAX([.D66];[.F66];[.H66];[.J66];[.L66])" office:value-type="float" office:value="0.8715884" calcext:value-type="float">
            <text:p>8,72E-01</text:p>
          </table:table-cell>
          <table:table-cell table:style-name="ce1"/>
          <table:table-cell table:style-name="ce1" office:value-type="float" office:value="0.7270118" calcext:value-type="float">
            <text:p>7,27E-01</text:p>
          </table:table-cell>
          <table:table-cell table:style-name="ce1" office:value-type="float" office:value="0.8715884" calcext:value-type="float">
            <text:p>8,72E-01</text:p>
          </table:table-cell>
          <table:table-cell table:style-name="ce4" table:formula="of:=[.Q66]&gt;[.N66]" office:value-type="boolean" office:boolean-value="true" calcext:value-type="boolean">
            <text:p>ІСТИНА</text:p>
          </table:table-cell>
          <table:table-cell table:style-name="ce4" table:formula="of:=[.R66]&gt;[.O6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270118" calcext:value-type="float">
            <text:p>7,27E-01</text:p>
          </table:table-cell>
          <table:table-cell table:style-name="ce4" table:formula="of:=[.V66]&gt;[.Q66]" office:value-type="boolean" office:boolean-value="false" calcext:value-type="boolean">
            <text:p>БРЕХНЯ</text:p>
          </table:table-cell>
          <table:table-cell table:style-name="ce1" table:formula="of:=MAX([.V66];[.Q66])" office:value-type="float" office:value="0.7270118" calcext:value-type="float">
            <text:p>7,27E-01</text:p>
          </table:table-cell>
          <table:table-cell table:style-name="ce4" table:formula="of:=[.X66]&gt;[.R6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6]&gt;[.C66]" office:value-type="boolean" office:boolean-value="false" calcext:value-type="boolean">
            <text:p>БРЕХНЯ</text:p>
          </table:table-cell>
          <table:table-cell table:style-name="ce4" table:formula="of:=[.F66]&gt;[.D66]" office:value-type="boolean" office:boolean-value="true" calcext:value-type="boolean">
            <text:p>ІСТИНА</text:p>
          </table:table-cell>
          <table:table-cell table:style-name="ce4" table:formula="of:=[.G66]&gt;MAX([.C66];[.E66])" office:value-type="boolean" office:boolean-value="true" calcext:value-type="boolean">
            <text:p>ІСТИНА</text:p>
          </table:table-cell>
          <table:table-cell table:style-name="ce4" table:formula="of:=[.H66]&gt;MAX([.D66];[.F66])" office:value-type="boolean" office:boolean-value="false" calcext:value-type="boolean">
            <text:p>БРЕХНЯ</text:p>
          </table:table-cell>
          <table:table-cell table:style-name="ce4" table:formula="of:=[.I66]&gt;MAX([.C66];[.E66];[.G66])" office:value-type="boolean" office:boolean-value="false" calcext:value-type="boolean">
            <text:p>БРЕХНЯ</text:p>
          </table:table-cell>
          <table:table-cell table:style-name="ce4" table:formula="of:=[.J66]&gt;MAX([.D66];[.F66];[.H66])" office:value-type="boolean" office:boolean-value="false" calcext:value-type="boolean">
            <text:p>БРЕХНЯ</text:p>
          </table:table-cell>
          <table:table-cell table:style-name="ce4" table:formula="of:=[.K66]&gt;MAX([.C66];[.E66];[.G66];[.I66])" office:value-type="boolean" office:boolean-value="true" calcext:value-type="boolean">
            <text:p>ІСТИНА</text:p>
          </table:table-cell>
          <table:table-cell table:style-name="ce4" table:formula="of:=[.L66]&gt;MAX([.D66];[.F66];[.H66];[.J6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6]&gt;0.9" office:value-type="boolean" office:boolean-value="false" calcext:value-type="boolean">
            <text:p>БРЕХНЯ</text:p>
          </table:table-cell>
          <table:table-cell table:style-name="ce4" table:formula="of:=[.R66]&gt;0.9" office:value-type="boolean" office:boolean-value="false" calcext:value-type="boolean">
            <text:p>БРЕХНЯ</text:p>
          </table:table-cell>
          <table:table-cell table:style-name="ce4" table:formula="of:=[.X66]&gt;0.8" office:value-type="boolean" office:boolean-value="false" calcext:value-type="boolean">
            <text:p>БРЕХНЯ</text:p>
          </table:table-cell>
          <table:table-cell table:style-name="ce4" table:formula="of:=[.R66]&gt;0.8" office:value-type="boolean" office:boolean-value="true" calcext:value-type="boolean">
            <text:p>ІСТИНА</text:p>
          </table:table-cell>
          <table:table-cell table:style-name="ce4" table:formula="of:=[.X66]&gt;0.7" office:value-type="boolean" office:boolean-value="true" calcext:value-type="boolean">
            <text:p>ІСТИНА</text:p>
          </table:table-cell>
          <table:table-cell table:style-name="ce4" table:formula="of:=[.R66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0.7156724" calcext:value-type="float">
            <text:p>7,16E-01</text:p>
          </table:table-cell>
          <table:table-cell table:style-name="ce1" office:value-type="float" office:value="0.8670524" calcext:value-type="float">
            <text:p>8,67E-01</text:p>
          </table:table-cell>
          <table:table-cell table:style-name="ce1" office:value-type="float" office:value="0.7068817" calcext:value-type="float">
            <text:p>7,07E-01</text:p>
          </table:table-cell>
          <table:table-cell table:style-name="ce1" office:value-type="float" office:value="0.8921255" calcext:value-type="float">
            <text:p>8,92E-01</text:p>
          </table:table-cell>
          <table:table-cell table:style-name="ce1" office:value-type="float" office:value="0.7109354" calcext:value-type="float">
            <text:p>7,11E-01</text:p>
          </table:table-cell>
          <table:table-cell table:style-name="ce1" office:value-type="float" office:value="0.8766867" calcext:value-type="float">
            <text:p>8,77E-01</text:p>
          </table:table-cell>
          <table:table-cell table:style-name="ce1" office:value-type="float" office:value="0.7135758" calcext:value-type="float">
            <text:p>7,14E-01</text:p>
          </table:table-cell>
          <table:table-cell table:style-name="ce1" office:value-type="float" office:value="0.827415" calcext:value-type="float">
            <text:p>8,27E-01</text:p>
          </table:table-cell>
          <table:table-cell table:style-name="ce1" office:value-type="float" office:value="0.6773225" calcext:value-type="float">
            <text:p>6,77E-01</text:p>
          </table:table-cell>
          <table:table-cell table:style-name="ce1" office:value-type="float" office:value="0.9014269" calcext:value-type="float">
            <text:p>9,01E-01</text:p>
          </table:table-cell>
          <table:table-cell/>
          <table:table-cell table:style-name="ce1" table:formula="of:=MAX([.C67];[.E67];[.G67];[.I67];[.K67])" office:value-type="float" office:value="0.7156724" calcext:value-type="float">
            <text:p>7,16E-01</text:p>
          </table:table-cell>
          <table:table-cell table:style-name="ce8" table:formula="of:=MAX([.D67];[.F67];[.H67];[.J67];[.L67])" office:value-type="float" office:value="0.9014269" calcext:value-type="float">
            <text:p>9,01E-01</text:p>
          </table:table-cell>
          <table:table-cell table:style-name="ce1"/>
          <table:table-cell table:style-name="ce1" office:value-type="float" office:value="0.7589063" calcext:value-type="float">
            <text:p>7,59E-01</text:p>
          </table:table-cell>
          <table:table-cell table:style-name="ce1" office:value-type="float" office:value="0.9014269" calcext:value-type="float">
            <text:p>9,01E-01</text:p>
          </table:table-cell>
          <table:table-cell table:style-name="ce4" table:formula="of:=[.Q67]&gt;[.N67]" office:value-type="boolean" office:boolean-value="true" calcext:value-type="boolean">
            <text:p>ІСТИНА</text:p>
          </table:table-cell>
          <table:table-cell table:style-name="ce4" table:formula="of:=[.R67]&gt;[.O67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89063" calcext:value-type="float">
            <text:p>7,59E-01</text:p>
          </table:table-cell>
          <table:table-cell table:style-name="ce4" table:formula="of:=[.V67]&gt;[.Q67]" office:value-type="boolean" office:boolean-value="false" calcext:value-type="boolean">
            <text:p>БРЕХНЯ</text:p>
          </table:table-cell>
          <table:table-cell table:style-name="ce1" table:formula="of:=MAX([.V67];[.Q67])" office:value-type="float" office:value="0.7589063" calcext:value-type="float">
            <text:p>7,59E-01</text:p>
          </table:table-cell>
          <table:table-cell table:style-name="ce4" table:formula="of:=[.X67]&gt;[.R67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7]&gt;[.C67]" office:value-type="boolean" office:boolean-value="false" calcext:value-type="boolean">
            <text:p>БРЕХНЯ</text:p>
          </table:table-cell>
          <table:table-cell table:style-name="ce4" table:formula="of:=[.F67]&gt;[.D67]" office:value-type="boolean" office:boolean-value="true" calcext:value-type="boolean">
            <text:p>ІСТИНА</text:p>
          </table:table-cell>
          <table:table-cell table:style-name="ce4" table:formula="of:=[.G67]&gt;MAX([.C67];[.E67])" office:value-type="boolean" office:boolean-value="false" calcext:value-type="boolean">
            <text:p>БРЕХНЯ</text:p>
          </table:table-cell>
          <table:table-cell table:style-name="ce4" table:formula="of:=[.H67]&gt;MAX([.D67];[.F67])" office:value-type="boolean" office:boolean-value="false" calcext:value-type="boolean">
            <text:p>БРЕХНЯ</text:p>
          </table:table-cell>
          <table:table-cell table:style-name="ce4" table:formula="of:=[.I67]&gt;MAX([.C67];[.E67];[.G67])" office:value-type="boolean" office:boolean-value="false" calcext:value-type="boolean">
            <text:p>БРЕХНЯ</text:p>
          </table:table-cell>
          <table:table-cell table:style-name="ce4" table:formula="of:=[.J67]&gt;MAX([.D67];[.F67];[.H67])" office:value-type="boolean" office:boolean-value="false" calcext:value-type="boolean">
            <text:p>БРЕХНЯ</text:p>
          </table:table-cell>
          <table:table-cell table:style-name="ce4" table:formula="of:=[.K67]&gt;MAX([.C67];[.E67];[.G67];[.I67])" office:value-type="boolean" office:boolean-value="false" calcext:value-type="boolean">
            <text:p>БРЕХНЯ</text:p>
          </table:table-cell>
          <table:table-cell table:style-name="ce4" table:formula="of:=[.L67]&gt;MAX([.D67];[.F67];[.H67];[.J67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67]&gt;0.9" office:value-type="boolean" office:boolean-value="false" calcext:value-type="boolean">
            <text:p>БРЕХНЯ</text:p>
          </table:table-cell>
          <table:table-cell table:style-name="ce4" table:formula="of:=[.R67]&gt;0.9" office:value-type="boolean" office:boolean-value="true" calcext:value-type="boolean">
            <text:p>ІСТИНА</text:p>
          </table:table-cell>
          <table:table-cell table:style-name="ce4" table:formula="of:=[.X67]&gt;0.8" office:value-type="boolean" office:boolean-value="false" calcext:value-type="boolean">
            <text:p>БРЕХНЯ</text:p>
          </table:table-cell>
          <table:table-cell table:style-name="ce4" table:formula="of:=[.R67]&gt;0.8" office:value-type="boolean" office:boolean-value="true" calcext:value-type="boolean">
            <text:p>ІСТИНА</text:p>
          </table:table-cell>
          <table:table-cell table:style-name="ce4" table:formula="of:=[.X67]&gt;0.7" office:value-type="boolean" office:boolean-value="true" calcext:value-type="boolean">
            <text:p>ІСТИНА</text:p>
          </table:table-cell>
          <table:table-cell table:style-name="ce4" table:formula="of:=[.R67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0.6533576" calcext:value-type="float">
            <text:p>6,53E-01</text:p>
          </table:table-cell>
          <table:table-cell table:style-name="ce1" office:value-type="float" office:value="0.7752311" calcext:value-type="float">
            <text:p>7,75E-01</text:p>
          </table:table-cell>
          <table:table-cell table:style-name="ce1" office:value-type="float" office:value="0.6111096" calcext:value-type="float">
            <text:p>6,11E-01</text:p>
          </table:table-cell>
          <table:table-cell table:style-name="ce1" office:value-type="float" office:value="0.7915548" calcext:value-type="float">
            <text:p>7,92E-01</text:p>
          </table:table-cell>
          <table:table-cell table:style-name="ce1" office:value-type="float" office:value="0.6651209" calcext:value-type="float">
            <text:p>6,65E-01</text:p>
          </table:table-cell>
          <table:table-cell table:style-name="ce1" office:value-type="float" office:value="0.7793642" calcext:value-type="float">
            <text:p>7,79E-01</text:p>
          </table:table-cell>
          <table:table-cell table:style-name="ce1" office:value-type="float" office:value="0.652755" calcext:value-type="float">
            <text:p>6,53E-01</text:p>
          </table:table-cell>
          <table:table-cell table:style-name="ce1" office:value-type="float" office:value="0.5039954" calcext:value-type="float">
            <text:p>5,04E-01</text:p>
          </table:table-cell>
          <table:table-cell table:style-name="ce1" office:value-type="float" office:value="0.6524438" calcext:value-type="float">
            <text:p>6,52E-01</text:p>
          </table:table-cell>
          <table:table-cell table:style-name="ce1" office:value-type="float" office:value="0.8582951" calcext:value-type="float">
            <text:p>8,58E-01</text:p>
          </table:table-cell>
          <table:table-cell/>
          <table:table-cell table:style-name="ce1" table:formula="of:=MAX([.C68];[.E68];[.G68];[.I68];[.K68])" office:value-type="float" office:value="0.6651209" calcext:value-type="float">
            <text:p>6,65E-01</text:p>
          </table:table-cell>
          <table:table-cell table:style-name="ce8" table:formula="of:=MAX([.D68];[.F68];[.H68];[.J68];[.L68])" office:value-type="float" office:value="0.8582951" calcext:value-type="float">
            <text:p>8,58E-01</text:p>
          </table:table-cell>
          <table:table-cell table:style-name="ce1"/>
          <table:table-cell table:style-name="ce1" office:value-type="float" office:value="0.7039078" calcext:value-type="float">
            <text:p>7,04E-01</text:p>
          </table:table-cell>
          <table:table-cell table:style-name="ce1" office:value-type="float" office:value="0.8582951" calcext:value-type="float">
            <text:p>8,58E-01</text:p>
          </table:table-cell>
          <table:table-cell table:style-name="ce4" table:formula="of:=[.Q68]&gt;[.N68]" office:value-type="boolean" office:boolean-value="true" calcext:value-type="boolean">
            <text:p>ІСТИНА</text:p>
          </table:table-cell>
          <table:table-cell table:style-name="ce4" table:formula="of:=[.R68]&gt;[.O68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039078" calcext:value-type="float">
            <text:p>7,04E-01</text:p>
          </table:table-cell>
          <table:table-cell table:style-name="ce4" table:formula="of:=[.V68]&gt;[.Q68]" office:value-type="boolean" office:boolean-value="false" calcext:value-type="boolean">
            <text:p>БРЕХНЯ</text:p>
          </table:table-cell>
          <table:table-cell table:style-name="ce1" table:formula="of:=MAX([.V68];[.Q68])" office:value-type="float" office:value="0.7039078" calcext:value-type="float">
            <text:p>7,04E-01</text:p>
          </table:table-cell>
          <table:table-cell table:style-name="ce4" table:formula="of:=[.X68]&gt;[.R68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8]&gt;[.C68]" office:value-type="boolean" office:boolean-value="false" calcext:value-type="boolean">
            <text:p>БРЕХНЯ</text:p>
          </table:table-cell>
          <table:table-cell table:style-name="ce4" table:formula="of:=[.F68]&gt;[.D68]" office:value-type="boolean" office:boolean-value="true" calcext:value-type="boolean">
            <text:p>ІСТИНА</text:p>
          </table:table-cell>
          <table:table-cell table:style-name="ce4" table:formula="of:=[.G68]&gt;MAX([.C68];[.E68])" office:value-type="boolean" office:boolean-value="true" calcext:value-type="boolean">
            <text:p>ІСТИНА</text:p>
          </table:table-cell>
          <table:table-cell table:style-name="ce4" table:formula="of:=[.H68]&gt;MAX([.D68];[.F68])" office:value-type="boolean" office:boolean-value="false" calcext:value-type="boolean">
            <text:p>БРЕХНЯ</text:p>
          </table:table-cell>
          <table:table-cell table:style-name="ce4" table:formula="of:=[.I68]&gt;MAX([.C68];[.E68];[.G68])" office:value-type="boolean" office:boolean-value="false" calcext:value-type="boolean">
            <text:p>БРЕХНЯ</text:p>
          </table:table-cell>
          <table:table-cell table:style-name="ce4" table:formula="of:=[.J68]&gt;MAX([.D68];[.F68];[.H68])" office:value-type="boolean" office:boolean-value="false" calcext:value-type="boolean">
            <text:p>БРЕХНЯ</text:p>
          </table:table-cell>
          <table:table-cell table:style-name="ce4" table:formula="of:=[.K68]&gt;MAX([.C68];[.E68];[.G68];[.I68])" office:value-type="boolean" office:boolean-value="false" calcext:value-type="boolean">
            <text:p>БРЕХНЯ</text:p>
          </table:table-cell>
          <table:table-cell table:style-name="ce4" table:formula="of:=[.L68]&gt;MAX([.D68];[.F68];[.H68];[.J68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68]&gt;0.9" office:value-type="boolean" office:boolean-value="false" calcext:value-type="boolean">
            <text:p>БРЕХНЯ</text:p>
          </table:table-cell>
          <table:table-cell table:style-name="ce4" table:formula="of:=[.R68]&gt;0.9" office:value-type="boolean" office:boolean-value="false" calcext:value-type="boolean">
            <text:p>БРЕХНЯ</text:p>
          </table:table-cell>
          <table:table-cell table:style-name="ce4" table:formula="of:=[.X68]&gt;0.8" office:value-type="boolean" office:boolean-value="false" calcext:value-type="boolean">
            <text:p>БРЕХНЯ</text:p>
          </table:table-cell>
          <table:table-cell table:style-name="ce4" table:formula="of:=[.R68]&gt;0.8" office:value-type="boolean" office:boolean-value="true" calcext:value-type="boolean">
            <text:p>ІСТИНА</text:p>
          </table:table-cell>
          <table:table-cell table:style-name="ce4" table:formula="of:=[.X68]&gt;0.7" office:value-type="boolean" office:boolean-value="true" calcext:value-type="boolean">
            <text:p>ІСТИНА</text:p>
          </table:table-cell>
          <table:table-cell table:style-name="ce4" table:formula="of:=[.R68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-0.05720025" calcext:value-type="float">
            <text:p>-5,72E-02</text:p>
          </table:table-cell>
          <table:table-cell table:style-name="ce1" office:value-type="float" office:value="0.09621924" calcext:value-type="float">
            <text:p>9,62E-02</text:p>
          </table:table-cell>
          <table:table-cell table:style-name="ce1" office:value-type="float" office:value="-0.05589002" calcext:value-type="float">
            <text:p>-5,59E-02</text:p>
          </table:table-cell>
          <table:table-cell table:style-name="ce1" office:value-type="float" office:value="0.3722496" calcext:value-type="float">
            <text:p>3,72E-01</text:p>
          </table:table-cell>
          <table:table-cell table:style-name="ce1" office:value-type="float" office:value="-0.1643345" calcext:value-type="float">
            <text:p>-1,64E-01</text:p>
          </table:table-cell>
          <table:table-cell table:style-name="ce1" office:value-type="float" office:value="0.1718828" calcext:value-type="float">
            <text:p>1,72E-01</text:p>
          </table:table-cell>
          <table:table-cell table:style-name="ce1" office:value-type="float" office:value="-0.1354549" calcext:value-type="float">
            <text:p>-1,35E-01</text:p>
          </table:table-cell>
          <table:table-cell table:style-name="ce1" office:value-type="float" office:value="0.3166972" calcext:value-type="float">
            <text:p>3,17E-01</text:p>
          </table:table-cell>
          <table:table-cell table:style-name="ce1" office:value-type="float" office:value="-0.06674857" calcext:value-type="float">
            <text:p>-6,67E-02</text:p>
          </table:table-cell>
          <table:table-cell table:style-name="ce1" office:value-type="float" office:value="0.2056979" calcext:value-type="float">
            <text:p>2,06E-01</text:p>
          </table:table-cell>
          <table:table-cell/>
          <table:table-cell table:style-name="ce1" table:formula="of:=MAX([.C69];[.E69];[.G69];[.I69];[.K69])" office:value-type="float" office:value="-0.05589002" calcext:value-type="float">
            <text:p>-5,59E-02</text:p>
          </table:table-cell>
          <table:table-cell table:style-name="ce8" table:formula="of:=MAX([.D69];[.F69];[.H69];[.J69];[.L69])" office:value-type="float" office:value="0.3722496" calcext:value-type="float">
            <text:p>3,72E-01</text:p>
          </table:table-cell>
          <table:table-cell table:style-name="ce2"/>
          <table:table-cell table:style-name="ce1" office:value-type="float" office:value="0.5228564" calcext:value-type="float">
            <text:p>5,23E-01</text:p>
          </table:table-cell>
          <table:table-cell table:style-name="ce1" office:value-type="float" office:value="0.7423933" calcext:value-type="float">
            <text:p>7,42E-01</text:p>
          </table:table-cell>
          <table:table-cell table:style-name="ce4" table:formula="of:=[.Q69]&gt;[.N69]" office:value-type="boolean" office:boolean-value="true" calcext:value-type="boolean">
            <text:p>ІСТИНА</text:p>
          </table:table-cell>
          <table:table-cell table:style-name="ce4" table:formula="of:=[.R69]&gt;[.O69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5984171" calcext:value-type="float">
            <text:p>5,98E-01</text:p>
          </table:table-cell>
          <table:table-cell table:style-name="ce4" table:formula="of:=[.V69]&gt;[.Q69]" office:value-type="boolean" office:boolean-value="true" calcext:value-type="boolean">
            <text:p>ІСТИНА</text:p>
          </table:table-cell>
          <table:table-cell table:style-name="ce1" table:formula="of:=MAX([.V69];[.Q69])" office:value-type="float" office:value="0.5984171" calcext:value-type="float">
            <text:p>5,98E-01</text:p>
          </table:table-cell>
          <table:table-cell table:style-name="ce4" table:formula="of:=[.X69]&gt;[.R69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69]&gt;[.C69]" office:value-type="boolean" office:boolean-value="true" calcext:value-type="boolean">
            <text:p>ІСТИНА</text:p>
          </table:table-cell>
          <table:table-cell table:style-name="ce4" table:formula="of:=[.F69]&gt;[.D69]" office:value-type="boolean" office:boolean-value="true" calcext:value-type="boolean">
            <text:p>ІСТИНА</text:p>
          </table:table-cell>
          <table:table-cell table:style-name="ce4" table:formula="of:=[.G69]&gt;MAX([.C69];[.E69])" office:value-type="boolean" office:boolean-value="false" calcext:value-type="boolean">
            <text:p>БРЕХНЯ</text:p>
          </table:table-cell>
          <table:table-cell table:style-name="ce4" table:formula="of:=[.H69]&gt;MAX([.D69];[.F69])" office:value-type="boolean" office:boolean-value="false" calcext:value-type="boolean">
            <text:p>БРЕХНЯ</text:p>
          </table:table-cell>
          <table:table-cell table:style-name="ce4" table:formula="of:=[.I69]&gt;MAX([.C69];[.E69];[.G69])" office:value-type="boolean" office:boolean-value="false" calcext:value-type="boolean">
            <text:p>БРЕХНЯ</text:p>
          </table:table-cell>
          <table:table-cell table:style-name="ce4" table:formula="of:=[.J69]&gt;MAX([.D69];[.F69];[.H69])" office:value-type="boolean" office:boolean-value="false" calcext:value-type="boolean">
            <text:p>БРЕХНЯ</text:p>
          </table:table-cell>
          <table:table-cell table:style-name="ce4" table:formula="of:=[.K69]&gt;MAX([.C69];[.E69];[.G69];[.I69])" office:value-type="boolean" office:boolean-value="false" calcext:value-type="boolean">
            <text:p>БРЕХНЯ</text:p>
          </table:table-cell>
          <table:table-cell table:style-name="ce4" table:formula="of:=[.L69]&gt;MAX([.D69];[.F69];[.H69];[.J69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69]&gt;0.9" office:value-type="boolean" office:boolean-value="false" calcext:value-type="boolean">
            <text:p>БРЕХНЯ</text:p>
          </table:table-cell>
          <table:table-cell table:style-name="ce4" table:formula="of:=[.R69]&gt;0.9" office:value-type="boolean" office:boolean-value="false" calcext:value-type="boolean">
            <text:p>БРЕХНЯ</text:p>
          </table:table-cell>
          <table:table-cell table:style-name="ce4" table:formula="of:=[.X69]&gt;0.8" office:value-type="boolean" office:boolean-value="false" calcext:value-type="boolean">
            <text:p>БРЕХНЯ</text:p>
          </table:table-cell>
          <table:table-cell table:style-name="ce4" table:formula="of:=[.R69]&gt;0.8" office:value-type="boolean" office:boolean-value="false" calcext:value-type="boolean">
            <text:p>БРЕХНЯ</text:p>
          </table:table-cell>
          <table:table-cell table:style-name="ce4" table:formula="of:=[.X69]&gt;0.7" office:value-type="boolean" office:boolean-value="false" calcext:value-type="boolean">
            <text:p>БРЕХНЯ</text:p>
          </table:table-cell>
          <table:table-cell table:style-name="ce4" table:formula="of:=[.R69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6732298" calcext:value-type="float">
            <text:p>6,73E-01</text:p>
          </table:table-cell>
          <table:table-cell table:style-name="ce1" office:value-type="float" office:value="0.7777047" calcext:value-type="float">
            <text:p>7,78E-01</text:p>
          </table:table-cell>
          <table:table-cell table:style-name="ce1" office:value-type="float" office:value="0.6597286" calcext:value-type="float">
            <text:p>6,60E-01</text:p>
          </table:table-cell>
          <table:table-cell table:style-name="ce1" office:value-type="float" office:value="0.8210703" calcext:value-type="float">
            <text:p>8,21E-01</text:p>
          </table:table-cell>
          <table:table-cell table:style-name="ce1" office:value-type="float" office:value="0.6176596" calcext:value-type="float">
            <text:p>6,18E-01</text:p>
          </table:table-cell>
          <table:table-cell table:style-name="ce1" office:value-type="float" office:value="0.7423822" calcext:value-type="float">
            <text:p>7,42E-01</text:p>
          </table:table-cell>
          <table:table-cell table:style-name="ce1" office:value-type="float" office:value="0.6926122" calcext:value-type="float">
            <text:p>6,93E-01</text:p>
          </table:table-cell>
          <table:table-cell table:style-name="ce1" office:value-type="float" office:value="0.7961108" calcext:value-type="float">
            <text:p>7,96E-01</text:p>
          </table:table-cell>
          <table:table-cell table:style-name="ce1" office:value-type="float" office:value="0.6490445" calcext:value-type="float">
            <text:p>6,49E-01</text:p>
          </table:table-cell>
          <table:table-cell table:style-name="ce1" office:value-type="float" office:value="0.7598868" calcext:value-type="float">
            <text:p>7,60E-01</text:p>
          </table:table-cell>
          <table:table-cell/>
          <table:table-cell table:style-name="ce1" table:formula="of:=MAX([.C70];[.E70];[.G70];[.I70];[.K70])" office:value-type="float" office:value="0.6926122" calcext:value-type="float">
            <text:p>6,93E-01</text:p>
          </table:table-cell>
          <table:table-cell table:style-name="ce8" table:formula="of:=MAX([.D70];[.F70];[.H70];[.J70];[.L70])" office:value-type="float" office:value="0.8210703" calcext:value-type="float">
            <text:p>8,21E-01</text:p>
          </table:table-cell>
          <table:table-cell table:style-name="ce1"/>
          <table:table-cell table:style-name="ce1" office:value-type="float" office:value="0.6926122" calcext:value-type="float">
            <text:p>6,93E-01</text:p>
          </table:table-cell>
          <table:table-cell table:style-name="ce1" office:value-type="float" office:value="0.8210703" calcext:value-type="float">
            <text:p>8,21E-01</text:p>
          </table:table-cell>
          <table:table-cell table:style-name="ce4" table:formula="of:=[.Q70]&gt;[.N70]" office:value-type="boolean" office:boolean-value="false" calcext:value-type="boolean">
            <text:p>БРЕХНЯ</text:p>
          </table:table-cell>
          <table:table-cell table:style-name="ce4" table:formula="of:=[.R70]&gt;[.O70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6926122" calcext:value-type="float">
            <text:p>6,93E-01</text:p>
          </table:table-cell>
          <table:table-cell table:style-name="ce4" table:formula="of:=[.V70]&gt;[.Q70]" office:value-type="boolean" office:boolean-value="false" calcext:value-type="boolean">
            <text:p>БРЕХНЯ</text:p>
          </table:table-cell>
          <table:table-cell table:style-name="ce1" table:formula="of:=MAX([.V70];[.Q70])" office:value-type="float" office:value="0.6926122" calcext:value-type="float">
            <text:p>6,93E-01</text:p>
          </table:table-cell>
          <table:table-cell table:style-name="ce4" table:formula="of:=[.X70]&gt;[.R70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0]&gt;[.C70]" office:value-type="boolean" office:boolean-value="false" calcext:value-type="boolean">
            <text:p>БРЕХНЯ</text:p>
          </table:table-cell>
          <table:table-cell table:style-name="ce4" table:formula="of:=[.F70]&gt;[.D70]" office:value-type="boolean" office:boolean-value="true" calcext:value-type="boolean">
            <text:p>ІСТИНА</text:p>
          </table:table-cell>
          <table:table-cell table:style-name="ce4" table:formula="of:=[.G70]&gt;MAX([.C70];[.E70])" office:value-type="boolean" office:boolean-value="false" calcext:value-type="boolean">
            <text:p>БРЕХНЯ</text:p>
          </table:table-cell>
          <table:table-cell table:style-name="ce4" table:formula="of:=[.H70]&gt;MAX([.D70];[.F70])" office:value-type="boolean" office:boolean-value="false" calcext:value-type="boolean">
            <text:p>БРЕХНЯ</text:p>
          </table:table-cell>
          <table:table-cell table:style-name="ce4" table:formula="of:=[.I70]&gt;MAX([.C70];[.E70];[.G70])" office:value-type="boolean" office:boolean-value="true" calcext:value-type="boolean">
            <text:p>ІСТИНА</text:p>
          </table:table-cell>
          <table:table-cell table:style-name="ce4" table:formula="of:=[.J70]&gt;MAX([.D70];[.F70];[.H70])" office:value-type="boolean" office:boolean-value="false" calcext:value-type="boolean">
            <text:p>БРЕХНЯ</text:p>
          </table:table-cell>
          <table:table-cell table:style-name="ce4" table:formula="of:=[.K70]&gt;MAX([.C70];[.E70];[.G70];[.I70])" office:value-type="boolean" office:boolean-value="false" calcext:value-type="boolean">
            <text:p>БРЕХНЯ</text:p>
          </table:table-cell>
          <table:table-cell table:style-name="ce4" table:formula="of:=[.L70]&gt;MAX([.D70];[.F70];[.H70];[.J70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0]&gt;0.9" office:value-type="boolean" office:boolean-value="false" calcext:value-type="boolean">
            <text:p>БРЕХНЯ</text:p>
          </table:table-cell>
          <table:table-cell table:style-name="ce4" table:formula="of:=[.R70]&gt;0.9" office:value-type="boolean" office:boolean-value="false" calcext:value-type="boolean">
            <text:p>БРЕХНЯ</text:p>
          </table:table-cell>
          <table:table-cell table:style-name="ce4" table:formula="of:=[.X70]&gt;0.8" office:value-type="boolean" office:boolean-value="false" calcext:value-type="boolean">
            <text:p>БРЕХНЯ</text:p>
          </table:table-cell>
          <table:table-cell table:style-name="ce4" table:formula="of:=[.R70]&gt;0.8" office:value-type="boolean" office:boolean-value="true" calcext:value-type="boolean">
            <text:p>ІСТИНА</text:p>
          </table:table-cell>
          <table:table-cell table:style-name="ce4" table:formula="of:=[.X70]&gt;0.7" office:value-type="boolean" office:boolean-value="false" calcext:value-type="boolean">
            <text:p>БРЕХНЯ</text:p>
          </table:table-cell>
          <table:table-cell table:style-name="ce4" table:formula="of:=[.R70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6484383" calcext:value-type="float">
            <text:p>6,48E-01</text:p>
          </table:table-cell>
          <table:table-cell table:style-name="ce1" office:value-type="float" office:value="0.8019757" calcext:value-type="float">
            <text:p>8,02E-01</text:p>
          </table:table-cell>
          <table:table-cell table:style-name="ce1" office:value-type="float" office:value="0.6877011" calcext:value-type="float">
            <text:p>6,88E-01</text:p>
          </table:table-cell>
          <table:table-cell table:style-name="ce1" office:value-type="float" office:value="0.8490357" calcext:value-type="float">
            <text:p>8,49E-01</text:p>
          </table:table-cell>
          <table:table-cell table:style-name="ce1" office:value-type="float" office:value="0.6834866" calcext:value-type="float">
            <text:p>6,83E-01</text:p>
          </table:table-cell>
          <table:table-cell table:style-name="ce1" office:value-type="float" office:value="0.8075861" calcext:value-type="float">
            <text:p>8,08E-01</text:p>
          </table:table-cell>
          <table:table-cell table:style-name="ce1" office:value-type="float" office:value="0.661327" calcext:value-type="float">
            <text:p>6,61E-01</text:p>
          </table:table-cell>
          <table:table-cell table:style-name="ce1" office:value-type="float" office:value="0.8083118" calcext:value-type="float">
            <text:p>8,08E-01</text:p>
          </table:table-cell>
          <table:table-cell table:style-name="ce1" office:value-type="float" office:value="0.7228541" calcext:value-type="float">
            <text:p>7,23E-01</text:p>
          </table:table-cell>
          <table:table-cell table:style-name="ce1" office:value-type="float" office:value="0.7959406" calcext:value-type="float">
            <text:p>7,96E-01</text:p>
          </table:table-cell>
          <table:table-cell/>
          <table:table-cell table:style-name="ce1" table:formula="of:=MAX([.C71];[.E71];[.G71];[.I71];[.K71])" office:value-type="float" office:value="0.7228541" calcext:value-type="float">
            <text:p>7,23E-01</text:p>
          </table:table-cell>
          <table:table-cell table:style-name="ce8" table:formula="of:=MAX([.D71];[.F71];[.H71];[.J71];[.L71])" office:value-type="float" office:value="0.8490357" calcext:value-type="float">
            <text:p>8,49E-01</text:p>
          </table:table-cell>
          <table:table-cell table:style-name="ce1"/>
          <table:table-cell table:style-name="ce1" office:value-type="float" office:value="0.7228541" calcext:value-type="float">
            <text:p>7,23E-01</text:p>
          </table:table-cell>
          <table:table-cell table:style-name="ce1" office:value-type="float" office:value="0.8490357" calcext:value-type="float">
            <text:p>8,49E-01</text:p>
          </table:table-cell>
          <table:table-cell table:style-name="ce4" table:formula="of:=[.Q71]&gt;[.N71]" office:value-type="boolean" office:boolean-value="false" calcext:value-type="boolean">
            <text:p>БРЕХНЯ</text:p>
          </table:table-cell>
          <table:table-cell table:style-name="ce4" table:formula="of:=[.R71]&gt;[.O71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228541" calcext:value-type="float">
            <text:p>7,23E-01</text:p>
          </table:table-cell>
          <table:table-cell table:style-name="ce4" table:formula="of:=[.V71]&gt;[.Q71]" office:value-type="boolean" office:boolean-value="false" calcext:value-type="boolean">
            <text:p>БРЕХНЯ</text:p>
          </table:table-cell>
          <table:table-cell table:style-name="ce1" table:formula="of:=MAX([.V71];[.Q71])" office:value-type="float" office:value="0.7228541" calcext:value-type="float">
            <text:p>7,23E-01</text:p>
          </table:table-cell>
          <table:table-cell table:style-name="ce4" table:formula="of:=[.X71]&gt;[.R71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1]&gt;[.C71]" office:value-type="boolean" office:boolean-value="true" calcext:value-type="boolean">
            <text:p>ІСТИНА</text:p>
          </table:table-cell>
          <table:table-cell table:style-name="ce4" table:formula="of:=[.F71]&gt;[.D71]" office:value-type="boolean" office:boolean-value="true" calcext:value-type="boolean">
            <text:p>ІСТИНА</text:p>
          </table:table-cell>
          <table:table-cell table:style-name="ce4" table:formula="of:=[.G71]&gt;MAX([.C71];[.E71])" office:value-type="boolean" office:boolean-value="false" calcext:value-type="boolean">
            <text:p>БРЕХНЯ</text:p>
          </table:table-cell>
          <table:table-cell table:style-name="ce4" table:formula="of:=[.H71]&gt;MAX([.D71];[.F71])" office:value-type="boolean" office:boolean-value="false" calcext:value-type="boolean">
            <text:p>БРЕХНЯ</text:p>
          </table:table-cell>
          <table:table-cell table:style-name="ce4" table:formula="of:=[.I71]&gt;MAX([.C71];[.E71];[.G71])" office:value-type="boolean" office:boolean-value="false" calcext:value-type="boolean">
            <text:p>БРЕХНЯ</text:p>
          </table:table-cell>
          <table:table-cell table:style-name="ce4" table:formula="of:=[.J71]&gt;MAX([.D71];[.F71];[.H71])" office:value-type="boolean" office:boolean-value="false" calcext:value-type="boolean">
            <text:p>БРЕХНЯ</text:p>
          </table:table-cell>
          <table:table-cell table:style-name="ce4" table:formula="of:=[.K71]&gt;MAX([.C71];[.E71];[.G71];[.I71])" office:value-type="boolean" office:boolean-value="true" calcext:value-type="boolean">
            <text:p>ІСТИНА</text:p>
          </table:table-cell>
          <table:table-cell table:style-name="ce4" table:formula="of:=[.L71]&gt;MAX([.D71];[.F71];[.H71];[.J71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1]&gt;0.9" office:value-type="boolean" office:boolean-value="false" calcext:value-type="boolean">
            <text:p>БРЕХНЯ</text:p>
          </table:table-cell>
          <table:table-cell table:style-name="ce4" table:formula="of:=[.R71]&gt;0.9" office:value-type="boolean" office:boolean-value="false" calcext:value-type="boolean">
            <text:p>БРЕХНЯ</text:p>
          </table:table-cell>
          <table:table-cell table:style-name="ce4" table:formula="of:=[.X71]&gt;0.8" office:value-type="boolean" office:boolean-value="false" calcext:value-type="boolean">
            <text:p>БРЕХНЯ</text:p>
          </table:table-cell>
          <table:table-cell table:style-name="ce4" table:formula="of:=[.R71]&gt;0.8" office:value-type="boolean" office:boolean-value="true" calcext:value-type="boolean">
            <text:p>ІСТИНА</text:p>
          </table:table-cell>
          <table:table-cell table:style-name="ce4" table:formula="of:=[.X71]&gt;0.7" office:value-type="boolean" office:boolean-value="true" calcext:value-type="boolean">
            <text:p>ІСТИНА</text:p>
          </table:table-cell>
          <table:table-cell table:style-name="ce4" table:formula="of:=[.R71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6847345" calcext:value-type="float">
            <text:p>6,85E-01</text:p>
          </table:table-cell>
          <table:table-cell table:style-name="ce1" office:value-type="float" office:value="0.7843102" calcext:value-type="float">
            <text:p>7,84E-01</text:p>
          </table:table-cell>
          <table:table-cell table:style-name="ce1" office:value-type="float" office:value="0.654328" calcext:value-type="float">
            <text:p>6,54E-01</text:p>
          </table:table-cell>
          <table:table-cell table:style-name="ce1" office:value-type="float" office:value="0.798564" calcext:value-type="float">
            <text:p>7,99E-01</text:p>
          </table:table-cell>
          <table:table-cell table:style-name="ce1" office:value-type="float" office:value="0.660157" calcext:value-type="float">
            <text:p>6,60E-01</text:p>
          </table:table-cell>
          <table:table-cell table:style-name="ce1" office:value-type="float" office:value="0.8819501" calcext:value-type="float">
            <text:p>8,82E-01</text:p>
          </table:table-cell>
          <table:table-cell table:style-name="ce1" office:value-type="float" office:value="0.7539619" calcext:value-type="float">
            <text:p>7,54E-01</text:p>
          </table:table-cell>
          <table:table-cell table:style-name="ce1" office:value-type="float" office:value="0.86625" calcext:value-type="float">
            <text:p>8,66E-01</text:p>
          </table:table-cell>
          <table:table-cell table:style-name="ce1" office:value-type="float" office:value="0.672251" calcext:value-type="float">
            <text:p>6,72E-01</text:p>
          </table:table-cell>
          <table:table-cell table:style-name="ce1" office:value-type="float" office:value="0.7869285" calcext:value-type="float">
            <text:p>7,87E-01</text:p>
          </table:table-cell>
          <table:table-cell/>
          <table:table-cell table:style-name="ce1" table:formula="of:=MAX([.C72];[.E72];[.G72];[.I72];[.K72])" office:value-type="float" office:value="0.7539619" calcext:value-type="float">
            <text:p>7,54E-01</text:p>
          </table:table-cell>
          <table:table-cell table:style-name="ce8" table:formula="of:=MAX([.D72];[.F72];[.H72];[.J72];[.L72])" office:value-type="float" office:value="0.8819501" calcext:value-type="float">
            <text:p>8,82E-01</text:p>
          </table:table-cell>
          <table:table-cell table:style-name="ce1"/>
          <table:table-cell table:style-name="ce1" office:value-type="float" office:value="0.7539619" calcext:value-type="float">
            <text:p>7,54E-01</text:p>
          </table:table-cell>
          <table:table-cell table:style-name="ce1" office:value-type="float" office:value="0.8819501" calcext:value-type="float">
            <text:p>8,82E-01</text:p>
          </table:table-cell>
          <table:table-cell table:style-name="ce4" table:formula="of:=[.Q72]&gt;[.N72]" office:value-type="boolean" office:boolean-value="false" calcext:value-type="boolean">
            <text:p>БРЕХНЯ</text:p>
          </table:table-cell>
          <table:table-cell table:style-name="ce4" table:formula="of:=[.R72]&gt;[.O72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539619" calcext:value-type="float">
            <text:p>7,54E-01</text:p>
          </table:table-cell>
          <table:table-cell table:style-name="ce4" table:formula="of:=[.V72]&gt;[.Q72]" office:value-type="boolean" office:boolean-value="false" calcext:value-type="boolean">
            <text:p>БРЕХНЯ</text:p>
          </table:table-cell>
          <table:table-cell table:style-name="ce1" table:formula="of:=MAX([.V72];[.Q72])" office:value-type="float" office:value="0.7539619" calcext:value-type="float">
            <text:p>7,54E-01</text:p>
          </table:table-cell>
          <table:table-cell table:style-name="ce4" table:formula="of:=[.X72]&gt;[.R72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2]&gt;[.C72]" office:value-type="boolean" office:boolean-value="false" calcext:value-type="boolean">
            <text:p>БРЕХНЯ</text:p>
          </table:table-cell>
          <table:table-cell table:style-name="ce4" table:formula="of:=[.F72]&gt;[.D72]" office:value-type="boolean" office:boolean-value="true" calcext:value-type="boolean">
            <text:p>ІСТИНА</text:p>
          </table:table-cell>
          <table:table-cell table:style-name="ce4" table:formula="of:=[.G72]&gt;MAX([.C72];[.E72])" office:value-type="boolean" office:boolean-value="false" calcext:value-type="boolean">
            <text:p>БРЕХНЯ</text:p>
          </table:table-cell>
          <table:table-cell table:style-name="ce4" table:formula="of:=[.H72]&gt;MAX([.D72];[.F72])" office:value-type="boolean" office:boolean-value="true" calcext:value-type="boolean">
            <text:p>ІСТИНА</text:p>
          </table:table-cell>
          <table:table-cell table:style-name="ce4" table:formula="of:=[.I72]&gt;MAX([.C72];[.E72];[.G72])" office:value-type="boolean" office:boolean-value="true" calcext:value-type="boolean">
            <text:p>ІСТИНА</text:p>
          </table:table-cell>
          <table:table-cell table:style-name="ce4" table:formula="of:=[.J72]&gt;MAX([.D72];[.F72];[.H72])" office:value-type="boolean" office:boolean-value="false" calcext:value-type="boolean">
            <text:p>БРЕХНЯ</text:p>
          </table:table-cell>
          <table:table-cell table:style-name="ce4" table:formula="of:=[.K72]&gt;MAX([.C72];[.E72];[.G72];[.I72])" office:value-type="boolean" office:boolean-value="false" calcext:value-type="boolean">
            <text:p>БРЕХНЯ</text:p>
          </table:table-cell>
          <table:table-cell table:style-name="ce4" table:formula="of:=[.L72]&gt;MAX([.D72];[.F72];[.H72];[.J72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2]&gt;0.9" office:value-type="boolean" office:boolean-value="false" calcext:value-type="boolean">
            <text:p>БРЕХНЯ</text:p>
          </table:table-cell>
          <table:table-cell table:style-name="ce4" table:formula="of:=[.R72]&gt;0.9" office:value-type="boolean" office:boolean-value="false" calcext:value-type="boolean">
            <text:p>БРЕХНЯ</text:p>
          </table:table-cell>
          <table:table-cell table:style-name="ce4" table:formula="of:=[.X72]&gt;0.8" office:value-type="boolean" office:boolean-value="false" calcext:value-type="boolean">
            <text:p>БРЕХНЯ</text:p>
          </table:table-cell>
          <table:table-cell table:style-name="ce4" table:formula="of:=[.R72]&gt;0.8" office:value-type="boolean" office:boolean-value="true" calcext:value-type="boolean">
            <text:p>ІСТИНА</text:p>
          </table:table-cell>
          <table:table-cell table:style-name="ce4" table:formula="of:=[.X72]&gt;0.7" office:value-type="boolean" office:boolean-value="true" calcext:value-type="boolean">
            <text:p>ІСТИНА</text:p>
          </table:table-cell>
          <table:table-cell table:style-name="ce4" table:formula="of:=[.R72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0.6412611" calcext:value-type="float">
            <text:p>6,41E-01</text:p>
          </table:table-cell>
          <table:table-cell table:style-name="ce1" office:value-type="float" office:value="0.7361407" calcext:value-type="float">
            <text:p>7,36E-01</text:p>
          </table:table-cell>
          <table:table-cell table:style-name="ce1" office:value-type="float" office:value="0.6088758" calcext:value-type="float">
            <text:p>6,09E-01</text:p>
          </table:table-cell>
          <table:table-cell table:style-name="ce1" office:value-type="float" office:value="0.7378876" calcext:value-type="float">
            <text:p>7,38E-01</text:p>
          </table:table-cell>
          <table:table-cell table:style-name="ce1" office:value-type="float" office:value="0.5152631" calcext:value-type="float">
            <text:p>5,15E-01</text:p>
          </table:table-cell>
          <table:table-cell table:style-name="ce1" office:value-type="float" office:value="0.7655794" calcext:value-type="float">
            <text:p>7,66E-01</text:p>
          </table:table-cell>
          <table:table-cell table:style-name="ce1" office:value-type="float" office:value="0.6643709" calcext:value-type="float">
            <text:p>6,64E-01</text:p>
          </table:table-cell>
          <table:table-cell table:style-name="ce1" office:value-type="float" office:value="0.7918041" calcext:value-type="float">
            <text:p>7,92E-01</text:p>
          </table:table-cell>
          <table:table-cell table:style-name="ce1" office:value-type="float" office:value="0.6571908" calcext:value-type="float">
            <text:p>6,57E-01</text:p>
          </table:table-cell>
          <table:table-cell table:style-name="ce1" office:value-type="float" office:value="0.7963468" calcext:value-type="float">
            <text:p>7,96E-01</text:p>
          </table:table-cell>
          <table:table-cell/>
          <table:table-cell table:style-name="ce1" table:formula="of:=MAX([.C73];[.E73];[.G73];[.I73];[.K73])" office:value-type="float" office:value="0.6643709" calcext:value-type="float">
            <text:p>6,64E-01</text:p>
          </table:table-cell>
          <table:table-cell table:style-name="ce8" table:formula="of:=MAX([.D73];[.F73];[.H73];[.J73];[.L73])" office:value-type="float" office:value="0.7963468" calcext:value-type="float">
            <text:p>7,96E-01</text:p>
          </table:table-cell>
          <table:table-cell table:style-name="ce1"/>
          <table:table-cell table:style-name="ce1" office:value-type="float" office:value="0.6878495" calcext:value-type="float">
            <text:p>6,88E-01</text:p>
          </table:table-cell>
          <table:table-cell table:style-name="ce1" office:value-type="float" office:value="0.9145961" calcext:value-type="float">
            <text:p>9,15E-01</text:p>
          </table:table-cell>
          <table:table-cell table:style-name="ce4" table:formula="of:=[.Q73]&gt;[.N73]" office:value-type="boolean" office:boolean-value="true" calcext:value-type="boolean">
            <text:p>ІСТИНА</text:p>
          </table:table-cell>
          <table:table-cell table:style-name="ce4" table:formula="of:=[.R73]&gt;[.O73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948757" calcext:value-type="float">
            <text:p>6,95E-01</text:p>
          </table:table-cell>
          <table:table-cell table:style-name="ce4" table:formula="of:=[.V73]&gt;[.Q73]" office:value-type="boolean" office:boolean-value="true" calcext:value-type="boolean">
            <text:p>ІСТИНА</text:p>
          </table:table-cell>
          <table:table-cell table:style-name="ce1" table:formula="of:=MAX([.V73];[.Q73])" office:value-type="float" office:value="0.6948757" calcext:value-type="float">
            <text:p>6,95E-01</text:p>
          </table:table-cell>
          <table:table-cell table:style-name="ce4" table:formula="of:=[.X73]&gt;[.R73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3]&gt;[.C73]" office:value-type="boolean" office:boolean-value="false" calcext:value-type="boolean">
            <text:p>БРЕХНЯ</text:p>
          </table:table-cell>
          <table:table-cell table:style-name="ce4" table:formula="of:=[.F73]&gt;[.D73]" office:value-type="boolean" office:boolean-value="true" calcext:value-type="boolean">
            <text:p>ІСТИНА</text:p>
          </table:table-cell>
          <table:table-cell table:style-name="ce4" table:formula="of:=[.G73]&gt;MAX([.C73];[.E73])" office:value-type="boolean" office:boolean-value="false" calcext:value-type="boolean">
            <text:p>БРЕХНЯ</text:p>
          </table:table-cell>
          <table:table-cell table:style-name="ce4" table:formula="of:=[.H73]&gt;MAX([.D73];[.F73])" office:value-type="boolean" office:boolean-value="true" calcext:value-type="boolean">
            <text:p>ІСТИНА</text:p>
          </table:table-cell>
          <table:table-cell table:style-name="ce4" table:formula="of:=[.I73]&gt;MAX([.C73];[.E73];[.G73])" office:value-type="boolean" office:boolean-value="true" calcext:value-type="boolean">
            <text:p>ІСТИНА</text:p>
          </table:table-cell>
          <table:table-cell table:style-name="ce4" table:formula="of:=[.J73]&gt;MAX([.D73];[.F73];[.H73])" office:value-type="boolean" office:boolean-value="true" calcext:value-type="boolean">
            <text:p>ІСТИНА</text:p>
          </table:table-cell>
          <table:table-cell table:style-name="ce4" table:formula="of:=[.K73]&gt;MAX([.C73];[.E73];[.G73];[.I73])" office:value-type="boolean" office:boolean-value="false" calcext:value-type="boolean">
            <text:p>БРЕХНЯ</text:p>
          </table:table-cell>
          <table:table-cell table:style-name="ce4" table:formula="of:=[.L73]&gt;MAX([.D73];[.F73];[.H73];[.J73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73]&gt;0.9" office:value-type="boolean" office:boolean-value="false" calcext:value-type="boolean">
            <text:p>БРЕХНЯ</text:p>
          </table:table-cell>
          <table:table-cell table:style-name="ce4" table:formula="of:=[.R73]&gt;0.9" office:value-type="boolean" office:boolean-value="true" calcext:value-type="boolean">
            <text:p>ІСТИНА</text:p>
          </table:table-cell>
          <table:table-cell table:style-name="ce4" table:formula="of:=[.X73]&gt;0.8" office:value-type="boolean" office:boolean-value="false" calcext:value-type="boolean">
            <text:p>БРЕХНЯ</text:p>
          </table:table-cell>
          <table:table-cell table:style-name="ce4" table:formula="of:=[.R73]&gt;0.8" office:value-type="boolean" office:boolean-value="true" calcext:value-type="boolean">
            <text:p>ІСТИНА</text:p>
          </table:table-cell>
          <table:table-cell table:style-name="ce4" table:formula="of:=[.X73]&gt;0.7" office:value-type="boolean" office:boolean-value="false" calcext:value-type="boolean">
            <text:p>БРЕХНЯ</text:p>
          </table:table-cell>
          <table:table-cell table:style-name="ce4" table:formula="of:=[.R73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-0.1250045" calcext:value-type="float">
            <text:p>-1,25E-01</text:p>
          </table:table-cell>
          <table:table-cell table:style-name="ce1" office:value-type="float" office:value="0.227731" calcext:value-type="float">
            <text:p>2,28E-01</text:p>
          </table:table-cell>
          <table:table-cell table:style-name="ce1" office:value-type="float" office:value="-0.1795161" calcext:value-type="float">
            <text:p>-1,80E-01</text:p>
          </table:table-cell>
          <table:table-cell table:style-name="ce1" office:value-type="float" office:value="0.09278686" calcext:value-type="float">
            <text:p>9,28E-02</text:p>
          </table:table-cell>
          <table:table-cell table:style-name="ce1" office:value-type="float" office:value="-0.06438592" calcext:value-type="float">
            <text:p>-6,44E-02</text:p>
          </table:table-cell>
          <table:table-cell table:style-name="ce1" office:value-type="float" office:value="0.08753968" calcext:value-type="float">
            <text:p>8,75E-02</text:p>
          </table:table-cell>
          <table:table-cell table:style-name="ce1" office:value-type="float" office:value="-0.03671228" calcext:value-type="float">
            <text:p>-3,67E-02</text:p>
          </table:table-cell>
          <table:table-cell table:style-name="ce1" office:value-type="float" office:value="0.2907787" calcext:value-type="float">
            <text:p>2,91E-01</text:p>
          </table:table-cell>
          <table:table-cell table:style-name="ce1" office:value-type="float" office:value="-0.185341" calcext:value-type="float">
            <text:p>-1,85E-01</text:p>
          </table:table-cell>
          <table:table-cell table:style-name="ce1" office:value-type="float" office:value="0.1849281" calcext:value-type="float">
            <text:p>1,85E-01</text:p>
          </table:table-cell>
          <table:table-cell/>
          <table:table-cell table:style-name="ce1" table:formula="of:=MAX([.C74];[.E74];[.G74];[.I74];[.K74])" office:value-type="float" office:value="-0.03671228" calcext:value-type="float">
            <text:p>-3,67E-02</text:p>
          </table:table-cell>
          <table:table-cell table:style-name="ce8" table:formula="of:=MAX([.D74];[.F74];[.H74];[.J74];[.L74])" office:value-type="float" office:value="0.2907787" calcext:value-type="float">
            <text:p>2,91E-01</text:p>
          </table:table-cell>
          <table:table-cell table:style-name="ce2"/>
          <table:table-cell table:style-name="ce1" office:value-type="float" office:value="0.4972609" calcext:value-type="float">
            <text:p>4,97E-01</text:p>
          </table:table-cell>
          <table:table-cell table:style-name="ce1" office:value-type="float" office:value="0.6553812" calcext:value-type="float">
            <text:p>6,55E-01</text:p>
          </table:table-cell>
          <table:table-cell table:style-name="ce4" table:formula="of:=[.Q74]&gt;[.N74]" office:value-type="boolean" office:boolean-value="true" calcext:value-type="boolean">
            <text:p>ІСТИНА</text:p>
          </table:table-cell>
          <table:table-cell table:style-name="ce4" table:formula="of:=[.R74]&gt;[.O74]" office:value-type="boolean" office:boolean-value="true" calcext:value-type="boolean">
            <text:p>ІСТИНА</text:p>
          </table:table-cell>
          <table:table-cell/>
          <table:table-cell table:style-name="ce1" office:value-type="float" office:value="0.622264" calcext:value-type="float">
            <text:p>6,22E-01</text:p>
          </table:table-cell>
          <table:table-cell table:style-name="ce4" table:formula="of:=[.V74]&gt;[.Q74]" office:value-type="boolean" office:boolean-value="true" calcext:value-type="boolean">
            <text:p>ІСТИНА</text:p>
          </table:table-cell>
          <table:table-cell table:style-name="ce1" table:formula="of:=MAX([.V74];[.Q74])" office:value-type="float" office:value="0.622264" calcext:value-type="float">
            <text:p>6,22E-01</text:p>
          </table:table-cell>
          <table:table-cell table:style-name="ce4" table:formula="of:=[.X74]&gt;[.R74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4]&gt;[.C74]" office:value-type="boolean" office:boolean-value="false" calcext:value-type="boolean">
            <text:p>БРЕХНЯ</text:p>
          </table:table-cell>
          <table:table-cell table:style-name="ce4" table:formula="of:=[.F74]&gt;[.D74]" office:value-type="boolean" office:boolean-value="false" calcext:value-type="boolean">
            <text:p>БРЕХНЯ</text:p>
          </table:table-cell>
          <table:table-cell table:style-name="ce4" table:formula="of:=[.G74]&gt;MAX([.C74];[.E74])" office:value-type="boolean" office:boolean-value="true" calcext:value-type="boolean">
            <text:p>ІСТИНА</text:p>
          </table:table-cell>
          <table:table-cell table:style-name="ce4" table:formula="of:=[.H74]&gt;MAX([.D74];[.F74])" office:value-type="boolean" office:boolean-value="false" calcext:value-type="boolean">
            <text:p>БРЕХНЯ</text:p>
          </table:table-cell>
          <table:table-cell table:style-name="ce4" table:formula="of:=[.I74]&gt;MAX([.C74];[.E74];[.G74])" office:value-type="boolean" office:boolean-value="true" calcext:value-type="boolean">
            <text:p>ІСТИНА</text:p>
          </table:table-cell>
          <table:table-cell table:style-name="ce4" table:formula="of:=[.J74]&gt;MAX([.D74];[.F74];[.H74])" office:value-type="boolean" office:boolean-value="true" calcext:value-type="boolean">
            <text:p>ІСТИНА</text:p>
          </table:table-cell>
          <table:table-cell table:style-name="ce4" table:formula="of:=[.K74]&gt;MAX([.C74];[.E74];[.G74];[.I74])" office:value-type="boolean" office:boolean-value="false" calcext:value-type="boolean">
            <text:p>БРЕХНЯ</text:p>
          </table:table-cell>
          <table:table-cell table:style-name="ce4" table:formula="of:=[.L74]&gt;MAX([.D74];[.F74];[.H74];[.J74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4]&gt;0.9" office:value-type="boolean" office:boolean-value="false" calcext:value-type="boolean">
            <text:p>БРЕХНЯ</text:p>
          </table:table-cell>
          <table:table-cell table:style-name="ce4" table:formula="of:=[.R74]&gt;0.9" office:value-type="boolean" office:boolean-value="false" calcext:value-type="boolean">
            <text:p>БРЕХНЯ</text:p>
          </table:table-cell>
          <table:table-cell table:style-name="ce4" table:formula="of:=[.X74]&gt;0.8" office:value-type="boolean" office:boolean-value="false" calcext:value-type="boolean">
            <text:p>БРЕХНЯ</text:p>
          </table:table-cell>
          <table:table-cell table:style-name="ce4" table:formula="of:=[.R74]&gt;0.8" office:value-type="boolean" office:boolean-value="false" calcext:value-type="boolean">
            <text:p>БРЕХНЯ</text:p>
          </table:table-cell>
          <table:table-cell table:style-name="ce4" table:formula="of:=[.X74]&gt;0.7" office:value-type="boolean" office:boolean-value="false" calcext:value-type="boolean">
            <text:p>БРЕХНЯ</text:p>
          </table:table-cell>
          <table:table-cell table:style-name="ce4" table:formula="of:=[.R74]&gt;0.7" office:value-type="boolean" office:boolean-value="false" calcext:value-type="boolean">
            <text:p>БРЕХН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0.5796869" calcext:value-type="float">
            <text:p>5,80E-01</text:p>
          </table:table-cell>
          <table:table-cell table:style-name="ce1" office:value-type="float" office:value="0.7230392" calcext:value-type="float">
            <text:p>7,23E-01</text:p>
          </table:table-cell>
          <table:table-cell table:style-name="ce1" office:value-type="float" office:value="0.6566519" calcext:value-type="float">
            <text:p>6,57E-01</text:p>
          </table:table-cell>
          <table:table-cell table:style-name="ce1" office:value-type="float" office:value="0.8230986" calcext:value-type="float">
            <text:p>8,23E-01</text:p>
          </table:table-cell>
          <table:table-cell table:style-name="ce1" office:value-type="float" office:value="0.654483" calcext:value-type="float">
            <text:p>6,54E-01</text:p>
          </table:table-cell>
          <table:table-cell table:style-name="ce1" office:value-type="float" office:value="0.7331239" calcext:value-type="float">
            <text:p>7,33E-01</text:p>
          </table:table-cell>
          <table:table-cell table:style-name="ce1" office:value-type="float" office:value="0.6503599" calcext:value-type="float">
            <text:p>6,50E-01</text:p>
          </table:table-cell>
          <table:table-cell table:style-name="ce1" office:value-type="float" office:value="0.782046" calcext:value-type="float">
            <text:p>7,82E-01</text:p>
          </table:table-cell>
          <table:table-cell table:style-name="ce1" office:value-type="float" office:value="0.6330118" calcext:value-type="float">
            <text:p>6,33E-01</text:p>
          </table:table-cell>
          <table:table-cell table:style-name="ce1" office:value-type="float" office:value="0.8255135" calcext:value-type="float">
            <text:p>8,26E-01</text:p>
          </table:table-cell>
          <table:table-cell/>
          <table:table-cell table:style-name="ce1" table:formula="of:=MAX([.C75];[.E75];[.G75];[.I75];[.K75])" office:value-type="float" office:value="0.6566519" calcext:value-type="float">
            <text:p>6,57E-01</text:p>
          </table:table-cell>
          <table:table-cell table:style-name="ce8" table:formula="of:=MAX([.D75];[.F75];[.H75];[.J75];[.L75])" office:value-type="float" office:value="0.8255135" calcext:value-type="float">
            <text:p>8,26E-01</text:p>
          </table:table-cell>
          <table:table-cell table:style-name="ce1"/>
          <table:table-cell table:style-name="ce1" office:value-type="float" office:value="0.7318139" calcext:value-type="float">
            <text:p>7,32E-01</text:p>
          </table:table-cell>
          <table:table-cell table:style-name="ce1" office:value-type="float" office:value="0.8255135" calcext:value-type="float">
            <text:p>8,26E-01</text:p>
          </table:table-cell>
          <table:table-cell table:style-name="ce4" table:formula="of:=[.Q75]&gt;[.N75]" office:value-type="boolean" office:boolean-value="true" calcext:value-type="boolean">
            <text:p>ІСТИНА</text:p>
          </table:table-cell>
          <table:table-cell table:style-name="ce4" table:formula="of:=[.R75]&gt;[.O75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318139" calcext:value-type="float">
            <text:p>7,32E-01</text:p>
          </table:table-cell>
          <table:table-cell table:style-name="ce4" table:formula="of:=[.V75]&gt;[.Q75]" office:value-type="boolean" office:boolean-value="false" calcext:value-type="boolean">
            <text:p>БРЕХНЯ</text:p>
          </table:table-cell>
          <table:table-cell table:style-name="ce1" table:formula="of:=MAX([.V75];[.Q75])" office:value-type="float" office:value="0.7318139" calcext:value-type="float">
            <text:p>7,32E-01</text:p>
          </table:table-cell>
          <table:table-cell table:style-name="ce4" table:formula="of:=[.X75]&gt;[.R75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5]&gt;[.C75]" office:value-type="boolean" office:boolean-value="true" calcext:value-type="boolean">
            <text:p>ІСТИНА</text:p>
          </table:table-cell>
          <table:table-cell table:style-name="ce4" table:formula="of:=[.F75]&gt;[.D75]" office:value-type="boolean" office:boolean-value="true" calcext:value-type="boolean">
            <text:p>ІСТИНА</text:p>
          </table:table-cell>
          <table:table-cell table:style-name="ce4" table:formula="of:=[.G75]&gt;MAX([.C75];[.E75])" office:value-type="boolean" office:boolean-value="false" calcext:value-type="boolean">
            <text:p>БРЕХНЯ</text:p>
          </table:table-cell>
          <table:table-cell table:style-name="ce4" table:formula="of:=[.H75]&gt;MAX([.D75];[.F75])" office:value-type="boolean" office:boolean-value="false" calcext:value-type="boolean">
            <text:p>БРЕХНЯ</text:p>
          </table:table-cell>
          <table:table-cell table:style-name="ce4" table:formula="of:=[.I75]&gt;MAX([.C75];[.E75];[.G75])" office:value-type="boolean" office:boolean-value="false" calcext:value-type="boolean">
            <text:p>БРЕХНЯ</text:p>
          </table:table-cell>
          <table:table-cell table:style-name="ce4" table:formula="of:=[.J75]&gt;MAX([.D75];[.F75];[.H75])" office:value-type="boolean" office:boolean-value="false" calcext:value-type="boolean">
            <text:p>БРЕХНЯ</text:p>
          </table:table-cell>
          <table:table-cell table:style-name="ce4" table:formula="of:=[.K75]&gt;MAX([.C75];[.E75];[.G75];[.I75])" office:value-type="boolean" office:boolean-value="false" calcext:value-type="boolean">
            <text:p>БРЕХНЯ</text:p>
          </table:table-cell>
          <table:table-cell table:style-name="ce4" table:formula="of:=[.L75]&gt;MAX([.D75];[.F75];[.H75];[.J75])" office:value-type="boolean" office:boolean-value="true" calcext:value-type="boolean">
            <text:p>ІСТИНА</text:p>
          </table:table-cell>
          <table:table-cell table:style-name="ce4"/>
          <table:table-cell table:style-name="ce4" table:formula="of:=[.X75]&gt;0.9" office:value-type="boolean" office:boolean-value="false" calcext:value-type="boolean">
            <text:p>БРЕХНЯ</text:p>
          </table:table-cell>
          <table:table-cell table:style-name="ce4" table:formula="of:=[.R75]&gt;0.9" office:value-type="boolean" office:boolean-value="false" calcext:value-type="boolean">
            <text:p>БРЕХНЯ</text:p>
          </table:table-cell>
          <table:table-cell table:style-name="ce4" table:formula="of:=[.X75]&gt;0.8" office:value-type="boolean" office:boolean-value="false" calcext:value-type="boolean">
            <text:p>БРЕХНЯ</text:p>
          </table:table-cell>
          <table:table-cell table:style-name="ce4" table:formula="of:=[.R75]&gt;0.8" office:value-type="boolean" office:boolean-value="true" calcext:value-type="boolean">
            <text:p>ІСТИНА</text:p>
          </table:table-cell>
          <table:table-cell table:style-name="ce4" table:formula="of:=[.X75]&gt;0.7" office:value-type="boolean" office:boolean-value="true" calcext:value-type="boolean">
            <text:p>ІСТИНА</text:p>
          </table:table-cell>
          <table:table-cell table:style-name="ce4" table:formula="of:=[.R75]&gt;0.7" office:value-type="boolean" office:boolean-value="true" calcext:value-type="boolean">
            <text:p>І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7204631" calcext:value-type="float">
            <text:p>7,20E-01</text:p>
          </table:table-cell>
          <table:table-cell table:style-name="ce1" office:value-type="float" office:value="0.7499377" calcext:value-type="float">
            <text:p>7,50E-01</text:p>
          </table:table-cell>
          <table:table-cell table:style-name="ce1" office:value-type="float" office:value="0.6964989" calcext:value-type="float">
            <text:p>6,96E-01</text:p>
          </table:table-cell>
          <table:table-cell table:style-name="ce1" office:value-type="float" office:value="0.7513897" calcext:value-type="float">
            <text:p>7,51E-01</text:p>
          </table:table-cell>
          <table:table-cell table:style-name="ce1" office:value-type="float" office:value="0.7001557" calcext:value-type="float">
            <text:p>7,00E-01</text:p>
          </table:table-cell>
          <table:table-cell table:style-name="ce1" office:value-type="float" office:value="0.8053524" calcext:value-type="float">
            <text:p>8,05E-01</text:p>
          </table:table-cell>
          <table:table-cell table:style-name="ce1" office:value-type="float" office:value="0.6000133" calcext:value-type="float">
            <text:p>6,00E-01</text:p>
          </table:table-cell>
          <table:table-cell table:style-name="ce1" office:value-type="float" office:value="0.7998004" calcext:value-type="float">
            <text:p>8,00E-01</text:p>
          </table:table-cell>
          <table:table-cell table:style-name="ce1" office:value-type="float" office:value="0.5561694" calcext:value-type="float">
            <text:p>5,56E-01</text:p>
          </table:table-cell>
          <table:table-cell table:style-name="ce1" office:value-type="float" office:value="0.7919761" calcext:value-type="float">
            <text:p>7,92E-01</text:p>
          </table:table-cell>
          <table:table-cell/>
          <table:table-cell table:style-name="ce1" table:formula="of:=MAX([.C76];[.E76];[.G76];[.I76];[.K76])" office:value-type="float" office:value="0.7204631" calcext:value-type="float">
            <text:p>7,20E-01</text:p>
          </table:table-cell>
          <table:table-cell table:style-name="ce8" table:formula="of:=MAX([.D76];[.F76];[.H76];[.J76];[.L76])" office:value-type="float" office:value="0.8053524" calcext:value-type="float">
            <text:p>8,05E-01</text:p>
          </table:table-cell>
          <table:table-cell table:style-name="ce1"/>
          <table:table-cell table:style-name="ce1" office:value-type="float" office:value="0.7489262" calcext:value-type="float">
            <text:p>7,49E-01</text:p>
          </table:table-cell>
          <table:table-cell table:style-name="ce1" office:value-type="float" office:value="0.8053524" calcext:value-type="float">
            <text:p>8,05E-01</text:p>
          </table:table-cell>
          <table:table-cell table:style-name="ce4" table:formula="of:=[.Q76]&gt;[.N76]" office:value-type="boolean" office:boolean-value="true" calcext:value-type="boolean">
            <text:p>ІСТИНА</text:p>
          </table:table-cell>
          <table:table-cell table:style-name="ce4" table:formula="of:=[.R76]&gt;[.O76]" office:value-type="boolean" office:boolean-value="false" calcext:value-type="boolean">
            <text:p>БРЕХНЯ</text:p>
          </table:table-cell>
          <table:table-cell/>
          <table:table-cell table:style-name="ce1" office:value-type="float" office:value="0.7489262" calcext:value-type="float">
            <text:p>7,49E-01</text:p>
          </table:table-cell>
          <table:table-cell table:style-name="ce4" table:formula="of:=[.V76]&gt;[.Q76]" office:value-type="boolean" office:boolean-value="false" calcext:value-type="boolean">
            <text:p>БРЕХНЯ</text:p>
          </table:table-cell>
          <table:table-cell table:style-name="ce1" table:formula="of:=MAX([.V76];[.Q76])" office:value-type="float" office:value="0.7489262" calcext:value-type="float">
            <text:p>7,49E-01</text:p>
          </table:table-cell>
          <table:table-cell table:style-name="ce4" table:formula="of:=[.X76]&gt;[.R76]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E76]&gt;[.C76]" office:value-type="boolean" office:boolean-value="false" calcext:value-type="boolean">
            <text:p>БРЕХНЯ</text:p>
          </table:table-cell>
          <table:table-cell table:style-name="ce4" table:formula="of:=[.F76]&gt;[.D76]" office:value-type="boolean" office:boolean-value="true" calcext:value-type="boolean">
            <text:p>ІСТИНА</text:p>
          </table:table-cell>
          <table:table-cell table:style-name="ce4" table:formula="of:=[.G76]&gt;MAX([.C76];[.E76])" office:value-type="boolean" office:boolean-value="false" calcext:value-type="boolean">
            <text:p>БРЕХНЯ</text:p>
          </table:table-cell>
          <table:table-cell table:style-name="ce4" table:formula="of:=[.H76]&gt;MAX([.D76];[.F76])" office:value-type="boolean" office:boolean-value="true" calcext:value-type="boolean">
            <text:p>ІСТИНА</text:p>
          </table:table-cell>
          <table:table-cell table:style-name="ce4" table:formula="of:=[.I76]&gt;MAX([.C76];[.E76];[.G76])" office:value-type="boolean" office:boolean-value="false" calcext:value-type="boolean">
            <text:p>БРЕХНЯ</text:p>
          </table:table-cell>
          <table:table-cell table:style-name="ce4" table:formula="of:=[.J76]&gt;MAX([.D76];[.F76];[.H76])" office:value-type="boolean" office:boolean-value="false" calcext:value-type="boolean">
            <text:p>БРЕХНЯ</text:p>
          </table:table-cell>
          <table:table-cell table:style-name="ce4" table:formula="of:=[.K76]&gt;MAX([.C76];[.E76];[.G76];[.I76])" office:value-type="boolean" office:boolean-value="false" calcext:value-type="boolean">
            <text:p>БРЕХНЯ</text:p>
          </table:table-cell>
          <table:table-cell table:style-name="ce4" table:formula="of:=[.L76]&gt;MAX([.D76];[.F76];[.H76];[.J76])" office:value-type="boolean" office:boolean-value="false" calcext:value-type="boolean">
            <text:p>БРЕХНЯ</text:p>
          </table:table-cell>
          <table:table-cell table:style-name="ce4"/>
          <table:table-cell table:style-name="ce4" table:formula="of:=[.X76]&gt;0.9" office:value-type="boolean" office:boolean-value="false" calcext:value-type="boolean">
            <text:p>БРЕХНЯ</text:p>
          </table:table-cell>
          <table:table-cell table:style-name="ce4" table:formula="of:=[.R76]&gt;0.9" office:value-type="boolean" office:boolean-value="false" calcext:value-type="boolean">
            <text:p>БРЕХНЯ</text:p>
          </table:table-cell>
          <table:table-cell table:style-name="ce4" table:formula="of:=[.X76]&gt;0.8" office:value-type="boolean" office:boolean-value="false" calcext:value-type="boolean">
            <text:p>БРЕХНЯ</text:p>
          </table:table-cell>
          <table:table-cell table:style-name="ce4" table:formula="of:=[.R76]&gt;0.8" office:value-type="boolean" office:boolean-value="true" calcext:value-type="boolean">
            <text:p>ІСТИНА</text:p>
          </table:table-cell>
          <table:table-cell table:style-name="ce4" table:formula="of:=[.X76]&gt;0.7" office:value-type="boolean" office:boolean-value="true" calcext:value-type="boolean">
            <text:p>ІСТИНА</text:p>
          </table:table-cell>
          <table:table-cell table:style-name="ce4" table:formula="of:=[.R76]&gt;0.7" office:value-type="boolean" office:boolean-value="true" calcext:value-type="boolean">
            <text:p>ІСТИНА</text:p>
          </table:table-cell>
        </table:table-row>
        <table:table-row table:style-name="ro1" table:number-rows-repeated="1048499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 style:data-style-name="N2" text:time-value="20:48:03.513927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21:22:45.096141662</meta:creation-date>
    <dc:date>2026-03-23T20:49:11.040559480</dc:date>
    <meta:editing-duration>PT5H57M37S</meta:editing-duration>
    <meta:editing-cycles>48</meta:editing-cycles>
    <meta:generator>LibreOffice/25.8.2.2$Linux_X86_64 LibreOffice_project/d401f2107ccab8f924a8e2df40f573aab7605b6f</meta:generator>
    <meta:document-statistic meta:table-count="1" meta:cell-count="2698" meta:object-count="0"/>
  </office:meta>
</office:document-meta>
</file>